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8.17cm"/>
    </style:style>
    <style:style style:name="co5" style:family="table-column">
      <style:table-column-properties fo:break-before="auto" style:column-width="0.339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8.698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4.106cm"/>
    </style:style>
    <style:style style:name="co14" style:family="table-column">
      <style:table-column-properties fo:break-before="auto" style:column-width="3.958cm"/>
    </style:style>
    <style:style style:name="co15" style:family="table-column">
      <style:table-column-properties fo:break-before="auto" style:column-width="2.794cm"/>
    </style:style>
    <style:style style:name="co16" style:family="table-column">
      <style:table-column-properties fo:break-before="auto" style:column-width="17.59cm"/>
    </style:style>
    <style:style style:name="co17" style:family="table-column">
      <style:table-column-properties fo:break-before="auto" style:column-width="3.408cm"/>
    </style:style>
    <style:style style:name="co18" style:family="table-column">
      <style:table-column-properties fo:break-before="auto" style:column-width="0.445cm"/>
    </style:style>
    <style:style style:name="co19" style:family="table-column">
      <style:table-column-properties fo:break-before="auto" style:column-width="9.88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43" table:default-cell-style-name="ce4"/>
        <table:table-column table:style-name="co21" table:number-columns-repeated="16320"/>
        <table:table-row table:style-name="ro1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2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3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3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3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3|knows_ironflesh_6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leather_gloves_good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leather_gloves_reinf, itm_mail_mittens, 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leather_gloves_reinf, itm_mail_mittens, 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number-columns-repeated="5"/>
          <table:table-cell table:style-name="ce6"/>
          <table:table-cell table:number-columns-repeated="58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42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itm_dun_helm_d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itm_dunnish_axe_bad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_helm_d_bad,itm_dunland_tunic_1_bad, itm_dunland_tunic_2_bad, itm_dunland_fur_1_bad, itm_dunland_fur_2_bad,itm_dunland_wolfboots,itm_wood_club,itm_orc_slasher,itm_orc_axe,itm_dunland_spear,itm_dunnish_axe_bad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itm_dun_helm_d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xe,itm_wood_club,itm_dunland_spear, itm_dunnish_war_axe_bad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_helm_d,itm_dunland_tunic_1, itm_dunland_tunic_2, itm_dunland_fur_1,itm_dunland_fur_2,itm_dunland_wolfboots,itm_dunnish_axe,itm_wood_club,itm_dunland_spear, itm_dunnish_war_axe_bad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_helm_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itm_dun_helm_d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_helm_d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twohand_wood_club,itm_dunland_spear,itm_dunnish_long_axe_bad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twohand_wood_club,itm_dunland_spear,itm_dunnish_long_axe_bad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itm_dun_helm_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_heavy,itm_dunnish_war_axe,itm_dunland_javelin,itm_dunland_javelin,itm_dunland_javelin,itm_dunnish_long_axe_bad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_helm_d,itm_dunland_tunic_1_good, itm_dunland_tunic_2_good, itm_dunland_fur_1_good, itm_dunland_fur_2_good,itm_leather_gloves,itm_dunland_wolfboots,itm_leather_boots_dark_bad,itm_dunnish_axe_heavy,itm_dunnish_war_axe,itm_dunland_javelin,itm_dunland_javelin,itm_dunland_javelin,itm_dunnish_long_axe_bad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bad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_shortsword,itm_dunland_javelin,itm_dunland_javelin,itm_dunland_javelin,itm_dunnish_long_axe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_bad,itm_dunland_mail_1_bad, itm_dunland_mail_2_bad,itm_leather_gloves,itm_dunland_wolfboots,itm_leather_boots_dark,itm_dunnish_axe_heavy,itm_dunnish_war_axe,itm_dun_shortsword,itm_dunland_javelin,itm_dunland_javelin,itm_dunland_javelin,itm_dunnish_long_axe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good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_heavy,itm_dun_berserker,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_good,itm_dunland_mail_1_good, itm_dunland_mail_2_good,itm_leather_gloves,itm_fur_gloves_reward,itm_dunland_wolfboots,itm_leather_boots_dark,itm_dunnish_war_axe_heavy,itm_dun_berserker,itm_dunnish_long_axe_heavy,itm_dun_shield_a,],attr_evil_tier_5,wp_tier_5,knows_common|knows_athletics_6|knows_shield_5|knows_power_strike_4|knows_ironflesh_6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_bad,itm_dunland_javelin_big,itm_dunland_javelin_big,itm_dunnish_antler_axe,itm_dunnish_long_axe,itm_dunland_spear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_bad,itm_dunland_javelin_big,itm_dunland_javelin_big,itm_dunnish_antler_axe,itm_dunnish_long_axe,itm_dunland_spear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2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dun_retainer</text:p>
          </table:table-cell>
          <table:table-cell table:style-name="ce7" office:value-type="string" calcext:value-type="string">
            <text:p>Dunnish_Retainer</text:p>
          </table:table-cell>
          <table:table-cell table:style-name="ce7" office:value-type="string" calcext:value-type="string">
            <text:p>Dunnish_Retainers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_good,itm_dun_helm_c,</text:p>
          </table:table-cell>
          <table:table-cell table:style-name="ce11" office:value-type="string" calcext:value-type="string">
            <text:p>itm_dunland_chieftain, itm_dunland_mail_2_good, itm_dunland_mail_2_good,</text:p>
          </table:table-cell>
          <table:table-cell table:style-name="ce11" office:value-type="string" calcext:value-type="string">
            <text:p>itm_evil_gauntlets_a_good,itm_orc_mittens, 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nish_antler_axe, itm_dun_berserker_heavy, itm_dunnish_long_axe_heavy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5|knows_power_strike_6|knows_ironflesh_8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6_dun_retainer&quot;,&quot;Dunnish_Retainer&quot;,&quot;Dunnish_Retainers&quot;,tf_dunland| tf_randomize_face| tfg_armor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],attr_evil_tier_6,wp_tier_6,knows_common|knows_athletics_5|knows_shield_5|knows_power_strike_6|knows_ironflesh_8|knows_power_throw_7,dunland_face1,dunland_face2]," calcext:value-type="string">
            <text:p>["i6_dun_retainer","Dunnish_Retainer","Dunnish_Retainers",tf_dunland| tf_randomize_face| tfg_armor| tfg_helm| tfg_boots,0,0,fac_dunland,[itm_dun_helm_a_good,itm_dun_helm_c,itm_dunland_chieftain, itm_dunland_mail_2_good, itm_dunland_mail_2_good,itm_evil_gauntlets_a_good,itm_orc_mittens, itm_splinted_greaves,itm_leather_boots_dark,itm_dunnish_antler_axe, itm_dun_berserker_heavy, itm_dunnish_long_axe_heavy,itm_dun_shield_a,],attr_evil_tier_6,wp_tier_6,knows_common|knows_athletics_5|knows_shield_5|knows_power_strike_6|knows_ironflesh_8|knows_power_throw_7,dunland_face1,dunland_face2],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_heavy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_heavy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1"/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#KHAND" calcext:value-type="string">
            <text:p>#KHAND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#UMBAR #CORSAIRS" calcext:value-type="string">
            <text:p>#UMBAR #CORSAIR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, itm_umb_armor_a_cloak,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b_good,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bad, 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bad, itm_umb_armor_c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e_bad, itm_umb_armor_e_cloak, itm_umb_armor_e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 <text:s/>itm_umb_armor_c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f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,itm_hood_black_good,</text:p>
          </table:table-cell>
          <table:table-cell table:style-name="ce11"/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e, itm_umb_armor_e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 itm_umb_armor_f, itm_umb_armor_f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44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mittens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1"/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#ISENGARD Uruk-hai" calcext:value-type="string">
            <text:p>#ISENGARD Uruk-hai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orc_mittens_good,itm_uruk_chain_greaves,itm_uruk_ragwrap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orc_mittens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 itm_orc_mittens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 itm_orc_mittens_good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 itm_orc_mittens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 itm_orc_mittens_good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orc_mittens_good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#MORDOR Uruks" calcext:value-type="string">
            <text:p>#MORDOR Uruk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orc_mittens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 itm_orc_mittens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 itm_orc_mittens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 itm_orc_mittens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 itm_orc_mittens_good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 itm_orc_mittens_good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 itm_orc_mittens_good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4"/>
          <table:table-cell table:style-name="ce42" table:number-columns-repeated="2"/>
          <table:table-cell table:style-name="ce6" table:number-columns-repeated="14"/>
          <table:table-cell table:style-name="ce42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#Trolls #Ents" calcext:value-type="string">
            <text:p>#Trolls #Ent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4"/>
          <table:table-cell table:style-name="ce42" table:number-columns-repeated="2"/>
          <table:table-cell table:style-name="ce6" table:number-columns-repeated="14"/>
          <table:table-cell table:style-name="ce42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DOL GULDUR Orcs" calcext:value-type="string">
            <text:p>#DOL GULDUR Orc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#MORDOR Orcs" calcext:value-type="string">
            <text:p>#MORDOR Orc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mittens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 itm_orc_mittens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office:value-type="string" calcext:value-type="string">
            <text:p>itm_orc_mittens_bad,</text:p>
          </table:table-cell>
          <table:table-cell table:style-name="ce11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mittens_bad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 itm_orc_mittens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 itm_orc_mittens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#Gundabad" calcext:value-type="string">
            <text:p>#Gundabad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 table:number-columns-repeated="2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/>
          <table:table-cell table:style-name="ce6" table:number-columns-repeated="19"/>
          <table:table-cell table:style-name="ce42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 itm_orc_mittens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 itm_orc_mittens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 itm_orc_mittens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 itm_orc_mittens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_good, itm_orc_mittens_good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_good, itm_orc_mittens_good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42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#Trolls  &amp; ents" calcext:value-type="string">
            <text:p>#Trolls <text:s/>&amp; ent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41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6" table:number-columns-repeated="20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##captains" calcext:value-type="string">
            <text:p>##captains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43"/>
          <table:table-cell table:style-name="ce42" table:number-columns-repeated="16320"/>
        </table:table-row>
        <table:table-row table:style-name="ro3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41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43"/>
          <table:table-cell table:style-name="ce42" table:number-columns-repeated="16320"/>
        </table:table-row>
        <table:table-row table:style-name="ro1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41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4]&lt;&gt;&quot;&quot;;[.B484]&lt;&gt;&quot;&quot;);CONCATENATE([Variables.$I$1];[Variables.$I$7];[.A484];[Variables.$I$7];[Variables.$I$6];[Variables.$I$7];[.B484];[Variables.$I$7];[Variables.$I$6];[Variables.$I$7];[.C484];[Variables.$I$7];[Variables.$I$6];[.D484];[Variables.$I$6];[.E484];[Variables.$I$6];[.F484];[Variables.$I$6];[.G484];[Variables.$I$6];[Variables.$I$1];[.H484];[.I484];[.J484];[.K484];[.L484];[.M484];[.N484];[Variables.$I$2];[Variables.$I$6];[.O484];[Variables.$I$6];[.P484];[Variables.$I$6];[.Q484];[Variables.$I$6];[.R484];[Variables.$I$6];[.S484];IF([.T484]&lt;&gt;&quot;&quot;;CONCATENATE([Variables.$I$6];[.T484]);&quot;&quot;);[Variables.$I$2];[Variables.$I$6]);IF([.A484]&lt;&gt;&quot;&quot;;CONCATENATE(&quot;#&quot;;[.A484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43"/>
          <table:table-cell table:style-name="ce42" table:number-columns-repeated="16320"/>
        </table:table-row>
        <table:table-row table:style-name="ro3">
          <table:table-cell table:style-name="ce42" table:number-columns-repeated="16384"/>
        </table:table-row>
        <table:table-row table:style-name="ro1" table:number-rows-repeated="12">
          <table:table-cell table:style-name="ce42" table:number-columns-repeated="16384"/>
        </table:table-row>
        <table:table-row table:style-name="ro1" table:number-rows-repeated="4">
          <table:table-cell table:number-columns-repeated="64"/>
          <table:table-cell table:style-name="ce42" table:number-columns-repeated="16320"/>
        </table:table-row>
        <table:table-row table:style-name="ro1" table:number-rows-repeated="543">
          <table:table-cell table:style-name="ce6" table:number-columns-repeated="21"/>
          <table:table-cell table:number-columns-repeated="43"/>
          <table:table-cell table:style-name="ce42" table:number-columns-repeated="16320"/>
        </table:table-row>
        <table:table-row table:style-name="ro4" table:number-rows-repeated="1047465">
          <table:table-cell table:number-columns-repeated="64"/>
          <table:table-cell table:style-name="ce42" table:number-columns-repeated="16320"/>
        </table:table-row>
        <table:table-row table:style-name="ro5" table:number-rows-repeated="66">
          <table:table-cell table:number-columns-repeated="64"/>
          <table:table-cell table:style-name="ce42" table:number-columns-repeated="16320"/>
        </table:table-row>
        <table:table-row table:style-name="ro5">
          <table:table-cell table:number-columns-repeated="64"/>
          <table:table-cell table:style-name="ce42" table:number-columns-repeated="16320"/>
        </table:table-row>
      </table:table>
      <table:table table:name="Variables" table:style-name="ta1">
        <table:table-column table:style-name="co20" table:number-columns-repeated="9" table:default-cell-style-name="ce42"/>
        <table:table-column table:style-name="co20" table:number-columns-repeated="55"/>
        <table:table-column table:style-name="co21" table:number-columns-repeated="16320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style-name="ce42"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style-name="ce42" table:number-columns-repeated="16375"/>
        </table:table-row>
        <table:table-row table:style-name="ro4">
          <table:table-cell table:number-columns-repeated="9"/>
          <table:table-cell table:style-name="ce42" table:number-columns-repeated="16375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8"/>
          <table:table-cell table:style-name="ce42" table:number-columns-repeated="16375"/>
        </table:table-row>
        <table:table-row table:style-name="ro4" table:number-rows-repeated="1048566">
          <table:table-cell table:number-columns-repeated="9"/>
          <table:table-cell table:style-name="ce42" table:number-columns-repeated="16375"/>
        </table:table-row>
        <table:table-row table:style-name="ro4">
          <table:table-cell table:number-columns-repeated="9"/>
          <table:table-cell table:style-name="ce42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20:59:39.319874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initial-creator/>
    <meta:creation-date>2018-01-09T20:56:58Z</meta:creation-date>
    <dc:date>2026-03-03T21:14:59.146999000</dc:date>
    <meta:editing-cycles>654</meta:editing-cycles>
    <meta:editing-duration>PT15H49M28S</meta:editing-duration>
    <meta:document-statistic meta:table-count="2" meta:cell-count="7736" meta:object-count="0"/>
  </office:meta>
</office:document-meta>
</file>