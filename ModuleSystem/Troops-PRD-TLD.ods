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" svg:font-family="Cambria" style:font-family-generic="roman"/>
    <style:font-face style:name="Cambria1" svg:font-family="Cambria1"/>
    <style:font-face style:name="Cambria2" svg:font-family="Cambria2"/>
    <style:font-face style:name="Cambria3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96cm"/>
    </style:style>
    <style:style style:name="co2" style:family="table-column">
      <style:table-column-properties fo:break-before="auto" style:column-width="4.572cm"/>
    </style:style>
    <style:style style:name="co3" style:family="table-column">
      <style:table-column-properties fo:break-before="auto" style:column-width="3.874cm"/>
    </style:style>
    <style:style style:name="co4" style:family="table-column">
      <style:table-column-properties fo:break-before="auto" style:column-width="3.789cm"/>
    </style:style>
    <style:style style:name="co5" style:family="table-column">
      <style:table-column-properties fo:break-before="auto" style:column-width="8.17cm"/>
    </style:style>
    <style:style style:name="co6" style:family="table-column">
      <style:table-column-properties fo:break-before="auto" style:column-width="0.339cm"/>
    </style:style>
    <style:style style:name="co7" style:family="table-column">
      <style:table-column-properties fo:break-before="auto" style:column-width="0.471cm"/>
    </style:style>
    <style:style style:name="co8" style:family="table-column">
      <style:table-column-properties fo:break-before="auto" style:column-width="1.736cm"/>
    </style:style>
    <style:style style:name="co9" style:family="table-column">
      <style:table-column-properties fo:break-before="auto" style:column-width="7.303cm"/>
    </style:style>
    <style:style style:name="co10" style:family="table-column">
      <style:table-column-properties fo:break-before="auto" style:column-width="13.864cm"/>
    </style:style>
    <style:style style:name="co11" style:family="table-column">
      <style:table-column-properties fo:break-before="auto" style:column-width="3.09cm"/>
    </style:style>
    <style:style style:name="co12" style:family="table-column">
      <style:table-column-properties fo:break-before="auto" style:column-width="3.937cm"/>
    </style:style>
    <style:style style:name="co13" style:family="table-column">
      <style:table-column-properties fo:break-before="auto" style:column-width="8.7cm"/>
    </style:style>
    <style:style style:name="co14" style:family="table-column">
      <style:table-column-properties fo:break-before="auto" style:column-width="5.609cm"/>
    </style:style>
    <style:style style:name="co15" style:family="table-column">
      <style:table-column-properties fo:break-before="auto" style:column-width="4.106cm"/>
    </style:style>
    <style:style style:name="co16" style:family="table-column">
      <style:table-column-properties fo:break-before="auto" style:column-width="3.958cm"/>
    </style:style>
    <style:style style:name="co17" style:family="table-column">
      <style:table-column-properties fo:break-before="auto" style:column-width="2.794cm"/>
    </style:style>
    <style:style style:name="co18" style:family="table-column">
      <style:table-column-properties fo:break-before="auto" style:column-width="17.59cm"/>
    </style:style>
    <style:style style:name="co19" style:family="table-column">
      <style:table-column-properties fo:break-before="auto" style:column-width="3.408cm"/>
    </style:style>
    <style:style style:name="co20" style:family="table-column">
      <style:table-column-properties fo:break-before="auto" style:column-width="0.445cm"/>
    </style:style>
    <style:style style:name="co21" style:family="table-column">
      <style:table-column-properties fo:break-before="auto" style:column-width="9.885cm"/>
    </style:style>
    <style:style style:name="co22" style:family="table-column">
      <style:table-column-properties fo:break-before="auto" style:column-width="3.175cm"/>
    </style:style>
    <style:style style:name="co23" style:family="table-column">
      <style:table-column-properties fo:break-before="auto" style:column-width="2.371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76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0">
      <style:table-cell-properties fo:background-color="#00ffff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36" style:family="table-cell" style:parent-style-name="Default" style:data-style-name="N0"/>
    <style:style style:name="ce6" style:family="table-cell" style:parent-style-name="Default" style:data-style-name="N0">
      <style:table-cell-properties fo:border="0.06pt solid #000000"/>
      <style:text-properties style:font-name="Cambria1" fo:font-size="7pt" style:font-name-asian="Cambria1" style:font-size-asian="7pt" style:font-name-complex="Cambria1" style:font-size-complex="7pt"/>
    </style:style>
    <style:style style:name="ce3" style:family="table-cell" style:parent-style-name="Default" style:data-style-name="N0">
      <style:table-cell-properties fo:background-color="#ea9999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5" style:family="table-cell" style:parent-style-name="Default" style:data-style-name="N0">
      <style:table-cell-properties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7" style:family="table-cell" style:parent-style-name="Default" style:data-style-name="N0">
      <style:table-cell-properties fo:background-color="#d9ead3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21" style:family="table-cell" style:parent-style-name="Default" style:data-style-name="N0">
      <style:table-cell-properties fo:background-color="#ffffff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4" style:family="table-cell" style:parent-style-name="Default" style:data-style-name="N0">
      <style:table-cell-properties fo:border="0.06pt solid #000000"/>
    </style:style>
    <style:style style:name="ce17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cm"/>
      <style:text-properties style:font-name="Cambria1" fo:font-size="7pt" style:font-name-asian="Cambria1" style:font-size-asian="7pt" style:font-name-complex="Cambria1" style:font-size-complex="7pt"/>
    </style:style>
    <style:style style:name="ce8" style:family="table-cell" style:parent-style-name="Default" style:data-style-name="N0">
      <style:table-cell-properties fo:background-color="#b4a7d6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9" style:family="table-cell" style:parent-style-name="Default" style:data-style-name="N0">
      <style:table-cell-properties fo:background-color="#f9cb9c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10" style:family="table-cell" style:parent-style-name="Default" style:data-style-name="N0">
      <style:table-cell-properties fo:background-color="#a2c4c9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11" style:family="table-cell" style:parent-style-name="Default" style:data-style-name="N0">
      <style:table-cell-properties fo:background-color="#b6d7a8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19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5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31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26" style:family="table-cell" style:parent-style-name="Default" style:data-style-name="N0">
      <style:table-cell-properties fo:background-color="#b6d7a8" fo:border="0.06pt solid #000000" style:vertical-align="middle"/>
      <style:text-properties style:font-name="Cambria1" fo:font-size="7pt" style:font-name-asian="Cambria1" style:font-size-asian="7pt" style:font-name-complex="Cambria1" style:font-size-complex="7pt"/>
    </style:style>
    <style:style style:name="ce16" style:family="table-cell" style:parent-style-name="Default" style:data-style-name="N0">
      <style:table-cell-properties fo:background-color="#b6d7a8" fo:border="0.06pt solid #000000"/>
      <style:text-properties style:font-name="Cambria1" fo:font-size="7pt" style:font-name-asian="Cambria1" style:font-size-asian="7pt" style:font-name-complex="Cambria1" style:font-size-complex="7pt"/>
    </style:style>
    <style:style style:name="ce18" style:family="table-cell" style:parent-style-name="Default" style:data-style-name="N0">
      <style:table-cell-properties fo:background-color="#b6d7a8" fo:border="0.06pt solid #000000"/>
      <style:text-properties style:font-name="Cambria1" style:font-name-asian="Cambria1" style:font-name-complex="Cambria1"/>
    </style:style>
    <style:style style:name="ce27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28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30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1" fo:font-size="7pt" style:font-name-asian="Cambria1" style:font-size-asian="7pt" style:font-name-complex="Cambria1" style:font-size-complex="7pt"/>
    </style:style>
    <style:style style:name="ce22" style:family="table-cell" style:parent-style-name="Default" style:data-style-name="N0">
      <style:table-cell-properties fo:background-color="#ffffff" fo:border="0.06pt solid #000000"/>
      <style:text-properties style:font-name="Cambria1" style:font-name-asian="Cambria1" style:font-name-complex="Cambria1"/>
    </style:style>
    <style:style style:name="ce12" style:family="table-cell" style:parent-style-name="Default" style:data-style-name="N0">
      <style:table-cell-properties fo:background-color="#d5a6bd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13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3" style:font-size-asian="7pt" style:font-name-complex="Cambria3" style:font-size-complex="7pt"/>
    </style:style>
    <style:style style:name="ce29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1" fo:font-size="7pt" style:font-name-asian="Cambria1" style:font-size-asian="7pt" style:font-name-complex="Cambria1" style:font-size-complex="7pt"/>
    </style:style>
    <style:style style:name="ce14" style:family="table-cell" style:parent-style-name="Default" style:data-style-name="N0">
      <style:table-cell-properties fo:background-color="#ffe599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15" style:family="table-cell" style:parent-style-name="Default" style:data-style-name="N0">
      <style:table-cell-properties fo:background-color="#f9cb9c" fo:border="0.06pt solid #000000"/>
      <style:text-properties style:font-name="Cambria1" fo:font-size="7pt" style:font-name-asian="Cambria1" style:font-size-asian="7pt" style:font-name-complex="Cambria1" style:font-size-complex="7pt"/>
    </style:style>
    <style:style style:name="ce23" style:family="table-cell" style:parent-style-name="Default" style:data-style-name="N0">
      <style:table-cell-properties fo:background-color="#ffffff" fo:border="0.06pt solid #000000"/>
      <style:text-properties style:font-name="Cambria1" fo:font-size="7pt" style:font-name-asian="Cambria1" style:font-size-asian="7pt" style:font-name-complex="Cambria1" style:font-size-complex="7pt"/>
    </style:style>
    <style:style style:name="ce32" style:family="table-cell" style:parent-style-name="Default" style:data-style-name="N0">
      <style:table-cell-properties fo:border="0.06pt solid #000000"/>
      <style:text-properties style:font-name="Cambria2" fo:font-size="7pt" style:font-name-asian="Cambria2" style:font-size-asian="7pt" style:font-name-complex="Cambria2" style:font-size-complex="7pt"/>
    </style:style>
    <style:style style:name="ce24" style:family="table-cell" style:parent-style-name="Default" style:data-style-name="N0">
      <style:table-cell-properties fo:background-color="#ffffff" fo:border="0.06pt solid #000000"/>
    </style:style>
    <style:style style:name="ce68" style:family="table-cell" style:parent-style-name="Default" style:data-style-name="N0">
      <style:table-cell-properties style:vertical-align="automatic"/>
      <style:text-properties fo:color="#0000ff" style:font-name="Cambria1" style:text-underline-style="solid" style:text-underline-width="auto" style:text-underline-color="font-color" style:font-name-asian="Cambria1" style:font-name-complex="Cambria1"/>
    </style:style>
    <style:style style:name="ce6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1" fo:font-size="7pt" style:font-name-asian="Cambria1" style:font-size-asian="7pt" style:font-name-complex="Cambria1" style:font-size-complex="7pt"/>
    </style:style>
    <style:style style:name="T1" style:family="text">
      <style:text-properties fo:color="#000000" style:font-name="Cambria1" fo:font-size="7pt" fo:font-weight="normal" style:text-underline-style="none" style:text-underline-color="font-color" style:text-line-through-type="none" fo:font-style="normal" style:text-outline="false" fo:text-shadow="none" style:font-name-asian="Cambria1" style:font-name-complex="Cambria1" style:font-size-asian="7pt" style:font-size-complex="7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ce36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2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number-columns-repeated="43" table:default-cell-style-name="ce4"/>
        <table:table-column table:style-name="co23" table:number-columns-repeated="16319" table:default-cell-style-name="ce36"/>
        <table:table-row table:style-name="ro1">
          <table:table-cell table:style-name="ce2" office:value-type="string" calcext:value-type="string">
            <text:p>code</text:p>
          </table:table-cell>
          <table:table-cell table:style-name="ce3" office:value-type="string" calcext:value-type="string">
            <text:p>ID name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plural name</text:p>
          </table:table-cell>
          <table:table-cell table:style-name="ce3" office:value-type="string" calcext:value-type="string">
            <text:p>flags</text:p>
          </table:table-cell>
          <table:table-cell table:style-name="ce3" office:value-type="string" calcext:value-type="string">
            <text:p>scene</text:p>
          </table:table-cell>
          <table:table-cell table:style-name="ce3" office:value-type="string" calcext:value-type="string">
            <text:p>reserved</text:p>
          </table:table-cell>
          <table:table-cell table:style-name="ce3" office:value-type="string" calcext:value-type="string">
            <text:p>faction</text:p>
          </table:table-cell>
          <table:table-cell table:style-name="ce3" office:value-type="string" calcext:value-type="string">
            <text:p>head armors</text:p>
          </table:table-cell>
          <table:table-cell table:style-name="ce3" office:value-type="string" calcext:value-type="string">
            <text:p>body armors</text:p>
          </table:table-cell>
          <table:table-cell table:style-name="ce3" office:value-type="string" calcext:value-type="string">
            <text:p>hand armors</text:p>
          </table:table-cell>
          <table:table-cell table:style-name="ce3" office:value-type="string" calcext:value-type="string">
            <text:p>foot armors</text:p>
          </table:table-cell>
          <table:table-cell table:style-name="ce3" office:value-type="string" calcext:value-type="string">
            <text:p>pri weapons</text:p>
          </table:table-cell>
          <table:table-cell table:style-name="ce3" office:value-type="string" calcext:value-type="string">
            <text:p>sec weapions</text:p>
          </table:table-cell>
          <table:table-cell table:style-name="ce3" office:value-type="string" calcext:value-type="string">
            <text:p>horses</text:p>
          </table:table-cell>
          <table:table-cell table:style-name="ce3" office:value-type="string" calcext:value-type="string">
            <text:p>attributes</text:p>
          </table:table-cell>
          <table:table-cell table:style-name="ce3" office:value-type="string" calcext:value-type="string">
            <text:p>proficiencies</text:p>
          </table:table-cell>
          <table:table-cell table:style-name="ce3" office:value-type="string" calcext:value-type="string">
            <text:p>skills</text:p>
          </table:table-cell>
          <table:table-cell table:style-name="ce3" office:value-type="string" calcext:value-type="string">
            <text:p>face code 1</text:p>
          </table:table-cell>
          <table:table-cell table:style-name="ce3" office:value-type="string" calcext:value-type="string">
            <text:p>face code 2</text:p>
          </table:table-cell>
          <table:table-cell table:style-name="ce3" office:value-type="string" calcext:value-type="string">
            <text:p>image</text:p>
          </table:table-cell>
          <table:table-cell table:style-name="ce2" office:value-type="string" calcext:value-type="string">
            <text:p>code</text:p>
          </table:table-cell>
          <table:table-cell table:number-columns-repeated="16362"/>
        </table:table-row>
        <table:table-row table:style-name="ro1">
          <table:table-cell/>
          <table:table-cell table:style-name="ce5" office:value-type="string" calcext:value-type="string">
            <text:p>Woodmen</text:p>
          </table:table-cell>
          <table:table-cell table:style-name="ce6" table:number-columns-repeated="19"/>
          <table:table-cell table:style-name="ce6" table:formula="of:=IF(AND([.B2]&lt;&gt;&quot;&quot;;[.C2]&lt;&gt;&quot;&quot;);CONCATENATE([Variables.$I$1];[Variables.$I$7];[.B2];[Variables.$I$7];[Variables.$I$6];[Variables.$I$7];[.C2];[Variables.$I$7];[Variables.$I$6];[Variables.$I$7];[.D2];[Variables.$I$7];[Variables.$I$6];[.E2];[Variables.$I$6];[.F2];[Variables.$I$6];[.G2];[Variables.$I$6];[.H2];[Variables.$I$6];[Variables.$I$1];[.I2];[.J2];[.K2];[.L2];[.M2];[.N2];[.O2];[Variables.$I$2];[Variables.$I$6];[.P2];[Variables.$I$6];[.Q2];[Variables.$I$6];[.R2];[Variables.$I$6];[.S2];[Variables.$I$6];[.T2];IF([.U2]&lt;&gt;&quot;&quot;;CONCATENATE([Variables.$I$6];[.U2]);&quot;&quot;);[Variables.$I$2];[Variables.$I$6]);IF([.B2]&lt;&gt;&quot;&quot;;CONCATENATE(&quot;#&quot;;[.B2]);&quot;&quot;))" office:value-type="string" office:string-value="#Woodmen" calcext:value-type="string">
            <text:p>#Woodmen</text:p>
          </table:table-cell>
          <table:table-cell table:number-columns-repeated="16362"/>
        </table:table-row>
        <table:table-row table:style-name="ro1">
          <table:table-cell table:style-name="ce6" table:formula="of:=IF(AND([.B3]&lt;&gt;&quot;&quot;;[.C3]&lt;&gt;&quot;&quot;);CONCATENATE([Variables.$I$1];[Variables.$I$7];[.B3];[Variables.$I$7];[Variables.$I$6];[Variables.$I$7];[.C3];[Variables.$I$7];[Variables.$I$6];[Variables.$I$7];[.D3];[Variables.$I$7];[Variables.$I$6];[.E3];[Variables.$I$6];[.F3];[Variables.$I$6];[.G3];[Variables.$I$6];[.H3];[Variables.$I$6];[Variables.$I$1];[.I3];[.J3];[.K3];[.L3];[.M3];[.N3];[.O3];[Variables.$I$2];[Variables.$I$6];[.P3];[Variables.$I$6];[.Q3];[Variables.$I$6];[.R3];[Variables.$I$6];[.S3];[Variables.$I$6];[.T3];IF([.U3]&lt;&gt;&quot;&quot;;CONCATENATE([Variables.$I$6];[.U3]);&quot;&quot;);[Variables.$I$2];[Variables.$I$6]);IF([.B3]&lt;&gt;&quot;&quot;;CONCATENATE(&quot;#&quot;;[.B3]);&quot;&quot;))" office:value-type="string" office:string-value="[&quot;i1_woodmen_man&quot;,&quot;Woodmen_Settler&quot;,&quot;Woodmen_Settlers&quot;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" calcext:value-type="string">
            <text:p>["i1_woodmen_man","Woodmen_Settler","Woodmen_Settlers"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</text:p>
          </table:table-cell>
          <table:table-cell table:style-name="ce7" office:value-type="string" calcext:value-type="string">
            <text:p>i1_woodmen_man</text:p>
          </table:table-cell>
          <table:table-cell table:style-name="ce7" office:value-type="string" calcext:value-type="string">
            <text:p>Woodmen_Settler</text:p>
          </table:table-cell>
          <table:table-cell table:style-name="ce7" office:value-type="string" calcext:value-type="string">
            <text:p>Woodmen_Settl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beorn</text:p>
          </table:table-cell>
          <table:table-cell table:style-name="ce11" office:value-type="string" calcext:value-type="string">
            <text:p>itm_gondor_ranger_hood,</text:p>
          </table:table-cell>
          <table:table-cell table:style-name="ce11" office:value-type="string" calcext:value-type="string">
            <text:p>itm_woodman_tunic_bad, itm_woodman_scout_bad,</text:p>
          </table:table-cell>
          <table:table-cell table:style-name="ce11"/>
          <table:table-cell table:style-name="ce11" office:value-type="string" calcext:value-type="string">
            <text:p>itm_rohan_shoes,</text:p>
          </table:table-cell>
          <table:table-cell table:style-name="ce11" office:value-type="string" calcext:value-type="string">
            <text:p>itm_short_bow,itm_arrows,</text:p>
          </table:table-cell>
          <table:table-cell table:style-name="ce11" office:value-type="string" calcext:value-type="string">
            <text:p>itm_beorn_staff, itm_axe_a,</text:p>
          </table:table-cell>
          <table:table-cell table:style-name="ce11"/>
          <table:table-cell table:style-name="ce12" office:value-type="string" calcext:value-type="string">
            <text:p>attr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ironflesh_1|knows_power_strike_1|knows_power_draw_1|knows_athletics_2|knows_looting_1|knows_tracking_1|knows_pathfinding_1|knows_spotting_2|knows_inventory_management_1|knows_wound_treatment_1|knows_persuasion_1</text:p>
          </table:table-cell>
          <table:table-cell table:style-name="ce14" office:value-type="string" calcext:value-type="string">
            <text:p>rohan_face_younger_1</text:p>
          </table:table-cell>
          <table:table-cell table:style-name="ce14" office:value-type="string" calcext:value-type="string">
            <text:p>rohan_face_middle_2</text:p>
          </table:table-cell>
          <table:table-cell table:style-name="ce15"/>
          <table:table-cell table:style-name="ce6" table:formula="of:=IF(AND([.B3]&lt;&gt;&quot;&quot;;[.C3]&lt;&gt;&quot;&quot;);CONCATENATE([Variables.$I$1];[Variables.$I$7];[.B3];[Variables.$I$7];[Variables.$I$6];[Variables.$I$7];[.C3];[Variables.$I$7];[Variables.$I$6];[Variables.$I$7];[.D3];[Variables.$I$7];[Variables.$I$6];[.E3];[Variables.$I$6];[.F3];[Variables.$I$6];[.G3];[Variables.$I$6];[.H3];[Variables.$I$6];[Variables.$I$1];[.I3];[.J3];[.K3];[.L3];[.M3];[.N3];[.O3];[Variables.$I$2];[Variables.$I$6];[.P3];[Variables.$I$6];[.Q3];[Variables.$I$6];[.R3];[Variables.$I$6];[.S3];[Variables.$I$6];[.T3];IF([.U3]&lt;&gt;&quot;&quot;;CONCATENATE([Variables.$I$6];[.U3]);&quot;&quot;);[Variables.$I$2];[Variables.$I$6]);IF([.B3]&lt;&gt;&quot;&quot;;CONCATENATE(&quot;#&quot;;[.B3]);&quot;&quot;))" office:value-type="string" office:string-value="[&quot;i1_woodmen_man&quot;,&quot;Woodmen_Settler&quot;,&quot;Woodmen_Settlers&quot;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" calcext:value-type="string">
            <text:p>["i1_woodmen_man","Woodmen_Settler","Woodmen_Settlers"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</text:p>
          </table:table-cell>
          <table:table-cell table:number-columns-repeated="16362"/>
        </table:table-row>
        <table:table-row table:style-name="ro1">
          <table:table-cell table:style-name="ce6" table:formula="of:=IF(AND([.B4]&lt;&gt;&quot;&quot;;[.C4]&lt;&gt;&quot;&quot;);CONCATENATE([Variables.$I$1];[Variables.$I$7];[.B4];[Variables.$I$7];[Variables.$I$6];[Variables.$I$7];[.C4];[Variables.$I$7];[Variables.$I$6];[Variables.$I$7];[.D4];[Variables.$I$7];[Variables.$I$6];[.E4];[Variables.$I$6];[.F4];[Variables.$I$6];[.G4];[Variables.$I$6];[.H4];[Variables.$I$6];[Variables.$I$1];[.I4];[.J4];[.K4];[.L4];[.M4];[.N4];[.O4];[Variables.$I$2];[Variables.$I$6];[.P4];[Variables.$I$6];[.Q4];[Variables.$I$6];[.R4];[Variables.$I$6];[.S4];[Variables.$I$6];[.T4];IF([.U4]&lt;&gt;&quot;&quot;;CONCATENATE([Variables.$I$6];[.U4]);&quot;&quot;);[Variables.$I$2];[Variables.$I$6]);IF([.B4]&lt;&gt;&quot;&quot;;CONCATENATE(&quot;#&quot;;[.B4]);&quot;&quot;))" office:value-type="string" office:string-value="[&quot;i2_woodmen_forester&quot;,&quot;Woodmen_Forester&quot;,&quot;Woodmen_Foresters&quot;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,rohan_face_young_1,rohan_face_middle_2]," calcext:value-type="string">
            <text:p>["i2_woodmen_forester","Woodmen_Forester","Woodmen_Foresters"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,rohan_face_young_1,rohan_face_middle_2],</text:p>
          </table:table-cell>
          <table:table-cell table:style-name="ce7" office:value-type="string" calcext:value-type="string">
            <text:p>i2_woodmen_forester</text:p>
          </table:table-cell>
          <table:table-cell table:style-name="ce7" office:value-type="string" calcext:value-type="string">
            <text:p>Woodmen_Forester</text:p>
          </table:table-cell>
          <table:table-cell table:style-name="ce7" office:value-type="string" calcext:value-type="string">
            <text:p>Woodmen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beorn</text:p>
          </table:table-cell>
          <table:table-cell table:style-name="ce11" office:value-type="string" calcext:value-type="string">
            <text:p>itm_gondor_ranger_hood,</text:p>
          </table:table-cell>
          <table:table-cell table:style-name="ce11" office:value-type="string" calcext:value-type="string">
            <text:p>itm_woodman_tunic_good, itm_woodman_scout, itm_woodman_padded_bad,</text:p>
          </table:table-cell>
          <table:table-cell table:style-name="ce11"/>
          <table:table-cell table:style-name="ce11" office:value-type="string" calcext:value-type="string">
            <text:p>itm_furry_boots,</text:p>
          </table:table-cell>
          <table:table-cell table:style-name="ce11" office:value-type="string" calcext:value-type="string">
            <text:p>itm_beorn_staff, itm_axe_a,</text:p>
          </table:table-cell>
          <table:table-cell table:style-name="ce11" table:number-columns-repeated="2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2" office:value-type="string" calcext:value-type="string">
            <text:p>knows_common|knows_ironflesh_2|knows_power_strike_2|knows_power_draw_1|knows_athletics_2|knows_looting_1|knows_tracking_1|knows_pathfinding_1|knows_spotting_2|knows_inventory_management_1|knows_wound_treatment_1|knows_persuasion_1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middle_2</text:p>
          </table:table-cell>
          <table:table-cell table:style-name="ce15"/>
          <table:table-cell table:style-name="ce6" table:formula="of:=IF(AND([.B4]&lt;&gt;&quot;&quot;;[.C4]&lt;&gt;&quot;&quot;);CONCATENATE([Variables.$I$1];[Variables.$I$7];[.B4];[Variables.$I$7];[Variables.$I$6];[Variables.$I$7];[.C4];[Variables.$I$7];[Variables.$I$6];[Variables.$I$7];[.D4];[Variables.$I$7];[Variables.$I$6];[.E4];[Variables.$I$6];[.F4];[Variables.$I$6];[.G4];[Variables.$I$6];[.H4];[Variables.$I$6];[Variables.$I$1];[.I4];[.J4];[.K4];[.L4];[.M4];[.N4];[.O4];[Variables.$I$2];[Variables.$I$6];[.P4];[Variables.$I$6];[.Q4];[Variables.$I$6];[.R4];[Variables.$I$6];[.S4];[Variables.$I$6];[.T4];IF([.U4]&lt;&gt;&quot;&quot;;CONCATENATE([Variables.$I$6];[.U4]);&quot;&quot;);[Variables.$I$2];[Variables.$I$6]);IF([.B4]&lt;&gt;&quot;&quot;;CONCATENATE(&quot;#&quot;;[.B4]);&quot;&quot;))" office:value-type="string" office:string-value="[&quot;i2_woodmen_forester&quot;,&quot;Woodmen_Forester&quot;,&quot;Woodmen_Foresters&quot;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,rohan_face_young_1,rohan_face_middle_2]," calcext:value-type="string">
            <text:p>["i2_woodmen_forester","Woodmen_Forester","Woodmen_Foresters"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,rohan_face_young_1,rohan_face_middle_2],</text:p>
          </table:table-cell>
          <table:table-cell table:number-columns-repeated="16362"/>
        </table:table-row>
        <table:table-row table:style-name="ro1">
          <table:table-cell table:style-name="ce6" table:formula="of:=IF(AND([.B5]&lt;&gt;&quot;&quot;;[.C5]&lt;&gt;&quot;&quot;);CONCATENATE([Variables.$I$1];[Variables.$I$7];[.B5];[Variables.$I$7];[Variables.$I$6];[Variables.$I$7];[.C5];[Variables.$I$7];[Variables.$I$6];[Variables.$I$7];[.D5];[Variables.$I$7];[Variables.$I$6];[.E5];[Variables.$I$6];[.F5];[Variables.$I$6];[.G5];[Variables.$I$6];[.H5];[Variables.$I$6];[Variables.$I$1];[.I5];[.J5];[.K5];[.L5];[.M5];[.N5];[.O5];[Variables.$I$2];[Variables.$I$6];[.P5];[Variables.$I$6];[.Q5];[Variables.$I$6];[.R5];[Variables.$I$6];[.S5];[Variables.$I$6];[.T5];IF([.U5]&lt;&gt;&quot;&quot;;CONCATENATE([Variables.$I$6];[.U5]);&quot;&quot;);[Variables.$I$2];[Variables.$I$6]);IF([.B5]&lt;&gt;&quot;&quot;;CONCATENATE(&quot;#&quot;;[.B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scout_good, itm_woodman_padded,itm_leather_boots_bad,itm_rohan_shoe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scout_good, itm_woodman_padded,itm_leather_boots_bad,itm_rohan_shoes,itm_long_bearded_axe,],attr_tier_3,wp_tier_3,knows_common|knows_athletics_3|knows_power_strike_3|knows_ironflesh_3,rohan_face_young_1,rohan_face_middle_2],</text:p>
          </table:table-cell>
          <table:table-cell table:style-name="ce7" office:value-type="string" calcext:value-type="string">
            <text:p>i3_woodmen_skilled_forester</text:p>
          </table:table-cell>
          <table:table-cell table:style-name="ce7" office:value-type="string" calcext:value-type="string">
            <text:p>Woodmen_Skilled_Forester</text:p>
          </table:table-cell>
          <table:table-cell table:style-name="ce7" office:value-type="string" calcext:value-type="string">
            <text:p>Woodmen_Skilled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beorn</text:p>
          </table:table-cell>
          <table:table-cell table:style-name="ce11" office:value-type="string" calcext:value-type="string">
            <text:p>itm_north_leather_skullcap, itm_north_leather_skullcap_bad,</text:p>
          </table:table-cell>
          <table:table-cell table:style-name="ce11" office:value-type="string" calcext:value-type="string">
            <text:p>itm_woodman_scout_good, itm_woodman_padded,</text:p>
          </table:table-cell>
          <table:table-cell table:style-name="ce11"/>
          <table:table-cell table:style-name="ce11" office:value-type="string" calcext:value-type="string">
            <text:p>itm_leather_boots_bad,itm_rohan_shoes,</text:p>
          </table:table-cell>
          <table:table-cell table:style-name="ce11" office:value-type="string" calcext:value-type="string">
            <text:p>itm_long_bearded_axe,</text:p>
          </table:table-cell>
          <table:table-cell table:style-name="ce11" table:number-columns-repeated="2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3|knows_power_strike_3|knows_ironflesh_3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middle_2</text:p>
          </table:table-cell>
          <table:table-cell table:style-name="ce15"/>
          <table:table-cell table:style-name="ce6" table:formula="of:=IF(AND([.B5]&lt;&gt;&quot;&quot;;[.C5]&lt;&gt;&quot;&quot;);CONCATENATE([Variables.$I$1];[Variables.$I$7];[.B5];[Variables.$I$7];[Variables.$I$6];[Variables.$I$7];[.C5];[Variables.$I$7];[Variables.$I$6];[Variables.$I$7];[.D5];[Variables.$I$7];[Variables.$I$6];[.E5];[Variables.$I$6];[.F5];[Variables.$I$6];[.G5];[Variables.$I$6];[.H5];[Variables.$I$6];[Variables.$I$1];[.I5];[.J5];[.K5];[.L5];[.M5];[.N5];[.O5];[Variables.$I$2];[Variables.$I$6];[.P5];[Variables.$I$6];[.Q5];[Variables.$I$6];[.R5];[Variables.$I$6];[.S5];[Variables.$I$6];[.T5];IF([.U5]&lt;&gt;&quot;&quot;;CONCATENATE([Variables.$I$6];[.U5]);&quot;&quot;);[Variables.$I$2];[Variables.$I$6]);IF([.B5]&lt;&gt;&quot;&quot;;CONCATENATE(&quot;#&quot;;[.B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scout_good, itm_woodman_padded,itm_leather_boots_bad,itm_rohan_shoe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scout_good, itm_woodman_padded,itm_leather_boots_bad,itm_rohan_shoes,itm_long_bearded_axe,],attr_tier_3,wp_tier_3,knows_common|knows_athletics_3|knows_power_strike_3|knows_ironflesh_3,rohan_face_young_1,rohan_face_middle_2],</text:p>
          </table:table-cell>
          <table:table-cell table:number-columns-repeated="16362"/>
        </table:table-row>
        <table:table-row table:style-name="ro2">
          <table:table-cell table:style-name="ce6" table:formula="of:=IF(AND([.B6]&lt;&gt;&quot;&quot;;[.C6]&lt;&gt;&quot;&quot;);CONCATENATE([Variables.$I$1];[Variables.$I$7];[.B6];[Variables.$I$7];[Variables.$I$6];[Variables.$I$7];[.C6];[Variables.$I$7];[Variables.$I$6];[Variables.$I$7];[.D6];[Variables.$I$7];[Variables.$I$6];[.E6];[Variables.$I$6];[.F6];[Variables.$I$6];[.G6];[Variables.$I$6];[.H6];[Variables.$I$6];[Variables.$I$1];[.I6];[.J6];[.K6];[.L6];[.M6];[.N6];[.O6];[Variables.$I$2];[Variables.$I$6];[.P6];[Variables.$I$6];[.Q6];[Variables.$I$6];[.R6];[Variables.$I$6];[.S6];[Variables.$I$6];[.T6];IF([.U6]&lt;&gt;&quot;&quot;;CONCATENATE([Variables.$I$6];[.U6]);&quot;&quot;);[Variables.$I$2];[Variables.$I$6]);IF([.B6]&lt;&gt;&quot;&quot;;CONCATENATE(&quot;#&quot;;[.B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</text:p>
          </table:table-cell>
          <table:table-cell table:style-name="ce7" office:value-type="string" calcext:value-type="string">
            <text:p>i4_woodmen_axemen</text:p>
          </table:table-cell>
          <table:table-cell table:style-name="ce7" office:value-type="string" calcext:value-type="string">
            <text:p>Woodmen_Axeman</text:p>
          </table:table-cell>
          <table:table-cell table:style-name="ce7" office:value-type="string" calcext:value-type="string">
            <text:p>Woodmen_Axemen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beorn</text:p>
          </table:table-cell>
          <table:table-cell table:style-name="ce11" office:value-type="string" calcext:value-type="string">
            <text:p>itm_north_leather_skullcap, itm_north_leather_skullcap_bad,itm_north_leather_skullcap_good, itm_north_skullcap,</text:p>
          </table:table-cell>
          <table:table-cell table:style-name="ce11" office:value-type="string" calcext:value-type="string">
            <text:p>itm_woodman_padded_good, itm_woodmen_heavy_bad,</text:p>
          </table:table-cell>
          <table:table-cell table:style-name="ce11" office:value-type="string" calcext:value-type="string">
            <text:p>itm_evil_gauntlets_a,</text:p>
          </table:table-cell>
          <table:table-cell table:style-name="ce11" office:value-type="string" calcext:value-type="string">
            <text:p>itm_leather_boots,</text:p>
          </table:table-cell>
          <table:table-cell table:style-name="ce11" office:value-type="string" calcext:value-type="string">
            <text:p>itm_long_bearded_axe,</text:p>
          </table:table-cell>
          <table:table-cell table:style-name="ce11" table:number-columns-repeated="2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4|knows_power_strike_4|knows_ironflesh_4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B6]&lt;&gt;&quot;&quot;;[.C6]&lt;&gt;&quot;&quot;);CONCATENATE([Variables.$I$1];[Variables.$I$7];[.B6];[Variables.$I$7];[Variables.$I$6];[Variables.$I$7];[.C6];[Variables.$I$7];[Variables.$I$6];[Variables.$I$7];[.D6];[Variables.$I$7];[Variables.$I$6];[.E6];[Variables.$I$6];[.F6];[Variables.$I$6];[.G6];[Variables.$I$6];[.H6];[Variables.$I$6];[Variables.$I$1];[.I6];[.J6];[.K6];[.L6];[.M6];[.N6];[.O6];[Variables.$I$2];[Variables.$I$6];[.P6];[Variables.$I$6];[.Q6];[Variables.$I$6];[.R6];[Variables.$I$6];[.S6];[Variables.$I$6];[.T6];IF([.U6]&lt;&gt;&quot;&quot;;CONCATENATE([Variables.$I$6];[.U6]);&quot;&quot;);[Variables.$I$2];[Variables.$I$6]);IF([.B6]&lt;&gt;&quot;&quot;;CONCATENATE(&quot;#&quot;;[.B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</text:p>
          </table:table-cell>
          <table:table-cell table:number-columns-repeated="16362"/>
        </table:table-row>
        <table:table-row table:style-name="ro3">
          <table:table-cell table:style-name="ce6" table:formula="of:=IF(AND([.B7]&lt;&gt;&quot;&quot;;[.C7]&lt;&gt;&quot;&quot;);CONCATENATE([Variables.$I$1];[Variables.$I$7];[.B7];[Variables.$I$7];[Variables.$I$6];[Variables.$I$7];[.C7];[Variables.$I$7];[Variables.$I$6];[Variables.$I$7];[.D7];[Variables.$I$7];[Variables.$I$6];[.E7];[Variables.$I$6];[.F7];[Variables.$I$6];[.G7];[Variables.$I$6];[.H7];[Variables.$I$6];[Variables.$I$1];[.I7];[.J7];[.K7];[.L7];[.M7];[.N7];[.O7];[Variables.$I$2];[Variables.$I$6];[.P7];[Variables.$I$6];[.Q7];[Variables.$I$6];[.R7];[Variables.$I$6];[.S7];[Variables.$I$6];[.T7];IF([.U7]&lt;&gt;&quot;&quot;;CONCATENATE([Variables.$I$6];[.U7]);&quot;&quot;);[Variables.$I$2];[Variables.$I$6]);IF([.B7]&lt;&gt;&quot;&quot;;CONCATENATE(&quot;#&quot;;[.B7]);&quot;&quot;))"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gloves_good,itm_evil_gauntlets_a_good,itm_leather_boots,itm_2_handed_axe,itm_marker_night_troop,],attr_tier_5,wp_tier_5,knows_common|knows_athletics_5|knows_power_strike_6|knows_ironflesh_6,rohan_face_middle_1,rohan_face_old_2]," calcext:value-type="string">
            <text:p>["i5_woodmen_night_guard","Night_Guard_of_Mirkwood","Night_Guards_of_Mirkwood",tfg_armor| tfg_helm| tfg_boots| tfg_gloves,0,0,fac_beorn,[itm_north_leather_skullcap_good, itm_north_skullcap, itm_north_nasal_helm_good,itm_woodmen_heavy,itm_leather_gloves_good,itm_evil_gauntlets_a_good,itm_leather_boots,itm_2_handed_axe,itm_marker_night_troop,],attr_tier_5,wp_tier_5,knows_common|knows_athletics_5|knows_power_strike_6|knows_ironflesh_6,rohan_face_middle_1,rohan_face_old_2],</text:p>
          </table:table-cell>
          <table:table-cell table:style-name="ce7" office:value-type="string" calcext:value-type="string">
            <text:p>i5_woodmen_night_guard</text:p>
          </table:table-cell>
          <table:table-cell table:style-name="ce7" office:value-type="string" calcext:value-type="string">
            <text:p>Night_Guard_of_Mirkwood</text:p>
          </table:table-cell>
          <table:table-cell table:style-name="ce7" office:value-type="string" calcext:value-type="string">
            <text:p>Night_Guards_of_Mirkwood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beorn</text:p>
          </table:table-cell>
          <table:table-cell table:style-name="ce11" office:value-type="string" calcext:value-type="string">
            <text:p>itm_north_leather_skullcap_good, itm_north_skullcap, itm_north_nasal_helm_good,</text:p>
          </table:table-cell>
          <table:table-cell table:style-name="ce11" office:value-type="string" calcext:value-type="string">
            <text:p>itm_woodmen_heavy,</text:p>
          </table:table-cell>
          <table:table-cell table:style-name="ce11" office:value-type="string" calcext:value-type="string">
            <text:p>itm_leather_gloves_good,itm_evil_gauntlets_a_good,</text:p>
          </table:table-cell>
          <table:table-cell table:style-name="ce11" office:value-type="string" calcext:value-type="string">
            <text:p>itm_leather_boots,</text:p>
          </table:table-cell>
          <table:table-cell table:style-name="ce11" office:value-type="string" calcext:value-type="string">
            <text:p>itm_2_handed_axe,</text:p>
          </table:table-cell>
          <table:table-cell table:style-name="ce11"/>
          <table:table-cell table:style-name="ce11" office:value-type="string" calcext:value-type="string">
            <text:p>itm_marker_night_troop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5|knows_power_strike_6|knows_ironflesh_6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B7]&lt;&gt;&quot;&quot;;[.C7]&lt;&gt;&quot;&quot;);CONCATENATE([Variables.$I$1];[Variables.$I$7];[.B7];[Variables.$I$7];[Variables.$I$6];[Variables.$I$7];[.C7];[Variables.$I$7];[Variables.$I$6];[Variables.$I$7];[.D7];[Variables.$I$7];[Variables.$I$6];[.E7];[Variables.$I$6];[.F7];[Variables.$I$6];[.G7];[Variables.$I$6];[.H7];[Variables.$I$6];[Variables.$I$1];[.I7];[.J7];[.L7];[.L7];[.M7];[.N7];[.O7];[Variables.$I$2];[Variables.$I$6];[.P7];[Variables.$I$6];[.Q7];[Variables.$I$6];[.R7];[Variables.$I$6];[.S7];[Variables.$I$6];[.T7];IF([.U7]&lt;&gt;&quot;&quot;;CONCATENATE([Variables.$I$6];[.U7]);&quot;&quot;);[Variables.$I$2];[Variables.$I$6]);IF([.B7]&lt;&gt;&quot;&quot;;CONCATENATE(&quot;#&quot;;[.B7]);&quot;&quot;))"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itm_marker_night_troop,],attr_tier_5,wp_tier_5,knows_common|knows_athletics_5|knows_power_strike_6|knows_ironflesh_6,rohan_face_middle_1,rohan_face_old_2]," calcext:value-type="string">
            <text:p>["i5_woodmen_night_guard","Night_Guard_of_Mirkwood","Night_Guards_of_Mirkwood",tfg_armor| tfg_helm| tfg_boots| tfg_gloves,0,0,fac_beorn,[itm_north_leather_skullcap_good, itm_north_skullcap, itm_north_nasal_helm_good,itm_woodmen_heavy,itm_leather_boots,itm_leather_boots,itm_2_handed_axe,itm_marker_night_troop,],attr_tier_5,wp_tier_5,knows_common|knows_athletics_5|knows_power_strike_6|knows_ironflesh_6,rohan_face_middle_1,rohan_face_old_2],</text:p>
          </table:table-cell>
          <table:table-cell table:number-columns-repeated="16362"/>
        </table:table-row>
        <table:table-row table:style-name="ro1">
          <table:table-cell table:style-name="ce6" table:formula="of:=IF(AND([.B8]&lt;&gt;&quot;&quot;;[.C8]&lt;&gt;&quot;&quot;);CONCATENATE([Variables.$I$1];[Variables.$I$7];[.B8];[Variables.$I$7];[Variables.$I$6];[Variables.$I$7];[.C8];[Variables.$I$7];[Variables.$I$6];[Variables.$I$7];[.D8];[Variables.$I$7];[Variables.$I$6];[.E8];[Variables.$I$6];[.F8];[Variables.$I$6];[.G8];[Variables.$I$6];[.H8];[Variables.$I$6];[Variables.$I$1];[.I8];[.J8];[.K8];[.L8];[.M8];[.N8];[.O8];[Variables.$I$2];[Variables.$I$6];[.P8];[Variables.$I$6];[.Q8];[Variables.$I$6];[.R8];[Variables.$I$6];[.S8];[Variables.$I$6];[.T8];IF([.U8]&lt;&gt;&quot;&quot;;CONCATENATE([Variables.$I$6];[.U8]);&quot;&quot;);[Variables.$I$2];[Variables.$I$6]);IF([.B8]&lt;&gt;&quot;&quot;;CONCATENATE(&quot;#&quot;;[.B8]);&quot;&quot;))" office:value-type="string" office:string-value="[&quot;a2_woodmen_tracker&quot;,&quot;Woodmen_Tracker&quot;,&quot;Woodmen_Trackers&quot;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" calcext:value-type="string">
            <text:p>["a2_woodmen_tracker","Woodmen_Tracker","Woodmen_Trackers"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</text:p>
          </table:table-cell>
          <table:table-cell table:style-name="ce7" office:value-type="string" calcext:value-type="string">
            <text:p>a2_woodmen_tracker</text:p>
          </table:table-cell>
          <table:table-cell table:style-name="ce7" office:value-type="string" calcext:value-type="string">
            <text:p>Woodmen_Tracker</text:p>
          </table:table-cell>
          <table:table-cell table:style-name="ce7" office:value-type="string" calcext:value-type="string">
            <text:p>Woodmen_Tracker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beorn</text:p>
          </table:table-cell>
          <table:table-cell table:style-name="ce11" office:value-type="string" calcext:value-type="string">
            <text:p>itm_gondor_ranger_hood,</text:p>
          </table:table-cell>
          <table:table-cell table:style-name="ce11" office:value-type="string" calcext:value-type="string">
            <text:p>itm_woodman_tunic_cloak,</text:p>
          </table:table-cell>
          <table:table-cell table:style-name="ce11"/>
          <table:table-cell table:style-name="ce11" office:value-type="string" calcext:value-type="string">
            <text:p>itm_leather_boots_bad,itm_rohan_shoes,itm_furry_boots,</text:p>
          </table:table-cell>
          <table:table-cell table:style-name="ce11" office:value-type="string" calcext:value-type="string">
            <text:p>itm_short_bow,itm_arrows,</text:p>
          </table:table-cell>
          <table:table-cell table:style-name="ce11" office:value-type="string" calcext:value-type="string">
            <text:p>itm_beorn_staff, itm_axe_a,</text:p>
          </table:table-cell>
          <table:table-cell table:style-name="ce11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bow_2</text:p>
          </table:table-cell>
          <table:table-cell table:style-name="ce13" office:value-type="string" calcext:value-type="string">
            <text:p>knows_common|knows_ironflesh_1|knows_power_strike_1|knows_power_draw_2|knows_athletics_3|knows_looting_1|knows_tracking_1|knows_pathfinding_1|knows_spotting_2|knows_inventory_management_1|knows_wound_treatment_1|knows_persuasion_1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B8]&lt;&gt;&quot;&quot;;[.C8]&lt;&gt;&quot;&quot;);CONCATENATE([Variables.$I$1];[Variables.$I$7];[.B8];[Variables.$I$7];[Variables.$I$6];[Variables.$I$7];[.C8];[Variables.$I$7];[Variables.$I$6];[Variables.$I$7];[.D8];[Variables.$I$7];[Variables.$I$6];[.E8];[Variables.$I$6];[.F8];[Variables.$I$6];[.G8];[Variables.$I$6];[.H8];[Variables.$I$6];[Variables.$I$1];[.I8];[.J8];[.K8];[.L8];[.M8];[.N8];[.O8];[Variables.$I$2];[Variables.$I$6];[.P8];[Variables.$I$6];[.Q8];[Variables.$I$6];[.R8];[Variables.$I$6];[.S8];[Variables.$I$6];[.T8];IF([.U8]&lt;&gt;&quot;&quot;;CONCATENATE([Variables.$I$6];[.U8]);&quot;&quot;);[Variables.$I$2];[Variables.$I$6]);IF([.B8]&lt;&gt;&quot;&quot;;CONCATENATE(&quot;#&quot;;[.B8]);&quot;&quot;))" office:value-type="string" office:string-value="[&quot;a2_woodmen_tracker&quot;,&quot;Woodmen_Tracker&quot;,&quot;Woodmen_Trackers&quot;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" calcext:value-type="string">
            <text:p>["a2_woodmen_tracker","Woodmen_Tracker","Woodmen_Trackers"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</text:p>
          </table:table-cell>
          <table:table-cell table:number-columns-repeated="16362"/>
        </table:table-row>
        <table:table-row table:style-name="ro1">
          <table:table-cell table:style-name="ce6" table:formula="of:=IF(AND([.B9]&lt;&gt;&quot;&quot;;[.C9]&lt;&gt;&quot;&quot;);CONCATENATE([Variables.$I$1];[Variables.$I$7];[.B9];[Variables.$I$7];[Variables.$I$6];[Variables.$I$7];[.C9];[Variables.$I$7];[Variables.$I$6];[Variables.$I$7];[.D9];[Variables.$I$7];[Variables.$I$6];[.E9];[Variables.$I$6];[.F9];[Variables.$I$6];[.G9];[Variables.$I$6];[.H9];[Variables.$I$6];[Variables.$I$1];[.I9];[.J9];[.K9];[.L9];[.M9];[.N9];[.O9];[Variables.$I$2];[Variables.$I$6];[.P9];[Variables.$I$6];[.Q9];[Variables.$I$6];[.R9];[Variables.$I$6];[.S9];[Variables.$I$6];[.T9];IF([.U9]&lt;&gt;&quot;&quot;;CONCATENATE([Variables.$I$6];[.U9]);&quot;&quot;);[Variables.$I$2];[Variables.$I$6]);IF([.B9]&lt;&gt;&quot;&quot;;CONCATENATE(&quot;#&quot;;[.B9]);&quot;&quot;))" office:value-type="string" office:string-value="[&quot;a3_woodmen_scout&quot;,&quot;Woodmen_Scout&quot;,&quot;Woodmen_Scouts&quot;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style-name="ce7" office:value-type="string" calcext:value-type="string">
            <text:p>a3_woodmen_scout</text:p>
          </table:table-cell>
          <table:table-cell table:style-name="ce7" office:value-type="string" calcext:value-type="string">
            <text:p>Woodmen_Scout</text:p>
          </table:table-cell>
          <table:table-cell table:style-name="ce7" office:value-type="string" calcext:value-type="string">
            <text:p>Woodmen_Scout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beorn</text:p>
          </table:table-cell>
          <table:table-cell table:style-name="ce11" office:value-type="string" calcext:value-type="string">
            <text:p>itm_gondor_ranger_hood, itm_north_leather_skullcap_bad,</text:p>
          </table:table-cell>
          <table:table-cell table:style-name="ce11" office:value-type="string" calcext:value-type="string">
            <text:p>itm_woodman_tunic_good_cloak, itm_woodman_scout_cloak,</text:p>
          </table:table-cell>
          <table:table-cell table:style-name="ce11"/>
          <table:table-cell table:style-name="ce11" office:value-type="string" calcext:value-type="string">
            <text:p>itm_leather_boots_bad,itm_furry_boots,</text:p>
          </table:table-cell>
          <table:table-cell table:style-name="ce11" office:value-type="string" calcext:value-type="string">
            <text:p>itm_regular_bow,itm_arrows,</text:p>
          </table:table-cell>
          <table:table-cell table:style-name="ce11" office:value-type="string" calcext:value-type="string">
            <text:p>itm_axe_a, itm_axe_b, itm_beorn_staff,itm_long_bearded_axe,</text:p>
          </table:table-cell>
          <table:table-cell table:style-name="ce11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bow_3</text:p>
          </table:table-cell>
          <table:table-cell table:style-name="ce12" office:value-type="string" calcext:value-type="string">
            <text:p>knows_common|knows_athletics_3|knows_power_draw_2|knows_power_strike_1|knows_ironflesh_1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middle_2</text:p>
          </table:table-cell>
          <table:table-cell table:style-name="ce15"/>
          <table:table-cell table:style-name="ce6" table:formula="of:=IF(AND([.B9]&lt;&gt;&quot;&quot;;[.C9]&lt;&gt;&quot;&quot;);CONCATENATE([Variables.$I$1];[Variables.$I$7];[.B9];[Variables.$I$7];[Variables.$I$6];[Variables.$I$7];[.C9];[Variables.$I$7];[Variables.$I$6];[Variables.$I$7];[.D9];[Variables.$I$7];[Variables.$I$6];[.E9];[Variables.$I$6];[.F9];[Variables.$I$6];[.G9];[Variables.$I$6];[.H9];[Variables.$I$6];[Variables.$I$1];[.I9];[.J9];[.K9];[.L9];[.M9];[.N9];[.O9];[Variables.$I$2];[Variables.$I$6];[.P9];[Variables.$I$6];[.Q9];[Variables.$I$6];[.R9];[Variables.$I$6];[.S9];[Variables.$I$6];[.T9];IF([.U9]&lt;&gt;&quot;&quot;;CONCATENATE([Variables.$I$6];[.U9]);&quot;&quot;);[Variables.$I$2];[Variables.$I$6]);IF([.B9]&lt;&gt;&quot;&quot;;CONCATENATE(&quot;#&quot;;[.B9]);&quot;&quot;))" office:value-type="string" office:string-value="[&quot;a3_woodmen_scout&quot;,&quot;Woodmen_Scout&quot;,&quot;Woodmen_Scouts&quot;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number-columns-repeated="16362"/>
        </table:table-row>
        <table:table-row table:style-name="ro3">
          <table:table-cell table:style-name="ce6" table:formula="of:=IF(AND([.B10]&lt;&gt;&quot;&quot;;[.C10]&lt;&gt;&quot;&quot;);CONCATENATE([Variables.$I$1];[Variables.$I$7];[.B10];[Variables.$I$7];[Variables.$I$6];[Variables.$I$7];[.C10];[Variables.$I$7];[Variables.$I$6];[Variables.$I$7];[.D10];[Variables.$I$7];[Variables.$I$6];[.E10];[Variables.$I$6];[.F10];[Variables.$I$6];[.G10];[Variables.$I$6];[.H10];[Variables.$I$6];[Variables.$I$1];[.I10];[.J10];[.K10];[.L10];[.M10];[.N10];[.O10];[Variables.$I$2];[Variables.$I$6];[.P10];[Variables.$I$6];[.Q10];[Variables.$I$6];[.R10];[Variables.$I$6];[.S10];[Variables.$I$6];[.T10];IF([.U10]&lt;&gt;&quot;&quot;;CONCATENATE([Variables.$I$6];[.U10]);&quot;&quot;);[Variables.$I$2];[Variables.$I$6]);IF([.B10]&lt;&gt;&quot;&quot;;CONCATENATE(&quot;#&quot;;[.B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style-name="ce7" office:value-type="string" calcext:value-type="string">
            <text:p>a4_woodmen_archer</text:p>
          </table:table-cell>
          <table:table-cell table:style-name="ce7" office:value-type="string" calcext:value-type="string">
            <text:p>Woodmen_Archer</text:p>
          </table:table-cell>
          <table:table-cell table:style-name="ce7" office:value-type="string" calcext:value-type="string">
            <text:p>Woodmen_Archers</text:p>
          </table:table-cell>
          <table:table-cell table:style-name="ce8" office:value-type="string" calcext:value-type="string">
            <text:p>tfg_ranged| tfg_armor| tfg_helm|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beorn</text:p>
          </table:table-cell>
          <table:table-cell table:style-name="ce11" office:value-type="string" calcext:value-type="string">
            <text:p>itm_gondor_ranger_hood, itm_north_leather_skullcap_bad, itm_north_leather_skullcap,</text:p>
          </table:table-cell>
          <table:table-cell table:style-name="ce11" office:value-type="string" calcext:value-type="string">
            <text:p>itm_woodman_scout_good_cloak, itm_woodman_padded_cloak,</text:p>
          </table:table-cell>
          <table:table-cell table:style-name="ce11" office:value-type="string" calcext:value-type="string">
            <text:p>itm_leather_gloves,itm_evil_gauntlets_a,</text:p>
          </table:table-cell>
          <table:table-cell table:style-name="ce11" office:value-type="string" calcext:value-type="string">
            <text:p>itm_leather_boots,</text:p>
          </table:table-cell>
          <table:table-cell table:style-name="ce11" office:value-type="string" calcext:value-type="string">
            <text:p>itm_regular_bow,itm_arrows,</text:p>
          </table:table-cell>
          <table:table-cell table:style-name="ce11" office:value-type="string" calcext:value-type="string">
            <text:p>itm_axe_b, itm_beorn_staff,itm_long_bearded_axe,</text:p>
          </table:table-cell>
          <table:table-cell table:style-name="ce11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bow_5</text:p>
          </table:table-cell>
          <table:table-cell table:style-name="ce12" office:value-type="string" calcext:value-type="string">
            <text:p>knows_common|knows_athletics_4|knows_power_draw_3|knows_power_strike_2|knows_ironflesh_2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B10]&lt;&gt;&quot;&quot;;[.C10]&lt;&gt;&quot;&quot;);CONCATENATE([Variables.$I$1];[Variables.$I$7];[.B10];[Variables.$I$7];[Variables.$I$6];[Variables.$I$7];[.C10];[Variables.$I$7];[Variables.$I$6];[Variables.$I$7];[.D10];[Variables.$I$7];[Variables.$I$6];[.E10];[Variables.$I$6];[.F10];[Variables.$I$6];[.G10];[Variables.$I$6];[.H10];[Variables.$I$6];[Variables.$I$1];[.I10];[.J10];[.K10];[.L10];[.M10];[.N10];[.O10];[Variables.$I$2];[Variables.$I$6];[.P10];[Variables.$I$6];[.Q10];[Variables.$I$6];[.R10];[Variables.$I$6];[.S10];[Variables.$I$6];[.T10];IF([.U10]&lt;&gt;&quot;&quot;;CONCATENATE([Variables.$I$6];[.U10]);&quot;&quot;);[Variables.$I$2];[Variables.$I$6]);IF([.B10]&lt;&gt;&quot;&quot;;CONCATENATE(&quot;#&quot;;[.B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number-columns-repeated="16362"/>
        </table:table-row>
        <table:table-row table:style-name="ro3">
          <table:table-cell table:style-name="ce6" table:formula="of:=IF(AND([.B11]&lt;&gt;&quot;&quot;;[.C11]&lt;&gt;&quot;&quot;);CONCATENATE([Variables.$I$1];[Variables.$I$7];[.B11];[Variables.$I$7];[Variables.$I$6];[Variables.$I$7];[.C11];[Variables.$I$7];[Variables.$I$6];[Variables.$I$7];[.D11];[Variables.$I$7];[Variables.$I$6];[.E11];[Variables.$I$6];[.F11];[Variables.$I$6];[.G11];[Variables.$I$6];[.H11];[Variables.$I$6];[Variables.$I$1];[.I11];[.J11];[.K11];[.L11];[.M11];[.N11];[.O11];[Variables.$I$2];[Variables.$I$6];[.P11];[Variables.$I$6];[.Q11];[Variables.$I$6];[.R11];[Variables.$I$6];[.S11];[Variables.$I$6];[.T11];IF([.U11]&lt;&gt;&quot;&quot;;CONCATENATE([Variables.$I$6];[.U11]);&quot;&quot;);[Variables.$I$2];[Variables.$I$6]);IF([.B11]&lt;&gt;&quot;&quot;;CONCATENATE(&quot;#&quot;;[.B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_good_cloak,itm_leather_gloves_good,itm_evil_gauntlets_a_good,itm_leather_boots,itm_elven_bow,itm_arrows,itm_long_bearded_axe,itm_long_bearded_axe,itm_beorn_staff,itm_marker_night_troop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_good_cloak,itm_leather_gloves_good,itm_evil_gauntlets_a_good,itm_leather_boots,itm_elven_bow,itm_arrows,itm_long_bearded_axe,itm_long_bearded_axe,itm_beorn_staff,itm_marker_night_troop,],attr_tier_5,wp_archery(210)|wp_melee(150),knows_common|knows_athletics_6|knows_power_draw_4|knows_power_strike_3|knows_ironflesh_4,rohan_face_middle_1,rohan_face_old_2],</text:p>
          </table:table-cell>
          <table:table-cell table:style-name="ce7" office:value-type="string" calcext:value-type="string">
            <text:p>a5_woodmen_night_stalker</text:p>
          </table:table-cell>
          <table:table-cell table:style-name="ce7" office:value-type="string" calcext:value-type="string">
            <text:p>Night_Stalker_of_Mirkwood</text:p>
          </table:table-cell>
          <table:table-cell table:style-name="ce7" office:value-type="string" calcext:value-type="string">
            <text:p>Night_Stalkers_of_Mirkwood</text:p>
          </table:table-cell>
          <table:table-cell table:style-name="ce8" office:value-type="string" calcext:value-type="string">
            <text:p>tfg_ranged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beorn</text:p>
          </table:table-cell>
          <table:table-cell table:style-name="ce11" office:value-type="string" calcext:value-type="string">
            <text:p>itm_north_leather_skullcap, itm_north_leather_skullcap_bad,itm_north_leather_skullcap_good, itm_north_skullcap,</text:p>
          </table:table-cell>
          <table:table-cell table:style-name="ce11" office:value-type="string" calcext:value-type="string">
            <text:p>itm_woodman_padded_good_cloak,</text:p>
          </table:table-cell>
          <table:table-cell table:style-name="ce11" office:value-type="string" calcext:value-type="string">
            <text:p>itm_leather_gloves_good,itm_evil_gauntlets_a_good,</text:p>
          </table:table-cell>
          <table:table-cell table:style-name="ce11" office:value-type="string" calcext:value-type="string">
            <text:p>itm_leather_boots,</text:p>
          </table:table-cell>
          <table:table-cell table:style-name="ce11" office:value-type="string" calcext:value-type="string">
            <text:p>itm_elven_bow,itm_arrows,</text:p>
          </table:table-cell>
          <table:table-cell table:style-name="ce11" office:value-type="string" calcext:value-type="string">
            <text:p>itm_long_bearded_axe,itm_long_bearded_axe,itm_beorn_staff,</text:p>
          </table:table-cell>
          <table:table-cell table:style-name="ce11" office:value-type="string" calcext:value-type="string">
            <text:p>itm_marker_night_troop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archery(210)|wp_melee(150)</text:p>
          </table:table-cell>
          <table:table-cell table:style-name="ce12" office:value-type="string" calcext:value-type="string">
            <text:p>knows_common|knows_athletics_6|knows_power_draw_4|knows_power_strike_3|knows_ironflesh_4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B11]&lt;&gt;&quot;&quot;;[.C11]&lt;&gt;&quot;&quot;);CONCATENATE([Variables.$I$1];[Variables.$I$7];[.B11];[Variables.$I$7];[Variables.$I$6];[Variables.$I$7];[.C11];[Variables.$I$7];[Variables.$I$6];[Variables.$I$7];[.D11];[Variables.$I$7];[Variables.$I$6];[.E11];[Variables.$I$6];[.F11];[Variables.$I$6];[.G11];[Variables.$I$6];[.H11];[Variables.$I$6];[Variables.$I$1];[.I11];[.J11];[.L11];[.L11];[.M11];[.N11];[.O11];[Variables.$I$2];[Variables.$I$6];[.P11];[Variables.$I$6];[.Q11];[Variables.$I$6];[.R11];[Variables.$I$6];[.S11];[Variables.$I$6];[.T11];IF([.U11]&lt;&gt;&quot;&quot;;CONCATENATE([Variables.$I$6];[.U11]);&quot;&quot;);[Variables.$I$2];[Variables.$I$6]);IF([.B11]&lt;&gt;&quot;&quot;;CONCATENATE(&quot;#&quot;;[.B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_good_cloak,itm_leather_boots,itm_leather_boots,itm_elven_bow,itm_arrows,itm_long_bearded_axe,itm_long_bearded_axe,itm_beorn_staff,itm_marker_night_troop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_good_cloak,itm_leather_boots,itm_leather_boots,itm_elven_bow,itm_arrows,itm_long_bearded_axe,itm_long_bearded_axe,itm_beorn_staff,itm_marker_night_troop,],attr_tier_5,wp_archery(210)|wp_melee(150),knows_common|knows_athletics_6|knows_power_draw_4|knows_power_strike_3|knows_ironflesh_4,rohan_face_middle_1,rohan_face_old_2],</text:p>
          </table:table-cell>
          <table:table-cell table:number-columns-repeated="16362"/>
        </table:table-row>
        <table:table-row table:style-name="ro1">
          <table:table-cell table:formula="of:=IF(AND([.B12]&lt;&gt;&quot;&quot;;[.C12]&lt;&gt;&quot;&quot;);CONCATENATE([Variables.$I$1];[Variables.$I$7];[.B12];[Variables.$I$7];[Variables.$I$6];[Variables.$I$7];[.C12];[Variables.$I$7];[Variables.$I$6];[Variables.$I$7];[.D12];[Variables.$I$7];[Variables.$I$6];[.E12];[Variables.$I$6];[.F12];[Variables.$I$6];[.G12];[Variables.$I$6];[.H12];[Variables.$I$6];[Variables.$I$1];[.I12];[.J12];[.K12];[.L12];[.M12];[.N12];[.O12];[Variables.$I$2];[Variables.$I$6];[.P12];[Variables.$I$6];[.Q12];[Variables.$I$6];[.R12];[Variables.$I$6];[.S12];[Variables.$I$6];[.T12];IF([.U12]&lt;&gt;&quot;&quot;;CONCATENATE([Variables.$I$6];[.U12]);&quot;&quot;);[Variables.$I$2];[Variables.$I$6]);IF([.B12]&lt;&gt;&quot;&quot;;CONCATENATE(&quot;#&quot;;[.B12]);&quot;&quot;))">
            <text:p/>
          </table:table-cell>
          <table:table-cell table:style-name="ce6" table:number-columns-repeated="5"/>
          <table:table-cell table:style-name="ce6" table:formula="of:=[.G3]+[.G4]+[.G5]+[.G6]+[.G7]+[.G8]" office:value-type="float" office:value="0" calcext:value-type="float">
            <text:p>0</text:p>
          </table:table-cell>
          <table:table-cell table:style-name="ce6" table:number-columns-repeated="14"/>
          <table:table-cell table:style-name="ce36" table:formula="of:=IF(AND([.B12]&lt;&gt;&quot;&quot;;[.C12]&lt;&gt;&quot;&quot;);CONCATENATE([Variables.$I$1];[Variables.$I$7];[.B12];[Variables.$I$7];[Variables.$I$6];[Variables.$I$7];[.C12];[Variables.$I$7];[Variables.$I$6];[Variables.$I$7];[.D12];[Variables.$I$7];[Variables.$I$6];[.E12];[Variables.$I$6];[.F12];[Variables.$I$6];[.G12];[Variables.$I$6];[.H12];[Variables.$I$6];[Variables.$I$1];[.I12];[.J12];[.K12];[.L12];[.M12];[.N12];[.O12];[Variables.$I$2];[Variables.$I$6];[.P12];[Variables.$I$6];[.Q12];[Variables.$I$6];[.R12];[Variables.$I$6];[.S12];[Variables.$I$6];[.T12];IF([.U12]&lt;&gt;&quot;&quot;;CONCATENATE([Variables.$I$6];[.U12]);&quot;&quot;);[Variables.$I$2];[Variables.$I$6]);IF([.B12]&lt;&gt;&quot;&quot;;CONCATENATE(&quot;#&quot;;[.B12]);&quot;&quot;))">
            <text:p/>
          </table:table-cell>
          <table:table-cell table:number-columns-repeated="16362"/>
        </table:table-row>
        <table:table-row table:style-name="ro1">
          <table:table-cell table:style-name="ce6" table:formula="of:=IF(AND([.B13]&lt;&gt;&quot;&quot;;[.C13]&lt;&gt;&quot;&quot;);CONCATENATE([Variables.$I$1];[Variables.$I$7];[.B13];[Variables.$I$7];[Variables.$I$6];[Variables.$I$7];[.C13];[Variables.$I$7];[Variables.$I$6];[Variables.$I$7];[.D13];[Variables.$I$7];[Variables.$I$6];[.E13];[Variables.$I$6];[.F13];[Variables.$I$6];[.G13];[Variables.$I$6];[.H13];[Variables.$I$6];[Variables.$I$1];[.I13];[.J13];[.K13];[.L13];[.M13];[.N13];[.O13];[Variables.$I$2];[Variables.$I$6];[.P13];[Variables.$I$6];[.Q13];[Variables.$I$6];[.R13];[Variables.$I$6];[.S13];[Variables.$I$6];[.T13];IF([.U13]&lt;&gt;&quot;&quot;;CONCATENATE([Variables.$I$6];[.U13]);&quot;&quot;);[Variables.$I$2];[Variables.$I$6]);IF([.B13]&lt;&gt;&quot;&quot;;CONCATENATE(&quot;#&quot;;[.B13]);&quot;&quot;))" office:value-type="string" office:string-value="#Beornings" calcext:value-type="string">
            <text:p>#Beornings</text:p>
          </table:table-cell>
          <table:table-cell table:style-name="ce5" office:value-type="string" calcext:value-type="string">
            <text:p>Beornings</text:p>
          </table:table-cell>
          <table:table-cell table:style-name="ce6" table:number-columns-repeated="19"/>
          <table:table-cell table:style-name="ce6" table:formula="of:=IF(AND([.B13]&lt;&gt;&quot;&quot;;[.C13]&lt;&gt;&quot;&quot;);CONCATENATE([Variables.$I$1];[Variables.$I$7];[.B13];[Variables.$I$7];[Variables.$I$6];[Variables.$I$7];[.C13];[Variables.$I$7];[Variables.$I$6];[Variables.$I$7];[.D13];[Variables.$I$7];[Variables.$I$6];[.E13];[Variables.$I$6];[.F13];[Variables.$I$6];[.G13];[Variables.$I$6];[.H13];[Variables.$I$6];[Variables.$I$1];[.I13];[.J13];[.K13];[.L13];[.M13];[.N13];[.O13];[Variables.$I$2];[Variables.$I$6];[.P13];[Variables.$I$6];[.Q13];[Variables.$I$6];[.R13];[Variables.$I$6];[.S13];[Variables.$I$6];[.T13];IF([.U13]&lt;&gt;&quot;&quot;;CONCATENATE([Variables.$I$6];[.U13]);&quot;&quot;);[Variables.$I$2];[Variables.$I$6]);IF([.B13]&lt;&gt;&quot;&quot;;CONCATENATE(&quot;#&quot;;[.B13]);&quot;&quot;))" office:value-type="string" office:string-value="#Beornings" calcext:value-type="string">
            <text:p>#Beornings</text:p>
          </table:table-cell>
          <table:table-cell table:number-columns-repeated="16362"/>
        </table:table-row>
        <table:table-row table:style-name="ro1">
          <table:table-cell table:style-name="ce6" table:formula="of:=IF(AND([.B14]&lt;&gt;&quot;&quot;;[.C14]&lt;&gt;&quot;&quot;);CONCATENATE([Variables.$I$1];[Variables.$I$7];[.B14];[Variables.$I$7];[Variables.$I$6];[Variables.$I$7];[.C14];[Variables.$I$7];[Variables.$I$6];[Variables.$I$7];[.D14];[Variables.$I$7];[Variables.$I$6];[.E14];[Variables.$I$6];[.F14];[Variables.$I$6];[.G14];[Variables.$I$6];[.H14];[Variables.$I$6];[Variables.$I$1];[.I14];[.J14];[.K14];[.L14];[.M14];[.N14];[.O14];[Variables.$I$2];[Variables.$I$6];[.P14];[Variables.$I$6];[.Q14];[Variables.$I$6];[.R14];[Variables.$I$6];[.S14];[Variables.$I$6];[.T14];IF([.U14]&lt;&gt;&quot;&quot;;CONCATENATE([Variables.$I$6];[.U14]);&quot;&quot;);[Variables.$I$2];[Variables.$I$6]);IF([.B14]&lt;&gt;&quot;&quot;;CONCATENATE(&quot;#&quot;;[.B14]);&quot;&quot;))" office:value-type="string" office:string-value="[&quot;i1_beorning_man&quot;,&quot;Beorning_Man&quot;,&quot;Beorning_Men&quot;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" calcext:value-type="string">
            <text:p>["i1_beorning_man","Beorning_Man","Beorning_Men"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</text:p>
          </table:table-cell>
          <table:table-cell table:style-name="ce7" office:value-type="string" calcext:value-type="string">
            <text:p>i1_beorning_man</text:p>
          </table:table-cell>
          <table:table-cell table:style-name="ce7" office:value-type="string" calcext:value-type="string">
            <text:p>Beorning_Man</text:p>
          </table:table-cell>
          <table:table-cell table:style-name="ce7" office:value-type="string" calcext:value-type="string">
            <text:p>Beorning_Men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beorn</text:p>
          </table:table-cell>
          <table:table-cell table:style-name="ce11" office:value-type="string" calcext:value-type="string">
            <text:p>itm_gondor_ranger_hood,</text:p>
          </table:table-cell>
          <table:table-cell table:style-name="ce11" office:value-type="string" calcext:value-type="string">
            <text:p>itm_beorn_tunic_bad,</text:p>
          </table:table-cell>
          <table:table-cell table:style-name="ce11"/>
          <table:table-cell table:style-name="ce11" office:value-type="string" calcext:value-type="string">
            <text:p>itm_furry_boots,</text:p>
          </table:table-cell>
          <table:table-cell table:style-name="ce11" office:value-type="string" calcext:value-type="string">
            <text:p>itm_beorn_staff,itm_beorn_axe,itm_dwarf_sword_b,</text:p>
          </table:table-cell>
          <table:table-cell table:style-name="ce11" table:number-columns-repeated="2"/>
          <table:table-cell table:style-name="ce12" office:value-type="string" calcext:value-type="string">
            <text:p>attr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ironflesh_3|knows_power_strike_1|knows_athletics_3|knows_tracking_2|knows_pathfinding_1|knows_spotting_1|knows_surgery_1|knows_persuasion_1|knows_trade_1</text:p>
          </table:table-cell>
          <table:table-cell table:style-name="ce14" office:value-type="string" calcext:value-type="string">
            <text:p>beorn_face1</text:p>
          </table:table-cell>
          <table:table-cell table:style-name="ce14" office:value-type="string" calcext:value-type="string">
            <text:p>beorn_face2</text:p>
          </table:table-cell>
          <table:table-cell table:style-name="ce15"/>
          <table:table-cell table:style-name="ce6" table:formula="of:=IF(AND([.B14]&lt;&gt;&quot;&quot;;[.C14]&lt;&gt;&quot;&quot;);CONCATENATE([Variables.$I$1];[Variables.$I$7];[.B14];[Variables.$I$7];[Variables.$I$6];[Variables.$I$7];[.C14];[Variables.$I$7];[Variables.$I$6];[Variables.$I$7];[.D14];[Variables.$I$7];[Variables.$I$6];[.E14];[Variables.$I$6];[.F14];[Variables.$I$6];[.G14];[Variables.$I$6];[.H14];[Variables.$I$6];[Variables.$I$1];[.I14];[.J14];[.K14];[.L14];[.M14];[.N14];[.O14];[Variables.$I$2];[Variables.$I$6];[.P14];[Variables.$I$6];[.Q14];[Variables.$I$6];[.R14];[Variables.$I$6];[.S14];[Variables.$I$6];[.T14];IF([.U14]&lt;&gt;&quot;&quot;;CONCATENATE([Variables.$I$6];[.U14]);&quot;&quot;);[Variables.$I$2];[Variables.$I$6]);IF([.B14]&lt;&gt;&quot;&quot;;CONCATENATE(&quot;#&quot;;[.B14]);&quot;&quot;))" office:value-type="string" office:string-value="[&quot;i1_beorning_man&quot;,&quot;Beorning_Man&quot;,&quot;Beorning_Men&quot;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" calcext:value-type="string">
            <text:p>["i1_beorning_man","Beorning_Man","Beorning_Men"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</text:p>
          </table:table-cell>
          <table:table-cell table:number-columns-repeated="16362"/>
        </table:table-row>
        <table:table-row table:style-name="ro1">
          <table:table-cell table:style-name="ce6" table:formula="of:=IF(AND([.B15]&lt;&gt;&quot;&quot;;[.C15]&lt;&gt;&quot;&quot;);CONCATENATE([Variables.$I$1];[Variables.$I$7];[.B15];[Variables.$I$7];[Variables.$I$6];[Variables.$I$7];[.C15];[Variables.$I$7];[Variables.$I$6];[Variables.$I$7];[.D15];[Variables.$I$7];[Variables.$I$6];[.E15];[Variables.$I$6];[.F15];[Variables.$I$6];[.G15];[Variables.$I$6];[.H15];[Variables.$I$6];[Variables.$I$1];[.I15];[.J15];[.K15];[.L15];[.M15];[.N15];[.O15];[Variables.$I$2];[Variables.$I$6];[.P15];[Variables.$I$6];[.Q15];[Variables.$I$6];[.R15];[Variables.$I$6];[.S15];[Variables.$I$6];[.T15];IF([.U15]&lt;&gt;&quot;&quot;;CONCATENATE([Variables.$I$6];[.U15]);&quot;&quot;);[Variables.$I$2];[Variables.$I$6]);IF([.B15]&lt;&gt;&quot;&quot;;CONCATENATE(&quot;#&quot;;[.B15]);&quot;&quot;))" office:value-type="string" office:string-value="[&quot;i2_beorning_warrior&quot;,&quot;Beorning_Warrior&quot;,&quot;Beorning_Warriors&quot;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" calcext:value-type="string">
            <text:p>["i2_beorning_warrior","Beorning_Warrior","Beorning_Warriors"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</text:p>
          </table:table-cell>
          <table:table-cell table:style-name="ce7" office:value-type="string" calcext:value-type="string">
            <text:p>i2_beorning_warrior</text:p>
          </table:table-cell>
          <table:table-cell table:style-name="ce7" office:value-type="string" calcext:value-type="string">
            <text:p>Beorning_Warrior</text:p>
          </table:table-cell>
          <table:table-cell table:style-name="ce7" office:value-type="string" calcext:value-type="string">
            <text:p>Beorning_Warrio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beorn</text:p>
          </table:table-cell>
          <table:table-cell table:style-name="ce11" office:value-type="string" calcext:value-type="string">
            <text:p>itm_north_skullcap,itm_gondor_ranger_hood,</text:p>
          </table:table-cell>
          <table:table-cell table:style-name="ce11" office:value-type="string" calcext:value-type="string">
            <text:p>itm_beorn_tunic,itm_beorn_padded_bad,</text:p>
          </table:table-cell>
          <table:table-cell table:style-name="ce11"/>
          <table:table-cell table:style-name="ce11" office:value-type="string" calcext:value-type="string">
            <text:p>itm_furry_boots,</text:p>
          </table:table-cell>
          <table:table-cell table:style-name="ce11" office:value-type="string" calcext:value-type="string">
            <text:p>itm_beorn_axe,itm_dwarf_sword_b,</text:p>
          </table:table-cell>
          <table:table-cell table:style-name="ce11" office:value-type="string" calcext:value-type="string">
            <text:p>itm_beorn_shield,itm_north_round_shield,</text:p>
          </table:table-cell>
          <table:table-cell table:style-name="ce11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3|knows_power_strike_2|knows_athletics_4|knows_tracking_2|knows_pathfinding_1|knows_spotting_1|knows_surgery_1|knows_persuasion_1|knows_trade_1</text:p>
          </table:table-cell>
          <table:table-cell table:style-name="ce14" office:value-type="string" calcext:value-type="string">
            <text:p>beorn_face1</text:p>
          </table:table-cell>
          <table:table-cell table:style-name="ce14" office:value-type="string" calcext:value-type="string">
            <text:p>beorn_face2</text:p>
          </table:table-cell>
          <table:table-cell table:style-name="ce15"/>
          <table:table-cell table:style-name="ce6" table:formula="of:=IF(AND([.B15]&lt;&gt;&quot;&quot;;[.C15]&lt;&gt;&quot;&quot;);CONCATENATE([Variables.$I$1];[Variables.$I$7];[.B15];[Variables.$I$7];[Variables.$I$6];[Variables.$I$7];[.C15];[Variables.$I$7];[Variables.$I$6];[Variables.$I$7];[.D15];[Variables.$I$7];[Variables.$I$6];[.E15];[Variables.$I$6];[.F15];[Variables.$I$6];[.G15];[Variables.$I$6];[.H15];[Variables.$I$6];[Variables.$I$1];[.I15];[.J15];[.K15];[.L15];[.M15];[.N15];[.O15];[Variables.$I$2];[Variables.$I$6];[.P15];[Variables.$I$6];[.Q15];[Variables.$I$6];[.R15];[Variables.$I$6];[.S15];[Variables.$I$6];[.T15];IF([.U15]&lt;&gt;&quot;&quot;;CONCATENATE([Variables.$I$6];[.U15]);&quot;&quot;);[Variables.$I$2];[Variables.$I$6]);IF([.B15]&lt;&gt;&quot;&quot;;CONCATENATE(&quot;#&quot;;[.B15]);&quot;&quot;))" office:value-type="string" office:string-value="[&quot;i2_beorning_warrior&quot;,&quot;Beorning_Warrior&quot;,&quot;Beorning_Warriors&quot;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" calcext:value-type="string">
            <text:p>["i2_beorning_warrior","Beorning_Warrior","Beorning_Warriors"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</text:p>
          </table:table-cell>
          <table:table-cell table:number-columns-repeated="16362"/>
        </table:table-row>
        <table:table-row table:style-name="ro1">
          <table:table-cell table:style-name="ce6" table:formula="of:=IF(AND([.B16]&lt;&gt;&quot;&quot;;[.C16]&lt;&gt;&quot;&quot;);CONCATENATE([Variables.$I$1];[Variables.$I$7];[.B16];[Variables.$I$7];[Variables.$I$6];[Variables.$I$7];[.C16];[Variables.$I$7];[Variables.$I$6];[Variables.$I$7];[.D16];[Variables.$I$7];[Variables.$I$6];[.E16];[Variables.$I$6];[.F16];[Variables.$I$6];[.G16];[Variables.$I$6];[.H16];[Variables.$I$6];[Variables.$I$1];[.I16];[.J16];[.K16];[.L16];[.M16];[.N16];[.O16];[Variables.$I$2];[Variables.$I$6];[.P16];[Variables.$I$6];[.Q16];[Variables.$I$6];[.R16];[Variables.$I$6];[.S16];[Variables.$I$6];[.T16];IF([.U16]&lt;&gt;&quot;&quot;;CONCATENATE([Variables.$I$6];[.U16]);&quot;&quot;);[Variables.$I$2];[Variables.$I$6]);IF([.B16]&lt;&gt;&quot;&quot;;CONCATENATE(&quot;#&quot;;[.B16]);&quot;&quot;))" office:value-type="string" office:string-value="[&quot;i3_beorning_tolltacker&quot;,&quot;Beorning_Toll-Taker&quot;,&quot;Beorning_Toll-Takers&quot;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" calcext:value-type="string">
            <text:p>["i3_beorning_tolltacker","Beorning_Toll-Taker","Beorning_Toll-Takers"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</text:p>
          </table:table-cell>
          <table:table-cell table:style-name="ce7" office:value-type="string" calcext:value-type="string">
            <text:p>i3_beorning_tolltacker</text:p>
          </table:table-cell>
          <table:table-cell table:style-name="ce7" office:value-type="string" calcext:value-type="string">
            <text:p>Beorning_Toll-Taker</text:p>
          </table:table-cell>
          <table:table-cell table:style-name="ce7" office:value-type="string" calcext:value-type="string">
            <text:p>Beorning_Toll-Takers</text:p>
          </table:table-cell>
          <table:table-cell table:style-name="ce8" office:value-type="string" calcext:value-type="string">
            <text:p>tfg_armor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beorn</text:p>
          </table:table-cell>
          <table:table-cell table:style-name="ce11" office:value-type="string" calcext:value-type="string">
            <text:p>itm_north_skullcap,itm_beorn_helmet_light,</text:p>
          </table:table-cell>
          <table:table-cell table:style-name="ce11" office:value-type="string" calcext:value-type="string">
            <text:p>itm_beorn_padded, itm_beorn_heavy_bad,</text:p>
          </table:table-cell>
          <table:table-cell table:style-name="ce11"/>
          <table:table-cell table:style-name="ce11" office:value-type="string" calcext:value-type="string">
            <text:p>itm_furry_boots,</text:p>
          </table:table-cell>
          <table:table-cell table:style-name="ce11" office:value-type="string" calcext:value-type="string">
            <text:p>itm_dwarf_sword_b,</text:p>
          </table:table-cell>
          <table:table-cell table:style-name="ce11" office:value-type="string" calcext:value-type="string">
            <text:p>itm_beorn_shield,itm_north_round_shield,itm_rohirrim_throwing_axe,</text:p>
          </table:table-cell>
          <table:table-cell table:style-name="ce11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4|knows_power_strike_3|knows_ironflesh_4|knows_power_throw_2</text:p>
          </table:table-cell>
          <table:table-cell table:style-name="ce14" office:value-type="string" calcext:value-type="string">
            <text:p>beorn_face1</text:p>
          </table:table-cell>
          <table:table-cell table:style-name="ce14" office:value-type="string" calcext:value-type="string">
            <text:p>beorn_face2</text:p>
          </table:table-cell>
          <table:table-cell table:style-name="ce15"/>
          <table:table-cell table:style-name="ce6" table:formula="of:=IF(AND([.B16]&lt;&gt;&quot;&quot;;[.C16]&lt;&gt;&quot;&quot;);CONCATENATE([Variables.$I$1];[Variables.$I$7];[.B16];[Variables.$I$7];[Variables.$I$6];[Variables.$I$7];[.C16];[Variables.$I$7];[Variables.$I$6];[Variables.$I$7];[.D16];[Variables.$I$7];[Variables.$I$6];[.E16];[Variables.$I$6];[.F16];[Variables.$I$6];[.G16];[Variables.$I$6];[.H16];[Variables.$I$6];[Variables.$I$1];[.I16];[.J16];[.K16];[.L16];[.M16];[.N16];[.O16];[Variables.$I$2];[Variables.$I$6];[.P16];[Variables.$I$6];[.Q16];[Variables.$I$6];[.R16];[Variables.$I$6];[.S16];[Variables.$I$6];[.T16];IF([.U16]&lt;&gt;&quot;&quot;;CONCATENATE([Variables.$I$6];[.U16]);&quot;&quot;);[Variables.$I$2];[Variables.$I$6]);IF([.B16]&lt;&gt;&quot;&quot;;CONCATENATE(&quot;#&quot;;[.B16]);&quot;&quot;))" office:value-type="string" office:string-value="[&quot;i3_beorning_tolltacker&quot;,&quot;Beorning_Toll-Taker&quot;,&quot;Beorning_Toll-Takers&quot;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" calcext:value-type="string">
            <text:p>["i3_beorning_tolltacker","Beorning_Toll-Taker","Beorning_Toll-Takers"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</text:p>
          </table:table-cell>
          <table:table-cell table:number-columns-repeated="16362"/>
        </table:table-row>
        <table:table-row table:style-name="ro1">
          <table:table-cell table:style-name="ce6" table:formula="of:=IF(AND([.B17]&lt;&gt;&quot;&quot;;[.C17]&lt;&gt;&quot;&quot;);CONCATENATE([Variables.$I$1];[Variables.$I$7];[.B17];[Variables.$I$7];[Variables.$I$6];[Variables.$I$7];[.C17];[Variables.$I$7];[Variables.$I$6];[Variables.$I$7];[.D17];[Variables.$I$7];[Variables.$I$6];[.E17];[Variables.$I$6];[.F17];[Variables.$I$6];[.G17];[Variables.$I$6];[.H17];[Variables.$I$6];[Variables.$I$1];[.I17];[.J17];[.K17];[.L17];[.M17];[.N17];[.O17];[Variables.$I$2];[Variables.$I$6];[.P17];[Variables.$I$6];[.Q17];[Variables.$I$6];[.R17];[Variables.$I$6];[.S17];[Variables.$I$6];[.T17];IF([.U17]&lt;&gt;&quot;&quot;;CONCATENATE([Variables.$I$6];[.U17]);&quot;&quot;);[Variables.$I$2];[Variables.$I$6]);IF([.B17]&lt;&gt;&quot;&quot;;CONCATENATE(&quot;#&quot;;[.B17]);&quot;&quot;))" office:value-type="string" office:string-value="[&quot;i4_beorning_sentinel&quot;,&quot;Beorning_Sentinel&quot;,&quot;Beorning_Sentinels&quot;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" calcext:value-type="string">
            <text:p>["i4_beorning_sentinel","Beorning_Sentinel","Beorning_Sentinels"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</text:p>
          </table:table-cell>
          <table:table-cell table:style-name="ce7" office:value-type="string" calcext:value-type="string">
            <text:p>i4_beorning_sentinel</text:p>
          </table:table-cell>
          <table:table-cell table:style-name="ce7" office:value-type="string" calcext:value-type="string">
            <text:p>Beorning_Sentinel</text:p>
          </table:table-cell>
          <table:table-cell table:style-name="ce7" office:value-type="string" calcext:value-type="string">
            <text:p>Beorning_Sentinel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beorn</text:p>
          </table:table-cell>
          <table:table-cell table:style-name="ce11" office:value-type="string" calcext:value-type="string">
            <text:p>itm_north_skullcap,itm_beorn_helmet_light,</text:p>
          </table:table-cell>
          <table:table-cell table:style-name="ce11" office:value-type="string" calcext:value-type="string">
            <text:p>itm_beorn_heavy,</text:p>
          </table:table-cell>
          <table:table-cell table:style-name="ce11"/>
          <table:table-cell table:style-name="ce11" office:value-type="string" calcext:value-type="string">
            <text:p>itm_leather_boots,</text:p>
          </table:table-cell>
          <table:table-cell table:style-name="ce11" office:value-type="string" calcext:value-type="string">
            <text:p>itm_dwarf_sword_b,itm_dale_sword,</text:p>
          </table:table-cell>
          <table:table-cell table:style-name="ce11" office:value-type="string" calcext:value-type="string">
            <text:p>itm_beorn_shield,itm_beorn_shield_good,itm_rohirrim_throwing_axe,</text:p>
          </table:table-cell>
          <table:table-cell table:style-name="ce11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4|knows_power_strike_3|knows_ironflesh_5|knows_shield_3|knows_power_throw_2</text:p>
          </table:table-cell>
          <table:table-cell table:style-name="ce14" office:value-type="string" calcext:value-type="string">
            <text:p>beorn_face1</text:p>
          </table:table-cell>
          <table:table-cell table:style-name="ce14" office:value-type="string" calcext:value-type="string">
            <text:p>beorn_face2</text:p>
          </table:table-cell>
          <table:table-cell table:style-name="ce15"/>
          <table:table-cell table:style-name="ce6" table:formula="of:=IF(AND([.B17]&lt;&gt;&quot;&quot;;[.C17]&lt;&gt;&quot;&quot;);CONCATENATE([Variables.$I$1];[Variables.$I$7];[.B17];[Variables.$I$7];[Variables.$I$6];[Variables.$I$7];[.C17];[Variables.$I$7];[Variables.$I$6];[Variables.$I$7];[.D17];[Variables.$I$7];[Variables.$I$6];[.E17];[Variables.$I$6];[.F17];[Variables.$I$6];[.G17];[Variables.$I$6];[.H17];[Variables.$I$6];[Variables.$I$1];[.I17];[.J17];[.K17];[.L17];[.M17];[.N17];[.O17];[Variables.$I$2];[Variables.$I$6];[.P17];[Variables.$I$6];[.Q17];[Variables.$I$6];[.R17];[Variables.$I$6];[.S17];[Variables.$I$6];[.T17];IF([.U17]&lt;&gt;&quot;&quot;;CONCATENATE([Variables.$I$6];[.U17]);&quot;&quot;);[Variables.$I$2];[Variables.$I$6]);IF([.B17]&lt;&gt;&quot;&quot;;CONCATENATE(&quot;#&quot;;[.B17]);&quot;&quot;))" office:value-type="string" office:string-value="[&quot;i4_beorning_sentinel&quot;,&quot;Beorning_Sentinel&quot;,&quot;Beorning_Sentinels&quot;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" calcext:value-type="string">
            <text:p>["i4_beorning_sentinel","Beorning_Sentinel","Beorning_Sentinels"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</text:p>
          </table:table-cell>
          <table:table-cell table:number-columns-repeated="16362"/>
        </table:table-row>
        <table:table-row table:style-name="ro1">
          <table:table-cell table:style-name="ce6" table:formula="of:=IF(AND([.B18]&lt;&gt;&quot;&quot;;[.C18]&lt;&gt;&quot;&quot;);CONCATENATE([Variables.$I$1];[Variables.$I$7];[.B18];[Variables.$I$7];[Variables.$I$6];[Variables.$I$7];[.C18];[Variables.$I$7];[Variables.$I$6];[Variables.$I$7];[.D18];[Variables.$I$7];[Variables.$I$6];[.E18];[Variables.$I$6];[.F18];[Variables.$I$6];[.G18];[Variables.$I$6];[.H18];[Variables.$I$6];[Variables.$I$1];[.I18];[.J18];[.K18];[.L18];[.M18];[.N18];[.O18];[Variables.$I$2];[Variables.$I$6];[.P18];[Variables.$I$6];[.Q18];[Variables.$I$6];[.R18];[Variables.$I$6];[.S18];[Variables.$I$6];[.T18];IF([.U18]&lt;&gt;&quot;&quot;;CONCATENATE([Variables.$I$6];[.U18]);&quot;&quot;);[Variables.$I$2];[Variables.$I$6]);IF([.B18]&lt;&gt;&quot;&quot;;CONCATENATE(&quot;#&quot;;[.B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lmet,itm_beorn_heavy_good,itm_leather_gloves,itm_leather_boots,itm_dwarf_sword_a,itm_dwarf_sword_b,itm_dale_sword,itm_dale_sword_long,itm_beorn_shield_good,itm_rohirrim_throwing_axe,],attr_tier_5,wp_tier_5,knows_common|knows_athletics_5|knows_power_strike_4|knows_ironflesh_7|knows_shield_5|knows_power_throw_3,beorn_face1,beorn_face2]," calcext:value-type="string">
            <text:p>["i5_beorning_warden_of_the_ford","Beorning_Warden_of_the_Ford","Beorning_Wardens_of_the_Ford",tfg_gloves| tfg_shield| tfg_armor| tfg_helm| tfg_boots,0,0,fac_beorn,[itm_north_skullcap,itm_beorn_helmet,itm_beorn_heavy_good,itm_leather_gloves,itm_leather_boots,itm_dwarf_sword_a,itm_dwarf_sword_b,itm_dale_sword,itm_dale_sword_long,itm_beorn_shield_good,itm_rohirrim_throwing_axe,],attr_tier_5,wp_tier_5,knows_common|knows_athletics_5|knows_power_strike_4|knows_ironflesh_7|knows_shield_5|knows_power_throw_3,beorn_face1,beorn_face2],</text:p>
          </table:table-cell>
          <table:table-cell table:style-name="ce7" office:value-type="string" calcext:value-type="string">
            <text:p>i5_beorning_warden_of_the_ford</text:p>
          </table:table-cell>
          <table:table-cell table:style-name="ce7" office:value-type="string" calcext:value-type="string">
            <text:p>Beorning_Warden_of_the_Ford</text:p>
          </table:table-cell>
          <table:table-cell table:style-name="ce7" office:value-type="string" calcext:value-type="string">
            <text:p>Beorning_Wardens_of_the_Ford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beorn</text:p>
          </table:table-cell>
          <table:table-cell table:style-name="ce11" office:value-type="string" calcext:value-type="string">
            <text:p>itm_north_skullcap,itm_beorn_helmet,</text:p>
          </table:table-cell>
          <table:table-cell table:style-name="ce11" office:value-type="string" calcext:value-type="string">
            <text:p>itm_beorn_heavy_good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leather_boots,</text:p>
          </table:table-cell>
          <table:table-cell table:style-name="ce11" office:value-type="string" calcext:value-type="string">
            <text:p>itm_dwarf_sword_a,itm_dwarf_sword_b,itm_dale_sword,itm_dale_sword_long,</text:p>
          </table:table-cell>
          <table:table-cell table:style-name="ce11" office:value-type="string" calcext:value-type="string">
            <text:p>itm_beorn_shield_good,itm_rohirrim_throwing_axe,</text:p>
          </table:table-cell>
          <table:table-cell table:style-name="ce11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5|knows_power_strike_4|knows_ironflesh_7|knows_shield_5|knows_power_throw_3</text:p>
          </table:table-cell>
          <table:table-cell table:style-name="ce14" office:value-type="string" calcext:value-type="string">
            <text:p>beorn_face1</text:p>
          </table:table-cell>
          <table:table-cell table:style-name="ce14" office:value-type="string" calcext:value-type="string">
            <text:p>beorn_face2</text:p>
          </table:table-cell>
          <table:table-cell table:style-name="ce15"/>
          <table:table-cell table:style-name="ce6" table:formula="of:=IF(AND([.B18]&lt;&gt;&quot;&quot;;[.C18]&lt;&gt;&quot;&quot;);CONCATENATE([Variables.$I$1];[Variables.$I$7];[.B18];[Variables.$I$7];[Variables.$I$6];[Variables.$I$7];[.C18];[Variables.$I$7];[Variables.$I$6];[Variables.$I$7];[.D18];[Variables.$I$7];[Variables.$I$6];[.E18];[Variables.$I$6];[.F18];[Variables.$I$6];[.G18];[Variables.$I$6];[.H18];[Variables.$I$6];[Variables.$I$1];[.I18];[.J18];[.K18];[.L18];[.M18];[.N18];[.O18];[Variables.$I$2];[Variables.$I$6];[.P18];[Variables.$I$6];[.Q18];[Variables.$I$6];[.R18];[Variables.$I$6];[.S18];[Variables.$I$6];[.T18];IF([.U18]&lt;&gt;&quot;&quot;;CONCATENATE([Variables.$I$6];[.U18]);&quot;&quot;);[Variables.$I$2];[Variables.$I$6]);IF([.B18]&lt;&gt;&quot;&quot;;CONCATENATE(&quot;#&quot;;[.B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lmet,itm_beorn_heavy_good,itm_leather_gloves,itm_leather_boots,itm_dwarf_sword_a,itm_dwarf_sword_b,itm_dale_sword,itm_dale_sword_long,itm_beorn_shield_good,itm_rohirrim_throwing_axe,],attr_tier_5,wp_tier_5,knows_common|knows_athletics_5|knows_power_strike_4|knows_ironflesh_7|knows_shield_5|knows_power_throw_3,beorn_face1,beorn_face2]," calcext:value-type="string">
            <text:p>["i5_beorning_warden_of_the_ford","Beorning_Warden_of_the_Ford","Beorning_Wardens_of_the_Ford",tfg_gloves| tfg_shield| tfg_armor| tfg_helm| tfg_boots,0,0,fac_beorn,[itm_north_skullcap,itm_beorn_helmet,itm_beorn_heavy_good,itm_leather_gloves,itm_leather_boots,itm_dwarf_sword_a,itm_dwarf_sword_b,itm_dale_sword,itm_dale_sword_long,itm_beorn_shield_good,itm_rohirrim_throwing_axe,],attr_tier_5,wp_tier_5,knows_common|knows_athletics_5|knows_power_strike_4|knows_ironflesh_7|knows_shield_5|knows_power_throw_3,beorn_face1,beorn_face2],</text:p>
          </table:table-cell>
          <table:table-cell table:number-columns-repeated="16362"/>
        </table:table-row>
        <table:table-row table:style-name="ro1">
          <table:table-cell table:style-name="ce6" table:formula="of:=IF(AND([.B19]&lt;&gt;&quot;&quot;;[.C19]&lt;&gt;&quot;&quot;);CONCATENATE([Variables.$I$1];[Variables.$I$7];[.B19];[Variables.$I$7];[Variables.$I$6];[Variables.$I$7];[.C19];[Variables.$I$7];[Variables.$I$6];[Variables.$I$7];[.D19];[Variables.$I$7];[Variables.$I$6];[.E19];[Variables.$I$6];[.F19];[Variables.$I$6];[.G19];[Variables.$I$6];[.H19];[Variables.$I$6];[Variables.$I$1];[.I19];[.J19];[.K19];[.L19];[.M19];[.N19];[.O19];[Variables.$I$2];[Variables.$I$6];[.P19];[Variables.$I$6];[.Q19];[Variables.$I$6];[.R19];[Variables.$I$6];[.S19];[Variables.$I$6];[.T19];IF([.U19]&lt;&gt;&quot;&quot;;CONCATENATE([Variables.$I$6];[.U19]);&quot;&quot;);[Variables.$I$2];[Variables.$I$6]);IF([.B19]&lt;&gt;&quot;&quot;;CONCATENATE(&quot;#&quot;;[.B19]);&quot;&quot;))" office:value-type="string" office:string-value="[&quot;i3_beorning_carrock_lookout&quot;,&quot;Beorning_Carrock_Lookout&quot;,&quot;Beorning_Carrock_Lookouts&quot;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" calcext:value-type="string">
            <text:p>["i3_beorning_carrock_lookout","Beorning_Carrock_Lookout","Beorning_Carrock_Lookouts"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</text:p>
          </table:table-cell>
          <table:table-cell table:style-name="ce7" office:value-type="string" calcext:value-type="string">
            <text:p>i3_beorning_carrock_lookout</text:p>
          </table:table-cell>
          <table:table-cell table:style-name="ce7" office:value-type="string" calcext:value-type="string">
            <text:p>Beorning_Carrock_Lookout</text:p>
          </table:table-cell>
          <table:table-cell table:style-name="ce7" office:value-type="string" calcext:value-type="string">
            <text:p>Beorning_Carrock_Lookout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beorn</text:p>
          </table:table-cell>
          <table:table-cell table:style-name="ce11" office:value-type="string" calcext:value-type="string">
            <text:p>itm_north_skullcap,itm_beorn_helmet_light,</text:p>
          </table:table-cell>
          <table:table-cell table:style-name="ce11" office:value-type="string" calcext:value-type="string">
            <text:p>itm_beorn_tunic_good,itm_beorn_padded_bad,itm_beorn_berserk_bad,</text:p>
          </table:table-cell>
          <table:table-cell table:style-name="ce11"/>
          <table:table-cell table:style-name="ce11" office:value-type="string" calcext:value-type="string">
            <text:p>itm_furry_boots,</text:p>
          </table:table-cell>
          <table:table-cell table:style-name="ce11" office:value-type="string" calcext:value-type="string">
            <text:p>itm_beorn_axe,</text:p>
          </table:table-cell>
          <table:table-cell table:style-name="ce11" office:value-type="string" calcext:value-type="string">
            <text:p>itm_javelin,</text:p>
          </table:table-cell>
          <table:table-cell table:style-name="ce11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6|knows_power_strike_4|knows_ironflesh_6|knows_power_throw_2</text:p>
          </table:table-cell>
          <table:table-cell table:style-name="ce14" office:value-type="string" calcext:value-type="string">
            <text:p>beorn_face1</text:p>
          </table:table-cell>
          <table:table-cell table:style-name="ce14" office:value-type="string" calcext:value-type="string">
            <text:p>beorn_face2</text:p>
          </table:table-cell>
          <table:table-cell table:style-name="ce15"/>
          <table:table-cell table:style-name="ce6" table:formula="of:=IF(AND([.B19]&lt;&gt;&quot;&quot;;[.C19]&lt;&gt;&quot;&quot;);CONCATENATE([Variables.$I$1];[Variables.$I$7];[.B19];[Variables.$I$7];[Variables.$I$6];[Variables.$I$7];[.C19];[Variables.$I$7];[Variables.$I$6];[Variables.$I$7];[.D19];[Variables.$I$7];[Variables.$I$6];[.E19];[Variables.$I$6];[.F19];[Variables.$I$6];[.G19];[Variables.$I$6];[.H19];[Variables.$I$6];[Variables.$I$1];[.I19];[.J19];[.K19];[.L19];[.M19];[.N19];[.O19];[Variables.$I$2];[Variables.$I$6];[.P19];[Variables.$I$6];[.Q19];[Variables.$I$6];[.R19];[Variables.$I$6];[.S19];[Variables.$I$6];[.T19];IF([.U19]&lt;&gt;&quot;&quot;;CONCATENATE([Variables.$I$6];[.U19]);&quot;&quot;);[Variables.$I$2];[Variables.$I$6]);IF([.B19]&lt;&gt;&quot;&quot;;CONCATENATE(&quot;#&quot;;[.B19]);&quot;&quot;))" office:value-type="string" office:string-value="[&quot;i3_beorning_carrock_lookout&quot;,&quot;Beorning_Carrock_Lookout&quot;,&quot;Beorning_Carrock_Lookouts&quot;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" calcext:value-type="string">
            <text:p>["i3_beorning_carrock_lookout","Beorning_Carrock_Lookout","Beorning_Carrock_Lookouts"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</text:p>
          </table:table-cell>
          <table:table-cell table:number-columns-repeated="16362"/>
        </table:table-row>
        <table:table-row table:style-name="ro1">
          <table:table-cell table:style-name="ce6" table:formula="of:=IF(AND([.B20]&lt;&gt;&quot;&quot;;[.C20]&lt;&gt;&quot;&quot;);CONCATENATE([Variables.$I$1];[Variables.$I$7];[.B20];[Variables.$I$7];[Variables.$I$6];[Variables.$I$7];[.C20];[Variables.$I$7];[Variables.$I$6];[Variables.$I$7];[.D20];[Variables.$I$7];[Variables.$I$6];[.E20];[Variables.$I$6];[.F20];[Variables.$I$6];[.G20];[Variables.$I$6];[.H20];[Variables.$I$6];[Variables.$I$1];[.I20];[.J20];[.K20];[.L20];[.M20];[.N20];[.O20];[Variables.$I$2];[Variables.$I$6];[.P20];[Variables.$I$6];[.Q20];[Variables.$I$6];[.R20];[Variables.$I$6];[.S20];[Variables.$I$6];[.T20];IF([.U20]&lt;&gt;&quot;&quot;;CONCATENATE([Variables.$I$6];[.U20]);&quot;&quot;);[Variables.$I$2];[Variables.$I$6]);IF([.B20]&lt;&gt;&quot;&quot;;CONCATENATE(&quot;#&quot;;[.B20]);&quot;&quot;))" office:value-type="string" office:string-value="[&quot;i4_beorning_carrock_fighter&quot;,&quot;Beorning_Carrock_Fighter&quot;,&quot;Beorning_Carrock_Fighters&quot;,tfg_shield| tfg_armor| tfg_helm| tfg_boots,0,0,fac_beorn,[itm_beorn_helmet,itm_beorn_helmet_light,itm_beorn_padded, itm_beorn_berserk,itm_furry_boots,itm_beorn_axe,itm_beorn_battle_axe,itm_javelin,],attr_tier_4,wp_tier_4,knows_common|knows_athletics_7|knows_power_strike_5|knows_ironflesh_7|knows_power_throw_4,beorn_face1,beorn_face2]," calcext:value-type="string">
            <text:p>["i4_beorning_carrock_fighter","Beorning_Carrock_Fighter","Beorning_Carrock_Fighters",tfg_shield| tfg_armor| tfg_helm| tfg_boots,0,0,fac_beorn,[itm_beorn_helmet,itm_beorn_helmet_light,itm_beorn_padded, itm_beorn_berserk,itm_furry_boots,itm_beorn_axe,itm_beorn_battle_axe,itm_javelin,],attr_tier_4,wp_tier_4,knows_common|knows_athletics_7|knows_power_strike_5|knows_ironflesh_7|knows_power_throw_4,beorn_face1,beorn_face2],</text:p>
          </table:table-cell>
          <table:table-cell table:style-name="ce7" office:value-type="string" calcext:value-type="string">
            <text:p>i4_beorning_carrock_fighter</text:p>
          </table:table-cell>
          <table:table-cell table:style-name="ce7" office:value-type="string" calcext:value-type="string">
            <text:p>Beorning_Carrock_Fighter</text:p>
          </table:table-cell>
          <table:table-cell table:style-name="ce7" office:value-type="string" calcext:value-type="string">
            <text:p>Beorning_Carrock_Fighter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beorn</text:p>
          </table:table-cell>
          <table:table-cell table:style-name="ce11" office:value-type="string" calcext:value-type="string">
            <text:p>itm_beorn_helmet,itm_beorn_helmet_light,</text:p>
          </table:table-cell>
          <table:table-cell table:style-name="ce11" office:value-type="string" calcext:value-type="string">
            <text:p>itm_beorn_padded, itm_beorn_berserk,</text:p>
          </table:table-cell>
          <table:table-cell table:style-name="ce11"/>
          <table:table-cell table:style-name="ce11" office:value-type="string" calcext:value-type="string">
            <text:p>itm_furry_boots,</text:p>
          </table:table-cell>
          <table:table-cell table:style-name="ce11" office:value-type="string" calcext:value-type="string">
            <text:p>itm_beorn_axe,itm_beorn_battle_axe,</text:p>
          </table:table-cell>
          <table:table-cell table:style-name="ce11" office:value-type="string" calcext:value-type="string">
            <text:p>itm_javelin,</text:p>
          </table:table-cell>
          <table:table-cell table:style-name="ce11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7|knows_power_strike_5|knows_ironflesh_7|knows_power_throw_4</text:p>
          </table:table-cell>
          <table:table-cell table:style-name="ce14" office:value-type="string" calcext:value-type="string">
            <text:p>beorn_face1</text:p>
          </table:table-cell>
          <table:table-cell table:style-name="ce14" office:value-type="string" calcext:value-type="string">
            <text:p>beorn_face2</text:p>
          </table:table-cell>
          <table:table-cell table:style-name="ce15"/>
          <table:table-cell table:style-name="ce6" table:formula="of:=IF(AND([.B20]&lt;&gt;&quot;&quot;;[.C20]&lt;&gt;&quot;&quot;);CONCATENATE([Variables.$I$1];[Variables.$I$7];[.B20];[Variables.$I$7];[Variables.$I$6];[Variables.$I$7];[.C20];[Variables.$I$7];[Variables.$I$6];[Variables.$I$7];[.D20];[Variables.$I$7];[Variables.$I$6];[.E20];[Variables.$I$6];[.F20];[Variables.$I$6];[.G20];[Variables.$I$6];[.H20];[Variables.$I$6];[Variables.$I$1];[.I20];[.J20];[.K20];[.L20];[.M20];[.N20];[.O20];[Variables.$I$2];[Variables.$I$6];[.P20];[Variables.$I$6];[.Q20];[Variables.$I$6];[.R20];[Variables.$I$6];[.S20];[Variables.$I$6];[.T20];IF([.U20]&lt;&gt;&quot;&quot;;CONCATENATE([Variables.$I$6];[.U20]);&quot;&quot;);[Variables.$I$2];[Variables.$I$6]);IF([.B20]&lt;&gt;&quot;&quot;;CONCATENATE(&quot;#&quot;;[.B20]);&quot;&quot;))" office:value-type="string" office:string-value="[&quot;i4_beorning_carrock_fighter&quot;,&quot;Beorning_Carrock_Fighter&quot;,&quot;Beorning_Carrock_Fighters&quot;,tfg_shield| tfg_armor| tfg_helm| tfg_boots,0,0,fac_beorn,[itm_beorn_helmet,itm_beorn_helmet_light,itm_beorn_padded, itm_beorn_berserk,itm_furry_boots,itm_beorn_axe,itm_beorn_battle_axe,itm_javelin,],attr_tier_4,wp_tier_4,knows_common|knows_athletics_7|knows_power_strike_5|knows_ironflesh_7|knows_power_throw_4,beorn_face1,beorn_face2]," calcext:value-type="string">
            <text:p>["i4_beorning_carrock_fighter","Beorning_Carrock_Fighter","Beorning_Carrock_Fighters",tfg_shield| tfg_armor| tfg_helm| tfg_boots,0,0,fac_beorn,[itm_beorn_helmet,itm_beorn_helmet_light,itm_beorn_padded, itm_beorn_berserk,itm_furry_boots,itm_beorn_axe,itm_beorn_battle_axe,itm_javelin,],attr_tier_4,wp_tier_4,knows_common|knows_athletics_7|knows_power_strike_5|knows_ironflesh_7|knows_power_throw_4,beorn_face1,beorn_face2],</text:p>
          </table:table-cell>
          <table:table-cell table:number-columns-repeated="16362"/>
        </table:table-row>
        <table:table-row table:style-name="ro1">
          <table:table-cell table:style-name="ce6" table:formula="of:=IF(AND([.B21]&lt;&gt;&quot;&quot;;[.C21]&lt;&gt;&quot;&quot;);CONCATENATE([Variables.$I$1];[Variables.$I$7];[.B21];[Variables.$I$7];[Variables.$I$6];[Variables.$I$7];[.C21];[Variables.$I$7];[Variables.$I$6];[Variables.$I$7];[.D21];[Variables.$I$7];[Variables.$I$6];[.E21];[Variables.$I$6];[.F21];[Variables.$I$6];[.G21];[Variables.$I$6];[.H21];[Variables.$I$6];[Variables.$I$1];[.I21];[.J21];[.K21];[.L21];[.M21];[.N21];[.O21];[Variables.$I$2];[Variables.$I$6];[.P21];[Variables.$I$6];[.Q21];[Variables.$I$6];[.R21];[Variables.$I$6];[.S21];[Variables.$I$6];[.T21];IF([.U21]&lt;&gt;&quot;&quot;;CONCATENATE([Variables.$I$6];[.U21]);&quot;&quot;);[Variables.$I$2];[Variables.$I$6]);IF([.B21]&lt;&gt;&quot;&quot;;CONCATENATE(&quot;#&quot;;[.B21]);&quot;&quot;))" office:value-type="string" office:string-value="[&quot;i5_beorning_carrock_berserker&quot;,&quot;Beorning_Carrock_Berserker&quot;,&quot;Beorning_Carrock_Berserkers&quot;,tfg_gloves| tfg_armor| tfg_helm| tfg_boots,0,0,fac_beorn,[itm_beorn_helmet,itm_beorn_padded_good,itm_beorn_berserk_good,itm_furry_boots,itm_beorn_battle_axe,itm_javelin,itm_marker_berserker, itm_marker_scares_wargs, itm_marker_scares_horses,],attr_tier_5,wp_tier_6,knows_common|knows_athletics_8|knows_power_strike_7|knows_ironflesh_9|knows_power_throw_6,beorn_face1,beorn_face2]," calcext:value-type="string">
            <text:p>["i5_beorning_carrock_berserker","Beorning_Carrock_Berserker","Beorning_Carrock_Berserkers",tfg_gloves| tfg_armor| tfg_helm| tfg_boots,0,0,fac_beorn,[itm_beorn_helmet,itm_beorn_padded_good,itm_beorn_berserk_good,itm_furry_boots,itm_beorn_battle_axe,itm_javelin,itm_marker_berserker, itm_marker_scares_wargs, itm_marker_scares_horses,],attr_tier_5,wp_tier_6,knows_common|knows_athletics_8|knows_power_strike_7|knows_ironflesh_9|knows_power_throw_6,beorn_face1,beorn_face2],</text:p>
          </table:table-cell>
          <table:table-cell table:style-name="ce7" office:value-type="string" calcext:value-type="string">
            <text:p>i5_beorning_carrock_berserker</text:p>
          </table:table-cell>
          <table:table-cell table:style-name="ce7" office:value-type="string" calcext:value-type="string">
            <text:p>Beorning_Carrock_Berserker</text:p>
          </table:table-cell>
          <table:table-cell table:style-name="ce7" office:value-type="string" calcext:value-type="string">
            <text:p>Beorning_Carrock_Berserkers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beorn</text:p>
          </table:table-cell>
          <table:table-cell table:style-name="ce11" office:value-type="string" calcext:value-type="string">
            <text:p>itm_beorn_helmet,</text:p>
          </table:table-cell>
          <table:table-cell table:style-name="ce11" office:value-type="string" calcext:value-type="string">
            <text:p>itm_beorn_padded_good,itm_beorn_berserk_good,</text:p>
          </table:table-cell>
          <table:table-cell table:style-name="ce11"/>
          <table:table-cell table:style-name="ce11" office:value-type="string" calcext:value-type="string">
            <text:p>itm_furry_boots,</text:p>
          </table:table-cell>
          <table:table-cell table:style-name="ce11" office:value-type="string" calcext:value-type="string">
            <text:p>itm_beorn_battle_axe,</text:p>
          </table:table-cell>
          <table:table-cell table:style-name="ce11" office:value-type="string" calcext:value-type="string">
            <text:p>itm_javelin,</text:p>
          </table:table-cell>
          <table:table-cell table:style-name="ce11" office:value-type="string" calcext:value-type="string">
            <text:p>itm_marker_berserker, itm_marker_scares_wargs, itm_marker_scares_horses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8|knows_power_strike_7|knows_ironflesh_9|knows_power_throw_6</text:p>
          </table:table-cell>
          <table:table-cell table:style-name="ce14" office:value-type="string" calcext:value-type="string">
            <text:p>beorn_face1</text:p>
          </table:table-cell>
          <table:table-cell table:style-name="ce14" office:value-type="string" calcext:value-type="string">
            <text:p>beorn_face2</text:p>
          </table:table-cell>
          <table:table-cell table:style-name="ce15"/>
          <table:table-cell table:style-name="ce6" table:formula="of:=IF(AND([.B21]&lt;&gt;&quot;&quot;;[.C21]&lt;&gt;&quot;&quot;);CONCATENATE([Variables.$I$1];[Variables.$I$7];[.B21];[Variables.$I$7];[Variables.$I$6];[Variables.$I$7];[.C21];[Variables.$I$7];[Variables.$I$6];[Variables.$I$7];[.D21];[Variables.$I$7];[Variables.$I$6];[.E21];[Variables.$I$6];[.F21];[Variables.$I$6];[.G21];[Variables.$I$6];[.H21];[Variables.$I$6];[Variables.$I$1];[.I21];[.J21];[.K21];[.L21];[.M21];[.N21];[.O21];[Variables.$I$2];[Variables.$I$6];[.P21];[Variables.$I$6];[.Q21];[Variables.$I$6];[.R21];[Variables.$I$6];[.S21];[Variables.$I$6];[.T21];IF([.U21]&lt;&gt;&quot;&quot;;CONCATENATE([Variables.$I$6];[.U21]);&quot;&quot;);[Variables.$I$2];[Variables.$I$6]);IF([.B21]&lt;&gt;&quot;&quot;;CONCATENATE(&quot;#&quot;;[.B21]);&quot;&quot;))" office:value-type="string" office:string-value="[&quot;i5_beorning_carrock_berserker&quot;,&quot;Beorning_Carrock_Berserker&quot;,&quot;Beorning_Carrock_Berserkers&quot;,tfg_gloves| tfg_armor| tfg_helm| tfg_boots,0,0,fac_beorn,[itm_beorn_helmet,itm_beorn_padded_good,itm_beorn_berserk_good,itm_furry_boots,itm_beorn_battle_axe,itm_javelin,itm_marker_berserker, itm_marker_scares_wargs, itm_marker_scares_horses,],attr_tier_5,wp_tier_6,knows_common|knows_athletics_8|knows_power_strike_7|knows_ironflesh_9|knows_power_throw_6,beorn_face1,beorn_face2]," calcext:value-type="string">
            <text:p>["i5_beorning_carrock_berserker","Beorning_Carrock_Berserker","Beorning_Carrock_Berserkers",tfg_gloves| tfg_armor| tfg_helm| tfg_boots,0,0,fac_beorn,[itm_beorn_helmet,itm_beorn_padded_good,itm_beorn_berserk_good,itm_furry_boots,itm_beorn_battle_axe,itm_javelin,itm_marker_berserker, itm_marker_scares_wargs, itm_marker_scares_horses,],attr_tier_5,wp_tier_6,knows_common|knows_athletics_8|knows_power_strike_7|knows_ironflesh_9|knows_power_throw_6,beorn_face1,beorn_face2],</text:p>
          </table:table-cell>
          <table:table-cell table:number-columns-repeated="16362"/>
        </table:table-row>
        <table:table-row table:style-name="ro1">
          <table:table-cell table:style-name="ce6" table:formula="of:=IF(AND([.B22]&lt;&gt;&quot;&quot;;[.C22]&lt;&gt;&quot;&quot;);CONCATENATE([Variables.$I$1];[Variables.$I$7];[.B22];[Variables.$I$7];[Variables.$I$6];[Variables.$I$7];[.C22];[Variables.$I$7];[Variables.$I$6];[Variables.$I$7];[.D22];[Variables.$I$7];[Variables.$I$6];[.E22];[Variables.$I$6];[.F22];[Variables.$I$6];[.G22];[Variables.$I$6];[.H22];[Variables.$I$6];[Variables.$I$1];[.I22];[.J22];[.K22];[.L22];[.M22];[.N22];[.O22];[Variables.$I$2];[Variables.$I$6];[.P22];[Variables.$I$6];[.Q22];[Variables.$I$6];[.R22];[Variables.$I$6];[.S22];[Variables.$I$6];[.T22];IF([.U22]&lt;&gt;&quot;&quot;;CONCATENATE([Variables.$I$6];[.U22]);&quot;&quot;);[Variables.$I$2];[Variables.$I$6]);IF([.B22]&lt;&gt;&quot;&quot;;CONCATENATE(&quot;#&quot;;[.B22]);&quot;&quot;))" office:value-type="string" office:string-value="#new troop at end of file" calcext:value-type="string">
            <text:p>#new troop at end of file</text:p>
          </table:table-cell>
          <table:table-cell table:style-name="ce5" office:value-type="string" calcext:value-type="string">
            <text:p>new troop at end of file</text:p>
          </table:table-cell>
          <table:table-cell table:style-name="ce6" table:number-columns-repeated="19"/>
          <table:table-cell table:style-name="ce6" table:formula="of:=IF(AND([.B22]&lt;&gt;&quot;&quot;;[.C22]&lt;&gt;&quot;&quot;);CONCATENATE([Variables.$I$1];[Variables.$I$7];[.B22];[Variables.$I$7];[Variables.$I$6];[Variables.$I$7];[.C22];[Variables.$I$7];[Variables.$I$6];[Variables.$I$7];[.D22];[Variables.$I$7];[Variables.$I$6];[.E22];[Variables.$I$6];[.F22];[Variables.$I$6];[.G22];[Variables.$I$6];[.H22];[Variables.$I$6];[Variables.$I$1];[.I22];[.J22];[.K22];[.L22];[.M22];[.N22];[.O22];[Variables.$I$2];[Variables.$I$6];[.P22];[Variables.$I$6];[.Q22];[Variables.$I$6];[.R22];[Variables.$I$6];[.S22];[Variables.$I$6];[.T22];IF([.U22]&lt;&gt;&quot;&quot;;CONCATENATE([Variables.$I$6];[.U22]);&quot;&quot;);[Variables.$I$2];[Variables.$I$6]);IF([.B22]&lt;&gt;&quot;&quot;;CONCATENATE(&quot;#&quot;;[.B22]);&quot;&quot;))" office:value-type="string" office:string-value="#new troop at end of file" calcext:value-type="string">
            <text:p>#new troop at end of file</text:p>
          </table:table-cell>
          <table:table-cell table:number-columns-repeated="16362"/>
        </table:table-row>
        <table:table-row table:style-name="ro1">
          <table:table-cell table:style-name="ce6" table:formula="of:=IF(AND([.B23]&lt;&gt;&quot;&quot;;[.C23]&lt;&gt;&quot;&quot;);CONCATENATE([Variables.$I$1];[Variables.$I$7];[.B23];[Variables.$I$7];[Variables.$I$6];[Variables.$I$7];[.C23];[Variables.$I$7];[Variables.$I$6];[Variables.$I$7];[.D23];[Variables.$I$7];[Variables.$I$6];[.E23];[Variables.$I$6];[.F23];[Variables.$I$6];[.G23];[Variables.$I$6];[.H23];[Variables.$I$6];[Variables.$I$1];[.I23];[.J23];[.K23];[.L23];[.M23];[.N23];[.O23];[Variables.$I$2];[Variables.$I$6];[.P23];[Variables.$I$6];[.Q23];[Variables.$I$6];[.R23];[Variables.$I$6];[.S23];[Variables.$I$6];[.T23];IF([.U23]&lt;&gt;&quot;&quot;;CONCATENATE([Variables.$I$6];[.U23]);&quot;&quot;);[Variables.$I$2];[Variables.$I$6]);IF([.B23]&lt;&gt;&quot;&quot;;CONCATENATE(&quot;#&quot;;[.B23]);&quot;&quot;))" office:value-type="string" office:string-value="[&quot;i6_beorning_bear_warrior&quot;,&quot;Bear_Warrior&quot;,&quot;Bear_Warriors&quot;,tfg_gloves| tfg_shield| tfg_armor| tfg_helm| tfg_boots,0,0,fac_beorn,[itm_beorn_helmet,itm_beorn_chief_bad,itm_leather_gloves_good,itm_leather_boots, itm_leather_boots_dark,itm_splinted_greaves,itm_beorn_axe_reward,itm_beorn_shield_reward,itm_rohirrim_throwing_axe,itm_marker_scares_wargs, itm_marker_scares_horses,itm_marker_hp_shield,],attr_evil_tier_6,wp_tier_6,knows_common|knows_athletics_5|knows_power_strike_4|knows_ironflesh_8|knows_shield_7|knows_power_throw_4,beorn_face1,beorn_face2]," calcext:value-type="string">
            <text:p>["i6_beorning_bear_warrior","Bear_Warrior","Bear_Warriors",tfg_gloves| tfg_shield| tfg_armor| tfg_helm| tfg_boots,0,0,fac_beorn,[itm_beorn_helmet,itm_beorn_chief_bad,itm_leather_gloves_good,itm_leather_boots, itm_leather_boots_dark,itm_splinted_greaves,itm_beorn_axe_reward,itm_beorn_shield_reward,itm_rohirrim_throwing_axe,itm_marker_scares_wargs, itm_marker_scares_horses,itm_marker_hp_shield,],attr_evil_tier_6,wp_tier_6,knows_common|knows_athletics_5|knows_power_strike_4|knows_ironflesh_8|knows_shield_7|knows_power_throw_4,beorn_face1,beorn_face2],</text:p>
          </table:table-cell>
          <table:table-cell table:style-name="ce7" office:value-type="string" calcext:value-type="string">
            <text:p>i6_beorning_bear_warrior</text:p>
          </table:table-cell>
          <table:table-cell table:style-name="ce7" office:value-type="string" calcext:value-type="string">
            <text:p>Bear_Warrior</text:p>
          </table:table-cell>
          <table:table-cell table:style-name="ce7" office:value-type="string" calcext:value-type="string">
            <text:p>Bear_Warrior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beorn</text:p>
          </table:table-cell>
          <table:table-cell table:style-name="ce11" office:value-type="string" calcext:value-type="string">
            <text:p>itm_beorn_helmet,</text:p>
          </table:table-cell>
          <table:table-cell table:style-name="ce11" office:value-type="string" calcext:value-type="string">
            <text:p>itm_beorn_chief_bad,</text:p>
          </table:table-cell>
          <table:table-cell table:style-name="ce11" office:value-type="string" calcext:value-type="string">
            <text:p>itm_leather_gloves_good,</text:p>
          </table:table-cell>
          <table:table-cell table:style-name="ce11" office:value-type="string" calcext:value-type="string">
            <text:p>itm_leather_boots, itm_leather_boots_dark,itm_splinted_greaves,</text:p>
          </table:table-cell>
          <table:table-cell table:style-name="ce11" office:value-type="string" calcext:value-type="string">
            <text:p>itm_beorn_axe_reward,</text:p>
          </table:table-cell>
          <table:table-cell table:style-name="ce11" office:value-type="string" calcext:value-type="string">
            <text:p>itm_beorn_shield_reward,itm_rohirrim_throwing_axe,</text:p>
          </table:table-cell>
          <table:table-cell table:style-name="ce11" office:value-type="string" calcext:value-type="string">
            <text:p>itm_marker_scares_wargs, itm_marker_scares_horses,itm_marker_hp_shield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5|knows_power_strike_4|knows_ironflesh_8|knows_shield_7|knows_power_throw_4</text:p>
          </table:table-cell>
          <table:table-cell table:style-name="ce14" office:value-type="string" calcext:value-type="string">
            <text:p>beorn_face1</text:p>
          </table:table-cell>
          <table:table-cell table:style-name="ce14" office:value-type="string" calcext:value-type="string">
            <text:p>beorn_face2</text:p>
          </table:table-cell>
          <table:table-cell table:style-name="ce15"/>
          <table:table-cell table:style-name="ce6" table:formula="of:=IF(AND([.B23]&lt;&gt;&quot;&quot;;[.C23]&lt;&gt;&quot;&quot;);CONCATENATE([Variables.$I$1];[Variables.$I$7];[.B23];[Variables.$I$7];[Variables.$I$6];[Variables.$I$7];[.C23];[Variables.$I$7];[Variables.$I$6];[Variables.$I$7];[.D23];[Variables.$I$7];[Variables.$I$6];[.E23];[Variables.$I$6];[.F23];[Variables.$I$6];[.G23];[Variables.$I$6];[.H23];[Variables.$I$6];[Variables.$I$1];[.I23];[.J23];[.K23];[.L23];[.M23];[.N23];[.O23];[Variables.$I$2];[Variables.$I$6];[.P23];[Variables.$I$6];[.Q23];[Variables.$I$6];[.R23];[Variables.$I$6];[.S23];[Variables.$I$6];[.T23];IF([.U23]&lt;&gt;&quot;&quot;;CONCATENATE([Variables.$I$6];[.U23]);&quot;&quot;);[Variables.$I$2];[Variables.$I$6]);IF([.B23]&lt;&gt;&quot;&quot;;CONCATENATE(&quot;#&quot;;[.B23]);&quot;&quot;))" office:value-type="string" office:string-value="[&quot;i6_beorning_bear_warrior&quot;,&quot;Bear_Warrior&quot;,&quot;Bear_Warriors&quot;,tfg_gloves| tfg_shield| tfg_armor| tfg_helm| tfg_boots,0,0,fac_beorn,[itm_beorn_helmet,itm_beorn_chief_bad,itm_leather_gloves_good,itm_leather_boots, itm_leather_boots_dark,itm_splinted_greaves,itm_beorn_axe_reward,itm_beorn_shield_reward,itm_rohirrim_throwing_axe,itm_marker_scares_wargs, itm_marker_scares_horses,itm_marker_hp_shield,],attr_evil_tier_6,wp_tier_6,knows_common|knows_athletics_5|knows_power_strike_4|knows_ironflesh_8|knows_shield_7|knows_power_throw_4,beorn_face1,beorn_face2]," calcext:value-type="string">
            <text:p>["i6_beorning_bear_warrior","Bear_Warrior","Bear_Warriors",tfg_gloves| tfg_shield| tfg_armor| tfg_helm| tfg_boots,0,0,fac_beorn,[itm_beorn_helmet,itm_beorn_chief_bad,itm_leather_gloves_good,itm_leather_boots, itm_leather_boots_dark,itm_splinted_greaves,itm_beorn_axe_reward,itm_beorn_shield_reward,itm_rohirrim_throwing_axe,itm_marker_scares_wargs, itm_marker_scares_horses,itm_marker_hp_shield,],attr_evil_tier_6,wp_tier_6,knows_common|knows_athletics_5|knows_power_strike_4|knows_ironflesh_8|knows_shield_7|knows_power_throw_4,beorn_face1,beorn_face2],</text:p>
          </table:table-cell>
          <table:table-cell table:number-columns-repeated="16362"/>
        </table:table-row>
        <table:table-row table:style-name="ro1">
          <table:table-cell table:formula="of:=IF(AND([.B24]&lt;&gt;&quot;&quot;;[.C24]&lt;&gt;&quot;&quot;);CONCATENATE([Variables.$I$1];[Variables.$I$7];[.B24];[Variables.$I$7];[Variables.$I$6];[Variables.$I$7];[.C24];[Variables.$I$7];[Variables.$I$6];[Variables.$I$7];[.D24];[Variables.$I$7];[Variables.$I$6];[.E24];[Variables.$I$6];[.F24];[Variables.$I$6];[.G24];[Variables.$I$6];[.H24];[Variables.$I$6];[Variables.$I$1];[.I24];[.J24];[.K24];[.L24];[.M24];[.N24];[.O24];[Variables.$I$2];[Variables.$I$6];[.P24];[Variables.$I$6];[.Q24];[Variables.$I$6];[.R24];[Variables.$I$6];[.S24];[Variables.$I$6];[.T24];IF([.U24]&lt;&gt;&quot;&quot;;CONCATENATE([Variables.$I$6];[.U24]);&quot;&quot;);[Variables.$I$2];[Variables.$I$6]);IF([.B24]&lt;&gt;&quot;&quot;;CONCATENATE(&quot;#&quot;;[.B24]);&quot;&quot;))">
            <text:p/>
          </table:table-cell>
          <table:table-cell table:style-name="ce6" table:number-columns-repeated="20"/>
          <table:table-cell table:style-name="ce36" table:formula="of:=IF(AND([.B24]&lt;&gt;&quot;&quot;;[.C24]&lt;&gt;&quot;&quot;);CONCATENATE([Variables.$I$1];[Variables.$I$7];[.B24];[Variables.$I$7];[Variables.$I$6];[Variables.$I$7];[.C24];[Variables.$I$7];[Variables.$I$6];[Variables.$I$7];[.D24];[Variables.$I$7];[Variables.$I$6];[.E24];[Variables.$I$6];[.F24];[Variables.$I$6];[.G24];[Variables.$I$6];[.H24];[Variables.$I$6];[Variables.$I$1];[.I24];[.J24];[.K24];[.L24];[.M24];[.N24];[.O24];[Variables.$I$2];[Variables.$I$6];[.P24];[Variables.$I$6];[.Q24];[Variables.$I$6];[.R24];[Variables.$I$6];[.S24];[Variables.$I$6];[.T24];IF([.U24]&lt;&gt;&quot;&quot;;CONCATENATE([Variables.$I$6];[.U24]);&quot;&quot;);[Variables.$I$2];[Variables.$I$6]);IF([.B24]&lt;&gt;&quot;&quot;;CONCATENATE(&quot;#&quot;;[.B24]);&quot;&quot;))">
            <text:p/>
          </table:table-cell>
          <table:table-cell table:number-columns-repeated="16362"/>
        </table:table-row>
        <table:table-row table:style-name="ro1">
          <table:table-cell table:style-name="ce6" table:formula="of:=IF(AND([.B25]&lt;&gt;&quot;&quot;;[.C25]&lt;&gt;&quot;&quot;);CONCATENATE([Variables.$I$1];[Variables.$I$7];[.B25];[Variables.$I$7];[Variables.$I$6];[Variables.$I$7];[.C25];[Variables.$I$7];[Variables.$I$6];[Variables.$I$7];[.D25];[Variables.$I$7];[Variables.$I$6];[.E25];[Variables.$I$6];[.F25];[Variables.$I$6];[.G25];[Variables.$I$6];[.H25];[Variables.$I$6];[Variables.$I$1];[.I25];[.J25];[.K25];[.L25];[.M25];[.N25];[.O25];[Variables.$I$2];[Variables.$I$6];[.P25];[Variables.$I$6];[.Q25];[Variables.$I$6];[.R25];[Variables.$I$6];[.S25];[Variables.$I$6];[.T25];IF([.U25]&lt;&gt;&quot;&quot;;CONCATENATE([Variables.$I$6];[.U25]);&quot;&quot;);[Variables.$I$2];[Variables.$I$6]);IF([.B25]&lt;&gt;&quot;&quot;;CONCATENATE(&quot;#&quot;;[.B25]);&quot;&quot;))" office:value-type="string" office:string-value="#Dale" calcext:value-type="string">
            <text:p>#Dale</text:p>
          </table:table-cell>
          <table:table-cell table:style-name="ce5" office:value-type="string" calcext:value-type="string">
            <text:p>Dale</text:p>
          </table:table-cell>
          <table:table-cell table:style-name="ce6" table:number-columns-repeated="19"/>
          <table:table-cell table:style-name="ce6" table:formula="of:=IF(AND([.B25]&lt;&gt;&quot;&quot;;[.C25]&lt;&gt;&quot;&quot;);CONCATENATE([Variables.$I$1];[Variables.$I$7];[.B25];[Variables.$I$7];[Variables.$I$6];[Variables.$I$7];[.C25];[Variables.$I$7];[Variables.$I$6];[Variables.$I$7];[.D25];[Variables.$I$7];[Variables.$I$6];[.E25];[Variables.$I$6];[.F25];[Variables.$I$6];[.G25];[Variables.$I$6];[.H25];[Variables.$I$6];[Variables.$I$1];[.I25];[.J25];[.K25];[.L25];[.M25];[.N25];[.O25];[Variables.$I$2];[Variables.$I$6];[.P25];[Variables.$I$6];[.Q25];[Variables.$I$6];[.R25];[Variables.$I$6];[.S25];[Variables.$I$6];[.T25];IF([.U25]&lt;&gt;&quot;&quot;;CONCATENATE([Variables.$I$6];[.U25]);&quot;&quot;);[Variables.$I$2];[Variables.$I$6]);IF([.B25]&lt;&gt;&quot;&quot;;CONCATENATE(&quot;#&quot;;[.B25]);&quot;&quot;))" office:value-type="string" office:string-value="#Dale" calcext:value-type="string">
            <text:p>#Dale</text:p>
          </table:table-cell>
          <table:table-cell table:number-columns-repeated="16362"/>
        </table:table-row>
        <table:table-row table:style-name="ro1">
          <table:table-cell table:style-name="ce6" table:formula="of:=IF(AND([.B26]&lt;&gt;&quot;&quot;;[.C26]&lt;&gt;&quot;&quot;);CONCATENATE([Variables.$I$1];[Variables.$I$7];[.B26];[Variables.$I$7];[Variables.$I$6];[Variables.$I$7];[.C26];[Variables.$I$7];[Variables.$I$6];[Variables.$I$7];[.D26];[Variables.$I$7];[Variables.$I$6];[.E26];[Variables.$I$6];[.F26];[Variables.$I$6];[.G26];[Variables.$I$6];[.H26];[Variables.$I$6];[Variables.$I$1];[.I26];[.J26];[.K26];[.L26];[.M26];[.N26];[.O26];[Variables.$I$2];[Variables.$I$6];[.P26];[Variables.$I$6];[.Q26];[Variables.$I$6];[.R26];[Variables.$I$6];[.S26];[Variables.$I$6];[.T26];IF([.U26]&lt;&gt;&quot;&quot;;CONCATENATE([Variables.$I$6];[.U26]);&quot;&quot;);[Variables.$I$2];[Variables.$I$6]);IF([.B26]&lt;&gt;&quot;&quot;;CONCATENATE(&quot;#&quot;;[.B26]);&quot;&quot;))" office:value-type="string" office:string-value="[&quot;i1_dale_militia&quot;,&quot;Dale_Militiaman&quot;,&quot;Dale_Militia&quot;,tfg_boots| tfg_armor,0,0,fac_dale,[itm_north_leather_skullcap, itm_north_leather_skullcap_bad,itm_hood_grey_bad,itm_mail_coif,itm_north_leather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swadian_face_younger_1,swadian_face_middle_2]," calcext:value-type="string">
            <text:p>["i1_dale_militia","Dale_Militiaman","Dale_Militia",tfg_boots| tfg_armor,0,0,fac_dale,[itm_north_leather_skullcap, itm_north_leather_skullcap_bad,itm_hood_grey_bad,itm_mail_coif,itm_north_leather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swadian_face_younger_1,swadian_face_middle_2],</text:p>
          </table:table-cell>
          <table:table-cell table:style-name="ce7" office:value-type="string" calcext:value-type="string">
            <text:p>i1_dale_militia</text:p>
          </table:table-cell>
          <table:table-cell table:style-name="ce7" office:value-type="string" calcext:value-type="string">
            <text:p>Dale_Militiaman</text:p>
          </table:table-cell>
          <table:table-cell table:style-name="ce7" office:value-type="string" calcext:value-type="string">
            <text:p>Dale_Militia</text:p>
          </table:table-cell>
          <table:table-cell table:style-name="ce8" office:value-type="string" calcext:value-type="string">
            <text:p>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ale</text:p>
          </table:table-cell>
          <table:table-cell table:style-name="ce11" office:value-type="string" calcext:value-type="string">
            <text:p>itm_north_leather_skullcap, itm_north_leather_skullcap_bad,itm_hood_grey_bad,itm_mail_coif,</text:p>
          </table:table-cell>
          <table:table-cell table:style-name="ce11" office:value-type="string" calcext:value-type="string">
            <text:p>itm_north_leather,itm_dale_light_a_bad,</text:p>
          </table:table-cell>
          <table:table-cell table:style-name="ce11"/>
          <table:table-cell table:style-name="ce11" office:value-type="string" calcext:value-type="string">
            <text:p>itm_rohan_shoes,</text:p>
          </table:table-cell>
          <table:table-cell table:style-name="ce11" office:value-type="string" calcext:value-type="string">
            <text:p>itm_dale_pike, itm_dale_sword, itm_arrows,itm_short_bow,itm_axe_a,</text:p>
          </table:table-cell>
          <table:table-cell table:style-name="ce11" office:value-type="string" calcext:value-type="string">
            <text:p>itm_north_round_shield,</text:p>
          </table:table-cell>
          <table:table-cell table:style-name="ce11"/>
          <table:table-cell table:style-name="ce12" office:value-type="string" calcext:value-type="string">
            <text:p>attr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ironflesh_1|knows_power_draw_2|knows_shield_1|knows_looting_1|knows_trainer_1|knows_tactics_1|knows_spotting_1|knows_inventory_management_1|knows_wound_treatment_1|knows_prisoner_management_1|knows_trade_2</text:p>
          </table:table-cell>
          <table:table-cell table:style-name="ce14" office:value-type="string" calcext:value-type="string">
            <text:p>swadian_face_younger_1</text:p>
          </table:table-cell>
          <table:table-cell table:style-name="ce14" office:value-type="string" calcext:value-type="string">
            <text:p>swadian_face_middle_2</text:p>
          </table:table-cell>
          <table:table-cell table:style-name="ce15"/>
          <table:table-cell table:style-name="ce6" table:formula="of:=IF(AND([.B26]&lt;&gt;&quot;&quot;;[.C26]&lt;&gt;&quot;&quot;);CONCATENATE([Variables.$I$1];[Variables.$I$7];[.B26];[Variables.$I$7];[Variables.$I$6];[Variables.$I$7];[.C26];[Variables.$I$7];[Variables.$I$6];[Variables.$I$7];[.D26];[Variables.$I$7];[Variables.$I$6];[.E26];[Variables.$I$6];[.F26];[Variables.$I$6];[.G26];[Variables.$I$6];[.H26];[Variables.$I$6];[Variables.$I$1];[.I26];[.J26];[.K26];[.L26];[.M26];[.N26];[.O26];[Variables.$I$2];[Variables.$I$6];[.P26];[Variables.$I$6];[.Q26];[Variables.$I$6];[.R26];[Variables.$I$6];[.S26];[Variables.$I$6];[.T26];IF([.U26]&lt;&gt;&quot;&quot;;CONCATENATE([Variables.$I$6];[.U26]);&quot;&quot;);[Variables.$I$2];[Variables.$I$6]);IF([.B26]&lt;&gt;&quot;&quot;;CONCATENATE(&quot;#&quot;;[.B26]);&quot;&quot;))" office:value-type="string" office:string-value="[&quot;i1_dale_militia&quot;,&quot;Dale_Militiaman&quot;,&quot;Dale_Militia&quot;,tfg_boots| tfg_armor,0,0,fac_dale,[itm_north_leather_skullcap, itm_north_leather_skullcap_bad,itm_hood_grey_bad,itm_mail_coif,itm_north_leather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swadian_face_younger_1,swadian_face_middle_2]," calcext:value-type="string">
            <text:p>["i1_dale_militia","Dale_Militiaman","Dale_Militia",tfg_boots| tfg_armor,0,0,fac_dale,[itm_north_leather_skullcap, itm_north_leather_skullcap_bad,itm_hood_grey_bad,itm_mail_coif,itm_north_leather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swadian_face_younger_1,swadian_face_middle_2],</text:p>
          </table:table-cell>
          <table:table-cell table:number-columns-repeated="16362"/>
        </table:table-row>
        <table:table-row table:style-name="ro1">
          <table:table-cell table:style-name="ce6" table:formula="of:=IF(AND([.B27]&lt;&gt;&quot;&quot;;[.C27]&lt;&gt;&quot;&quot;);CONCATENATE([Variables.$I$1];[Variables.$I$7];[.B27];[Variables.$I$7];[Variables.$I$6];[Variables.$I$7];[.C27];[Variables.$I$7];[Variables.$I$6];[Variables.$I$7];[.D27];[Variables.$I$7];[Variables.$I$6];[.E27];[Variables.$I$6];[.F27];[Variables.$I$6];[.G27];[Variables.$I$6];[.H27];[Variables.$I$6];[Variables.$I$1];[.I27];[.J27];[.K27];[.L27];[.M27];[.N27];[.O27];[Variables.$I$2];[Variables.$I$6];[.P27];[Variables.$I$6];[.Q27];[Variables.$I$6];[.R27];[Variables.$I$6];[.S27];[Variables.$I$6];[.T27];IF([.U27]&lt;&gt;&quot;&quot;;CONCATENATE([Variables.$I$6];[.U27]);&quot;&quot;);[Variables.$I$2];[Variables.$I$6]);IF([.B27]&lt;&gt;&quot;&quot;;CONCATENATE(&quot;#&quot;;[.B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mail_coif,itm_dale_light_a, itm_dale_light_a_good, itm_dale_med_b_bad,itm_dale_med_d_bad,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swadian_face_young_1,swadian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mail_coif,itm_dale_light_a, itm_dale_light_a_good, itm_dale_med_b_bad,itm_dale_med_d_bad,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swadian_face_young_1,swadian_face_middle_2],</text:p>
          </table:table-cell>
          <table:table-cell table:style-name="ce7" office:value-type="string" calcext:value-type="string">
            <text:p>i2_dale_man_at_arms</text:p>
          </table:table-cell>
          <table:table-cell table:style-name="ce7" office:value-type="string" calcext:value-type="string">
            <text:p>Dale_Man-at-Arms</text:p>
          </table:table-cell>
          <table:table-cell table:style-name="ce7" office:value-type="string" calcext:value-type="string">
            <text:p>Dale_Men-at-Arm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ale</text:p>
          </table:table-cell>
          <table:table-cell table:style-name="ce11" office:value-type="string" calcext:value-type="string">
            <text:p>itm_north_leather_skullcap, itm_north_leather_skullcap_good, itm_north_skullcap, itm_north_skullcap_good, itm_dale_helmet_a,itm_mail_coif,</text:p>
          </table:table-cell>
          <table:table-cell table:style-name="ce11" office:value-type="string" calcext:value-type="string">
            <text:p>itm_dale_light_a, itm_dale_light_a_good, itm_dale_med_b_bad,itm_dale_med_d_bad,</text:p>
          </table:table-cell>
          <table:table-cell table:style-name="ce11"/>
          <table:table-cell table:style-name="ce11" office:value-type="string" calcext:value-type="string">
            <text:p>itm_leather_boots_bad,itm_rohan_shoes,</text:p>
          </table:table-cell>
          <table:table-cell table:style-name="ce11" office:value-type="string" calcext:value-type="string">
            <text:p>itm_dale_sword,itm_dale_pike, itm_axe_a, itm_axe_b, itm_axe_c,</text:p>
          </table:table-cell>
          <table:table-cell table:style-name="ce11" office:value-type="string" calcext:value-type="string">
            <text:p>itm_north_round_shield, itm_dale_shield_c, itm_dale_shield_a,</text:p>
          </table:table-cell>
          <table:table-cell table:style-name="ce11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1|knows_power_strike_1|knows_power_draw_2|knows_shield_2|knows_looting_1|knows_trainer_1|knows_tactics_1|knows_spotting_1|knows_inventory_management_1|knows_wound_treatment_1|knows_prisoner_management_1|knows_trade_2</text:p>
          </table:table-cell>
          <table:table-cell table:style-name="ce14" office:value-type="string" calcext:value-type="string">
            <text:p>swadian_face_young_1</text:p>
          </table:table-cell>
          <table:table-cell table:style-name="ce14" office:value-type="string" calcext:value-type="string">
            <text:p>swadian_face_middle_2</text:p>
          </table:table-cell>
          <table:table-cell table:style-name="ce15"/>
          <table:table-cell table:style-name="ce6" table:formula="of:=IF(AND([.B27]&lt;&gt;&quot;&quot;;[.C27]&lt;&gt;&quot;&quot;);CONCATENATE([Variables.$I$1];[Variables.$I$7];[.B27];[Variables.$I$7];[Variables.$I$6];[Variables.$I$7];[.C27];[Variables.$I$7];[Variables.$I$6];[Variables.$I$7];[.D27];[Variables.$I$7];[Variables.$I$6];[.E27];[Variables.$I$6];[.F27];[Variables.$I$6];[.G27];[Variables.$I$6];[.H27];[Variables.$I$6];[Variables.$I$1];[.I27];[.J27];[.K27];[.L27];[.M27];[.N27];[.O27];[Variables.$I$2];[Variables.$I$6];[.P27];[Variables.$I$6];[.Q27];[Variables.$I$6];[.R27];[Variables.$I$6];[.S27];[Variables.$I$6];[.T27];IF([.U27]&lt;&gt;&quot;&quot;;CONCATENATE([Variables.$I$6];[.U27]);&quot;&quot;);[Variables.$I$2];[Variables.$I$6]);IF([.B27]&lt;&gt;&quot;&quot;;CONCATENATE(&quot;#&quot;;[.B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mail_coif,itm_dale_light_a, itm_dale_light_a_good, itm_dale_med_b_bad,itm_dale_med_d_bad,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swadian_face_young_1,swadian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mail_coif,itm_dale_light_a, itm_dale_light_a_good, itm_dale_med_b_bad,itm_dale_med_d_bad,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swadian_face_young_1,swadian_face_middle_2],</text:p>
          </table:table-cell>
          <table:table-cell table:number-columns-repeated="16362"/>
        </table:table-row>
        <table:table-row table:style-name="ro1">
          <table:table-cell table:style-name="ce6" table:formula="of:=IF(AND([.B28]&lt;&gt;&quot;&quot;;[.C28]&lt;&gt;&quot;&quot;);CONCATENATE([Variables.$I$1];[Variables.$I$7];[.B28];[Variables.$I$7];[Variables.$I$6];[Variables.$I$7];[.C28];[Variables.$I$7];[Variables.$I$6];[Variables.$I$7];[.D28];[Variables.$I$7];[Variables.$I$6];[.E28];[Variables.$I$6];[.F28];[Variables.$I$6];[.G28];[Variables.$I$6];[.H28];[Variables.$I$6];[Variables.$I$1];[.I28];[.J28];[.K28];[.L28];[.M28];[.N28];[.O28];[Variables.$I$2];[Variables.$I$6];[.P28];[Variables.$I$6];[.Q28];[Variables.$I$6];[.R28];[Variables.$I$6];[.S28];[Variables.$I$6];[.T28];IF([.U28]&lt;&gt;&quot;&quot;;CONCATENATE([Variables.$I$6];[.U28]);&quot;&quot;);[Variables.$I$2];[Variables.$I$6]);IF([.B28]&lt;&gt;&quot;&quot;;CONCATENATE(&quot;#&quot;;[.B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swadian_face_young_1,swadian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swadian_face_young_1,swadian_face_old_2],</text:p>
          </table:table-cell>
          <table:table-cell table:style-name="ce7" office:value-type="string" calcext:value-type="string">
            <text:p>a2_dale_scout</text:p>
          </table:table-cell>
          <table:table-cell table:style-name="ce7" office:value-type="string" calcext:value-type="string">
            <text:p>Dale_Scout</text:p>
          </table:table-cell>
          <table:table-cell table:style-name="ce7" office:value-type="string" calcext:value-type="string">
            <text:p>Dale_Scouts</text:p>
          </table:table-cell>
          <table:table-cell table:style-name="ce8" office:value-type="string" calcext:value-type="string">
            <text:p>tfg_ranged| 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ale</text:p>
          </table:table-cell>
          <table:table-cell table:style-name="ce11" office:value-type="string" calcext:value-type="string">
            <text:p>itm_north_leather_skullcap, itm_north_leather_skullcap_good, itm_north_skullcap,</text:p>
          </table:table-cell>
          <table:table-cell table:style-name="ce11" office:value-type="string" calcext:value-type="string">
            <text:p><text:s/>itm_dale_light_a, itm_dale_light_a_good,itm_north_leather_ok,itm_north_leather_good,</text:p>
          </table:table-cell>
          <table:table-cell table:style-name="ce11"/>
          <table:table-cell table:style-name="ce11" office:value-type="string" calcext:value-type="string">
            <text:p>itm_leather_boots_bad,itm_rohan_shoes,</text:p>
          </table:table-cell>
          <table:table-cell table:style-name="ce11" office:value-type="string" calcext:value-type="string">
            <text:p>itm_arrows,itm_regular_bow,</text:p>
          </table:table-cell>
          <table:table-cell table:style-name="ce11" office:value-type="string" calcext:value-type="string">
            <text:p>itm_dale_sword, itm_axe_a,</text:p>
          </table:table-cell>
          <table:table-cell table:style-name="ce11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bow_2</text:p>
          </table:table-cell>
          <table:table-cell table:style-name="ce13" office:value-type="string" calcext:value-type="string">
            <text:p>knows_common|knows_ironflesh_1|knows_power_strike_1|knows_power_draw_2|knows_shield_1|knows_athletics_1|knows_looting_1|knows_trainer_1|knows_tactics_1|knows_spotting_1|knows_inventory_management_1|knows_wound_treatment_1|knows_prisoner_management_1|knows_trade_2</text:p>
          </table:table-cell>
          <table:table-cell table:style-name="ce14" office:value-type="string" calcext:value-type="string">
            <text:p>swadian_face_young_1</text:p>
          </table:table-cell>
          <table:table-cell table:style-name="ce14" office:value-type="string" calcext:value-type="string">
            <text:p>swadian_face_old_2</text:p>
          </table:table-cell>
          <table:table-cell table:style-name="ce15"/>
          <table:table-cell table:style-name="ce6" table:formula="of:=IF(AND([.B28]&lt;&gt;&quot;&quot;;[.C28]&lt;&gt;&quot;&quot;);CONCATENATE([Variables.$I$1];[Variables.$I$7];[.B28];[Variables.$I$7];[Variables.$I$6];[Variables.$I$7];[.C28];[Variables.$I$7];[Variables.$I$6];[Variables.$I$7];[.D28];[Variables.$I$7];[Variables.$I$6];[.E28];[Variables.$I$6];[.F28];[Variables.$I$6];[.G28];[Variables.$I$6];[.H28];[Variables.$I$6];[Variables.$I$1];[.I28];[.J28];[.K28];[.L28];[.M28];[.N28];[.O28];[Variables.$I$2];[Variables.$I$6];[.P28];[Variables.$I$6];[.Q28];[Variables.$I$6];[.R28];[Variables.$I$6];[.S28];[Variables.$I$6];[.T28];IF([.U28]&lt;&gt;&quot;&quot;;CONCATENATE([Variables.$I$6];[.U28]);&quot;&quot;);[Variables.$I$2];[Variables.$I$6]);IF([.B28]&lt;&gt;&quot;&quot;;CONCATENATE(&quot;#&quot;;[.B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swadian_face_young_1,swadian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swadian_face_young_1,swadian_face_old_2],</text:p>
          </table:table-cell>
          <table:table-cell table:number-columns-repeated="16362"/>
        </table:table-row>
        <table:table-row table:style-name="ro1">
          <table:table-cell table:style-name="ce6" table:formula="of:=IF(AND([.B29]&lt;&gt;&quot;&quot;;[.C29]&lt;&gt;&quot;&quot;);CONCATENATE([Variables.$I$1];[Variables.$I$7];[.B29];[Variables.$I$7];[Variables.$I$6];[Variables.$I$7];[.C29];[Variables.$I$7];[Variables.$I$6];[Variables.$I$7];[.D29];[Variables.$I$7];[Variables.$I$6];[.E29];[Variables.$I$6];[.F29];[Variables.$I$6];[.G29];[Variables.$I$6];[.H29];[Variables.$I$6];[Variables.$I$1];[.I29];[.J29];[.K29];[.L29];[.M29];[.N29];[.O29];[Variables.$I$2];[Variables.$I$6];[.P29];[Variables.$I$6];[.Q29];[Variables.$I$6];[.R29];[Variables.$I$6];[.S29];[Variables.$I$6];[.T29];IF([.U29]&lt;&gt;&quot;&quot;;CONCATENATE([Variables.$I$6];[.U29]);&quot;&quot;);[Variables.$I$2];[Variables.$I$6]);IF([.B29]&lt;&gt;&quot;&quot;;CONCATENATE(&quot;#&quot;;[.B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swadian_face_young_1,swadian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swadian_face_young_1,swadian_face_older_2],</text:p>
          </table:table-cell>
          <table:table-cell table:style-name="ce7" office:value-type="string" calcext:value-type="string">
            <text:p>a3_dale_bowman</text:p>
          </table:table-cell>
          <table:table-cell table:style-name="ce7" office:value-type="string" calcext:value-type="string">
            <text:p>Dale_Bowman</text:p>
          </table:table-cell>
          <table:table-cell table:style-name="ce7" office:value-type="string" calcext:value-type="string">
            <text:p>Dale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ale</text:p>
          </table:table-cell>
          <table:table-cell table:style-name="ce11" office:value-type="string" calcext:value-type="string">
            <text:p>itm_dale_helmet_b,itm_dale_helmet_b,itm_dale_helmet_b, itm_dale_helmet_b_good,</text:p>
          </table:table-cell>
          <table:table-cell table:style-name="ce11" office:value-type="string" calcext:value-type="string">
            <text:p>itm_dale_med_b,itm_dale_med_b_bad,itm_dale_med_b_ok,itm_dale_med_b_bad,itm_dale_med_b_good,</text:p>
          </table:table-cell>
          <table:table-cell table:style-name="ce11"/>
          <table:table-cell table:style-name="ce11" office:value-type="string" calcext:value-type="string">
            <text:p>itm_leather_boots_bad,itm_rohan_shoes,</text:p>
          </table:table-cell>
          <table:table-cell table:style-name="ce11" office:value-type="string" calcext:value-type="string">
            <text:p>itm_arrows,itm_dale_bow,</text:p>
          </table:table-cell>
          <table:table-cell table:style-name="ce11" office:value-type="string" calcext:value-type="string">
            <text:p>itm_dale_sword, itm_axe_a, itm_axe_b,</text:p>
          </table:table-cell>
          <table:table-cell table:style-name="ce11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bow_3</text:p>
          </table:table-cell>
          <table:table-cell table:style-name="ce12" office:value-type="string" calcext:value-type="string">
            <text:p>knows_common|knows_ironflesh_2|knows_power_draw_2|knows_power_strike_1|knows_athletics_2</text:p>
          </table:table-cell>
          <table:table-cell table:style-name="ce14" office:value-type="string" calcext:value-type="string">
            <text:p>swadian_face_young_1</text:p>
          </table:table-cell>
          <table:table-cell table:style-name="ce14" office:value-type="string" calcext:value-type="string">
            <text:p>swadian_face_older_2</text:p>
          </table:table-cell>
          <table:table-cell table:style-name="ce15"/>
          <table:table-cell table:style-name="ce6" table:formula="of:=IF(AND([.B29]&lt;&gt;&quot;&quot;;[.C29]&lt;&gt;&quot;&quot;);CONCATENATE([Variables.$I$1];[Variables.$I$7];[.B29];[Variables.$I$7];[Variables.$I$6];[Variables.$I$7];[.C29];[Variables.$I$7];[Variables.$I$6];[Variables.$I$7];[.D29];[Variables.$I$7];[Variables.$I$6];[.E29];[Variables.$I$6];[.F29];[Variables.$I$6];[.G29];[Variables.$I$6];[.H29];[Variables.$I$6];[Variables.$I$1];[.I29];[.J29];[.K29];[.L29];[.M29];[.N29];[.O29];[Variables.$I$2];[Variables.$I$6];[.P29];[Variables.$I$6];[.Q29];[Variables.$I$6];[.R29];[Variables.$I$6];[.S29];[Variables.$I$6];[.T29];IF([.U29]&lt;&gt;&quot;&quot;;CONCATENATE([Variables.$I$6];[.U29]);&quot;&quot;);[Variables.$I$2];[Variables.$I$6]);IF([.B29]&lt;&gt;&quot;&quot;;CONCATENATE(&quot;#&quot;;[.B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swadian_face_young_1,swadian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swadian_face_young_1,swadian_face_older_2],</text:p>
          </table:table-cell>
          <table:table-cell table:number-columns-repeated="16362"/>
        </table:table-row>
        <table:table-row table:style-name="ro1">
          <table:table-cell table:style-name="ce6" table:formula="of:=IF(AND([.B30]&lt;&gt;&quot;&quot;;[.C30]&lt;&gt;&quot;&quot;);CONCATENATE([Variables.$I$1];[Variables.$I$7];[.B30];[Variables.$I$7];[Variables.$I$6];[Variables.$I$7];[.C30];[Variables.$I$7];[Variables.$I$6];[Variables.$I$7];[.D30];[Variables.$I$7];[Variables.$I$6];[.E30];[Variables.$I$6];[.F30];[Variables.$I$6];[.G30];[Variables.$I$6];[.H30];[Variables.$I$6];[Variables.$I$1];[.I30];[.J30];[.K30];[.L30];[.M30];[.N30];[.O30];[Variables.$I$2];[Variables.$I$6];[.P30];[Variables.$I$6];[.Q30];[Variables.$I$6];[.R30];[Variables.$I$6];[.S30];[Variables.$I$6];[.T30];IF([.U30]&lt;&gt;&quot;&quot;;CONCATENATE([Variables.$I$6];[.U30]);&quot;&quot;);[Variables.$I$2];[Variables.$I$6]);IF([.B30]&lt;&gt;&quot;&quot;;CONCATENATE(&quot;#&quot;;[.B30]);&quot;&quot;))" office:value-type="string" office:string-value="[&quot;a4_dale_archer&quot;,&quot;Dale_Archer&quot;,&quot;Dale_Archers&quot;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swadian_face_young_1,swadian_face_older_2]," calcext:value-type="string">
            <text:p>["a4_dale_archer","Dale_Archer","Dale_Archers"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swadian_face_young_1,swadian_face_older_2],</text:p>
          </table:table-cell>
          <table:table-cell table:style-name="ce7" office:value-type="string" calcext:value-type="string">
            <text:p>a4_dale_archer</text:p>
          </table:table-cell>
          <table:table-cell table:style-name="ce7" office:value-type="string" calcext:value-type="string">
            <text:p>Dale_Archer</text:p>
          </table:table-cell>
          <table:table-cell table:style-name="ce7" office:value-type="string" calcext:value-type="string">
            <text:p>Dale_Archers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ale</text:p>
          </table:table-cell>
          <table:table-cell table:style-name="ce11" office:value-type="string" calcext:value-type="string">
            <text:p>itm_dale_helmet_d,itm_dale_helmet_c,</text:p>
          </table:table-cell>
          <table:table-cell table:style-name="ce11" office:value-type="string" calcext:value-type="string">
            <text:p>itm_dale_med_b_lordly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leather_boots,itm_leather_boots_dark,</text:p>
          </table:table-cell>
          <table:table-cell table:style-name="ce11" office:value-type="string" calcext:value-type="string">
            <text:p>itm_arrows,itm_dale_bow,</text:p>
          </table:table-cell>
          <table:table-cell table:style-name="ce11" office:value-type="string" calcext:value-type="string">
            <text:p>itm_dale_sword, itm_axe_b, itm_axe_c,</text:p>
          </table:table-cell>
          <table:table-cell table:style-name="ce11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bow_4</text:p>
          </table:table-cell>
          <table:table-cell table:style-name="ce12" office:value-type="string" calcext:value-type="string">
            <text:p>knows_common|knows_ironflesh_3|knows_power_draw_3|knows_power_strike_2|knows_athletics_2</text:p>
          </table:table-cell>
          <table:table-cell table:style-name="ce14" office:value-type="string" calcext:value-type="string">
            <text:p>swadian_face_young_1</text:p>
          </table:table-cell>
          <table:table-cell table:style-name="ce14" office:value-type="string" calcext:value-type="string">
            <text:p>swadian_face_older_2</text:p>
          </table:table-cell>
          <table:table-cell table:style-name="ce15"/>
          <table:table-cell table:style-name="ce6" table:formula="of:=IF(AND([.B30]&lt;&gt;&quot;&quot;;[.C30]&lt;&gt;&quot;&quot;);CONCATENATE([Variables.$I$1];[Variables.$I$7];[.B30];[Variables.$I$7];[Variables.$I$6];[Variables.$I$7];[.C30];[Variables.$I$7];[Variables.$I$6];[Variables.$I$7];[.D30];[Variables.$I$7];[Variables.$I$6];[.E30];[Variables.$I$6];[.F30];[Variables.$I$6];[.G30];[Variables.$I$6];[.H30];[Variables.$I$6];[Variables.$I$1];[.I30];[.J30];[.K30];[.L30];[.M30];[.N30];[.O30];[Variables.$I$2];[Variables.$I$6];[.P30];[Variables.$I$6];[.Q30];[Variables.$I$6];[.R30];[Variables.$I$6];[.S30];[Variables.$I$6];[.T30];IF([.U30]&lt;&gt;&quot;&quot;;CONCATENATE([Variables.$I$6];[.U30]);&quot;&quot;);[Variables.$I$2];[Variables.$I$6]);IF([.B30]&lt;&gt;&quot;&quot;;CONCATENATE(&quot;#&quot;;[.B30]);&quot;&quot;))" office:value-type="string" office:string-value="[&quot;a4_dale_archer&quot;,&quot;Dale_Archer&quot;,&quot;Dale_Archers&quot;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swadian_face_young_1,swadian_face_older_2]," calcext:value-type="string">
            <text:p>["a4_dale_archer","Dale_Archer","Dale_Archers"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swadian_face_young_1,swadian_face_older_2],</text:p>
          </table:table-cell>
          <table:table-cell table:number-columns-repeated="16362"/>
        </table:table-row>
        <table:table-row table:style-name="ro1">
          <table:table-cell table:style-name="ce6" table:formula="of:=IF(AND([.B31]&lt;&gt;&quot;&quot;;[.C31]&lt;&gt;&quot;&quot;);CONCATENATE([Variables.$I$1];[Variables.$I$7];[.B31];[Variables.$I$7];[Variables.$I$6];[Variables.$I$7];[.C31];[Variables.$I$7];[Variables.$I$6];[Variables.$I$7];[.D31];[Variables.$I$7];[Variables.$I$6];[.E31];[Variables.$I$6];[.F31];[Variables.$I$6];[.G31];[Variables.$I$6];[.H31];[Variables.$I$6];[Variables.$I$1];[.I31];[.J31];[.K31];[.L31];[.M31];[.N31];[.O31];[Variables.$I$2];[Variables.$I$6];[.P31];[Variables.$I$6];[.Q31];[Variables.$I$6];[.R31];[Variables.$I$6];[.S31];[Variables.$I$6];[.T31];IF([.U31]&lt;&gt;&quot;&quot;;CONCATENATE([Variables.$I$6];[.U31]);&quot;&quot;);[Variables.$I$2];[Variables.$I$6]);IF([.B31]&lt;&gt;&quot;&quot;;CONCATENATE(&quot;#&quot;;[.B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swadian_face_young_1,swadian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swadian_face_young_1,swadian_face_older_2],</text:p>
          </table:table-cell>
          <table:table-cell table:style-name="ce7" office:value-type="string" calcext:value-type="string">
            <text:p>a5_barding_bowman</text:p>
          </table:table-cell>
          <table:table-cell table:style-name="ce7" office:value-type="string" calcext:value-type="string">
            <text:p>Barding_Bowman</text:p>
          </table:table-cell>
          <table:table-cell table:style-name="ce7" office:value-type="string" calcext:value-type="string">
            <text:p>Barding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ale</text:p>
          </table:table-cell>
          <table:table-cell table:style-name="ce11" office:value-type="string" calcext:value-type="string">
            <text:p>itm_dale_helmet_d_good,itm_dale_helmet_c_good,</text:p>
          </table:table-cell>
          <table:table-cell table:style-name="ce11" office:value-type="string" calcext:value-type="string">
            <text:p>itm_dale_med_c,itm_dale_med_c_bad,itm_dale_med_c_good,itm_dale_med_c_cloak,</text:p>
          </table:table-cell>
          <table:table-cell table:style-name="ce11" office:value-type="string" calcext:value-type="string">
            <text:p>itm_leather_gloves_good,</text:p>
          </table:table-cell>
          <table:table-cell table:style-name="ce11" office:value-type="string" calcext:value-type="string">
            <text:p>itm_leather_boots,itm_leather_boots_dark,</text:p>
          </table:table-cell>
          <table:table-cell table:style-name="ce11" office:value-type="string" calcext:value-type="string">
            <text:p>itm_arrows,itm_arrows,itm_dale_bow,</text:p>
          </table:table-cell>
          <table:table-cell table:style-name="ce11" office:value-type="string" calcext:value-type="string">
            <text:p>itm_dale_sword_broad, itm_axe_d,</text:p>
          </table:table-cell>
          <table:table-cell table:style-name="ce11"/>
          <table:table-cell table:style-name="ce12" office:value-type="string" calcext:value-type="string">
            <text:p>str_19|agi_18| int_8| cha_8|level(33)</text:p>
          </table:table-cell>
          <table:table-cell table:style-name="ce12" office:value-type="string" calcext:value-type="string">
            <text:p>wp_archery(260)|wp_melee(180)</text:p>
          </table:table-cell>
          <table:table-cell table:style-name="ce12" office:value-type="string" calcext:value-type="string">
            <text:p>knows_common|knows_ironflesh_4|knows_power_draw_4|knows_power_strike_2|knows_athletics_3</text:p>
          </table:table-cell>
          <table:table-cell table:style-name="ce14" office:value-type="string" calcext:value-type="string">
            <text:p>swadian_face_young_1</text:p>
          </table:table-cell>
          <table:table-cell table:style-name="ce14" office:value-type="string" calcext:value-type="string">
            <text:p>swadian_face_older_2</text:p>
          </table:table-cell>
          <table:table-cell table:style-name="ce15"/>
          <table:table-cell table:style-name="ce6" table:formula="of:=IF(AND([.B31]&lt;&gt;&quot;&quot;;[.C31]&lt;&gt;&quot;&quot;);CONCATENATE([Variables.$I$1];[Variables.$I$7];[.B31];[Variables.$I$7];[Variables.$I$6];[Variables.$I$7];[.C31];[Variables.$I$7];[Variables.$I$6];[Variables.$I$7];[.D31];[Variables.$I$7];[Variables.$I$6];[.E31];[Variables.$I$6];[.F31];[Variables.$I$6];[.G31];[Variables.$I$6];[.H31];[Variables.$I$6];[Variables.$I$1];[.I31];[.J31];[.K31];[.L31];[.M31];[.N31];[.O31];[Variables.$I$2];[Variables.$I$6];[.P31];[Variables.$I$6];[.Q31];[Variables.$I$6];[.R31];[Variables.$I$6];[.S31];[Variables.$I$6];[.T31];IF([.U31]&lt;&gt;&quot;&quot;;CONCATENATE([Variables.$I$6];[.U31]);&quot;&quot;);[Variables.$I$2];[Variables.$I$6]);IF([.B31]&lt;&gt;&quot;&quot;;CONCATENATE(&quot;#&quot;;[.B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swadian_face_young_1,swadian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swadian_face_young_1,swadian_face_older_2],</text:p>
          </table:table-cell>
          <table:table-cell table:number-columns-repeated="16362"/>
        </table:table-row>
        <table:table-row table:style-name="ro1">
          <table:table-cell table:style-name="ce6" table:formula="of:=IF(AND([.B32]&lt;&gt;&quot;&quot;;[.C32]&lt;&gt;&quot;&quot;);CONCATENATE([Variables.$I$1];[Variables.$I$7];[.B32];[Variables.$I$7];[Variables.$I$6];[Variables.$I$7];[.C32];[Variables.$I$7];[Variables.$I$6];[Variables.$I$7];[.D32];[Variables.$I$7];[Variables.$I$6];[.E32];[Variables.$I$6];[.F32];[Variables.$I$6];[.G32];[Variables.$I$6];[.H32];[Variables.$I$6];[Variables.$I$1];[.I32];[.J32];[.K32];[.L32];[.M32];[.N32];[.O32];[Variables.$I$2];[Variables.$I$6];[.P32];[Variables.$I$6];[.Q32];[Variables.$I$6];[.R32];[Variables.$I$6];[.S32];[Variables.$I$6];[.T32];IF([.U32]&lt;&gt;&quot;&quot;;CONCATENATE([Variables.$I$6];[.U32]);&quot;&quot;);[Variables.$I$2];[Variables.$I$6]);IF([.B32]&lt;&gt;&quot;&quot;;CONCATENATE(&quot;#&quot;;[.B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mail_coif_good,itm_dale_med_d,itm_leather_boots,itm_leather_boots_dark,itm_dale_sword,itm_dale_shield_a, itm_dale_shield_b,],attr_tier_3,wp_tier_3,knows_common|knows_athletics_1|knows_power_strike_2|knows_ironflesh_3|knows_shield_2,swadian_face_young_1,swadian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mail_coif_good,itm_dale_med_d,itm_leather_boots,itm_leather_boots_dark,itm_dale_sword,itm_dale_shield_a, itm_dale_shield_b,],attr_tier_3,wp_tier_3,knows_common|knows_athletics_1|knows_power_strike_2|knows_ironflesh_3|knows_shield_2,swadian_face_young_1,swadian_face_old_2],</text:p>
          </table:table-cell>
          <table:table-cell table:style-name="ce7" office:value-type="string" calcext:value-type="string">
            <text:p>i3_dale_swordsman</text:p>
          </table:table-cell>
          <table:table-cell table:style-name="ce7" office:value-type="string" calcext:value-type="string">
            <text:p>Dale_Swordsman</text:p>
          </table:table-cell>
          <table:table-cell table:style-name="ce7" office:value-type="string" calcext:value-type="string">
            <text:p>Dale_Swordsmen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ale</text:p>
          </table:table-cell>
          <table:table-cell table:style-name="ce11" office:value-type="string" calcext:value-type="string">
            <text:p>itm_north_skullcap, itm_north_skullcap_good, itm_north_nasal_helm, itm_dale_helmet_a, itm_dale_helmet_a_good,itm_mail_coif_good,</text:p>
          </table:table-cell>
          <table:table-cell table:style-name="ce11" office:value-type="string" calcext:value-type="string">
            <text:p>itm_dale_med_d,</text:p>
          </table:table-cell>
          <table:table-cell table:style-name="ce11"/>
          <table:table-cell table:style-name="ce11" office:value-type="string" calcext:value-type="string">
            <text:p>itm_leather_boots,itm_leather_boots_dark,</text:p>
          </table:table-cell>
          <table:table-cell table:style-name="ce11" office:value-type="string" calcext:value-type="string">
            <text:p>itm_dale_sword,</text:p>
          </table:table-cell>
          <table:table-cell table:style-name="ce11" office:value-type="string" calcext:value-type="string">
            <text:p>itm_dale_shield_a, itm_dale_shield_b,</text:p>
          </table:table-cell>
          <table:table-cell table:style-name="ce11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1|knows_power_strike_2|knows_ironflesh_3|knows_shield_2</text:p>
          </table:table-cell>
          <table:table-cell table:style-name="ce14" office:value-type="string" calcext:value-type="string">
            <text:p>swadian_face_young_1</text:p>
          </table:table-cell>
          <table:table-cell table:style-name="ce14" office:value-type="string" calcext:value-type="string">
            <text:p>swadian_face_old_2</text:p>
          </table:table-cell>
          <table:table-cell table:style-name="ce15"/>
          <table:table-cell table:style-name="ce6" table:formula="of:=IF(AND([.B32]&lt;&gt;&quot;&quot;;[.C32]&lt;&gt;&quot;&quot;);CONCATENATE([Variables.$I$1];[Variables.$I$7];[.B32];[Variables.$I$7];[Variables.$I$6];[Variables.$I$7];[.C32];[Variables.$I$7];[Variables.$I$6];[Variables.$I$7];[.D32];[Variables.$I$7];[Variables.$I$6];[.E32];[Variables.$I$6];[.F32];[Variables.$I$6];[.G32];[Variables.$I$6];[.H32];[Variables.$I$6];[Variables.$I$1];[.I32];[.J32];[.K32];[.L32];[.M32];[.N32];[.O32];[Variables.$I$2];[Variables.$I$6];[.P32];[Variables.$I$6];[.Q32];[Variables.$I$6];[.R32];[Variables.$I$6];[.S32];[Variables.$I$6];[.T32];IF([.U32]&lt;&gt;&quot;&quot;;CONCATENATE([Variables.$I$6];[.U32]);&quot;&quot;);[Variables.$I$2];[Variables.$I$6]);IF([.B32]&lt;&gt;&quot;&quot;;CONCATENATE(&quot;#&quot;;[.B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mail_coif_good,itm_dale_med_d,itm_leather_boots,itm_leather_boots_dark,itm_dale_sword,itm_dale_shield_a, itm_dale_shield_b,],attr_tier_3,wp_tier_3,knows_common|knows_athletics_1|knows_power_strike_2|knows_ironflesh_3|knows_shield_2,swadian_face_young_1,swadian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mail_coif_good,itm_dale_med_d,itm_leather_boots,itm_leather_boots_dark,itm_dale_sword,itm_dale_shield_a, itm_dale_shield_b,],attr_tier_3,wp_tier_3,knows_common|knows_athletics_1|knows_power_strike_2|knows_ironflesh_3|knows_shield_2,swadian_face_young_1,swadian_face_old_2],</text:p>
          </table:table-cell>
          <table:table-cell table:number-columns-repeated="16362"/>
        </table:table-row>
        <table:table-row table:style-name="ro1">
          <table:table-cell table:style-name="ce6" table:formula="of:=IF(AND([.B33]&lt;&gt;&quot;&quot;;[.C33]&lt;&gt;&quot;&quot;);CONCATENATE([Variables.$I$1];[Variables.$I$7];[.B33];[Variables.$I$7];[Variables.$I$6];[Variables.$I$7];[.C33];[Variables.$I$7];[Variables.$I$6];[Variables.$I$7];[.D33];[Variables.$I$7];[Variables.$I$6];[.E33];[Variables.$I$6];[.F33];[Variables.$I$6];[.G33];[Variables.$I$6];[.H33];[Variables.$I$6];[Variables.$I$1];[.I33];[.J33];[.K33];[.L33];[.M33];[.N33];[.O33];[Variables.$I$2];[Variables.$I$6];[.P33];[Variables.$I$6];[.Q33];[Variables.$I$6];[.R33];[Variables.$I$6];[.S33];[Variables.$I$6];[.T33];IF([.U33]&lt;&gt;&quot;&quot;;CONCATENATE([Variables.$I$6];[.U33]);&quot;&quot;);[Variables.$I$2];[Variables.$I$6]);IF([.B33]&lt;&gt;&quot;&quot;;CONCATENATE(&quot;#&quot;;[.B33]);&quot;&quot;))" office:value-type="string" office:string-value="[&quot;i4_dale_sergeant&quot;,&quot;Dale_Sergeant&quot;,&quot;Dale_Sergeants&quot;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swadian_face_young_1,swadian_face_older_2]," calcext:value-type="string">
            <text:p>["i4_dale_sergeant","Dale_Sergeant","Dale_Sergeants"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swadian_face_young_1,swadian_face_older_2],</text:p>
          </table:table-cell>
          <table:table-cell table:style-name="ce7" office:value-type="string" calcext:value-type="string">
            <text:p>i4_dale_sergeant</text:p>
          </table:table-cell>
          <table:table-cell table:style-name="ce7" office:value-type="string" calcext:value-type="string">
            <text:p>Dale_Sergeant</text:p>
          </table:table-cell>
          <table:table-cell table:style-name="ce7" office:value-type="string" calcext:value-type="string">
            <text:p>Dale_Sergeant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ale</text:p>
          </table:table-cell>
          <table:table-cell table:style-name="ce11" office:value-type="string" calcext:value-type="string">
            <text:p>itm_dale_helmet_c,</text:p>
          </table:table-cell>
          <table:table-cell table:style-name="ce11" office:value-type="string" calcext:value-type="string">
            <text:p>itm_dale_med_d_good,itm_dale_heavy_a_bad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leather_boots_dark, itm_splinted_greaves,</text:p>
          </table:table-cell>
          <table:table-cell table:style-name="ce11" office:value-type="string" calcext:value-type="string">
            <text:p>itm_dale_sword,itm_dale_sword_broad,itm_axe_d,</text:p>
          </table:table-cell>
          <table:table-cell table:style-name="ce11" office:value-type="string" calcext:value-type="string">
            <text:p>itm_dale_shield_b,</text:p>
          </table:table-cell>
          <table:table-cell table:style-name="ce11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2|knows_power_strike_3|knows_ironflesh_4|knows_shield_3</text:p>
          </table:table-cell>
          <table:table-cell table:style-name="ce14" office:value-type="string" calcext:value-type="string">
            <text:p>swadian_face_young_1</text:p>
          </table:table-cell>
          <table:table-cell table:style-name="ce14" office:value-type="string" calcext:value-type="string">
            <text:p>swadian_face_older_2</text:p>
          </table:table-cell>
          <table:table-cell table:style-name="ce15"/>
          <table:table-cell table:style-name="ce6" table:formula="of:=IF(AND([.B33]&lt;&gt;&quot;&quot;;[.C33]&lt;&gt;&quot;&quot;);CONCATENATE([Variables.$I$1];[Variables.$I$7];[.B33];[Variables.$I$7];[Variables.$I$6];[Variables.$I$7];[.C33];[Variables.$I$7];[Variables.$I$6];[Variables.$I$7];[.D33];[Variables.$I$7];[Variables.$I$6];[.E33];[Variables.$I$6];[.F33];[Variables.$I$6];[.G33];[Variables.$I$6];[.H33];[Variables.$I$6];[Variables.$I$1];[.I33];[.J33];[.K33];[.L33];[.M33];[.N33];[.O33];[Variables.$I$2];[Variables.$I$6];[.P33];[Variables.$I$6];[.Q33];[Variables.$I$6];[.R33];[Variables.$I$6];[.S33];[Variables.$I$6];[.T33];IF([.U33]&lt;&gt;&quot;&quot;;CONCATENATE([Variables.$I$6];[.U33]);&quot;&quot;);[Variables.$I$2];[Variables.$I$6]);IF([.B33]&lt;&gt;&quot;&quot;;CONCATENATE(&quot;#&quot;;[.B33]);&quot;&quot;))" office:value-type="string" office:string-value="[&quot;i4_dale_sergeant&quot;,&quot;Dale_Sergeant&quot;,&quot;Dale_Sergeants&quot;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swadian_face_young_1,swadian_face_older_2]," calcext:value-type="string">
            <text:p>["i4_dale_sergeant","Dale_Sergeant","Dale_Sergeants"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swadian_face_young_1,swadian_face_older_2],</text:p>
          </table:table-cell>
          <table:table-cell table:number-columns-repeated="16362"/>
        </table:table-row>
        <table:table-row table:style-name="ro1">
          <table:table-cell table:style-name="ce6" table:formula="of:=IF(AND([.B34]&lt;&gt;&quot;&quot;;[.C34]&lt;&gt;&quot;&quot;);CONCATENATE([Variables.$I$1];[Variables.$I$7];[.B34];[Variables.$I$7];[Variables.$I$6];[Variables.$I$7];[.C34];[Variables.$I$7];[Variables.$I$6];[Variables.$I$7];[.D34];[Variables.$I$7];[Variables.$I$6];[.E34];[Variables.$I$6];[.F34];[Variables.$I$6];[.G34];[Variables.$I$6];[.H34];[Variables.$I$6];[Variables.$I$1];[.I34];[.J34];[.K34];[.L34];[.M34];[.N34];[.O34];[Variables.$I$2];[Variables.$I$6];[.P34];[Variables.$I$6];[.Q34];[Variables.$I$6];[.R34];[Variables.$I$6];[.S34];[Variables.$I$6];[.T34];IF([.U34]&lt;&gt;&quot;&quot;;CONCATENATE([Variables.$I$6];[.U34]);&quot;&quot;);[Variables.$I$2];[Variables.$I$6]);IF([.B34]&lt;&gt;&quot;&quot;;CONCATENATE(&quot;#&quot;;[.B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_good,itm_leather_gloves_good,itm_splinted_greaves,itm_dale_sword_broad, itm_axe_d,itm_dale_shield_b_good,],attr_tier_5,wp_tier_5,knows_common|knows_athletics_3|knows_power_strike_4|knows_ironflesh_5|knows_shield_5,swadian_face_middle_1,swadian_face_older_2]," calcext:value-type="string">
            <text:p>["i5_dale_hearthman","Hearthman_of_Dale","Hearthmen_of_Dale",tfg_shield| tfg_boots| tfg_armor| tfg_helm,0,0,fac_dale,[itm_dale_helmet_c, itm_dale_helmet_c_good, itm_dale_helmet_e,itm_dale_heavy_a_good,itm_leather_gloves_good,itm_splinted_greaves,itm_dale_sword_broad, itm_axe_d,itm_dale_shield_b_good,],attr_tier_5,wp_tier_5,knows_common|knows_athletics_3|knows_power_strike_4|knows_ironflesh_5|knows_shield_5,swadian_face_middle_1,swadian_face_older_2],</text:p>
          </table:table-cell>
          <table:table-cell table:style-name="ce7" office:value-type="string" calcext:value-type="string">
            <text:p>i5_dale_hearthman</text:p>
          </table:table-cell>
          <table:table-cell table:style-name="ce7" office:value-type="string" calcext:value-type="string">
            <text:p>Hearthman_of_Dale</text:p>
          </table:table-cell>
          <table:table-cell table:style-name="ce7" office:value-type="string" calcext:value-type="string">
            <text:p>Hearthmen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ale</text:p>
          </table:table-cell>
          <table:table-cell table:style-name="ce11" office:value-type="string" calcext:value-type="string">
            <text:p>itm_dale_helmet_c, itm_dale_helmet_c_good, itm_dale_helmet_e,</text:p>
          </table:table-cell>
          <table:table-cell table:style-name="ce11" office:value-type="string" calcext:value-type="string">
            <text:p>itm_dale_heavy_a_good,</text:p>
          </table:table-cell>
          <table:table-cell table:style-name="ce11" office:value-type="string" calcext:value-type="string">
            <text:p>itm_leather_gloves_good,</text:p>
          </table:table-cell>
          <table:table-cell table:style-name="ce11" office:value-type="string" calcext:value-type="string">
            <text:p>itm_splinted_greaves,</text:p>
          </table:table-cell>
          <table:table-cell table:style-name="ce11" office:value-type="string" calcext:value-type="string">
            <text:p>itm_dale_sword_broad, itm_axe_d,</text:p>
          </table:table-cell>
          <table:table-cell table:style-name="ce11" office:value-type="string" calcext:value-type="string">
            <text:p>itm_dale_shield_b_good,</text:p>
          </table:table-cell>
          <table:table-cell table:style-name="ce11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3|knows_power_strike_4|knows_ironflesh_5|knows_shield_5</text:p>
          </table:table-cell>
          <table:table-cell table:style-name="ce14" office:value-type="string" calcext:value-type="string">
            <text:p>swadian_face_middle_1</text:p>
          </table:table-cell>
          <table:table-cell table:style-name="ce14" office:value-type="string" calcext:value-type="string">
            <text:p>swadian_face_older_2</text:p>
          </table:table-cell>
          <table:table-cell table:style-name="ce15"/>
          <table:table-cell table:style-name="ce6" table:formula="of:=IF(AND([.B34]&lt;&gt;&quot;&quot;;[.C34]&lt;&gt;&quot;&quot;);CONCATENATE([Variables.$I$1];[Variables.$I$7];[.B34];[Variables.$I$7];[Variables.$I$6];[Variables.$I$7];[.C34];[Variables.$I$7];[Variables.$I$6];[Variables.$I$7];[.D34];[Variables.$I$7];[Variables.$I$6];[.E34];[Variables.$I$6];[.F34];[Variables.$I$6];[.G34];[Variables.$I$6];[.H34];[Variables.$I$6];[Variables.$I$1];[.I34];[.J34];[.K34];[.L34];[.M34];[.N34];[.O34];[Variables.$I$2];[Variables.$I$6];[.P34];[Variables.$I$6];[.Q34];[Variables.$I$6];[.R34];[Variables.$I$6];[.S34];[Variables.$I$6];[.T34];IF([.U34]&lt;&gt;&quot;&quot;;CONCATENATE([Variables.$I$6];[.U34]);&quot;&quot;);[Variables.$I$2];[Variables.$I$6]);IF([.B34]&lt;&gt;&quot;&quot;;CONCATENATE(&quot;#&quot;;[.B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_good,itm_leather_gloves_good,itm_splinted_greaves,itm_dale_sword_broad, itm_axe_d,itm_dale_shield_b_good,],attr_tier_5,wp_tier_5,knows_common|knows_athletics_3|knows_power_strike_4|knows_ironflesh_5|knows_shield_5,swadian_face_middle_1,swadian_face_older_2]," calcext:value-type="string">
            <text:p>["i5_dale_hearthman","Hearthman_of_Dale","Hearthmen_of_Dale",tfg_shield| tfg_boots| tfg_armor| tfg_helm,0,0,fac_dale,[itm_dale_helmet_c, itm_dale_helmet_c_good, itm_dale_helmet_e,itm_dale_heavy_a_good,itm_leather_gloves_good,itm_splinted_greaves,itm_dale_sword_broad, itm_axe_d,itm_dale_shield_b_good,],attr_tier_5,wp_tier_5,knows_common|knows_athletics_3|knows_power_strike_4|knows_ironflesh_5|knows_shield_5,swadian_face_middle_1,swadian_face_older_2],</text:p>
          </table:table-cell>
          <table:table-cell table:number-columns-repeated="16362"/>
        </table:table-row>
        <table:table-row table:style-name="ro1">
          <table:table-cell table:style-name="ce6" table:formula="of:=IF(AND([.B35]&lt;&gt;&quot;&quot;;[.C35]&lt;&gt;&quot;&quot;);CONCATENATE([Variables.$I$1];[Variables.$I$7];[.B35];[Variables.$I$7];[Variables.$I$6];[Variables.$I$7];[.C35];[Variables.$I$7];[Variables.$I$6];[Variables.$I$7];[.D35];[Variables.$I$7];[Variables.$I$6];[.E35];[Variables.$I$6];[.F35];[Variables.$I$6];[.G35];[Variables.$I$6];[.H35];[Variables.$I$6];[Variables.$I$1];[.I35];[.J35];[.K35];[.L35];[.M35];[.N35];[.O35];[Variables.$I$2];[Variables.$I$6];[.P35];[Variables.$I$6];[.Q35];[Variables.$I$6];[.R35];[Variables.$I$6];[.S35];[Variables.$I$6];[.T35];IF([.U35]&lt;&gt;&quot;&quot;;CONCATENATE([Variables.$I$6];[.U35]);&quot;&quot;);[Variables.$I$2];[Variables.$I$6]);IF([.B35]&lt;&gt;&quot;&quot;;CONCATENATE(&quot;#&quot;;[.B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swadian_face_young_1,swadian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swadian_face_young_1,swadian_face_old_2],</text:p>
          </table:table-cell>
          <table:table-cell table:style-name="ce7" office:value-type="string" calcext:value-type="string">
            <text:p>i3_dale_spearman</text:p>
          </table:table-cell>
          <table:table-cell table:style-name="ce7" office:value-type="string" calcext:value-type="string">
            <text:p>Dale_Spearman</text:p>
          </table:table-cell>
          <table:table-cell table:style-name="ce7" office:value-type="string" calcext:value-type="string">
            <text:p>Dale_Spear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ale</text:p>
          </table:table-cell>
          <table:table-cell table:style-name="ce11" office:value-type="string" calcext:value-type="string">
            <text:p>itm_north_skullcap, itm_north_skullcap_good, itm_north_nasal_helm, itm_dale_helmet_a, itm_dale_helmet_a_good,</text:p>
          </table:table-cell>
          <table:table-cell table:style-name="ce11" office:value-type="string" calcext:value-type="string">
            <text:p>itm_dale_med_c,</text:p>
          </table:table-cell>
          <table:table-cell table:style-name="ce11"/>
          <table:table-cell table:style-name="ce11" office:value-type="string" calcext:value-type="string">
            <text:p>itm_leather_boots_dark, itm_splinted_greaves,</text:p>
          </table:table-cell>
          <table:table-cell table:style-name="ce11" office:value-type="string" calcext:value-type="string">
            <text:p>itm_dale_pike,</text:p>
          </table:table-cell>
          <table:table-cell table:style-name="ce11" table:number-columns-repeated="2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1|knows_power_strike_1|knows_ironflesh_1</text:p>
          </table:table-cell>
          <table:table-cell table:style-name="ce14" office:value-type="string" calcext:value-type="string">
            <text:p>swadian_face_young_1</text:p>
          </table:table-cell>
          <table:table-cell table:style-name="ce14" office:value-type="string" calcext:value-type="string">
            <text:p>swadian_face_old_2</text:p>
          </table:table-cell>
          <table:table-cell table:style-name="ce15"/>
          <table:table-cell table:style-name="ce6" table:formula="of:=IF(AND([.B35]&lt;&gt;&quot;&quot;;[.C35]&lt;&gt;&quot;&quot;);CONCATENATE([Variables.$I$1];[Variables.$I$7];[.B35];[Variables.$I$7];[Variables.$I$6];[Variables.$I$7];[.C35];[Variables.$I$7];[Variables.$I$6];[Variables.$I$7];[.D35];[Variables.$I$7];[Variables.$I$6];[.E35];[Variables.$I$6];[.F35];[Variables.$I$6];[.G35];[Variables.$I$6];[.H35];[Variables.$I$6];[Variables.$I$1];[.I35];[.J35];[.K35];[.L35];[.M35];[.N35];[.O35];[Variables.$I$2];[Variables.$I$6];[.P35];[Variables.$I$6];[.Q35];[Variables.$I$6];[.R35];[Variables.$I$6];[.S35];[Variables.$I$6];[.T35];IF([.U35]&lt;&gt;&quot;&quot;;CONCATENATE([Variables.$I$6];[.U35]);&quot;&quot;);[Variables.$I$2];[Variables.$I$6]);IF([.B35]&lt;&gt;&quot;&quot;;CONCATENATE(&quot;#&quot;;[.B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swadian_face_young_1,swadian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swadian_face_young_1,swadian_face_old_2],</text:p>
          </table:table-cell>
          <table:table-cell table:number-columns-repeated="16362"/>
        </table:table-row>
        <table:table-row table:style-name="ro1">
          <table:table-cell table:style-name="ce6" table:formula="of:=IF(AND([.B36]&lt;&gt;&quot;&quot;;[.C36]&lt;&gt;&quot;&quot;);CONCATENATE([Variables.$I$1];[Variables.$I$7];[.B36];[Variables.$I$7];[Variables.$I$6];[Variables.$I$7];[.C36];[Variables.$I$7];[Variables.$I$6];[Variables.$I$7];[.D36];[Variables.$I$7];[Variables.$I$6];[.E36];[Variables.$I$6];[.F36];[Variables.$I$6];[.G36];[Variables.$I$6];[.H36];[Variables.$I$6];[Variables.$I$1];[.I36];[.J36];[.K36];[.L36];[.M36];[.N36];[.O36];[Variables.$I$2];[Variables.$I$6];[.P36];[Variables.$I$6];[.Q36];[Variables.$I$6];[.R36];[Variables.$I$6];[.S36];[Variables.$I$6];[.T36];IF([.U36]&lt;&gt;&quot;&quot;;CONCATENATE([Variables.$I$6];[.U36]);&quot;&quot;);[Variables.$I$2];[Variables.$I$6]);IF([.B36]&lt;&gt;&quot;&quot;;CONCATENATE(&quot;#&quot;;[.B36]);&quot;&quot;))" office:value-type="string" office:string-value="[&quot;i4_dale_billman&quot;,&quot;Dale_Billman&quot;,&quot;Dale_Billmen&quot;,tfg_boots| tfg_armor| tfg_helm,0,0,fac_dale,[itm_dale_helmet_c,itm_dale_med_c_good,itm_leather_gloves,itm_splinted_greaves,itm_dale_billhook,],attr_tier_4,wp_tier_4,knows_common|knows_athletics_2|knows_ironflesh_2|knows_power_strike_2,swadian_face_young_1,swadian_face_older_2]," calcext:value-type="string">
            <text:p>["i4_dale_billman","Dale_Billman","Dale_Billmen",tfg_boots| tfg_armor| tfg_helm,0,0,fac_dale,[itm_dale_helmet_c,itm_dale_med_c_good,itm_leather_gloves,itm_splinted_greaves,itm_dale_billhook,],attr_tier_4,wp_tier_4,knows_common|knows_athletics_2|knows_ironflesh_2|knows_power_strike_2,swadian_face_young_1,swadian_face_older_2],</text:p>
          </table:table-cell>
          <table:table-cell table:style-name="ce7" office:value-type="string" calcext:value-type="string">
            <text:p>i4_dale_billman</text:p>
          </table:table-cell>
          <table:table-cell table:style-name="ce7" office:value-type="string" calcext:value-type="string">
            <text:p>Dale_Billman</text:p>
          </table:table-cell>
          <table:table-cell table:style-name="ce7" office:value-type="string" calcext:value-type="string">
            <text:p>Dale_Bill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ale</text:p>
          </table:table-cell>
          <table:table-cell table:style-name="ce11" office:value-type="string" calcext:value-type="string">
            <text:p>itm_dale_helmet_c,</text:p>
          </table:table-cell>
          <table:table-cell table:style-name="ce11" office:value-type="string" calcext:value-type="string">
            <text:p>itm_dale_med_c_good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splinted_greaves,</text:p>
          </table:table-cell>
          <table:table-cell table:style-name="ce11" office:value-type="string" calcext:value-type="string">
            <text:p>itm_dale_billhook,</text:p>
          </table:table-cell>
          <table:table-cell table:style-name="ce11" table:number-columns-repeated="2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2|knows_ironflesh_2|knows_power_strike_2</text:p>
          </table:table-cell>
          <table:table-cell table:style-name="ce14" office:value-type="string" calcext:value-type="string">
            <text:p>swadian_face_young_1</text:p>
          </table:table-cell>
          <table:table-cell table:style-name="ce14" office:value-type="string" calcext:value-type="string">
            <text:p>swadian_face_older_2</text:p>
          </table:table-cell>
          <table:table-cell table:style-name="ce15"/>
          <table:table-cell table:style-name="ce6" table:formula="of:=IF(AND([.B36]&lt;&gt;&quot;&quot;;[.C36]&lt;&gt;&quot;&quot;);CONCATENATE([Variables.$I$1];[Variables.$I$7];[.B36];[Variables.$I$7];[Variables.$I$6];[Variables.$I$7];[.C36];[Variables.$I$7];[Variables.$I$6];[Variables.$I$7];[.D36];[Variables.$I$7];[Variables.$I$6];[.E36];[Variables.$I$6];[.F36];[Variables.$I$6];[.G36];[Variables.$I$6];[.H36];[Variables.$I$6];[Variables.$I$1];[.I36];[.J36];[.K36];[.L36];[.M36];[.N36];[.O36];[Variables.$I$2];[Variables.$I$6];[.P36];[Variables.$I$6];[.Q36];[Variables.$I$6];[.R36];[Variables.$I$6];[.S36];[Variables.$I$6];[.T36];IF([.U36]&lt;&gt;&quot;&quot;;CONCATENATE([Variables.$I$6];[.U36]);&quot;&quot;);[Variables.$I$2];[Variables.$I$6]);IF([.B36]&lt;&gt;&quot;&quot;;CONCATENATE(&quot;#&quot;;[.B36]);&quot;&quot;))" office:value-type="string" office:string-value="[&quot;i4_dale_billman&quot;,&quot;Dale_Billman&quot;,&quot;Dale_Billmen&quot;,tfg_boots| tfg_armor| tfg_helm,0,0,fac_dale,[itm_dale_helmet_c,itm_dale_med_c_good,itm_leather_gloves,itm_splinted_greaves,itm_dale_billhook,],attr_tier_4,wp_tier_4,knows_common|knows_athletics_2|knows_ironflesh_2|knows_power_strike_2,swadian_face_young_1,swadian_face_older_2]," calcext:value-type="string">
            <text:p>["i4_dale_billman","Dale_Billman","Dale_Billmen",tfg_boots| tfg_armor| tfg_helm,0,0,fac_dale,[itm_dale_helmet_c,itm_dale_med_c_good,itm_leather_gloves,itm_splinted_greaves,itm_dale_billhook,],attr_tier_4,wp_tier_4,knows_common|knows_athletics_2|knows_ironflesh_2|knows_power_strike_2,swadian_face_young_1,swadian_face_older_2],</text:p>
          </table:table-cell>
          <table:table-cell table:number-columns-repeated="16362"/>
        </table:table-row>
        <table:table-row table:style-name="ro1">
          <table:table-cell table:style-name="ce6" table:formula="of:=IF(AND([.B37]&lt;&gt;&quot;&quot;;[.C37]&lt;&gt;&quot;&quot;);CONCATENATE([Variables.$I$1];[Variables.$I$7];[.B37];[Variables.$I$7];[Variables.$I$6];[Variables.$I$7];[.C37];[Variables.$I$7];[Variables.$I$6];[Variables.$I$7];[.D37];[Variables.$I$7];[Variables.$I$6];[.E37];[Variables.$I$6];[.F37];[Variables.$I$6];[.G37];[Variables.$I$6];[.H37];[Variables.$I$6];[Variables.$I$1];[.I37];[.J37];[.K37];[.L37];[.M37];[.N37];[.O37];[Variables.$I$2];[Variables.$I$6];[.P37];[Variables.$I$6];[.Q37];[Variables.$I$6];[.R37];[Variables.$I$6];[.S37];[Variables.$I$6];[.T37];IF([.U37]&lt;&gt;&quot;&quot;;CONCATENATE([Variables.$I$6];[.U37]);&quot;&quot;);[Variables.$I$2];[Variables.$I$6]);IF([.B37]&lt;&gt;&quot;&quot;;CONCATENATE(&quot;#&quot;;[.B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leather_gloves_reinf, itm_mail_mittens,itm_splinted_greaves_good,itm_dale_billhook,],attr_tier_5,wp_tier_5,knows_common|knows_athletics_2|knows_ironflesh_5|knows_power_strike_4,swadian_face_middle_1,swadian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leather_gloves_reinf, itm_mail_mittens,itm_splinted_greaves_good,itm_dale_billhook,],attr_tier_5,wp_tier_5,knows_common|knows_athletics_2|knows_ironflesh_5|knows_power_strike_4,swadian_face_middle_1,swadian_face_older_2],</text:p>
          </table:table-cell>
          <table:table-cell table:style-name="ce7" office:value-type="string" calcext:value-type="string">
            <text:p>i5_dale_bill_master</text:p>
          </table:table-cell>
          <table:table-cell table:style-name="ce7" office:value-type="string" calcext:value-type="string">
            <text:p>Dale_Bill_Master</text:p>
          </table:table-cell>
          <table:table-cell table:style-name="ce7" office:value-type="string" calcext:value-type="string">
            <text:p>Dale_Bill_Masters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ale</text:p>
          </table:table-cell>
          <table:table-cell table:style-name="ce11" office:value-type="string" calcext:value-type="string">
            <text:p>itm_dale_helmet_c, itm_dale_helmet_c_good, itm_dale_helmet_f,</text:p>
          </table:table-cell>
          <table:table-cell table:style-name="ce11" office:value-type="string" calcext:value-type="string">
            <text:p>itm_dale_heavy_b,itm_dale_heavy_b_good, itm_dale_heavy_b_pelt, itm_dale_heavy_b_lordly,</text:p>
          </table:table-cell>
          <table:table-cell table:style-name="ce11" office:value-type="string" calcext:value-type="string">
            <text:p>itm_leather_gloves_reinf, itm_mail_mittens,</text:p>
          </table:table-cell>
          <table:table-cell table:style-name="ce11" office:value-type="string" calcext:value-type="string">
            <text:p>itm_splinted_greaves_good,</text:p>
          </table:table-cell>
          <table:table-cell table:style-name="ce11" office:value-type="string" calcext:value-type="string">
            <text:p>itm_dale_billhook,</text:p>
          </table:table-cell>
          <table:table-cell table:style-name="ce11" table:number-columns-repeated="2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2|knows_ironflesh_5|knows_power_strike_4</text:p>
          </table:table-cell>
          <table:table-cell table:style-name="ce14" office:value-type="string" calcext:value-type="string">
            <text:p>swadian_face_middle_1</text:p>
          </table:table-cell>
          <table:table-cell table:style-name="ce14" office:value-type="string" calcext:value-type="string">
            <text:p>swadian_face_older_2</text:p>
          </table:table-cell>
          <table:table-cell table:style-name="ce15"/>
          <table:table-cell table:style-name="ce6" table:formula="of:=IF(AND([.B37]&lt;&gt;&quot;&quot;;[.C37]&lt;&gt;&quot;&quot;);CONCATENATE([Variables.$I$1];[Variables.$I$7];[.B37];[Variables.$I$7];[Variables.$I$6];[Variables.$I$7];[.C37];[Variables.$I$7];[Variables.$I$6];[Variables.$I$7];[.D37];[Variables.$I$7];[Variables.$I$6];[.E37];[Variables.$I$6];[.F37];[Variables.$I$6];[.G37];[Variables.$I$6];[.H37];[Variables.$I$6];[Variables.$I$1];[.I37];[.J37];[.K37];[.L37];[.M37];[.N37];[.O37];[Variables.$I$2];[Variables.$I$6];[.P37];[Variables.$I$6];[.Q37];[Variables.$I$6];[.R37];[Variables.$I$6];[.S37];[Variables.$I$6];[.T37];IF([.U37]&lt;&gt;&quot;&quot;;CONCATENATE([Variables.$I$6];[.U37]);&quot;&quot;);[Variables.$I$2];[Variables.$I$6]);IF([.B37]&lt;&gt;&quot;&quot;;CONCATENATE(&quot;#&quot;;[.B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leather_gloves_reinf, itm_mail_mittens,itm_splinted_greaves_good,itm_dale_billhook,],attr_tier_5,wp_tier_5,knows_common|knows_athletics_2|knows_ironflesh_5|knows_power_strike_4,swadian_face_middle_1,swadian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leather_gloves_reinf, itm_mail_mittens,itm_splinted_greaves_good,itm_dale_billhook,],attr_tier_5,wp_tier_5,knows_common|knows_athletics_2|knows_ironflesh_5|knows_power_strike_4,swadian_face_middle_1,swadian_face_older_2],</text:p>
          </table:table-cell>
          <table:table-cell table:number-columns-repeated="16362"/>
        </table:table-row>
        <table:table-row table:style-name="ro1">
          <table:table-cell table:style-name="ce6" table:formula="of:=IF(AND([.B38]&lt;&gt;&quot;&quot;;[.C38]&lt;&gt;&quot;&quot;);CONCATENATE([Variables.$I$1];[Variables.$I$7];[.B38];[Variables.$I$7];[Variables.$I$6];[Variables.$I$7];[.C38];[Variables.$I$7];[Variables.$I$6];[Variables.$I$7];[.D38];[Variables.$I$7];[Variables.$I$6];[.E38];[Variables.$I$6];[.F38];[Variables.$I$6];[.G38];[Variables.$I$6];[.H38];[Variables.$I$6];[Variables.$I$1];[.I38];[.J38];[.K38];[.L38];[.M38];[.N38];[.O38];[Variables.$I$2];[Variables.$I$6];[.P38];[Variables.$I$6];[.Q38];[Variables.$I$6];[.R38];[Variables.$I$6];[.S38];[Variables.$I$6];[.T38];IF([.U38]&lt;&gt;&quot;&quot;;CONCATENATE([Variables.$I$6];[.U38]);&quot;&quot;);[Variables.$I$2];[Variables.$I$6]);IF([.B38]&lt;&gt;&quot;&quot;;CONCATENATE(&quot;#&quot;;[.B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nord_face_young_1,nord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nord_face_young_1,nord_face_old_2],</text:p>
          </table:table-cell>
          <table:table-cell table:style-name="ce7" office:value-type="string" calcext:value-type="string">
            <text:p>c2_rhovanion_retainer</text:p>
          </table:table-cell>
          <table:table-cell table:style-name="ce7" office:value-type="string" calcext:value-type="string">
            <text:p>Northmen_Retainer</text:p>
          </table:table-cell>
          <table:table-cell table:style-name="ce7" office:value-type="string" calcext:value-type="string">
            <text:p>Northmen_Retainers</text:p>
          </table:table-cell>
          <table:table-cell table:style-name="ce8" office:value-type="string" calcext:value-type="string">
            <text:p>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ale</text:p>
          </table:table-cell>
          <table:table-cell table:style-name="ce11" office:value-type="string" calcext:value-type="string">
            <text:p>itm_north_leather_skullcap, itm_north_leather_skullcap_bad,</text:p>
          </table:table-cell>
          <table:table-cell table:style-name="ce11" office:value-type="string" calcext:value-type="string">
            <text:p>itm_dale_light_b, itm_dale_light_b_good,itm_north_leather_ok,</text:p>
          </table:table-cell>
          <table:table-cell table:style-name="ce11"/>
          <table:table-cell table:style-name="ce11" office:value-type="string" calcext:value-type="string">
            <text:p>itm_leather_boots_dark_bad,itm_rohan_shoes,</text:p>
          </table:table-cell>
          <table:table-cell table:style-name="ce11" office:value-type="string" calcext:value-type="string">
            <text:p>itm_dale_pike,itm_dale_sword_long,</text:p>
          </table:table-cell>
          <table:table-cell table:style-name="ce11" office:value-type="string" calcext:value-type="string">
            <text:p>itm_north_round_shield,itm_beorn_shield,</text:p>
          </table:table-cell>
          <table:table-cell table:style-name="ce11" office:value-type="string" calcext:value-type="string">
            <text:p>itm_dale_horse,</text:p>
          </table:table-cell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2" office:value-type="string" calcext:value-type="string">
            <text:p>knows_common|knows_riding_2|knows_athletics_1|knows_ironflesh_1|knows_shield_3</text:p>
          </table:table-cell>
          <table:table-cell table:style-name="ce14" office:value-type="string" calcext:value-type="string">
            <text:p>nord_face_young_1</text:p>
          </table:table-cell>
          <table:table-cell table:style-name="ce14" office:value-type="string" calcext:value-type="string">
            <text:p>nord_face_old_2</text:p>
          </table:table-cell>
          <table:table-cell table:style-name="ce15"/>
          <table:table-cell table:style-name="ce6" table:formula="of:=IF(AND([.B38]&lt;&gt;&quot;&quot;;[.C38]&lt;&gt;&quot;&quot;);CONCATENATE([Variables.$I$1];[Variables.$I$7];[.B38];[Variables.$I$7];[Variables.$I$6];[Variables.$I$7];[.C38];[Variables.$I$7];[Variables.$I$6];[Variables.$I$7];[.D38];[Variables.$I$7];[Variables.$I$6];[.E38];[Variables.$I$6];[.F38];[Variables.$I$6];[.G38];[Variables.$I$6];[.H38];[Variables.$I$6];[Variables.$I$1];[.I38];[.J38];[.K38];[.L38];[.M38];[.N38];[.O38];[Variables.$I$2];[Variables.$I$6];[.P38];[Variables.$I$6];[.Q38];[Variables.$I$6];[.R38];[Variables.$I$6];[.S38];[Variables.$I$6];[.T38];IF([.U38]&lt;&gt;&quot;&quot;;CONCATENATE([Variables.$I$6];[.U38]);&quot;&quot;);[Variables.$I$2];[Variables.$I$6]);IF([.B38]&lt;&gt;&quot;&quot;;CONCATENATE(&quot;#&quot;;[.B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nord_face_young_1,nord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nord_face_young_1,nord_face_old_2],</text:p>
          </table:table-cell>
          <table:table-cell table:number-columns-repeated="16362"/>
        </table:table-row>
        <table:table-row table:style-name="ro1">
          <table:table-cell table:style-name="ce6" table:formula="of:=IF(AND([.B39]&lt;&gt;&quot;&quot;;[.C39]&lt;&gt;&quot;&quot;);CONCATENATE([Variables.$I$1];[Variables.$I$7];[.B39];[Variables.$I$7];[Variables.$I$6];[Variables.$I$7];[.C39];[Variables.$I$7];[Variables.$I$6];[Variables.$I$7];[.D39];[Variables.$I$7];[Variables.$I$6];[.E39];[Variables.$I$6];[.F39];[Variables.$I$6];[.G39];[Variables.$I$6];[.H39];[Variables.$I$6];[Variables.$I$1];[.I39];[.J39];[.K39];[.L39];[.M39];[.N39];[.O39];[Variables.$I$2];[Variables.$I$6];[.P39];[Variables.$I$6];[.Q39];[Variables.$I$6];[.R39];[Variables.$I$6];[.S39];[Variables.$I$6];[.T39];IF([.U39]&lt;&gt;&quot;&quot;;CONCATENATE([Variables.$I$6];[.U39]);&quot;&quot;);[Variables.$I$2];[Variables.$I$6]);IF([.B39]&lt;&gt;&quot;&quot;;CONCATENATE(&quot;#&quot;;[.B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nord_face_young_1,nord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nord_face_young_1,nord_face_old_2],</text:p>
          </table:table-cell>
          <table:table-cell table:style-name="ce7" office:value-type="string" calcext:value-type="string">
            <text:p>c3_rhovanion_auxilia</text:p>
          </table:table-cell>
          <table:table-cell table:style-name="ce7" office:value-type="string" calcext:value-type="string">
            <text:p>Northmen_Auxiliary</text:p>
          </table:table-cell>
          <table:table-cell table:style-name="ce7" office:value-type="string" calcext:value-type="string">
            <text:p>Northmen_Auxilia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ale</text:p>
          </table:table-cell>
          <table:table-cell table:style-name="ce11" office:value-type="string" calcext:value-type="string">
            <text:p>itm_north_leather_skullcap, itm_north_leather_skullcap_bad,itm_north_leather_skullcap_good, itm_north_skullcap,</text:p>
          </table:table-cell>
          <table:table-cell table:style-name="ce11" office:value-type="string" calcext:value-type="string">
            <text:p>itm_dale_light_b_good, itm_dale_light_b_lordly,itm_north_leather_good,</text:p>
          </table:table-cell>
          <table:table-cell table:style-name="ce11"/>
          <table:table-cell table:style-name="ce11" office:value-type="string" calcext:value-type="string">
            <text:p>itm_leather_boots_dark,</text:p>
          </table:table-cell>
          <table:table-cell table:style-name="ce11" office:value-type="string" calcext:value-type="string">
            <text:p>itm_lance,itm_dale_sword_long,</text:p>
          </table:table-cell>
          <table:table-cell table:style-name="ce11" office:value-type="string" calcext:value-type="string">
            <text:p>itm_north_round_shield,itm_beorn_shield,</text:p>
          </table:table-cell>
          <table:table-cell table:style-name="ce11" office:value-type="string" calcext:value-type="string">
            <text:p>itm_dale_horse,</text:p>
          </table:table-cell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riding_4|knows_athletics_1|knows_ironflesh_1|knows_power_strike_1|knows_shield_3</text:p>
          </table:table-cell>
          <table:table-cell table:style-name="ce14" office:value-type="string" calcext:value-type="string">
            <text:p>nord_face_young_1</text:p>
          </table:table-cell>
          <table:table-cell table:style-name="ce14" office:value-type="string" calcext:value-type="string">
            <text:p>nord_face_old_2</text:p>
          </table:table-cell>
          <table:table-cell table:style-name="ce15"/>
          <table:table-cell table:style-name="ce6" table:formula="of:=IF(AND([.B39]&lt;&gt;&quot;&quot;;[.C39]&lt;&gt;&quot;&quot;);CONCATENATE([Variables.$I$1];[Variables.$I$7];[.B39];[Variables.$I$7];[Variables.$I$6];[Variables.$I$7];[.C39];[Variables.$I$7];[Variables.$I$6];[Variables.$I$7];[.D39];[Variables.$I$7];[Variables.$I$6];[.E39];[Variables.$I$6];[.F39];[Variables.$I$6];[.G39];[Variables.$I$6];[.H39];[Variables.$I$6];[Variables.$I$1];[.I39];[.J39];[.K39];[.L39];[.M39];[.N39];[.O39];[Variables.$I$2];[Variables.$I$6];[.P39];[Variables.$I$6];[.Q39];[Variables.$I$6];[.R39];[Variables.$I$6];[.S39];[Variables.$I$6];[.T39];IF([.U39]&lt;&gt;&quot;&quot;;CONCATENATE([Variables.$I$6];[.U39]);&quot;&quot;);[Variables.$I$2];[Variables.$I$6]);IF([.B39]&lt;&gt;&quot;&quot;;CONCATENATE(&quot;#&quot;;[.B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nord_face_young_1,nord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nord_face_young_1,nord_face_old_2],</text:p>
          </table:table-cell>
          <table:table-cell table:number-columns-repeated="16362"/>
        </table:table-row>
        <table:table-row table:style-name="ro1">
          <table:table-cell table:style-name="ce6" table:formula="of:=IF(AND([.B40]&lt;&gt;&quot;&quot;;[.C40]&lt;&gt;&quot;&quot;);CONCATENATE([Variables.$I$1];[Variables.$I$7];[.B40];[Variables.$I$7];[Variables.$I$6];[Variables.$I$7];[.C40];[Variables.$I$7];[Variables.$I$6];[Variables.$I$7];[.D40];[Variables.$I$7];[Variables.$I$6];[.E40];[Variables.$I$6];[.F40];[Variables.$I$6];[.G40];[Variables.$I$6];[.H40];[Variables.$I$6];[Variables.$I$1];[.I40];[.J40];[.K40];[.L40];[.M40];[.N40];[.O40];[Variables.$I$2];[Variables.$I$6];[.P40];[Variables.$I$6];[.Q40];[Variables.$I$6];[.R40];[Variables.$I$6];[.S40];[Variables.$I$6];[.T40];IF([.U40]&lt;&gt;&quot;&quot;;CONCATENATE([Variables.$I$6];[.U40]);&quot;&quot;);[Variables.$I$2];[Variables.$I$6]);IF([.B40]&lt;&gt;&quot;&quot;;CONCATENATE(&quot;#&quot;;[.B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nord_face_young_1,nord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nord_face_young_1,nord_face_older_2],</text:p>
          </table:table-cell>
          <table:table-cell table:style-name="ce7" office:value-type="string" calcext:value-type="string">
            <text:p>c4_rhovanion_rider</text:p>
          </table:table-cell>
          <table:table-cell table:style-name="ce7" office:value-type="string" calcext:value-type="string">
            <text:p>Rhovanion_Rider</text:p>
          </table:table-cell>
          <table:table-cell table:style-name="ce7" office:value-type="string" calcext:value-type="string">
            <text:p>Rhovanion_Riders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ale</text:p>
          </table:table-cell>
          <table:table-cell table:style-name="ce11" office:value-type="string" calcext:value-type="string">
            <text:p>itm_north_leather_skullcap_good, itm_north_skullcap, itm_north_nasal_helm, itm_north_skullcap_good,</text:p>
          </table:table-cell>
          <table:table-cell table:style-name="ce11" office:value-type="string" calcext:value-type="string">
            <text:p>itm_dale_med_a_bad, itm_dale_med_a,</text:p>
          </table:table-cell>
          <table:table-cell table:style-name="ce11"/>
          <table:table-cell table:style-name="ce11" office:value-type="string" calcext:value-type="string">
            <text:p>itm_leather_boots_dark,</text:p>
          </table:table-cell>
          <table:table-cell table:style-name="ce11" office:value-type="string" calcext:value-type="string">
            <text:p>itm_lance,itm_dale_sword_long,</text:p>
          </table:table-cell>
          <table:table-cell table:style-name="ce11" office:value-type="string" calcext:value-type="string">
            <text:p>itm_north_round_shield, itm_dale_shield_c,itm_dale_shield_c_good,</text:p>
          </table:table-cell>
          <table:table-cell table:style-name="ce11" office:value-type="string" calcext:value-type="string">
            <text:p>itm_dale_horse,itm_dale_warhorse,</text:p>
          </table:table-cell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riding_5|knows_ironflesh_2|knows_power_strike_2|knows_shield_4</text:p>
          </table:table-cell>
          <table:table-cell table:style-name="ce14" office:value-type="string" calcext:value-type="string">
            <text:p>nord_face_young_1</text:p>
          </table:table-cell>
          <table:table-cell table:style-name="ce14" office:value-type="string" calcext:value-type="string">
            <text:p>nord_face_older_2</text:p>
          </table:table-cell>
          <table:table-cell table:style-name="ce15"/>
          <table:table-cell table:style-name="ce6" table:formula="of:=IF(AND([.B40]&lt;&gt;&quot;&quot;;[.C40]&lt;&gt;&quot;&quot;);CONCATENATE([Variables.$I$1];[Variables.$I$7];[.B40];[Variables.$I$7];[Variables.$I$6];[Variables.$I$7];[.C40];[Variables.$I$7];[Variables.$I$6];[Variables.$I$7];[.D40];[Variables.$I$7];[Variables.$I$6];[.E40];[Variables.$I$6];[.F40];[Variables.$I$6];[.G40];[Variables.$I$6];[.H40];[Variables.$I$6];[Variables.$I$1];[.I40];[.J40];[.K40];[.L40];[.M40];[.N40];[.O40];[Variables.$I$2];[Variables.$I$6];[.P40];[Variables.$I$6];[.Q40];[Variables.$I$6];[.R40];[Variables.$I$6];[.S40];[Variables.$I$6];[.T40];IF([.U40]&lt;&gt;&quot;&quot;;CONCATENATE([Variables.$I$6];[.U40]);&quot;&quot;);[Variables.$I$2];[Variables.$I$6]);IF([.B40]&lt;&gt;&quot;&quot;;CONCATENATE(&quot;#&quot;;[.B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nord_face_young_1,nord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nord_face_young_1,nord_face_older_2],</text:p>
          </table:table-cell>
          <table:table-cell table:number-columns-repeated="16362"/>
        </table:table-row>
        <table:table-row table:style-name="ro1">
          <table:table-cell table:style-name="ce6" table:formula="of:=IF(AND([.B41]&lt;&gt;&quot;&quot;;[.C41]&lt;&gt;&quot;&quot;);CONCATENATE([Variables.$I$1];[Variables.$I$7];[.B41];[Variables.$I$7];[Variables.$I$6];[Variables.$I$7];[.C41];[Variables.$I$7];[Variables.$I$6];[Variables.$I$7];[.D41];[Variables.$I$7];[Variables.$I$6];[.E41];[Variables.$I$6];[.F41];[Variables.$I$6];[.G41];[Variables.$I$6];[.H41];[Variables.$I$6];[Variables.$I$1];[.I41];[.J41];[.K41];[.L41];[.M41];[.N41];[.O41];[Variables.$I$2];[Variables.$I$6];[.P41];[Variables.$I$6];[.Q41];[Variables.$I$6];[.R41];[Variables.$I$6];[.S41];[Variables.$I$6];[.T41];IF([.U41]&lt;&gt;&quot;&quot;;CONCATENATE([Variables.$I$6];[.U41]);&quot;&quot;);[Variables.$I$2];[Variables.$I$6]);IF([.B41]&lt;&gt;&quot;&quot;;CONCATENATE(&quot;#&quot;;[.B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_big, itm_javelin_big,itm_north_round_shield, itm_dale_shield_c,itm_dale_shield_c_good,itm_dale_warhorse,],attr_tier_5,wp_tier_5,knows_common|knows_riding_8|knows_shield_5|knows_ironflesh_3|knows_power_strike_3|knows_power_throw_6|knows_horse_archery_8,nord_face_middle_1,nord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_big, itm_javelin_big,itm_north_round_shield, itm_dale_shield_c,itm_dale_shield_c_good,itm_dale_warhorse,],attr_tier_5,wp_tier_5,knows_common|knows_riding_8|knows_shield_5|knows_ironflesh_3|knows_power_strike_3|knows_power_throw_6|knows_horse_archery_8,nord_face_middle_1,nord_face_older_2],</text:p>
          </table:table-cell>
          <table:table-cell table:style-name="ce7" office:value-type="string" calcext:value-type="string">
            <text:p>ac5_rhovanion_marchwarden</text:p>
          </table:table-cell>
          <table:table-cell table:style-name="ce7" office:value-type="string" calcext:value-type="string">
            <text:p>Rhovanion_Marchwarden</text:p>
          </table:table-cell>
          <table:table-cell table:style-name="ce7" office:value-type="string" calcext:value-type="string">
            <text:p>Rhovanion_Marchwardens</text:p>
          </table:table-cell>
          <table:table-cell table:style-name="ce8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ale</text:p>
          </table:table-cell>
          <table:table-cell table:style-name="ce11" office:value-type="string" calcext:value-type="string">
            <text:p>itm_dale_helmet_e, itm_dale_helmet_f,itm_north_skullcap_good,</text:p>
          </table:table-cell>
          <table:table-cell table:style-name="ce11" office:value-type="string" calcext:value-type="string">
            <text:p>itm_dale_med_a_good,itm_dale_med_a_lordly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leather_boots_dark,</text:p>
          </table:table-cell>
          <table:table-cell table:style-name="ce11" office:value-type="string" calcext:value-type="string">
            <text:p>itm_dale_sword_long, itm_javelin_big, itm_javelin_big,</text:p>
          </table:table-cell>
          <table:table-cell table:style-name="ce11" office:value-type="string" calcext:value-type="string">
            <text:p>itm_north_round_shield, itm_dale_shield_c,itm_dale_shield_c_good,</text:p>
          </table:table-cell>
          <table:table-cell table:style-name="ce11" office:value-type="string" calcext:value-type="string">
            <text:p>itm_dale_warhorse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riding_8|knows_shield_5|knows_ironflesh_3|knows_power_strike_3|knows_power_throw_6|knows_horse_archery_8</text:p>
          </table:table-cell>
          <table:table-cell table:style-name="ce14" office:value-type="string" calcext:value-type="string">
            <text:p>nord_face_middle_1</text:p>
          </table:table-cell>
          <table:table-cell table:style-name="ce14" office:value-type="string" calcext:value-type="string">
            <text:p>nord_face_older_2</text:p>
          </table:table-cell>
          <table:table-cell table:style-name="ce15"/>
          <table:table-cell table:style-name="ce6" table:formula="of:=IF(AND([.B41]&lt;&gt;&quot;&quot;;[.C41]&lt;&gt;&quot;&quot;);CONCATENATE([Variables.$I$1];[Variables.$I$7];[.B41];[Variables.$I$7];[Variables.$I$6];[Variables.$I$7];[.C41];[Variables.$I$7];[Variables.$I$6];[Variables.$I$7];[.D41];[Variables.$I$7];[Variables.$I$6];[.E41];[Variables.$I$6];[.F41];[Variables.$I$6];[.G41];[Variables.$I$6];[.H41];[Variables.$I$6];[Variables.$I$1];[.I41];[.J41];[.K41];[.L41];[.M41];[.N41];[.O41];[Variables.$I$2];[Variables.$I$6];[.P41];[Variables.$I$6];[.Q41];[Variables.$I$6];[.R41];[Variables.$I$6];[.S41];[Variables.$I$6];[.T41];IF([.U41]&lt;&gt;&quot;&quot;;CONCATENATE([Variables.$I$6];[.U41]);&quot;&quot;);[Variables.$I$2];[Variables.$I$6]);IF([.B41]&lt;&gt;&quot;&quot;;CONCATENATE(&quot;#&quot;;[.B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_big, itm_javelin_big,itm_north_round_shield, itm_dale_shield_c,itm_dale_shield_c_good,itm_dale_warhorse,],attr_tier_5,wp_tier_5,knows_common|knows_riding_8|knows_shield_5|knows_ironflesh_3|knows_power_strike_3|knows_power_throw_6|knows_horse_archery_8,nord_face_middle_1,nord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_big, itm_javelin_big,itm_north_round_shield, itm_dale_shield_c,itm_dale_shield_c_good,itm_dale_warhorse,],attr_tier_5,wp_tier_5,knows_common|knows_riding_8|knows_shield_5|knows_ironflesh_3|knows_power_strike_3|knows_power_throw_6|knows_horse_archery_8,nord_face_middle_1,nord_face_older_2],</text:p>
          </table:table-cell>
          <table:table-cell table:number-columns-repeated="16362"/>
        </table:table-row>
        <table:table-row table:style-name="ro1">
          <table:table-cell table:style-name="ce6" table:formula="of:=IF(AND([.B42]&lt;&gt;&quot;&quot;;[.C42]&lt;&gt;&quot;&quot;);CONCATENATE([Variables.$I$1];[Variables.$I$7];[.B42];[Variables.$I$7];[Variables.$I$6];[Variables.$I$7];[.C42];[Variables.$I$7];[Variables.$I$6];[Variables.$I$7];[.D42];[Variables.$I$7];[Variables.$I$6];[.E42];[Variables.$I$6];[.F42];[Variables.$I$6];[.G42];[Variables.$I$6];[.H42];[Variables.$I$6];[Variables.$I$1];[.I42];[.J42];[.K42];[.L42];[.M42];[.N42];[.O42];[Variables.$I$2];[Variables.$I$6];[.P42];[Variables.$I$6];[.Q42];[Variables.$I$6];[.R42];[Variables.$I$6];[.S42];[Variables.$I$6];[.T42];IF([.U42]&lt;&gt;&quot;&quot;;CONCATENATE([Variables.$I$6];[.U42]);&quot;&quot;);[Variables.$I$2];[Variables.$I$6]);IF([.B42]&lt;&gt;&quot;&quot;;CONCATENATE(&quot;#&quot;;[.B42]);&quot;&quot;))" office:value-type="string" office:string-value="#new troop at end of file" calcext:value-type="string">
            <text:p>#new troop at end of file</text:p>
          </table:table-cell>
          <table:table-cell table:style-name="ce5" office:value-type="string" calcext:value-type="string">
            <text:p>new troop at end of file</text:p>
          </table:table-cell>
          <table:table-cell table:style-name="ce6" table:number-columns-repeated="19"/>
          <table:table-cell table:style-name="ce6" table:formula="of:=IF(AND([.B42]&lt;&gt;&quot;&quot;;[.C42]&lt;&gt;&quot;&quot;);CONCATENATE([Variables.$I$1];[Variables.$I$7];[.B42];[Variables.$I$7];[Variables.$I$6];[Variables.$I$7];[.C42];[Variables.$I$7];[Variables.$I$6];[Variables.$I$7];[.D42];[Variables.$I$7];[Variables.$I$6];[.E42];[Variables.$I$6];[.F42];[Variables.$I$6];[.G42];[Variables.$I$6];[.H42];[Variables.$I$6];[Variables.$I$1];[.I42];[.J42];[.K42];[.L42];[.M42];[.N42];[.O42];[Variables.$I$2];[Variables.$I$6];[.P42];[Variables.$I$6];[.Q42];[Variables.$I$6];[.R42];[Variables.$I$6];[.S42];[Variables.$I$6];[.T42];IF([.U42]&lt;&gt;&quot;&quot;;CONCATENATE([Variables.$I$6];[.U42]);&quot;&quot;);[Variables.$I$2];[Variables.$I$6]);IF([.B42]&lt;&gt;&quot;&quot;;CONCATENATE(&quot;#&quot;;[.B42]);&quot;&quot;))" office:value-type="string" office:string-value="#new troop at end of file" calcext:value-type="string">
            <text:p>#new troop at end of file</text:p>
          </table:table-cell>
          <table:table-cell table:number-columns-repeated="16362"/>
        </table:table-row>
        <table:table-row table:style-name="ro1">
          <table:table-cell table:style-name="ce6" table:formula="of:=IF(AND([.B43]&lt;&gt;&quot;&quot;;[.C43]&lt;&gt;&quot;&quot;);CONCATENATE([Variables.$I$1];[Variables.$I$7];[.B43];[Variables.$I$7];[Variables.$I$6];[Variables.$I$7];[.C43];[Variables.$I$7];[Variables.$I$6];[Variables.$I$7];[.D43];[Variables.$I$7];[Variables.$I$6];[.E43];[Variables.$I$6];[.F43];[Variables.$I$6];[.G43];[Variables.$I$6];[.H43];[Variables.$I$6];[Variables.$I$1];[.I43];[.J43];[.K43];[.L43];[.M43];[.N43];[.O43];[Variables.$I$2];[Variables.$I$6];[.P43];[Variables.$I$6];[.Q43];[Variables.$I$6];[.R43];[Variables.$I$6];[.S43];[Variables.$I$6];[.T43];IF([.U43]&lt;&gt;&quot;&quot;;CONCATENATE([Variables.$I$6];[.U43]);&quot;&quot;);[Variables.$I$2];[Variables.$I$6]);IF([.B43]&lt;&gt;&quot;&quot;;CONCATENATE(&quot;#&quot;;[.B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nord_face_middle_1,nord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nord_face_middle_1,nord_face_older_2],</text:p>
          </table:table-cell>
          <table:table-cell table:style-name="ce7" office:value-type="string" calcext:value-type="string">
            <text:p>c5_rhovanion_noble</text:p>
          </table:table-cell>
          <table:table-cell table:style-name="ce7" office:value-type="string" calcext:value-type="string">
            <text:p>Rhovanion_Noble</text:p>
          </table:table-cell>
          <table:table-cell table:style-name="ce7" office:value-type="string" calcext:value-type="string">
            <text:p>Rhovanion_Noblemen</text:p>
          </table:table-cell>
          <table:table-cell table:style-name="ce8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ale</text:p>
          </table:table-cell>
          <table:table-cell table:style-name="ce11" office:value-type="string" calcext:value-type="string">
            <text:p>itm_dale_helmet_e, itm_dale_helmet_f, itm_north_nasal_helm_good,</text:p>
          </table:table-cell>
          <table:table-cell table:style-name="ce11" office:value-type="string" calcext:value-type="string">
            <text:p>itm_dale_heavy_c,itm_dale_heavy_c_good,</text:p>
          </table:table-cell>
          <table:table-cell table:style-name="ce11" office:value-type="string" calcext:value-type="string">
            <text:p>itm_leather_gloves_good,itm_mail_mittens,</text:p>
          </table:table-cell>
          <table:table-cell table:style-name="ce11" office:value-type="string" calcext:value-type="string">
            <text:p>itm_leather_boots_dark, itm_splinted_greaves_good,</text:p>
          </table:table-cell>
          <table:table-cell table:style-name="ce11" office:value-type="string" calcext:value-type="string">
            <text:p>itm_lance,itm_dale_sword_long,</text:p>
          </table:table-cell>
          <table:table-cell table:style-name="ce11" office:value-type="string" calcext:value-type="string">
            <text:p>itm_dwarf_shield_c, itm_dwarf_shield_c_good,</text:p>
          </table:table-cell>
          <table:table-cell table:style-name="ce11" office:value-type="string" calcext:value-type="string">
            <text:p>itm_dale_warhorse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riding_7|knows_shield_6|knows_ironflesh_4|knows_power_strike_3</text:p>
          </table:table-cell>
          <table:table-cell table:style-name="ce14" office:value-type="string" calcext:value-type="string">
            <text:p>nord_face_middle_1</text:p>
          </table:table-cell>
          <table:table-cell table:style-name="ce14" office:value-type="string" calcext:value-type="string">
            <text:p>nord_face_older_2</text:p>
          </table:table-cell>
          <table:table-cell table:style-name="ce15"/>
          <table:table-cell table:style-name="ce6" table:formula="of:=IF(AND([.B43]&lt;&gt;&quot;&quot;;[.C43]&lt;&gt;&quot;&quot;);CONCATENATE([Variables.$I$1];[Variables.$I$7];[.B43];[Variables.$I$7];[Variables.$I$6];[Variables.$I$7];[.C43];[Variables.$I$7];[Variables.$I$6];[Variables.$I$7];[.D43];[Variables.$I$7];[Variables.$I$6];[.E43];[Variables.$I$6];[.F43];[Variables.$I$6];[.G43];[Variables.$I$6];[.H43];[Variables.$I$6];[Variables.$I$1];[.I43];[.J43];[.K43];[.L43];[.M43];[.N43];[.O43];[Variables.$I$2];[Variables.$I$6];[.P43];[Variables.$I$6];[.Q43];[Variables.$I$6];[.R43];[Variables.$I$6];[.S43];[Variables.$I$6];[.T43];IF([.U43]&lt;&gt;&quot;&quot;;CONCATENATE([Variables.$I$6];[.U43]);&quot;&quot;);[Variables.$I$2];[Variables.$I$6]);IF([.B43]&lt;&gt;&quot;&quot;;CONCATENATE(&quot;#&quot;;[.B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nord_face_middle_1,nord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nord_face_middle_1,nord_face_older_2],</text:p>
          </table:table-cell>
          <table:table-cell table:number-columns-repeated="16362"/>
        </table:table-row>
        <table:table-row table:style-name="ro1">
          <table:table-cell table:formula="of:=IF(AND([.B44]&lt;&gt;&quot;&quot;;[.C44]&lt;&gt;&quot;&quot;);CONCATENATE([Variables.$I$1];[Variables.$I$7];[.B44];[Variables.$I$7];[Variables.$I$6];[Variables.$I$7];[.C44];[Variables.$I$7];[Variables.$I$6];[Variables.$I$7];[.D44];[Variables.$I$7];[Variables.$I$6];[.E44];[Variables.$I$6];[.F44];[Variables.$I$6];[.G44];[Variables.$I$6];[.H44];[Variables.$I$6];[Variables.$I$1];[.I44];[.J44];[.K44];[.L44];[.M44];[.N44];[.O44];[Variables.$I$2];[Variables.$I$6];[.P44];[Variables.$I$6];[.Q44];[Variables.$I$6];[.R44];[Variables.$I$6];[.S44];[Variables.$I$6];[.T44];IF([.U44]&lt;&gt;&quot;&quot;;CONCATENATE([Variables.$I$6];[.U44]);&quot;&quot;);[Variables.$I$2];[Variables.$I$6]);IF([.B44]&lt;&gt;&quot;&quot;;CONCATENATE(&quot;#&quot;;[.B44]);&quot;&quot;))">
            <text:p/>
          </table:table-cell>
          <table:table-cell table:style-name="ce6" table:number-columns-repeated="20"/>
          <table:table-cell table:style-name="ce36" table:formula="of:=IF(AND([.B44]&lt;&gt;&quot;&quot;;[.C44]&lt;&gt;&quot;&quot;);CONCATENATE([Variables.$I$1];[Variables.$I$7];[.B44];[Variables.$I$7];[Variables.$I$6];[Variables.$I$7];[.C44];[Variables.$I$7];[Variables.$I$6];[Variables.$I$7];[.D44];[Variables.$I$7];[Variables.$I$6];[.E44];[Variables.$I$6];[.F44];[Variables.$I$6];[.G44];[Variables.$I$6];[.H44];[Variables.$I$6];[Variables.$I$1];[.I44];[.J44];[.K44];[.L44];[.M44];[.N44];[.O44];[Variables.$I$2];[Variables.$I$6];[.P44];[Variables.$I$6];[.Q44];[Variables.$I$6];[.R44];[Variables.$I$6];[.S44];[Variables.$I$6];[.T44];IF([.U44]&lt;&gt;&quot;&quot;;CONCATENATE([Variables.$I$6];[.U44]);&quot;&quot;);[Variables.$I$2];[Variables.$I$6]);IF([.B44]&lt;&gt;&quot;&quot;;CONCATENATE(&quot;#&quot;;[.B44]);&quot;&quot;))">
            <text:p/>
          </table:table-cell>
          <table:table-cell table:number-columns-repeated="16362"/>
        </table:table-row>
        <table:table-row table:style-name="ro1">
          <table:table-cell table:style-name="ce6" table:formula="of:=IF(AND([.B45]&lt;&gt;&quot;&quot;;[.C45]&lt;&gt;&quot;&quot;);CONCATENATE([Variables.$I$1];[Variables.$I$7];[.B45];[Variables.$I$7];[Variables.$I$6];[Variables.$I$7];[.C45];[Variables.$I$7];[Variables.$I$6];[Variables.$I$7];[.D45];[Variables.$I$7];[Variables.$I$6];[.E45];[Variables.$I$6];[.F45];[Variables.$I$6];[.G45];[Variables.$I$6];[.H45];[Variables.$I$6];[Variables.$I$1];[.I45];[.J45];[.K45];[.L45];[.M45];[.N45];[.O45];[Variables.$I$2];[Variables.$I$6];[.P45];[Variables.$I$6];[.Q45];[Variables.$I$6];[.R45];[Variables.$I$6];[.S45];[Variables.$I$6];[.T45];IF([.U45]&lt;&gt;&quot;&quot;;CONCATENATE([Variables.$I$6];[.U45]);&quot;&quot;);[Variables.$I$2];[Variables.$I$6]);IF([.B45]&lt;&gt;&quot;&quot;;CONCATENATE(&quot;#&quot;;[.B45]);&quot;&quot;))" office:value-type="string" office:string-value="#Rhun" calcext:value-type="string">
            <text:p>#Rhun</text:p>
          </table:table-cell>
          <table:table-cell table:style-name="ce5" office:value-type="string" calcext:value-type="string">
            <text:p>Rhun</text:p>
          </table:table-cell>
          <table:table-cell table:style-name="ce6" table:number-columns-repeated="19"/>
          <table:table-cell table:style-name="ce6" table:formula="of:=IF(AND([.B45]&lt;&gt;&quot;&quot;;[.C45]&lt;&gt;&quot;&quot;);CONCATENATE([Variables.$I$1];[Variables.$I$7];[.B45];[Variables.$I$7];[Variables.$I$6];[Variables.$I$7];[.C45];[Variables.$I$7];[Variables.$I$6];[Variables.$I$7];[.D45];[Variables.$I$7];[Variables.$I$6];[.E45];[Variables.$I$6];[.F45];[Variables.$I$6];[.G45];[Variables.$I$6];[.H45];[Variables.$I$6];[Variables.$I$1];[.I45];[.J45];[.K45];[.L45];[.M45];[.N45];[.O45];[Variables.$I$2];[Variables.$I$6];[.P45];[Variables.$I$6];[.Q45];[Variables.$I$6];[.R45];[Variables.$I$6];[.S45];[Variables.$I$6];[.T45];IF([.U45]&lt;&gt;&quot;&quot;;CONCATENATE([Variables.$I$6];[.U45]);&quot;&quot;);[Variables.$I$2];[Variables.$I$6]);IF([.B45]&lt;&gt;&quot;&quot;;CONCATENATE(&quot;#&quot;;[.B45]);&quot;&quot;))" office:value-type="string" office:string-value="#Rhun" calcext:value-type="string">
            <text:p>#Rhun</text:p>
          </table:table-cell>
          <table:table-cell table:number-columns-repeated="16362"/>
        </table:table-row>
        <table:table-row table:style-name="ro1">
          <table:table-cell table:style-name="ce6" table:formula="of:=IF(AND([.B46]&lt;&gt;&quot;&quot;;[.C46]&lt;&gt;&quot;&quot;);CONCATENATE([Variables.$I$1];[Variables.$I$7];[.B46];[Variables.$I$7];[Variables.$I$6];[Variables.$I$7];[.C46];[Variables.$I$7];[Variables.$I$6];[Variables.$I$7];[.D46];[Variables.$I$7];[Variables.$I$6];[.E46];[Variables.$I$6];[.F46];[Variables.$I$6];[.G46];[Variables.$I$6];[.H46];[Variables.$I$6];[Variables.$I$1];[.I46];[.J46];[.K46];[.L46];[.M46];[.N46];[.O46];[Variables.$I$2];[Variables.$I$6];[.P46];[Variables.$I$6];[.Q46];[Variables.$I$6];[.R46];[Variables.$I$6];[.S46];[Variables.$I$6];[.T46];IF([.U46]&lt;&gt;&quot;&quot;;CONCATENATE([Variables.$I$6];[.U46]);&quot;&quot;);[Variables.$I$2];[Variables.$I$6]);IF([.B46]&lt;&gt;&quot;&quot;;CONCATENATE(&quot;#&quot;;[.B46]);&quot;&quot;))" office:value-type="string" office:string-value="[&quot;i1_rhun_tribesman&quot;,&quot;Rhun_Tribesman&quot;,&quot;Rhun_Tribesmen&quot;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" calcext:value-type="string">
            <text:p>["i1_rhun_tribesman","Rhun_Tribesman","Rhun_Tribesmen"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</text:p>
          </table:table-cell>
          <table:table-cell table:style-name="ce7" office:value-type="string" calcext:value-type="string">
            <text:p>i1_rhun_tribesman</text:p>
          </table:table-cell>
          <table:table-cell table:style-name="ce7" office:value-type="string" calcext:value-type="string">
            <text:p>Rhun_Tribesman</text:p>
          </table:table-cell>
          <table:table-cell table:style-name="ce7" office:value-type="string" calcext:value-type="string">
            <text:p>Rhun_Tribesmen</text:p>
          </table:table-cell>
          <table:table-cell table:style-name="ce8" office:value-type="string" calcext:value-type="string">
            <text:p>tf_evil_man| tf_mount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hun</text:p>
          </table:table-cell>
          <table:table-cell table:style-name="ce11"/>
          <table:table-cell table:style-name="ce11" office:value-type="string" calcext:value-type="string">
            <text:p>itm_rhun_armor_a,itm_rhun_armor_b,</text:p>
          </table:table-cell>
          <table:table-cell table:style-name="ce11"/>
          <table:table-cell table:style-name="ce11" office:value-type="string" calcext:value-type="string">
            <text:p>itm_furry_boots,</text:p>
          </table:table-cell>
          <table:table-cell table:style-name="ce11" office:value-type="string" calcext:value-type="string">
            <text:p>itm_rhun_shortsword,</text:p>
          </table:table-cell>
          <table:table-cell table:style-name="ce11" office:value-type="string" calcext:value-type="string">
            <text:p>itm_arrows,itm_hunting_bow,</text:p>
          </table:table-cell>
          <table:table-cell table:style-name="ce11"/>
          <table:table-cell table:style-name="ce12" office:value-type="string" calcext:value-type="string">
            <text:p>attr_evil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power_strike_1|knows_power_draw_1|knows_riding_2|knows_horse_archery_1|knows_looting_1|knows_tracking_1|knows_pathfinding_1|knows_spotting_1|knows_surgery_1|knows_prisoner_management_2|knows_trade_1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B46]&lt;&gt;&quot;&quot;;[.C46]&lt;&gt;&quot;&quot;);CONCATENATE([Variables.$I$1];[Variables.$I$7];[.B46];[Variables.$I$7];[Variables.$I$6];[Variables.$I$7];[.C46];[Variables.$I$7];[Variables.$I$6];[Variables.$I$7];[.D46];[Variables.$I$7];[Variables.$I$6];[.E46];[Variables.$I$6];[.F46];[Variables.$I$6];[.G46];[Variables.$I$6];[.H46];[Variables.$I$6];[Variables.$I$1];[.I46];[.J46];[.K46];[.L46];[.M46];[.N46];[.O46];[Variables.$I$2];[Variables.$I$6];[.P46];[Variables.$I$6];[.Q46];[Variables.$I$6];[.R46];[Variables.$I$6];[.S46];[Variables.$I$6];[.T46];IF([.U46]&lt;&gt;&quot;&quot;;CONCATENATE([Variables.$I$6];[.U46]);&quot;&quot;);[Variables.$I$2];[Variables.$I$6]);IF([.B46]&lt;&gt;&quot;&quot;;CONCATENATE(&quot;#&quot;;[.B46]);&quot;&quot;))" office:value-type="string" office:string-value="[&quot;i1_rhun_tribesman&quot;,&quot;Rhun_Tribesman&quot;,&quot;Rhun_Tribesmen&quot;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" calcext:value-type="string">
            <text:p>["i1_rhun_tribesman","Rhun_Tribesman","Rhun_Tribesmen"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16362"/>
        </table:table-row>
        <table:table-row table:style-name="ro1">
          <table:table-cell table:style-name="ce6" table:formula="of:=IF(AND([.B47]&lt;&gt;&quot;&quot;;[.C47]&lt;&gt;&quot;&quot;);CONCATENATE([Variables.$I$1];[Variables.$I$7];[.B47];[Variables.$I$7];[Variables.$I$6];[Variables.$I$7];[.C47];[Variables.$I$7];[Variables.$I$6];[Variables.$I$7];[.D47];[Variables.$I$7];[Variables.$I$6];[.E47];[Variables.$I$6];[.F47];[Variables.$I$6];[.G47];[Variables.$I$6];[.H47];[Variables.$I$6];[Variables.$I$1];[.I47];[.J47];[.K47];[.L47];[.M47];[.N47];[.O47];[Variables.$I$2];[Variables.$I$6];[.P47];[Variables.$I$6];[.Q47];[Variables.$I$6];[.R47];[Variables.$I$6];[.S47];[Variables.$I$6];[.T47];IF([.U47]&lt;&gt;&quot;&quot;;CONCATENATE([Variables.$I$6];[.U47]);&quot;&quot;);[Variables.$I$2];[Variables.$I$6]);IF([.B47]&lt;&gt;&quot;&quot;;CONCATENATE(&quot;#&quot;;[.B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</text:p>
          </table:table-cell>
          <table:table-cell table:style-name="ce7" office:value-type="string" calcext:value-type="string">
            <text:p>ac2_rhun_horse_scout</text:p>
          </table:table-cell>
          <table:table-cell table:style-name="ce7" office:value-type="string" calcext:value-type="string">
            <text:p>Rhun_Horse_Scout</text:p>
          </table:table-cell>
          <table:table-cell table:style-name="ce7" office:value-type="string" calcext:value-type="string">
            <text:p>Rhun_Horse_Scouts</text:p>
          </table:table-cell>
          <table:table-cell table:style-name="ce8" office:value-type="string" calcext:value-type="string">
            <text:p>tf_evil_man| tf_mounted| tfg_boots| tfg_armor| tfg_horse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hun</text:p>
          </table:table-cell>
          <table:table-cell table:style-name="ce11"/>
          <table:table-cell table:style-name="ce11" office:value-type="string" calcext:value-type="string">
            <text:p>itm_rhun_armor_a,itm_rhun_armor_b,itm_rhun_armor_d,</text:p>
          </table:table-cell>
          <table:table-cell table:style-name="ce11"/>
          <table:table-cell table:style-name="ce11" office:value-type="string" calcext:value-type="string">
            <text:p>itm_furry_boots,</text:p>
          </table:table-cell>
          <table:table-cell table:style-name="ce11" office:value-type="string" calcext:value-type="string">
            <text:p>itm_arrows,itm_nomad_bow,</text:p>
          </table:table-cell>
          <table:table-cell table:style-name="ce11" office:value-type="string" calcext:value-type="string">
            <text:p>itm_rhun_falchion,</text:p>
          </table:table-cell>
          <table:table-cell table:style-name="ce11" office:value-type="string" calcext:value-type="string">
            <text:p>itm_rhun_horse_a,itm_rhun_horse_b,</text:p>
          </table:table-cell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power_strike_1|knows_power_throw_1|knows_power_draw_2|knows_riding_3|knows_horse_archery_2|knows_looting_1|knows_tracking_1|knows_pathfinding_1|knows_spotting_1|knows_surgery_1|knows_prisoner_management_2|knows_trade_1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B47]&lt;&gt;&quot;&quot;;[.C47]&lt;&gt;&quot;&quot;);CONCATENATE([Variables.$I$1];[Variables.$I$7];[.B47];[Variables.$I$7];[Variables.$I$6];[Variables.$I$7];[.C47];[Variables.$I$7];[Variables.$I$6];[Variables.$I$7];[.D47];[Variables.$I$7];[Variables.$I$6];[.E47];[Variables.$I$6];[.F47];[Variables.$I$6];[.G47];[Variables.$I$6];[.H47];[Variables.$I$6];[Variables.$I$1];[.I47];[.J47];[.K47];[.L47];[.M47];[.N47];[.O47];[Variables.$I$2];[Variables.$I$6];[.P47];[Variables.$I$6];[.Q47];[Variables.$I$6];[.R47];[Variables.$I$6];[.S47];[Variables.$I$6];[.T47];IF([.U47]&lt;&gt;&quot;&quot;;CONCATENATE([Variables.$I$6];[.U47]);&quot;&quot;);[Variables.$I$2];[Variables.$I$6]);IF([.B47]&lt;&gt;&quot;&quot;;CONCATENATE(&quot;#&quot;;[.B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</text:p>
          </table:table-cell>
          <table:table-cell table:number-columns-repeated="16362"/>
        </table:table-row>
        <table:table-row table:style-name="ro1">
          <table:table-cell table:style-name="ce6" table:formula="of:=IF(AND([.B48]&lt;&gt;&quot;&quot;;[.C48]&lt;&gt;&quot;&quot;);CONCATENATE([Variables.$I$1];[Variables.$I$7];[.B48];[Variables.$I$7];[Variables.$I$6];[Variables.$I$7];[.C48];[Variables.$I$7];[Variables.$I$6];[Variables.$I$7];[.D48];[Variables.$I$7];[Variables.$I$6];[.E48];[Variables.$I$6];[.F48];[Variables.$I$6];[.G48];[Variables.$I$6];[.H48];[Variables.$I$6];[Variables.$I$1];[.I48];[.J48];[.K48];[.L48];[.M48];[.N48];[.O48];[Variables.$I$2];[Variables.$I$6];[.P48];[Variables.$I$6];[.Q48];[Variables.$I$6];[.R48];[Variables.$I$6];[.S48];[Variables.$I$6];[.T48];IF([.U48]&lt;&gt;&quot;&quot;;CONCATENATE([Variables.$I$6];[.U48]);&quot;&quot;);[Variables.$I$2];[Variables.$I$6]);IF([.B48]&lt;&gt;&quot;&quot;;CONCATENATE(&quot;#&quot;;[.B48]);&quot;&quot;))" office:value-type="string" office:string-value="[&quot;ac3_rhun_horse_archer&quot;,&quot;Rhun_Horse_Archer&quot;,&quot;Rhun_Horse_Archers&quot;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" calcext:value-type="string">
            <text:p>["ac3_rhun_horse_archer","Rhun_Horse_Archer","Rhun_Horse_Archers"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</text:p>
          </table:table-cell>
          <table:table-cell table:style-name="ce7" office:value-type="string" calcext:value-type="string">
            <text:p>ac3_rhun_horse_archer</text:p>
          </table:table-cell>
          <table:table-cell table:style-name="ce7" office:value-type="string" calcext:value-type="string">
            <text:p>Rhun_Horse_Archer</text:p>
          </table:table-cell>
          <table:table-cell table:style-name="ce7" office:value-type="string" calcext:value-type="string">
            <text:p>Rhun_Horse_Archers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hun</text:p>
          </table:table-cell>
          <table:table-cell table:style-name="ce11" office:value-type="string" calcext:value-type="string">
            <text:p>itm_rhun_helm_leather_bad, itm_rhun_helm_leather,itm_rhun_helm_round_bad,</text:p>
          </table:table-cell>
          <table:table-cell table:style-name="ce11" office:value-type="string" calcext:value-type="string">
            <text:p>itm_rhun_armor_a,itm_rhun_armor_b,itm_rhun_armor_d,</text:p>
          </table:table-cell>
          <table:table-cell table:style-name="ce11"/>
          <table:table-cell table:style-name="ce11" office:value-type="string" calcext:value-type="string">
            <text:p>itm_furry_boots,itm_leather_boots_dark_bad,</text:p>
          </table:table-cell>
          <table:table-cell table:style-name="ce11" office:value-type="string" calcext:value-type="string">
            <text:p>itm_arrows,itm_nomad_bow,</text:p>
          </table:table-cell>
          <table:table-cell table:style-name="ce11" office:value-type="string" calcext:value-type="string">
            <text:p>itm_rhun_sword,</text:p>
          </table:table-cell>
          <table:table-cell table:style-name="ce11" office:value-type="string" calcext:value-type="string">
            <text:p>itm_rhun_horse_a,itm_rhun_horse_b,</text:p>
          </table:table-cell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bow_3</text:p>
          </table:table-cell>
          <table:table-cell table:style-name="ce12" office:value-type="string" calcext:value-type="string">
            <text:p>knows_common|knows_riding_5|knows_power_draw_3|knows_ironflesh_1|knows_horse_archery_3|knows_power_throw_1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B48]&lt;&gt;&quot;&quot;;[.C48]&lt;&gt;&quot;&quot;);CONCATENATE([Variables.$I$1];[Variables.$I$7];[.B48];[Variables.$I$7];[Variables.$I$6];[Variables.$I$7];[.C48];[Variables.$I$7];[Variables.$I$6];[Variables.$I$7];[.D48];[Variables.$I$7];[Variables.$I$6];[.E48];[Variables.$I$6];[.F48];[Variables.$I$6];[.G48];[Variables.$I$6];[.H48];[Variables.$I$6];[Variables.$I$1];[.I48];[.J48];[.K48];[.L48];[.M48];[.N48];[.O48];[Variables.$I$2];[Variables.$I$6];[.P48];[Variables.$I$6];[.Q48];[Variables.$I$6];[.R48];[Variables.$I$6];[.S48];[Variables.$I$6];[.T48];IF([.U48]&lt;&gt;&quot;&quot;;CONCATENATE([Variables.$I$6];[.U48]);&quot;&quot;);[Variables.$I$2];[Variables.$I$6]);IF([.B48]&lt;&gt;&quot;&quot;;CONCATENATE(&quot;#&quot;;[.B48]);&quot;&quot;))" office:value-type="string" office:string-value="[&quot;ac3_rhun_horse_archer&quot;,&quot;Rhun_Horse_Archer&quot;,&quot;Rhun_Horse_Archers&quot;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" calcext:value-type="string">
            <text:p>["ac3_rhun_horse_archer","Rhun_Horse_Archer","Rhun_Horse_Archers"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</text:p>
          </table:table-cell>
          <table:table-cell table:number-columns-repeated="16362"/>
        </table:table-row>
        <table:table-row table:style-name="ro1">
          <table:table-cell table:style-name="ce6" table:formula="of:=IF(AND([.B49]&lt;&gt;&quot;&quot;;[.C49]&lt;&gt;&quot;&quot;);CONCATENATE([Variables.$I$1];[Variables.$I$7];[.B49];[Variables.$I$7];[Variables.$I$6];[Variables.$I$7];[.C49];[Variables.$I$7];[Variables.$I$6];[Variables.$I$7];[.D49];[Variables.$I$7];[Variables.$I$6];[.E49];[Variables.$I$6];[.F49];[Variables.$I$6];[.G49];[Variables.$I$6];[.H49];[Variables.$I$6];[Variables.$I$1];[.I49];[.J49];[.K49];[.L49];[.M49];[.N49];[.O49];[Variables.$I$2];[Variables.$I$6];[.P49];[Variables.$I$6];[.Q49];[Variables.$I$6];[.R49];[Variables.$I$6];[.S49];[Variables.$I$6];[.T49];IF([.U49]&lt;&gt;&quot;&quot;;CONCATENATE([Variables.$I$6];[.U49]);&quot;&quot;);[Variables.$I$2];[Variables.$I$6]);IF([.B49]&lt;&gt;&quot;&quot;;CONCATENATE(&quot;#&quot;;[.B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</text:p>
          </table:table-cell>
          <table:table-cell table:style-name="ce7" office:value-type="string" calcext:value-type="string">
            <text:p>ac4_rhun_veteran_horse_archer</text:p>
          </table:table-cell>
          <table:table-cell table:style-name="ce7" office:value-type="string" calcext:value-type="string">
            <text:p>Rhun_Veteran_Horse_Archer</text:p>
          </table:table-cell>
          <table:table-cell table:style-name="ce7" office:value-type="string" calcext:value-type="string">
            <text:p>Rhun_Veteran_Horse_Archers</text:p>
          </table:table-cell>
          <table:table-cell table:style-name="ce8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hun</text:p>
          </table:table-cell>
          <table:table-cell table:style-name="ce11" office:value-type="string" calcext:value-type="string">
            <text:p>itm_rhun_helm_leather, itm_rhun_helm_leather_good,itm_rhun_helm_round,</text:p>
          </table:table-cell>
          <table:table-cell table:style-name="ce11" office:value-type="string" calcext:value-type="string">
            <text:p>itm_rhun_armor_j,itm_rhun_armor_n,itm_rhun_armor_m,</text:p>
          </table:table-cell>
          <table:table-cell table:style-name="ce11"/>
          <table:table-cell table:style-name="ce11" office:value-type="string" calcext:value-type="string">
            <text:p>itm_furry_boots,itm_leather_boots_dark_bad,</text:p>
          </table:table-cell>
          <table:table-cell table:style-name="ce11" office:value-type="string" calcext:value-type="string">
            <text:p>itm_arrows,itm_nomad_bow,</text:p>
          </table:table-cell>
          <table:table-cell table:style-name="ce11" office:value-type="string" calcext:value-type="string">
            <text:p>itm_rhun_sword,</text:p>
          </table:table-cell>
          <table:table-cell table:style-name="ce11" office:value-type="string" calcext:value-type="string">
            <text:p>itm_rhun_horse_a,itm_rhun_horse_b,</text:p>
          </table:table-cell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bow_4</text:p>
          </table:table-cell>
          <table:table-cell table:style-name="ce12" office:value-type="string" calcext:value-type="string">
            <text:p>knows_common|knows_riding_6|knows_power_draw_4|knows_power_strike_1|knows_ironflesh_2|knows_horse_archery_5|knows_power_throw_3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B49]&lt;&gt;&quot;&quot;;[.C49]&lt;&gt;&quot;&quot;);CONCATENATE([Variables.$I$1];[Variables.$I$7];[.B49];[Variables.$I$7];[Variables.$I$6];[Variables.$I$7];[.C49];[Variables.$I$7];[Variables.$I$6];[Variables.$I$7];[.D49];[Variables.$I$7];[Variables.$I$6];[.E49];[Variables.$I$6];[.F49];[Variables.$I$6];[.G49];[Variables.$I$6];[.H49];[Variables.$I$6];[Variables.$I$1];[.I49];[.J49];[.K49];[.L49];[.M49];[.N49];[.O49];[Variables.$I$2];[Variables.$I$6];[.P49];[Variables.$I$6];[.Q49];[Variables.$I$6];[.R49];[Variables.$I$6];[.S49];[Variables.$I$6];[.T49];IF([.U49]&lt;&gt;&quot;&quot;;CONCATENATE([Variables.$I$6];[.U49]);&quot;&quot;);[Variables.$I$2];[Variables.$I$6]);IF([.B49]&lt;&gt;&quot;&quot;;CONCATENATE(&quot;#&quot;;[.B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</text:p>
          </table:table-cell>
          <table:table-cell table:number-columns-repeated="16362"/>
        </table:table-row>
        <table:table-row table:style-name="ro1">
          <table:table-cell table:style-name="ce6" table:formula="of:=IF(AND([.B50]&lt;&gt;&quot;&quot;;[.C50]&lt;&gt;&quot;&quot;);CONCATENATE([Variables.$I$1];[Variables.$I$7];[.B50];[Variables.$I$7];[Variables.$I$6];[Variables.$I$7];[.C50];[Variables.$I$7];[Variables.$I$6];[Variables.$I$7];[.D50];[Variables.$I$7];[Variables.$I$6];[.E50];[Variables.$I$6];[.F50];[Variables.$I$6];[.G50];[Variables.$I$6];[.H50];[Variables.$I$6];[Variables.$I$1];[.I50];[.J50];[.K50];[.L50];[.M50];[.N50];[.O50];[Variables.$I$2];[Variables.$I$6];[.P50];[Variables.$I$6];[.Q50];[Variables.$I$6];[.R50];[Variables.$I$6];[.S50];[Variables.$I$6];[.T50];IF([.U50]&lt;&gt;&quot;&quot;;CONCATENATE([Variables.$I$6];[.U50]);&quot;&quot;);[Variables.$I$2];[Variables.$I$6]);IF([.B50]&lt;&gt;&quot;&quot;;CONCATENATE(&quot;#&quot;;[.B50]);&quot;&quot;))"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ironflesh_2|knows_power_strike_2|knows_power_throw_4|knows_power_draw_4|knows_riding_6|knows_horse_archery_7,rhun_man1,rhun_man2]," calcext:value-type="string">
            <text:p>["ac5_rhun_balchoth_horse_archer","Balchoth_Horse_Archer","Balchoth_Horse_Archers"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ironflesh_2|knows_power_strike_2|knows_power_throw_4|knows_power_draw_4|knows_riding_6|knows_horse_archery_7,rhun_man1,rhun_man2],</text:p>
          </table:table-cell>
          <table:table-cell table:style-name="ce7" office:value-type="string" calcext:value-type="string">
            <text:p>ac5_rhun_balchoth_horse_archer</text:p>
          </table:table-cell>
          <table:table-cell table:style-name="ce7" office:value-type="string" calcext:value-type="string">
            <text:p>Balchoth_Horse_Archer</text:p>
          </table:table-cell>
          <table:table-cell table:style-name="ce7" office:value-type="string" calcext:value-type="string">
            <text:p>Balchoth_Horse_Archers</text:p>
          </table:table-cell>
          <table:table-cell table:style-name="ce8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hun</text:p>
          </table:table-cell>
          <table:table-cell table:style-name="ce11" office:value-type="string" calcext:value-type="string">
            <text:p>itm_rhun_helm_round_good, itm_rhun_helm_barbed_good,</text:p>
          </table:table-cell>
          <table:table-cell table:style-name="ce11" office:value-type="string" calcext:value-type="string">
            <text:p>itm_rhun_armor_o,itm_rhun_armor_n,itm_rhun_armor_m,</text:p>
          </table:table-cell>
          <table:table-cell table:style-name="ce11"/>
          <table:table-cell table:style-name="ce11" office:value-type="string" calcext:value-type="string">
            <text:p>itm_leather_boots_dark,</text:p>
          </table:table-cell>
          <table:table-cell table:style-name="ce11" office:value-type="string" calcext:value-type="string">
            <text:p>itm_arrows,itm_rhun_bow,</text:p>
          </table:table-cell>
          <table:table-cell table:style-name="ce11" office:value-type="string" calcext:value-type="string">
            <text:p>itm_rhun_sword,itm_rhun_bull1_shield,itm_rhun_bull2_shield,</text:p>
          </table:table-cell>
          <table:table-cell table:style-name="ce11" office:value-type="string" calcext:value-type="string">
            <text:p>itm_rhun_horse_d,itm_rhun_horse_b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bow_5</text:p>
          </table:table-cell>
          <table:table-cell table:style-name="ce12" office:value-type="string" calcext:value-type="string">
            <text:p>knows_common|knows_ironflesh_2|knows_power_strike_2|knows_power_throw_4|knows_power_draw_4|knows_riding_6|knows_horse_archery_7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B50]&lt;&gt;&quot;&quot;;[.C50]&lt;&gt;&quot;&quot;);CONCATENATE([Variables.$I$1];[Variables.$I$7];[.B50];[Variables.$I$7];[Variables.$I$6];[Variables.$I$7];[.C50];[Variables.$I$7];[Variables.$I$6];[Variables.$I$7];[.D50];[Variables.$I$7];[Variables.$I$6];[.E50];[Variables.$I$6];[.F50];[Variables.$I$6];[.G50];[Variables.$I$6];[.H50];[Variables.$I$6];[Variables.$I$1];[.I50];[.J50];[.K50];[.L50];[.M50];[.N50];[.O50];[Variables.$I$2];[Variables.$I$6];[.P50];[Variables.$I$6];[.Q50];[Variables.$I$6];[.R50];[Variables.$I$6];[.S50];[Variables.$I$6];[.T50];IF([.U50]&lt;&gt;&quot;&quot;;CONCATENATE([Variables.$I$6];[.U50]);&quot;&quot;);[Variables.$I$2];[Variables.$I$6]);IF([.B50]&lt;&gt;&quot;&quot;;CONCATENATE(&quot;#&quot;;[.B50]);&quot;&quot;))"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ironflesh_2|knows_power_strike_2|knows_power_throw_4|knows_power_draw_4|knows_riding_6|knows_horse_archery_7,rhun_man1,rhun_man2]," calcext:value-type="string">
            <text:p>["ac5_rhun_balchoth_horse_archer","Balchoth_Horse_Archer","Balchoth_Horse_Archers"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ironflesh_2|knows_power_strike_2|knows_power_throw_4|knows_power_draw_4|knows_riding_6|knows_horse_archery_7,rhun_man1,rhun_man2],</text:p>
          </table:table-cell>
          <table:table-cell table:number-columns-repeated="16362"/>
        </table:table-row>
        <table:table-row table:style-name="ro1">
          <table:table-cell table:style-name="ce6" table:formula="of:=IF(AND([.B51]&lt;&gt;&quot;&quot;;[.C51]&lt;&gt;&quot;&quot;);CONCATENATE([Variables.$I$1];[Variables.$I$7];[.B51];[Variables.$I$7];[Variables.$I$6];[Variables.$I$7];[.C51];[Variables.$I$7];[Variables.$I$6];[Variables.$I$7];[.D51];[Variables.$I$7];[Variables.$I$6];[.E51];[Variables.$I$6];[.F51];[Variables.$I$6];[.G51];[Variables.$I$6];[.H51];[Variables.$I$6];[Variables.$I$1];[.I51];[.J51];[.K51];[.L51];[.M51];[.N51];[.O51];[Variables.$I$2];[Variables.$I$6];[.P51];[Variables.$I$6];[.Q51];[Variables.$I$6];[.R51];[Variables.$I$6];[.S51];[Variables.$I$6];[.T51];IF([.U51]&lt;&gt;&quot;&quot;;CONCATENATE([Variables.$I$6];[.U51]);&quot;&quot;);[Variables.$I$2];[Variables.$I$6]);IF([.B51]&lt;&gt;&quot;&quot;;CONCATENATE(&quot;#&quot;;[.B51]);&quot;&quot;))" office:value-type="string" office:string-value="[&quot;c3_rhun_swift_horseman&quot;,&quot;Rhun_Swift_Horseman&quot;,&quot;Rhun_Swift_Horsemen&quot;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</text:p>
          </table:table-cell>
          <table:table-cell table:style-name="ce7" office:value-type="string" calcext:value-type="string">
            <text:p>c3_rhun_swift_horseman</text:p>
          </table:table-cell>
          <table:table-cell table:style-name="ce7" office:value-type="string" calcext:value-type="string">
            <text:p>Rhun_Swift_Horseman</text:p>
          </table:table-cell>
          <table:table-cell table:style-name="ce7" office:value-type="string" calcext:value-type="string">
            <text:p>Rhun_Swift_Horsemen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hun</text:p>
          </table:table-cell>
          <table:table-cell table:style-name="ce11" office:value-type="string" calcext:value-type="string">
            <text:p>itm_rhun_helm_pot_bad, itm_rhun_helm_horde_bad, itm_rhun_helm_round_bad,</text:p>
          </table:table-cell>
          <table:table-cell table:style-name="ce11" office:value-type="string" calcext:value-type="string">
            <text:p>itm_rhun_armor_a,itm_rhun_armor_d,</text:p>
          </table:table-cell>
          <table:table-cell table:style-name="ce11"/>
          <table:table-cell table:style-name="ce11" office:value-type="string" calcext:value-type="string">
            <text:p>itm_furry_boots,itm_leather_boots_dark_bad,</text:p>
          </table:table-cell>
          <table:table-cell table:style-name="ce11" office:value-type="string" calcext:value-type="string">
            <text:p>itm_rhun_sword,itm_light_lance,</text:p>
          </table:table-cell>
          <table:table-cell table:style-name="ce11" office:value-type="string" calcext:value-type="string">
            <text:p>itm_rhun_bull1_shield,</text:p>
          </table:table-cell>
          <table:table-cell table:style-name="ce11" office:value-type="string" calcext:value-type="string">
            <text:p>itm_rhun_horse_a,itm_rhun_horse_b,</text:p>
          </table:table-cell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riding_5|knows_power_draw_4|knows_ironflesh_1|knows_power_throw_1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B51]&lt;&gt;&quot;&quot;;[.C51]&lt;&gt;&quot;&quot;);CONCATENATE([Variables.$I$1];[Variables.$I$7];[.B51];[Variables.$I$7];[Variables.$I$6];[Variables.$I$7];[.C51];[Variables.$I$7];[Variables.$I$6];[Variables.$I$7];[.D51];[Variables.$I$7];[Variables.$I$6];[.E51];[Variables.$I$6];[.F51];[Variables.$I$6];[.G51];[Variables.$I$6];[.H51];[Variables.$I$6];[Variables.$I$1];[.I51];[.J51];[.K51];[.L51];[.M51];[.N51];[.O51];[Variables.$I$2];[Variables.$I$6];[.P51];[Variables.$I$6];[.Q51];[Variables.$I$6];[.R51];[Variables.$I$6];[.S51];[Variables.$I$6];[.T51];IF([.U51]&lt;&gt;&quot;&quot;;CONCATENATE([Variables.$I$6];[.U51]);&quot;&quot;);[Variables.$I$2];[Variables.$I$6]);IF([.B51]&lt;&gt;&quot;&quot;;CONCATENATE(&quot;#&quot;;[.B51]);&quot;&quot;))" office:value-type="string" office:string-value="[&quot;c3_rhun_swift_horseman&quot;,&quot;Rhun_Swift_Horseman&quot;,&quot;Rhun_Swift_Horsemen&quot;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</text:p>
          </table:table-cell>
          <table:table-cell table:number-columns-repeated="16362"/>
        </table:table-row>
        <table:table-row table:style-name="ro1">
          <table:table-cell table:style-name="ce6" table:formula="of:=IF(AND([.B52]&lt;&gt;&quot;&quot;;[.C52]&lt;&gt;&quot;&quot;);CONCATENATE([Variables.$I$1];[Variables.$I$7];[.B52];[Variables.$I$7];[Variables.$I$6];[Variables.$I$7];[.C52];[Variables.$I$7];[Variables.$I$6];[Variables.$I$7];[.D52];[Variables.$I$7];[Variables.$I$6];[.E52];[Variables.$I$6];[.F52];[Variables.$I$6];[.G52];[Variables.$I$6];[.H52];[Variables.$I$6];[Variables.$I$1];[.I52];[.J52];[.K52];[.L52];[.M52];[.N52];[.O52];[Variables.$I$2];[Variables.$I$6];[.P52];[Variables.$I$6];[.Q52];[Variables.$I$6];[.R52];[Variables.$I$6];[.S52];[Variables.$I$6];[.T52];IF([.U52]&lt;&gt;&quot;&quot;;CONCATENATE([Variables.$I$6];[.U52]);&quot;&quot;);[Variables.$I$2];[Variables.$I$6]);IF([.B52]&lt;&gt;&quot;&quot;;CONCATENATE(&quot;#&quot;;[.B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itm_rhun_horse_d,itm_rhun_horse_b,],attr_evil_tier_4,wp_tier_4,knows_common|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itm_rhun_horse_d,itm_rhun_horse_b,],attr_evil_tier_4,wp_tier_4,knows_common|knows_riding_6|knows_power_strike_2|knows_power_draw_2|knows_power_throw_2|knows_ironflesh_2|knows_horse_archery_1,rhun_man1,rhun_man2],</text:p>
          </table:table-cell>
          <table:table-cell table:style-name="ce7" office:value-type="string" calcext:value-type="string">
            <text:p>c4_rhun_veteran_swift_horseman</text:p>
          </table:table-cell>
          <table:table-cell table:style-name="ce7" office:value-type="string" calcext:value-type="string">
            <text:p>Rhun_Veteran_Swift_Horseman</text:p>
          </table:table-cell>
          <table:table-cell table:style-name="ce7" office:value-type="string" calcext:value-type="string">
            <text:p>Rhun_Veteran_Swift_Horsemen</text:p>
          </table:table-cell>
          <table:table-cell table:style-name="ce8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hun</text:p>
          </table:table-cell>
          <table:table-cell table:style-name="ce11" office:value-type="string" calcext:value-type="string">
            <text:p>itm_rhun_helm_pot, itm_rhun_helm_horde, itm_rhun_helm_round,</text:p>
          </table:table-cell>
          <table:table-cell table:style-name="ce11" office:value-type="string" calcext:value-type="string">
            <text:p>itm_rhun_armor_j,itm_rhun_armor_n,itm_rhun_armor_m,</text:p>
          </table:table-cell>
          <table:table-cell table:style-name="ce11" office:value-type="string" calcext:value-type="string">
            <text:p>itm_evil_gauntlets_a,</text:p>
          </table:table-cell>
          <table:table-cell table:style-name="ce11" office:value-type="string" calcext:value-type="string">
            <text:p>itm_furry_boots,itm_leather_boots_dark_bad,</text:p>
          </table:table-cell>
          <table:table-cell table:style-name="ce11" office:value-type="string" calcext:value-type="string">
            <text:p>itm_rhun_sword,itm_light_lance,</text:p>
          </table:table-cell>
          <table:table-cell table:style-name="ce11" office:value-type="string" calcext:value-type="string">
            <text:p>itm_rhun_bull1_shield,itm_rhun_shield,</text:p>
          </table:table-cell>
          <table:table-cell table:style-name="ce11" office:value-type="string" calcext:value-type="string">
            <text:p>itm_rhun_horse_d,itm_rhun_horse_b,</text:p>
          </table:table-cell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B52]&lt;&gt;&quot;&quot;;[.C52]&lt;&gt;&quot;&quot;);CONCATENATE([Variables.$I$1];[Variables.$I$7];[.B52];[Variables.$I$7];[Variables.$I$6];[Variables.$I$7];[.C52];[Variables.$I$7];[Variables.$I$6];[Variables.$I$7];[.D52];[Variables.$I$7];[Variables.$I$6];[.E52];[Variables.$I$6];[.F52];[Variables.$I$6];[.G52];[Variables.$I$6];[.H52];[Variables.$I$6];[Variables.$I$1];[.I52];[.J52];[.K52];[.L52];[.M52];[.N52];[.O52];[Variables.$I$2];[Variables.$I$6];[.P52];[Variables.$I$6];[.Q52];[Variables.$I$6];[.R52];[Variables.$I$6];[.S52];[Variables.$I$6];[.T52];IF([.U52]&lt;&gt;&quot;&quot;;CONCATENATE([Variables.$I$6];[.U52]);&quot;&quot;);[Variables.$I$2];[Variables.$I$6]);IF([.B52]&lt;&gt;&quot;&quot;;CONCATENATE(&quot;#&quot;;[.B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itm_rhun_horse_d,itm_rhun_horse_b,],attr_evil_tier_4,wp_tier_4,knows_common|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itm_rhun_horse_d,itm_rhun_horse_b,],attr_evil_tier_4,wp_tier_4,knows_common|knows_riding_6|knows_power_strike_2|knows_power_draw_2|knows_power_throw_2|knows_ironflesh_2|knows_horse_archery_1,rhun_man1,rhun_man2],</text:p>
          </table:table-cell>
          <table:table-cell table:number-columns-repeated="16362"/>
        </table:table-row>
        <table:table-row table:style-name="ro1">
          <table:table-cell table:style-name="ce6" table:formula="of:=IF(AND([.B53]&lt;&gt;&quot;&quot;;[.C53]&lt;&gt;&quot;&quot;);CONCATENATE([Variables.$I$1];[Variables.$I$7];[.B53];[Variables.$I$7];[Variables.$I$6];[Variables.$I$7];[.C53];[Variables.$I$7];[Variables.$I$6];[Variables.$I$7];[.D53];[Variables.$I$7];[Variables.$I$6];[.E53];[Variables.$I$6];[.F53];[Variables.$I$6];[.G53];[Variables.$I$6];[.H53];[Variables.$I$6];[Variables.$I$1];[.I53];[.J53];[.K53];[.L53];[.M53];[.N53];[.O53];[Variables.$I$2];[Variables.$I$6];[.P53];[Variables.$I$6];[.Q53];[Variables.$I$6];[.R53];[Variables.$I$6];[.S53];[Variables.$I$6];[.T53];IF([.U53]&lt;&gt;&quot;&quot;;CONCATENATE([Variables.$I$6];[.U53]);&quot;&quot;);[Variables.$I$2];[Variables.$I$6]);IF([.B53]&lt;&gt;&quot;&quot;;CONCATENATE(&quot;#&quot;;[.B53]);&quot;&quot;))" office:value-type="string" office:string-value="[&quot;c5_rhun_falcon_horseman&quot;,&quot;Falcon_Horseman&quot;,&quot;Falcon_Horsemen&quot;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" calcext:value-type="string">
            <text:p>["c5_rhun_falcon_horseman","Falcon_Horseman","Falcon_Horsemen"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</text:p>
          </table:table-cell>
          <table:table-cell table:style-name="ce7" office:value-type="string" calcext:value-type="string">
            <text:p>c5_rhun_falcon_horseman</text:p>
          </table:table-cell>
          <table:table-cell table:style-name="ce7" office:value-type="string" calcext:value-type="string">
            <text:p>Falcon_Horseman</text:p>
          </table:table-cell>
          <table:table-cell table:style-name="ce7" office:value-type="string" calcext:value-type="string">
            <text:p>Falcon_Horsemen</text:p>
          </table:table-cell>
          <table:table-cell table:style-name="ce8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hun</text:p>
          </table:table-cell>
          <table:table-cell table:style-name="ce11" office:value-type="string" calcext:value-type="string">
            <text:p>itm_rhun_helm_pot_good,itm_rhun_helm_horde_good,itm_rhun_helm_round_good,</text:p>
          </table:table-cell>
          <table:table-cell table:style-name="ce11" office:value-type="string" calcext:value-type="string">
            <text:p>itm_rhun_armor_g,itm_rhun_armor_h,</text:p>
          </table:table-cell>
          <table:table-cell table:style-name="ce11" office:value-type="string" calcext:value-type="string">
            <text:p>itm_evil_gauntlets_a_good,</text:p>
          </table:table-cell>
          <table:table-cell table:style-name="ce11" office:value-type="string" calcext:value-type="string">
            <text:p>itm_leather_boots_dark,</text:p>
          </table:table-cell>
          <table:table-cell table:style-name="ce11" office:value-type="string" calcext:value-type="string">
            <text:p>itm_rhun_sword,itm_light_lance,</text:p>
          </table:table-cell>
          <table:table-cell table:style-name="ce11" office:value-type="string" calcext:value-type="string">
            <text:p>itm_rhun_shield,</text:p>
          </table:table-cell>
          <table:table-cell table:style-name="ce11" office:value-type="string" calcext:value-type="string">
            <text:p>itm_rhun_horse_e,itm_rhun_horse_f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riding_6|knows_power_strike_3|knows_power_draw_2|knows_power_throw_2|knows_ironflesh_2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B53]&lt;&gt;&quot;&quot;;[.C53]&lt;&gt;&quot;&quot;);CONCATENATE([Variables.$I$1];[Variables.$I$7];[.B53];[Variables.$I$7];[Variables.$I$6];[Variables.$I$7];[.C53];[Variables.$I$7];[Variables.$I$6];[Variables.$I$7];[.D53];[Variables.$I$7];[Variables.$I$6];[.E53];[Variables.$I$6];[.F53];[Variables.$I$6];[.G53];[Variables.$I$6];[.H53];[Variables.$I$6];[Variables.$I$1];[.I53];[.J53];[.K53];[.L53];[.M53];[.N53];[.O53];[Variables.$I$2];[Variables.$I$6];[.P53];[Variables.$I$6];[.Q53];[Variables.$I$6];[.R53];[Variables.$I$6];[.S53];[Variables.$I$6];[.T53];IF([.U53]&lt;&gt;&quot;&quot;;CONCATENATE([Variables.$I$6];[.U53]);&quot;&quot;);[Variables.$I$2];[Variables.$I$6]);IF([.B53]&lt;&gt;&quot;&quot;;CONCATENATE(&quot;#&quot;;[.B53]);&quot;&quot;))" office:value-type="string" office:string-value="[&quot;c5_rhun_falcon_horseman&quot;,&quot;Falcon_Horseman&quot;,&quot;Falcon_Horsemen&quot;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" calcext:value-type="string">
            <text:p>["c5_rhun_falcon_horseman","Falcon_Horseman","Falcon_Horsemen"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</text:p>
          </table:table-cell>
          <table:table-cell table:number-columns-repeated="16362"/>
        </table:table-row>
        <table:table-row table:style-name="ro1">
          <table:table-cell table:style-name="ce6" table:formula="of:=IF(AND([.B54]&lt;&gt;&quot;&quot;;[.C54]&lt;&gt;&quot;&quot;);CONCATENATE([Variables.$I$1];[Variables.$I$7];[.B54];[Variables.$I$7];[Variables.$I$6];[Variables.$I$7];[.C54];[Variables.$I$7];[Variables.$I$6];[Variables.$I$7];[.D54];[Variables.$I$7];[Variables.$I$6];[.E54];[Variables.$I$6];[.F54];[Variables.$I$6];[.G54];[Variables.$I$6];[.H54];[Variables.$I$6];[Variables.$I$1];[.I54];[.J54];[.K54];[.L54];[.M54];[.N54];[.O54];[Variables.$I$2];[Variables.$I$6];[.P54];[Variables.$I$6];[.Q54];[Variables.$I$6];[.R54];[Variables.$I$6];[.S54];[Variables.$I$6];[.T54];IF([.U54]&lt;&gt;&quot;&quot;;CONCATENATE([Variables.$I$6];[.U54]);&quot;&quot;);[Variables.$I$2];[Variables.$I$6]);IF([.B54]&lt;&gt;&quot;&quot;;CONCATENATE(&quot;#&quot;;[.B54]);&quot;&quot;))" office:value-type="string" office:string-value="[&quot;i2_rhun_tribal_warrior&quot;,&quot;Rhun_Tribal_Footman&quot;,&quot;Rhun_Tribal_Footmen&quot;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" calcext:value-type="string">
            <text:p>["i2_rhun_tribal_warrior","Rhun_Tribal_Footman","Rhun_Tribal_Footmen"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</text:p>
          </table:table-cell>
          <table:table-cell table:style-name="ce7" office:value-type="string" calcext:value-type="string">
            <text:p>i2_rhun_tribal_warrior</text:p>
          </table:table-cell>
          <table:table-cell table:style-name="ce7" office:value-type="string" calcext:value-type="string">
            <text:p>Rhun_Tribal_Footman</text:p>
          </table:table-cell>
          <table:table-cell table:style-name="ce7" office:value-type="string" calcext:value-type="string">
            <text:p>Rhun_Tribal_Footmen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hun</text:p>
          </table:table-cell>
          <table:table-cell table:style-name="ce11"/>
          <table:table-cell table:style-name="ce11" office:value-type="string" calcext:value-type="string">
            <text:p>itm_rhun_armor_a,itm_rhun_armor_b,</text:p>
          </table:table-cell>
          <table:table-cell table:style-name="ce11"/>
          <table:table-cell table:style-name="ce11" office:value-type="string" calcext:value-type="string">
            <text:p>itm_furry_boots,</text:p>
          </table:table-cell>
          <table:table-cell table:style-name="ce11" office:value-type="string" calcext:value-type="string">
            <text:p>itm_rhun_falchion,itm_rhun_shortsword,</text:p>
          </table:table-cell>
          <table:table-cell table:style-name="ce11" office:value-type="string" calcext:value-type="string">
            <text:p>itm_rhun_bull1_shield,</text:p>
          </table:table-cell>
          <table:table-cell table:style-name="ce11"/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1|knows_power_strike_1|knows_power_draw_1|knows_athletics_2|knows_riding_2|knows_horse_archery_1|knows_looting_1|knows_tracking_1|knows_pathfinding_1|knows_spotting_1|knows_surgery_1|knows_prisoner_management_2|knows_trade_1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B54]&lt;&gt;&quot;&quot;;[.C54]&lt;&gt;&quot;&quot;);CONCATENATE([Variables.$I$1];[Variables.$I$7];[.B54];[Variables.$I$7];[Variables.$I$6];[Variables.$I$7];[.C54];[Variables.$I$7];[Variables.$I$6];[Variables.$I$7];[.D54];[Variables.$I$7];[Variables.$I$6];[.E54];[Variables.$I$6];[.F54];[Variables.$I$6];[.G54];[Variables.$I$6];[.H54];[Variables.$I$6];[Variables.$I$1];[.I54];[.J54];[.K54];[.L54];[.M54];[.N54];[.O54];[Variables.$I$2];[Variables.$I$6];[.P54];[Variables.$I$6];[.Q54];[Variables.$I$6];[.R54];[Variables.$I$6];[.S54];[Variables.$I$6];[.T54];IF([.U54]&lt;&gt;&quot;&quot;;CONCATENATE([Variables.$I$6];[.U54]);&quot;&quot;);[Variables.$I$2];[Variables.$I$6]);IF([.B54]&lt;&gt;&quot;&quot;;CONCATENATE(&quot;#&quot;;[.B54]);&quot;&quot;))" office:value-type="string" office:string-value="[&quot;i2_rhun_tribal_warrior&quot;,&quot;Rhun_Tribal_Footman&quot;,&quot;Rhun_Tribal_Footmen&quot;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" calcext:value-type="string">
            <text:p>["i2_rhun_tribal_warrior","Rhun_Tribal_Footman","Rhun_Tribal_Footmen"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16362"/>
        </table:table-row>
        <table:table-row table:style-name="ro1">
          <table:table-cell table:style-name="ce6" table:formula="of:=IF(AND([.B55]&lt;&gt;&quot;&quot;;[.C55]&lt;&gt;&quot;&quot;);CONCATENATE([Variables.$I$1];[Variables.$I$7];[.B55];[Variables.$I$7];[Variables.$I$6];[Variables.$I$7];[.C55];[Variables.$I$7];[Variables.$I$6];[Variables.$I$7];[.D55];[Variables.$I$7];[Variables.$I$6];[.E55];[Variables.$I$6];[.F55];[Variables.$I$6];[.G55];[Variables.$I$6];[.H55];[Variables.$I$6];[Variables.$I$1];[.I55];[.J55];[.K55];[.L55];[.M55];[.N55];[.O55];[Variables.$I$2];[Variables.$I$6];[.P55];[Variables.$I$6];[.Q55];[Variables.$I$6];[.R55];[Variables.$I$6];[.S55];[Variables.$I$6];[.T55];IF([.U55]&lt;&gt;&quot;&quot;;CONCATENATE([Variables.$I$6];[.U55]);&quot;&quot;);[Variables.$I$2];[Variables.$I$6]);IF([.B55]&lt;&gt;&quot;&quot;;CONCATENATE(&quot;#&quot;;[.B55]);&quot;&quot;))" office:value-type="string" office:string-value="[&quot;i3_rhun_tribal_infantry&quot;,&quot;Rhun_Tribal_Warrior&quot;,&quot;Rhun_Tribal_Warriors&quot;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" calcext:value-type="string">
            <text:p>["i3_rhun_tribal_infantry","Rhun_Tribal_Warrior","Rhun_Tribal_Warriors"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</text:p>
          </table:table-cell>
          <table:table-cell table:style-name="ce7" office:value-type="string" calcext:value-type="string">
            <text:p>i3_rhun_tribal_infantry</text:p>
          </table:table-cell>
          <table:table-cell table:style-name="ce7" office:value-type="string" calcext:value-type="string">
            <text:p>Rhun_Tribal_Warrior</text:p>
          </table:table-cell>
          <table:table-cell table:style-name="ce7" office:value-type="string" calcext:value-type="string">
            <text:p>Rhun_Tribal_Warriors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hun</text:p>
          </table:table-cell>
          <table:table-cell table:style-name="ce11" office:value-type="string" calcext:value-type="string">
            <text:p>itm_rhun_helm_leather_bad,itm_rhun_helm_horde_bad,</text:p>
          </table:table-cell>
          <table:table-cell table:style-name="ce11" office:value-type="string" calcext:value-type="string">
            <text:p>itm_rhun_armor_a,itm_rhun_armor_b,itm_rhun_armor_d,</text:p>
          </table:table-cell>
          <table:table-cell table:style-name="ce11"/>
          <table:table-cell table:style-name="ce11" office:value-type="string" calcext:value-type="string">
            <text:p>itm_furry_boots,itm_leather_boots_dark_bad,</text:p>
          </table:table-cell>
          <table:table-cell table:style-name="ce11" office:value-type="string" calcext:value-type="string">
            <text:p>itm_rhun_glaive,itm_rhun_greatfalchion,</text:p>
          </table:table-cell>
          <table:table-cell table:style-name="ce11" office:value-type="string" calcext:value-type="string">
            <text:p>itm_rhun_bull1_shield,</text:p>
          </table:table-cell>
          <table:table-cell table:style-name="ce11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3|knows_ironflesh_1|knows_power_strike_1|knows_shield_2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B55]&lt;&gt;&quot;&quot;;[.C55]&lt;&gt;&quot;&quot;);CONCATENATE([Variables.$I$1];[Variables.$I$7];[.B55];[Variables.$I$7];[Variables.$I$6];[Variables.$I$7];[.C55];[Variables.$I$7];[Variables.$I$6];[Variables.$I$7];[.D55];[Variables.$I$7];[Variables.$I$6];[.E55];[Variables.$I$6];[.F55];[Variables.$I$6];[.G55];[Variables.$I$6];[.H55];[Variables.$I$6];[Variables.$I$1];[.I55];[.J55];[.K55];[.L55];[.M55];[.N55];[.O55];[Variables.$I$2];[Variables.$I$6];[.P55];[Variables.$I$6];[.Q55];[Variables.$I$6];[.R55];[Variables.$I$6];[.S55];[Variables.$I$6];[.T55];IF([.U55]&lt;&gt;&quot;&quot;;CONCATENATE([Variables.$I$6];[.U55]);&quot;&quot;);[Variables.$I$2];[Variables.$I$6]);IF([.B55]&lt;&gt;&quot;&quot;;CONCATENATE(&quot;#&quot;;[.B55]);&quot;&quot;))" office:value-type="string" office:string-value="[&quot;i3_rhun_tribal_infantry&quot;,&quot;Rhun_Tribal_Warrior&quot;,&quot;Rhun_Tribal_Warriors&quot;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" calcext:value-type="string">
            <text:p>["i3_rhun_tribal_infantry","Rhun_Tribal_Warrior","Rhun_Tribal_Warriors"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</text:p>
          </table:table-cell>
          <table:table-cell table:number-columns-repeated="16362"/>
        </table:table-row>
        <table:table-row table:style-name="ro1">
          <table:table-cell table:style-name="ce6" table:formula="of:=IF(AND([.B56]&lt;&gt;&quot;&quot;;[.C56]&lt;&gt;&quot;&quot;);CONCATENATE([Variables.$I$1];[Variables.$I$7];[.B56];[Variables.$I$7];[Variables.$I$6];[Variables.$I$7];[.C56];[Variables.$I$7];[Variables.$I$6];[Variables.$I$7];[.D56];[Variables.$I$7];[Variables.$I$6];[.E56];[Variables.$I$6];[.F56];[Variables.$I$6];[.G56];[Variables.$I$6];[.H56];[Variables.$I$6];[Variables.$I$1];[.I56];[.J56];[.K56];[.L56];[.M56];[.N56];[.O56];[Variables.$I$2];[Variables.$I$6];[.P56];[Variables.$I$6];[.Q56];[Variables.$I$6];[.R56];[Variables.$I$6];[.S56];[Variables.$I$6];[.T56];IF([.U56]&lt;&gt;&quot;&quot;;CONCATENATE([Variables.$I$6];[.U56]);&quot;&quot;);[Variables.$I$2];[Variables.$I$6]);IF([.B56]&lt;&gt;&quot;&quot;;CONCATENATE(&quot;#&quot;;[.B56]);&quot;&quot;))" office:value-type="string" office:string-value="[&quot;i4_rhun_vet_infantry&quot;,&quot;Rhun_Veteran_Warrior&quot;,&quot;Rhun_Veteran_Warriors&quot;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" calcext:value-type="string">
            <text:p>["i4_rhun_vet_infantry","Rhun_Veteran_Warrior","Rhun_Veteran_Warriors"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</text:p>
          </table:table-cell>
          <table:table-cell table:style-name="ce7" office:value-type="string" calcext:value-type="string">
            <text:p>i4_rhun_vet_infantry</text:p>
          </table:table-cell>
          <table:table-cell table:style-name="ce7" office:value-type="string" calcext:value-type="string">
            <text:p>Rhun_Veteran_Warrior</text:p>
          </table:table-cell>
          <table:table-cell table:style-name="ce7" office:value-type="string" calcext:value-type="string">
            <text:p>Rhun_Veteran_Warriors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hun</text:p>
          </table:table-cell>
          <table:table-cell table:style-name="ce11" office:value-type="string" calcext:value-type="string">
            <text:p>itm_rhun_helm_barbed, itm_rhun_helm_horde, itm_rhun_helm_round_good,</text:p>
          </table:table-cell>
          <table:table-cell table:style-name="ce11" office:value-type="string" calcext:value-type="string">
            <text:p>itm_rhun_armor_g,itm_rhun_armor_h,</text:p>
          </table:table-cell>
          <table:table-cell table:style-name="ce11" office:value-type="string" calcext:value-type="string">
            <text:p>itm_evil_gauntlets_a_good,</text:p>
          </table:table-cell>
          <table:table-cell table:style-name="ce11" office:value-type="string" calcext:value-type="string">
            <text:p>itm_furry_boots,itm_leather_boots_dark_bad,</text:p>
          </table:table-cell>
          <table:table-cell table:style-name="ce11" office:value-type="string" calcext:value-type="string">
            <text:p>itm_rhun_falchion,itm_rhun_glaive,itm_rhun_greatfalchion,itm_rhun_battleaxe,</text:p>
          </table:table-cell>
          <table:table-cell table:style-name="ce11" office:value-type="string" calcext:value-type="string">
            <text:p>itm_rhun_bull1_shield,</text:p>
          </table:table-cell>
          <table:table-cell table:style-name="ce11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4|knows_ironflesh_2|knows_power_strike_2|knows_shield_2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B56]&lt;&gt;&quot;&quot;;[.C56]&lt;&gt;&quot;&quot;);CONCATENATE([Variables.$I$1];[Variables.$I$7];[.B56];[Variables.$I$7];[Variables.$I$6];[Variables.$I$7];[.C56];[Variables.$I$7];[Variables.$I$6];[Variables.$I$7];[.D56];[Variables.$I$7];[Variables.$I$6];[.E56];[Variables.$I$6];[.F56];[Variables.$I$6];[.G56];[Variables.$I$6];[.H56];[Variables.$I$6];[Variables.$I$1];[.I56];[.J56];[.K56];[.L56];[.M56];[.N56];[.O56];[Variables.$I$2];[Variables.$I$6];[.P56];[Variables.$I$6];[.Q56];[Variables.$I$6];[.R56];[Variables.$I$6];[.S56];[Variables.$I$6];[.T56];IF([.U56]&lt;&gt;&quot;&quot;;CONCATENATE([Variables.$I$6];[.U56]);&quot;&quot;);[Variables.$I$2];[Variables.$I$6]);IF([.B56]&lt;&gt;&quot;&quot;;CONCATENATE(&quot;#&quot;;[.B56]);&quot;&quot;))" office:value-type="string" office:string-value="[&quot;i4_rhun_vet_infantry&quot;,&quot;Rhun_Veteran_Warrior&quot;,&quot;Rhun_Veteran_Warriors&quot;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" calcext:value-type="string">
            <text:p>["i4_rhun_vet_infantry","Rhun_Veteran_Warrior","Rhun_Veteran_Warriors"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</text:p>
          </table:table-cell>
          <table:table-cell table:number-columns-repeated="16362"/>
        </table:table-row>
        <table:table-row table:style-name="ro1">
          <table:table-cell table:style-name="ce6" table:formula="of:=IF(AND([.B57]&lt;&gt;&quot;&quot;;[.C57]&lt;&gt;&quot;&quot;);CONCATENATE([Variables.$I$1];[Variables.$I$7];[.B57];[Variables.$I$7];[Variables.$I$6];[Variables.$I$7];[.C57];[Variables.$I$7];[Variables.$I$6];[Variables.$I$7];[.D57];[Variables.$I$7];[Variables.$I$6];[.E57];[Variables.$I$6];[.F57];[Variables.$I$6];[.G57];[Variables.$I$6];[.H57];[Variables.$I$6];[Variables.$I$1];[.I57];[.J57];[.K57];[.L57];[.M57];[.N57];[.O57];[Variables.$I$2];[Variables.$I$6];[.P57];[Variables.$I$6];[.Q57];[Variables.$I$6];[.R57];[Variables.$I$6];[.S57];[Variables.$I$6];[.T57];IF([.U57]&lt;&gt;&quot;&quot;;CONCATENATE([Variables.$I$6];[.U57]);&quot;&quot;);[Variables.$I$2];[Variables.$I$6]);IF([.B57]&lt;&gt;&quot;&quot;;CONCATENATE(&quot;#&quot;;[.B57]);&quot;&quot;))" office:value-type="string" office:string-value="[&quot;i5_rhun_ox_warrior&quot;,&quot;Warrior_of_the_Ox&quot;,&quot;Warriors_of_the_Ox&quot;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itm_marker_hp_shield,],attr_evil_tier_5,wp_tier_5,knows_common|knows_athletics_5|knows_shield_2|knows_ironflesh_3|knows_power_strike_3,rhun_man1,rhun_man2]," calcext:value-type="string">
            <text:p>["i5_rhun_ox_warrior","Warrior_of_the_Ox","Warriors_of_the_Ox"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itm_marker_hp_shield,],attr_evil_tier_5,wp_tier_5,knows_common|knows_athletics_5|knows_shield_2|knows_ironflesh_3|knows_power_strike_3,rhun_man1,rhun_man2],</text:p>
          </table:table-cell>
          <table:table-cell table:style-name="ce7" office:value-type="string" calcext:value-type="string">
            <text:p>i5_rhun_ox_warrior</text:p>
          </table:table-cell>
          <table:table-cell table:style-name="ce7" office:value-type="string" calcext:value-type="string">
            <text:p>Warrior_of_the_Ox</text:p>
          </table:table-cell>
          <table:table-cell table:style-name="ce7" office:value-type="string" calcext:value-type="string">
            <text:p>Warriors_of_the_Ox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hun</text:p>
          </table:table-cell>
          <table:table-cell table:style-name="ce11" office:value-type="string" calcext:value-type="string">
            <text:p>itm_rhun_helm_barbed_good, itm_rhun_helm_pot_good, itm_rhun_helm_horde_good,</text:p>
          </table:table-cell>
          <table:table-cell table:style-name="ce11" office:value-type="string" calcext:value-type="string">
            <text:p>itm_rhun_armor_g_good,itm_rhun_armor_h_good,itm_rhun_armor_p_bad,itm_rhun_armor_k_bad,</text:p>
          </table:table-cell>
          <table:table-cell table:style-name="ce11" office:value-type="string" calcext:value-type="string">
            <text:p>itm_evil_gauntlets_b_good,</text:p>
          </table:table-cell>
          <table:table-cell table:style-name="ce11" office:value-type="string" calcext:value-type="string">
            <text:p>itm_leather_boots_dark_bad, itm_splinted_greaves,</text:p>
          </table:table-cell>
          <table:table-cell table:style-name="ce11" office:value-type="string" calcext:value-type="string">
            <text:p>itm_rhun_warpick, itm_rhun_mangler, itm_rhun_glaive, itm_rhun_battleaxe,</text:p>
          </table:table-cell>
          <table:table-cell table:style-name="ce11" office:value-type="string" calcext:value-type="string">
            <text:p>itm_rhun_bull2_shield,</text:p>
          </table:table-cell>
          <table:table-cell table:style-name="ce11" office:value-type="string" calcext:value-type="string">
            <text:p>itm_marker_hp_shield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5|knows_shield_2|knows_ironflesh_3|knows_power_strike_3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B57]&lt;&gt;&quot;&quot;;[.C57]&lt;&gt;&quot;&quot;);CONCATENATE([Variables.$I$1];[Variables.$I$7];[.B57];[Variables.$I$7];[Variables.$I$6];[Variables.$I$7];[.C57];[Variables.$I$7];[Variables.$I$6];[Variables.$I$7];[.D57];[Variables.$I$7];[Variables.$I$6];[.E57];[Variables.$I$6];[.F57];[Variables.$I$6];[.G57];[Variables.$I$6];[.H57];[Variables.$I$6];[Variables.$I$1];[.I57];[.J57];[.K57];[.L57];[.M57];[.N57];[.O57];[Variables.$I$2];[Variables.$I$6];[.P57];[Variables.$I$6];[.Q57];[Variables.$I$6];[.R57];[Variables.$I$6];[.S57];[Variables.$I$6];[.T57];IF([.U57]&lt;&gt;&quot;&quot;;CONCATENATE([Variables.$I$6];[.U57]);&quot;&quot;);[Variables.$I$2];[Variables.$I$6]);IF([.B57]&lt;&gt;&quot;&quot;;CONCATENATE(&quot;#&quot;;[.B57]);&quot;&quot;))" office:value-type="string" office:string-value="[&quot;i5_rhun_ox_warrior&quot;,&quot;Warrior_of_the_Ox&quot;,&quot;Warriors_of_the_Ox&quot;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itm_marker_hp_shield,],attr_evil_tier_5,wp_tier_5,knows_common|knows_athletics_5|knows_shield_2|knows_ironflesh_3|knows_power_strike_3,rhun_man1,rhun_man2]," calcext:value-type="string">
            <text:p>["i5_rhun_ox_warrior","Warrior_of_the_Ox","Warriors_of_the_Ox"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itm_marker_hp_shield,],attr_evil_tier_5,wp_tier_5,knows_common|knows_athletics_5|knows_shield_2|knows_ironflesh_3|knows_power_strike_3,rhun_man1,rhun_man2],</text:p>
          </table:table-cell>
          <table:table-cell table:number-columns-repeated="16362"/>
        </table:table-row>
        <table:table-row table:style-name="ro1">
          <table:table-cell table:style-name="ce6" table:formula="of:=IF(AND([.B58]&lt;&gt;&quot;&quot;;[.C58]&lt;&gt;&quot;&quot;);CONCATENATE([Variables.$I$1];[Variables.$I$7];[.B58];[Variables.$I$7];[Variables.$I$6];[Variables.$I$7];[.C58];[Variables.$I$7];[Variables.$I$6];[Variables.$I$7];[.D58];[Variables.$I$7];[Variables.$I$6];[.E58];[Variables.$I$6];[.F58];[Variables.$I$6];[.G58];[Variables.$I$6];[.H58];[Variables.$I$6];[Variables.$I$1];[.I58];[.J58];[.K58];[.L58];[.M58];[.N58];[.O58];[Variables.$I$2];[Variables.$I$6];[.P58];[Variables.$I$6];[.Q58];[Variables.$I$6];[.R58];[Variables.$I$6];[.S58];[Variables.$I$6];[.T58];IF([.U58]&lt;&gt;&quot;&quot;;CONCATENATE([Variables.$I$6];[.U58]);&quot;&quot;);[Variables.$I$2];[Variables.$I$6]);IF([.B58]&lt;&gt;&quot;&quot;;CONCATENATE(&quot;#&quot;;[.B58]);&quot;&quot;))" office:value-type="string" office:string-value="[&quot;c2_rhun_horseman&quot;,&quot;Horseman_of_Rhun&quot;,&quot;Horsemen_of_Rhun&quot;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" calcext:value-type="string">
            <text:p>["c2_rhun_horseman","Horseman_of_Rhun","Horsemen_of_Rhun"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</text:p>
          </table:table-cell>
          <table:table-cell table:style-name="ce7" office:value-type="string" calcext:value-type="string">
            <text:p>c2_rhun_horseman</text:p>
          </table:table-cell>
          <table:table-cell table:style-name="ce7" office:value-type="string" calcext:value-type="string">
            <text:p>Horseman_of_Rhun</text:p>
          </table:table-cell>
          <table:table-cell table:style-name="ce7" office:value-type="string" calcext:value-type="string">
            <text:p>Horsemen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hun</text:p>
          </table:table-cell>
          <table:table-cell table:style-name="ce11"/>
          <table:table-cell table:style-name="ce11" office:value-type="string" calcext:value-type="string">
            <text:p>itm_rhun_armor_a,itm_rhun_armor_b,itm_rhun_armor_d,</text:p>
          </table:table-cell>
          <table:table-cell table:style-name="ce11"/>
          <table:table-cell table:style-name="ce11" office:value-type="string" calcext:value-type="string">
            <text:p>itm_furry_boots,itm_leather_boots_dark_bad,</text:p>
          </table:table-cell>
          <table:table-cell table:style-name="ce11" office:value-type="string" calcext:value-type="string">
            <text:p>itm_rhun_sword,</text:p>
          </table:table-cell>
          <table:table-cell table:style-name="ce11" office:value-type="string" calcext:value-type="string">
            <text:p>itm_rhun_bull1_shield,</text:p>
          </table:table-cell>
          <table:table-cell table:style-name="ce11" office:value-type="string" calcext:value-type="string">
            <text:p>itm_rhun_horse_a,itm_rhun_horse_b,</text:p>
          </table:table-cell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2" office:value-type="string" calcext:value-type="string">
            <text:p>knows_common|knows_riding_4|knows_power_draw_3|knows_power_throw_1|knows_horse_archery_3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B58]&lt;&gt;&quot;&quot;;[.C58]&lt;&gt;&quot;&quot;);CONCATENATE([Variables.$I$1];[Variables.$I$7];[.B58];[Variables.$I$7];[Variables.$I$6];[Variables.$I$7];[.C58];[Variables.$I$7];[Variables.$I$6];[Variables.$I$7];[.D58];[Variables.$I$7];[Variables.$I$6];[.E58];[Variables.$I$6];[.F58];[Variables.$I$6];[.G58];[Variables.$I$6];[.H58];[Variables.$I$6];[Variables.$I$1];[.I58];[.J58];[.K58];[.L58];[.M58];[.N58];[.O58];[Variables.$I$2];[Variables.$I$6];[.P58];[Variables.$I$6];[.Q58];[Variables.$I$6];[.R58];[Variables.$I$6];[.S58];[Variables.$I$6];[.T58];IF([.U58]&lt;&gt;&quot;&quot;;CONCATENATE([Variables.$I$6];[.U58]);&quot;&quot;);[Variables.$I$2];[Variables.$I$6]);IF([.B58]&lt;&gt;&quot;&quot;;CONCATENATE(&quot;#&quot;;[.B58]);&quot;&quot;))" office:value-type="string" office:string-value="[&quot;c2_rhun_horseman&quot;,&quot;Horseman_of_Rhun&quot;,&quot;Horsemen_of_Rhun&quot;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" calcext:value-type="string">
            <text:p>["c2_rhun_horseman","Horseman_of_Rhun","Horsemen_of_Rhun"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</text:p>
          </table:table-cell>
          <table:table-cell table:number-columns-repeated="16362"/>
        </table:table-row>
        <table:table-row table:style-name="ro1">
          <table:table-cell table:style-name="ce6" table:formula="of:=IF(AND([.B59]&lt;&gt;&quot;&quot;;[.C59]&lt;&gt;&quot;&quot;);CONCATENATE([Variables.$I$1];[Variables.$I$7];[.B59];[Variables.$I$7];[Variables.$I$6];[Variables.$I$7];[.C59];[Variables.$I$7];[Variables.$I$6];[Variables.$I$7];[.D59];[Variables.$I$7];[Variables.$I$6];[.E59];[Variables.$I$6];[.F59];[Variables.$I$6];[.G59];[Variables.$I$6];[.H59];[Variables.$I$6];[Variables.$I$1];[.I59];[.J59];[.K59];[.L59];[.M59];[.N59];[.O59];[Variables.$I$2];[Variables.$I$6];[.P59];[Variables.$I$6];[.Q59];[Variables.$I$6];[.R59];[Variables.$I$6];[.S59];[Variables.$I$6];[.T59];IF([.U59]&lt;&gt;&quot;&quot;;CONCATENATE([Variables.$I$6];[.U59]);&quot;&quot;);[Variables.$I$2];[Variables.$I$6]);IF([.B59]&lt;&gt;&quot;&quot;;CONCATENATE(&quot;#&quot;;[.B59]);&quot;&quot;))" office:value-type="string" office:string-value="[&quot;c3_rhun_outrider&quot;,&quot;Outrider_of_Rhun&quot;,&quot;Outriders_of_Rhun&quot;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itm_rhun_horse_b,itm_rhun_horse_d,],attr_evil_tier_3,wp_tier_3,knows_common|knows_riding_5|knows_power_draw_4|knows_power_strike_1|knows_ironflesh_1|knows_power_throw_1,rhun_man1,rhun_man2]," calcext:value-type="string">
            <text:p>["c3_rhun_outrider","Outrider_of_Rhun","Outriders_of_Rhun"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itm_rhun_horse_b,itm_rhun_horse_d,],attr_evil_tier_3,wp_tier_3,knows_common|knows_riding_5|knows_power_draw_4|knows_power_strike_1|knows_ironflesh_1|knows_power_throw_1,rhun_man1,rhun_man2],</text:p>
          </table:table-cell>
          <table:table-cell table:style-name="ce7" office:value-type="string" calcext:value-type="string">
            <text:p>c3_rhun_outrider</text:p>
          </table:table-cell>
          <table:table-cell table:style-name="ce7" office:value-type="string" calcext:value-type="string">
            <text:p>Outrider_of_Rhun</text:p>
          </table:table-cell>
          <table:table-cell table:style-name="ce7" office:value-type="string" calcext:value-type="string">
            <text:p>Outriders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hun</text:p>
          </table:table-cell>
          <table:table-cell table:style-name="ce11" office:value-type="string" calcext:value-type="string">
            <text:p>itm_rhun_helm_horde,itm_rhun_helm_round,itm_rhun_helm_pot_bad,</text:p>
          </table:table-cell>
          <table:table-cell table:style-name="ce11" office:value-type="string" calcext:value-type="string">
            <text:p>itm_rhun_armor_j,itm_rhun_armor_n,itm_rhun_armor_m,</text:p>
          </table:table-cell>
          <table:table-cell table:style-name="ce11"/>
          <table:table-cell table:style-name="ce11" office:value-type="string" calcext:value-type="string">
            <text:p>itm_furry_boots,itm_leather_boots_dark_bad,</text:p>
          </table:table-cell>
          <table:table-cell table:style-name="ce11" office:value-type="string" calcext:value-type="string">
            <text:p>itm_rhun_sword,</text:p>
          </table:table-cell>
          <table:table-cell table:style-name="ce11" office:value-type="string" calcext:value-type="string">
            <text:p>itm_rhun_bull1_shield,itm_rhun_bull2_shield,</text:p>
          </table:table-cell>
          <table:table-cell table:style-name="ce11" office:value-type="string" calcext:value-type="string">
            <text:p>itm_rhun_horse_b,itm_rhun_horse_d,</text:p>
          </table:table-cell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riding_5|knows_power_draw_4|knows_power_strike_1|knows_ironflesh_1|knows_power_throw_1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B59]&lt;&gt;&quot;&quot;;[.C59]&lt;&gt;&quot;&quot;);CONCATENATE([Variables.$I$1];[Variables.$I$7];[.B59];[Variables.$I$7];[Variables.$I$6];[Variables.$I$7];[.C59];[Variables.$I$7];[Variables.$I$6];[Variables.$I$7];[.D59];[Variables.$I$7];[Variables.$I$6];[.E59];[Variables.$I$6];[.F59];[Variables.$I$6];[.G59];[Variables.$I$6];[.H59];[Variables.$I$6];[Variables.$I$1];[.I59];[.J59];[.K59];[.L59];[.M59];[.N59];[.O59];[Variables.$I$2];[Variables.$I$6];[.P59];[Variables.$I$6];[.Q59];[Variables.$I$6];[.R59];[Variables.$I$6];[.S59];[Variables.$I$6];[.T59];IF([.U59]&lt;&gt;&quot;&quot;;CONCATENATE([Variables.$I$6];[.U59]);&quot;&quot;);[Variables.$I$2];[Variables.$I$6]);IF([.B59]&lt;&gt;&quot;&quot;;CONCATENATE(&quot;#&quot;;[.B59]);&quot;&quot;))" office:value-type="string" office:string-value="[&quot;c3_rhun_outrider&quot;,&quot;Outrider_of_Rhun&quot;,&quot;Outriders_of_Rhun&quot;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itm_rhun_horse_b,itm_rhun_horse_d,],attr_evil_tier_3,wp_tier_3,knows_common|knows_riding_5|knows_power_draw_4|knows_power_strike_1|knows_ironflesh_1|knows_power_throw_1,rhun_man1,rhun_man2]," calcext:value-type="string">
            <text:p>["c3_rhun_outrider","Outrider_of_Rhun","Outriders_of_Rhun"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16362"/>
        </table:table-row>
        <table:table-row table:style-name="ro1">
          <table:table-cell table:style-name="ce6" table:formula="of:=IF(AND([.B60]&lt;&gt;&quot;&quot;;[.C60]&lt;&gt;&quot;&quot;);CONCATENATE([Variables.$I$1];[Variables.$I$7];[.B60];[Variables.$I$7];[Variables.$I$6];[Variables.$I$7];[.C60];[Variables.$I$7];[Variables.$I$6];[Variables.$I$7];[.D60];[Variables.$I$7];[Variables.$I$6];[.E60];[Variables.$I$6];[.F60];[Variables.$I$6];[.G60];[Variables.$I$6];[.H60];[Variables.$I$6];[Variables.$I$1];[.I60];[.J60];[.K60];[.L60];[.M60];[.N60];[.O60];[Variables.$I$2];[Variables.$I$6];[.P60];[Variables.$I$6];[.Q60];[Variables.$I$6];[.R60];[Variables.$I$6];[.S60];[Variables.$I$6];[.T60];IF([.U60]&lt;&gt;&quot;&quot;;CONCATENATE([Variables.$I$6];[.U60]);&quot;&quot;);[Variables.$I$2];[Variables.$I$6]);IF([.B60]&lt;&gt;&quot;&quot;;CONCATENATE(&quot;#&quot;;[.B60]);&quot;&quot;))" office:value-type="string" office:string-value="[&quot;c4_rhun_noble_rider&quot;,&quot;Noble_Rider_of_Rhun&quot;,&quot;Noble_Riders_of_Rhun&quot;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" calcext:value-type="string">
            <text:p>["c4_rhun_noble_rider","Noble_Rider_of_Rhun","Noble_Riders_of_Rhun"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</text:p>
          </table:table-cell>
          <table:table-cell table:style-name="ce7" office:value-type="string" calcext:value-type="string">
            <text:p>c4_rhun_noble_rider</text:p>
          </table:table-cell>
          <table:table-cell table:style-name="ce7" office:value-type="string" calcext:value-type="string">
            <text:p>Noble_Rider_of_Rhun</text:p>
          </table:table-cell>
          <table:table-cell table:style-name="ce7" office:value-type="string" calcext:value-type="string">
            <text:p>Noble_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hun</text:p>
          </table:table-cell>
          <table:table-cell table:style-name="ce11" office:value-type="string" calcext:value-type="string">
            <text:p>itm_rhun_helm_horde_good,itm_rhun_helm_barbed,itm_rhun_helm_pot,</text:p>
          </table:table-cell>
          <table:table-cell table:style-name="ce11" office:value-type="string" calcext:value-type="string">
            <text:p>itm_rhun_armor_n,itm_rhun_armor_h,itm_rhun_armor_g,</text:p>
          </table:table-cell>
          <table:table-cell table:style-name="ce11"/>
          <table:table-cell table:style-name="ce11" office:value-type="string" calcext:value-type="string">
            <text:p>itm_furry_boots,itm_leather_boots_dark,</text:p>
          </table:table-cell>
          <table:table-cell table:style-name="ce11" office:value-type="string" calcext:value-type="string">
            <text:p>itm_rhun_sword,</text:p>
          </table:table-cell>
          <table:table-cell table:style-name="ce11" office:value-type="string" calcext:value-type="string">
            <text:p>itm_rhun_bull2_shield,</text:p>
          </table:table-cell>
          <table:table-cell table:style-name="ce11" office:value-type="string" calcext:value-type="string">
            <text:p>itm_rhun_horse_b,itm_rhun_horse_e,itm_rhun_horse_f,</text:p>
          </table:table-cell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B60]&lt;&gt;&quot;&quot;;[.C60]&lt;&gt;&quot;&quot;);CONCATENATE([Variables.$I$1];[Variables.$I$7];[.B60];[Variables.$I$7];[Variables.$I$6];[Variables.$I$7];[.C60];[Variables.$I$7];[Variables.$I$6];[Variables.$I$7];[.D60];[Variables.$I$7];[Variables.$I$6];[.E60];[Variables.$I$6];[.F60];[Variables.$I$6];[.G60];[Variables.$I$6];[.H60];[Variables.$I$6];[Variables.$I$1];[.I60];[.J60];[.K60];[.L60];[.M60];[.N60];[.O60];[Variables.$I$2];[Variables.$I$6];[.P60];[Variables.$I$6];[.Q60];[Variables.$I$6];[.R60];[Variables.$I$6];[.S60];[Variables.$I$6];[.T60];IF([.U60]&lt;&gt;&quot;&quot;;CONCATENATE([Variables.$I$6];[.U60]);&quot;&quot;);[Variables.$I$2];[Variables.$I$6]);IF([.B60]&lt;&gt;&quot;&quot;;CONCATENATE(&quot;#&quot;;[.B60]);&quot;&quot;))" office:value-type="string" office:string-value="[&quot;c4_rhun_noble_rider&quot;,&quot;Noble_Rider_of_Rhun&quot;,&quot;Noble_Riders_of_Rhun&quot;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" calcext:value-type="string">
            <text:p>["c4_rhun_noble_rider","Noble_Rider_of_Rhun","Noble_Riders_of_Rhun"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</text:p>
          </table:table-cell>
          <table:table-cell table:number-columns-repeated="16362"/>
        </table:table-row>
        <table:table-row table:style-name="ro1">
          <table:table-cell table:style-name="ce6" table:formula="of:=IF(AND([.B61]&lt;&gt;&quot;&quot;;[.C61]&lt;&gt;&quot;&quot;);CONCATENATE([Variables.$I$1];[Variables.$I$7];[.B61];[Variables.$I$7];[Variables.$I$6];[Variables.$I$7];[.C61];[Variables.$I$7];[Variables.$I$6];[Variables.$I$7];[.D61];[Variables.$I$7];[Variables.$I$6];[.E61];[Variables.$I$6];[.F61];[Variables.$I$6];[.G61];[Variables.$I$6];[.H61];[Variables.$I$6];[Variables.$I$1];[.I61];[.J61];[.K61];[.L61];[.M61];[.N61];[.O61];[Variables.$I$2];[Variables.$I$6];[.P61];[Variables.$I$6];[.Q61];[Variables.$I$6];[.R61];[Variables.$I$6];[.S61];[Variables.$I$6];[.T61];IF([.U61]&lt;&gt;&quot;&quot;;CONCATENATE([Variables.$I$6];[.U61]);&quot;&quot;);[Variables.$I$2];[Variables.$I$6]);IF([.B61]&lt;&gt;&quot;&quot;;CONCATENATE(&quot;#&quot;;[.B61]);&quot;&quot;))" office:value-type="string" office:string-value="[&quot;c5_rhun_warrider&quot;,&quot;Warrider_of_Rhun&quot;,&quot;Warriders_of_Rhun&quot;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" calcext:value-type="string">
            <text:p>["c5_rhun_warrider","Warrider_of_Rhun","Warriders_of_Rhun"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</text:p>
          </table:table-cell>
          <table:table-cell table:style-name="ce7" office:value-type="string" calcext:value-type="string">
            <text:p>c5_rhun_warrider</text:p>
          </table:table-cell>
          <table:table-cell table:style-name="ce7" office:value-type="string" calcext:value-type="string">
            <text:p>Warrider_of_Rhun</text:p>
          </table:table-cell>
          <table:table-cell table:style-name="ce7" office:value-type="string" calcext:value-type="string">
            <text:p>War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hun</text:p>
          </table:table-cell>
          <table:table-cell table:style-name="ce11" office:value-type="string" calcext:value-type="string">
            <text:p>itm_rhun_helm_barbed_good,itm_rhun_helm_pot_good,</text:p>
          </table:table-cell>
          <table:table-cell table:style-name="ce11" office:value-type="string" calcext:value-type="string">
            <text:p>itm_rhun_armor_p,itm_rhun_armor_k,</text:p>
          </table:table-cell>
          <table:table-cell table:style-name="ce11" office:value-type="string" calcext:value-type="string">
            <text:p>itm_evil_gauntlets_a_good,</text:p>
          </table:table-cell>
          <table:table-cell table:style-name="ce11" office:value-type="string" calcext:value-type="string">
            <text:p>itm_leather_boots_dark, itm_splinted_greaves,</text:p>
          </table:table-cell>
          <table:table-cell table:style-name="ce11" office:value-type="string" calcext:value-type="string">
            <text:p>itm_rhun_sword,itm_rhun_greatsword,</text:p>
          </table:table-cell>
          <table:table-cell table:style-name="ce11" office:value-type="string" calcext:value-type="string">
            <text:p>itm_rhun_bull3_shield,</text:p>
          </table:table-cell>
          <table:table-cell table:style-name="ce11" office:value-type="string" calcext:value-type="string">
            <text:p>itm_rhun_horse_g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riding_6|knows_power_strike_3|knows_power_draw_2|knows_power_throw_2|knows_ironflesh_2|knows_horse_archery_1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B61]&lt;&gt;&quot;&quot;;[.C61]&lt;&gt;&quot;&quot;);CONCATENATE([Variables.$I$1];[Variables.$I$7];[.B61];[Variables.$I$7];[Variables.$I$6];[Variables.$I$7];[.C61];[Variables.$I$7];[Variables.$I$6];[Variables.$I$7];[.D61];[Variables.$I$7];[Variables.$I$6];[.E61];[Variables.$I$6];[.F61];[Variables.$I$6];[.G61];[Variables.$I$6];[.H61];[Variables.$I$6];[Variables.$I$1];[.I61];[.J61];[.K61];[.L61];[.M61];[.N61];[.O61];[Variables.$I$2];[Variables.$I$6];[.P61];[Variables.$I$6];[.Q61];[Variables.$I$6];[.R61];[Variables.$I$6];[.S61];[Variables.$I$6];[.T61];IF([.U61]&lt;&gt;&quot;&quot;;CONCATENATE([Variables.$I$6];[.U61]);&quot;&quot;);[Variables.$I$2];[Variables.$I$6]);IF([.B61]&lt;&gt;&quot;&quot;;CONCATENATE(&quot;#&quot;;[.B61]);&quot;&quot;))" office:value-type="string" office:string-value="[&quot;c5_rhun_warrider&quot;,&quot;Warrider_of_Rhun&quot;,&quot;Warriders_of_Rhun&quot;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" calcext:value-type="string">
            <text:p>["c5_rhun_warrider","Warrider_of_Rhun","Warriders_of_Rhun"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</text:p>
          </table:table-cell>
          <table:table-cell table:number-columns-repeated="16362"/>
        </table:table-row>
        <table:table-row table:style-name="ro1">
          <table:table-cell table:style-name="ce6" table:formula="of:=IF(AND([.B62]&lt;&gt;&quot;&quot;;[.C62]&lt;&gt;&quot;&quot;);CONCATENATE([Variables.$I$1];[Variables.$I$7];[.B62];[Variables.$I$7];[Variables.$I$6];[Variables.$I$7];[.C62];[Variables.$I$7];[Variables.$I$6];[Variables.$I$7];[.D62];[Variables.$I$7];[Variables.$I$6];[.E62];[Variables.$I$6];[.F62];[Variables.$I$6];[.G62];[Variables.$I$6];[.H62];[Variables.$I$6];[Variables.$I$1];[.I62];[.J62];[.K62];[.L62];[.M62];[.N62];[.O62];[Variables.$I$2];[Variables.$I$6];[.P62];[Variables.$I$6];[.Q62];[Variables.$I$6];[.R62];[Variables.$I$6];[.S62];[Variables.$I$6];[.T62];IF([.U62]&lt;&gt;&quot;&quot;;CONCATENATE([Variables.$I$6];[.U62]);&quot;&quot;);[Variables.$I$2];[Variables.$I$6]);IF([.B62]&lt;&gt;&quot;&quot;;CONCATENATE(&quot;#&quot;;[.B62]);&quot;&quot;))" office:value-type="string" office:string-value="[&quot;c6_rhun_warlord&quot;,&quot;Warlord_of_Rhun&quot;,&quot;Warlords_of_Rhun&quot;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5|knows_power_strike_6|knows_riding_7,rhun_man1,rhun_man2]," calcext:value-type="string">
            <text:p>["c6_rhun_warlord","Warlord_of_Rhun","Warlords_of_Rhun"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5|knows_power_strike_6|knows_riding_7,rhun_man1,rhun_man2],</text:p>
          </table:table-cell>
          <table:table-cell table:style-name="ce7" office:value-type="string" calcext:value-type="string">
            <text:p>c6_rhun_warlord</text:p>
          </table:table-cell>
          <table:table-cell table:style-name="ce7" office:value-type="string" calcext:value-type="string">
            <text:p>Warlord_of_Rhun</text:p>
          </table:table-cell>
          <table:table-cell table:style-name="ce7" office:value-type="string" calcext:value-type="string">
            <text:p>Warlord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hun</text:p>
          </table:table-cell>
          <table:table-cell table:style-name="ce11" office:value-type="string" calcext:value-type="string">
            <text:p>itm_rhun_helm_chieftain,</text:p>
          </table:table-cell>
          <table:table-cell table:style-name="ce11" office:value-type="string" calcext:value-type="string">
            <text:p>itm_rhun_armor_p_good,itm_rhun_armor_k_good,</text:p>
          </table:table-cell>
          <table:table-cell table:style-name="ce11" office:value-type="string" calcext:value-type="string">
            <text:p>itm_evil_gauntlets_b_good,</text:p>
          </table:table-cell>
          <table:table-cell table:style-name="ce11" office:value-type="string" calcext:value-type="string">
            <text:p>itm_splinted_greaves_good,</text:p>
          </table:table-cell>
          <table:table-cell table:style-name="ce11" office:value-type="string" calcext:value-type="string">
            <text:p>itm_rhun_sword,itm_rhun_greatfalchion,</text:p>
          </table:table-cell>
          <table:table-cell table:style-name="ce11" office:value-type="string" calcext:value-type="string">
            <text:p>itm_rhun_bull3_shield,</text:p>
          </table:table-cell>
          <table:table-cell table:style-name="ce11" office:value-type="string" calcext:value-type="string">
            <text:p>itm_rhun_horse_g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ironflesh_5|knows_power_strike_6|knows_riding_7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B62]&lt;&gt;&quot;&quot;;[.C62]&lt;&gt;&quot;&quot;);CONCATENATE([Variables.$I$1];[Variables.$I$7];[.B62];[Variables.$I$7];[Variables.$I$6];[Variables.$I$7];[.C62];[Variables.$I$7];[Variables.$I$6];[Variables.$I$7];[.D62];[Variables.$I$7];[Variables.$I$6];[.E62];[Variables.$I$6];[.F62];[Variables.$I$6];[.G62];[Variables.$I$6];[.H62];[Variables.$I$6];[Variables.$I$1];[.I62];[.J62];[.K62];[.L62];[.M62];[.N62];[.O62];[Variables.$I$2];[Variables.$I$6];[.P62];[Variables.$I$6];[.Q62];[Variables.$I$6];[.R62];[Variables.$I$6];[.S62];[Variables.$I$6];[.T62];IF([.U62]&lt;&gt;&quot;&quot;;CONCATENATE([Variables.$I$6];[.U62]);&quot;&quot;);[Variables.$I$2];[Variables.$I$6]);IF([.B62]&lt;&gt;&quot;&quot;;CONCATENATE(&quot;#&quot;;[.B62]);&quot;&quot;))" office:value-type="string" office:string-value="[&quot;c6_rhun_warlord&quot;,&quot;Warlord_of_Rhun&quot;,&quot;Warlords_of_Rhun&quot;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5|knows_power_strike_6|knows_riding_7,rhun_man1,rhun_man2]," calcext:value-type="string">
            <text:p>["c6_rhun_warlord","Warlord_of_Rhun","Warlords_of_Rhun"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5|knows_power_strike_6|knows_riding_7,rhun_man1,rhun_man2],</text:p>
          </table:table-cell>
          <table:table-cell table:number-columns-repeated="16362"/>
        </table:table-row>
        <table:table-row table:style-name="ro1">
          <table:table-cell table:formula="of:=IF(AND([.B63]&lt;&gt;&quot;&quot;;[.C63]&lt;&gt;&quot;&quot;);CONCATENATE([Variables.$I$1];[Variables.$I$7];[.B63];[Variables.$I$7];[Variables.$I$6];[Variables.$I$7];[.C63];[Variables.$I$7];[Variables.$I$6];[Variables.$I$7];[.D63];[Variables.$I$7];[Variables.$I$6];[.E63];[Variables.$I$6];[.F63];[Variables.$I$6];[.G63];[Variables.$I$6];[.H63];[Variables.$I$6];[Variables.$I$1];[.I63];[.J63];[.K63];[.L63];[.M63];[.N63];[.O63];[Variables.$I$2];[Variables.$I$6];[.P63];[Variables.$I$6];[.Q63];[Variables.$I$6];[.R63];[Variables.$I$6];[.S63];[Variables.$I$6];[.T63];IF([.U63]&lt;&gt;&quot;&quot;;CONCATENATE([Variables.$I$6];[.U63]);&quot;&quot;);[Variables.$I$2];[Variables.$I$6]);IF([.B63]&lt;&gt;&quot;&quot;;CONCATENATE(&quot;#&quot;;[.B63]);&quot;&quot;))">
            <text:p/>
          </table:table-cell>
          <table:table-cell table:style-name="ce6" table:number-columns-repeated="20"/>
          <table:table-cell table:style-name="ce36" table:formula="of:=IF(AND([.B63]&lt;&gt;&quot;&quot;;[.C63]&lt;&gt;&quot;&quot;);CONCATENATE([Variables.$I$1];[Variables.$I$7];[.B63];[Variables.$I$7];[Variables.$I$6];[Variables.$I$7];[.C63];[Variables.$I$7];[Variables.$I$6];[Variables.$I$7];[.D63];[Variables.$I$7];[Variables.$I$6];[.E63];[Variables.$I$6];[.F63];[Variables.$I$6];[.G63];[Variables.$I$6];[.H63];[Variables.$I$6];[Variables.$I$1];[.I63];[.J63];[.K63];[.L63];[.M63];[.N63];[.O63];[Variables.$I$2];[Variables.$I$6];[.P63];[Variables.$I$6];[.Q63];[Variables.$I$6];[.R63];[Variables.$I$6];[.S63];[Variables.$I$6];[.T63];IF([.U63]&lt;&gt;&quot;&quot;;CONCATENATE([Variables.$I$6];[.U63]);&quot;&quot;);[Variables.$I$2];[Variables.$I$6]);IF([.B63]&lt;&gt;&quot;&quot;;CONCATENATE(&quot;#&quot;;[.B63]);&quot;&quot;))">
            <text:p/>
          </table:table-cell>
          <table:table-cell table:number-columns-repeated="16362"/>
        </table:table-row>
        <table:table-row table:style-name="ro1">
          <table:table-cell table:style-name="ce6" table:formula="of:=IF(AND([.B64]&lt;&gt;&quot;&quot;;[.C64]&lt;&gt;&quot;&quot;);CONCATENATE([Variables.$I$1];[Variables.$I$7];[.B64];[Variables.$I$7];[Variables.$I$6];[Variables.$I$7];[.C64];[Variables.$I$7];[Variables.$I$6];[Variables.$I$7];[.D64];[Variables.$I$7];[Variables.$I$6];[.E64];[Variables.$I$6];[.F64];[Variables.$I$6];[.G64];[Variables.$I$6];[.H64];[Variables.$I$6];[Variables.$I$1];[.I64];[.J64];[.K64];[.L64];[.M64];[.N64];[.O64];[Variables.$I$2];[Variables.$I$6];[.P64];[Variables.$I$6];[.Q64];[Variables.$I$6];[.R64];[Variables.$I$6];[.S64];[Variables.$I$6];[.T64];IF([.U64]&lt;&gt;&quot;&quot;;CONCATENATE([Variables.$I$6];[.U64]);&quot;&quot;);[Variables.$I$2];[Variables.$I$6]);IF([.B64]&lt;&gt;&quot;&quot;;CONCATENATE(&quot;#&quot;;[.B64]);&quot;&quot;))" office:value-type="string" office:string-value="#Dwarves" calcext:value-type="string">
            <text:p>#Dwarves</text:p>
          </table:table-cell>
          <table:table-cell table:style-name="ce5" office:value-type="string" calcext:value-type="string">
            <text:p>Dwarves</text:p>
          </table:table-cell>
          <table:table-cell table:style-name="ce6" table:number-columns-repeated="19"/>
          <table:table-cell table:style-name="ce6" table:formula="of:=IF(AND([.B64]&lt;&gt;&quot;&quot;;[.C64]&lt;&gt;&quot;&quot;);CONCATENATE([Variables.$I$1];[Variables.$I$7];[.B64];[Variables.$I$7];[Variables.$I$6];[Variables.$I$7];[.C64];[Variables.$I$7];[Variables.$I$6];[Variables.$I$7];[.D64];[Variables.$I$7];[Variables.$I$6];[.E64];[Variables.$I$6];[.F64];[Variables.$I$6];[.G64];[Variables.$I$6];[.H64];[Variables.$I$6];[Variables.$I$1];[.I64];[.J64];[.K64];[.L64];[.M64];[.N64];[.O64];[Variables.$I$2];[Variables.$I$6];[.P64];[Variables.$I$6];[.Q64];[Variables.$I$6];[.R64];[Variables.$I$6];[.S64];[Variables.$I$6];[.T64];IF([.U64]&lt;&gt;&quot;&quot;;CONCATENATE([Variables.$I$6];[.U64]);&quot;&quot;);[Variables.$I$2];[Variables.$I$6]);IF([.B64]&lt;&gt;&quot;&quot;;CONCATENATE(&quot;#&quot;;[.B64]);&quot;&quot;))" office:value-type="string" office:string-value="#Dwarves" calcext:value-type="string">
            <text:p>#Dwarves</text:p>
          </table:table-cell>
          <table:table-cell table:number-columns-repeated="16362"/>
        </table:table-row>
        <table:table-row table:style-name="ro1">
          <table:table-cell table:style-name="ce6" table:formula="of:=IF(AND([.B65]&lt;&gt;&quot;&quot;;[.C65]&lt;&gt;&quot;&quot;);CONCATENATE([Variables.$I$1];[Variables.$I$7];[.B65];[Variables.$I$7];[Variables.$I$6];[Variables.$I$7];[.C65];[Variables.$I$7];[Variables.$I$6];[Variables.$I$7];[.D65];[Variables.$I$7];[Variables.$I$6];[.E65];[Variables.$I$6];[.F65];[Variables.$I$6];[.G65];[Variables.$I$6];[.H65];[Variables.$I$6];[Variables.$I$1];[.I65];[.J65];[.K65];[.L65];[.M65];[.N65];[.O65];[Variables.$I$2];[Variables.$I$6];[.P65];[Variables.$I$6];[.Q65];[Variables.$I$6];[.R65];[Variables.$I$6];[.S65];[Variables.$I$6];[.T65];IF([.U65]&lt;&gt;&quot;&quot;;CONCATENATE([Variables.$I$6];[.U65]);&quot;&quot;);[Variables.$I$2];[Variables.$I$6]);IF([.B65]&lt;&gt;&quot;&quot;;CONCATENATE(&quot;#&quot;;[.B65]);&quot;&quot;))" office:value-type="string" office:string-value="[&quot;i1_dwarf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" calcext:value-type="string">
            <text:p>["i1_dwarf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</text:p>
          </table:table-cell>
          <table:table-cell table:style-name="ce7" office:value-type="string" calcext:value-type="string">
            <text:p>i1_dwarf_apprentice</text:p>
          </table:table-cell>
          <table:table-cell table:style-name="ce7" office:value-type="string" calcext:value-type="string">
            <text:p>Apprentice-dwarf</text:p>
          </table:table-cell>
          <table:table-cell table:style-name="ce7" office:value-type="string" calcext:value-type="string">
            <text:p>Apprentice-dwarve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warf</text:p>
          </table:table-cell>
          <table:table-cell table:style-name="ce11" office:value-type="string" calcext:value-type="string">
            <text:p>itm_dwarf_hood, itm_dwarf_miner,</text:p>
          </table:table-cell>
          <table:table-cell table:style-name="ce11" office:value-type="string" calcext:value-type="string">
            <text:p>itm_dwarf_vest,itm_dwarf_vest_lordly,</text:p>
          </table:table-cell>
          <table:table-cell table:style-name="ce11"/>
          <table:table-cell table:style-name="ce11" office:value-type="string" calcext:value-type="string">
            <text:p>itm_dwarf_pad_boots,</text:p>
          </table:table-cell>
          <table:table-cell table:style-name="ce11" office:value-type="string" calcext:value-type="string">
            <text:p>itm_dwarf_mattock, itm_dwarf_mattock_good, itm_dwarf_hand_axe,</text:p>
          </table:table-cell>
          <table:table-cell table:style-name="ce11" table:number-columns-repeated="2"/>
          <table:table-cell table:style-name="ce12" office:value-type="string" calcext:value-type="string">
            <text:p>attr_dwarf_tier_1</text:p>
          </table:table-cell>
          <table:table-cell table:style-name="ce12" office:value-type="string" calcext:value-type="string">
            <text:p>wp_dwarf_tier_1</text:p>
          </table:table-cell>
          <table:table-cell table:style-name="ce13" office:value-type="string" calcext:value-type="string">
            <text:p>knows_common|knows_ironflesh_3|knows_power_strike_1|knows_power_throw_1|knows_athletics_1|knows_trainer_1|knows_pathfinding_1|knows_spotting_1|knows_inventory_management_2|knows_wound_treatment_1|knows_trade_2</text:p>
          </table:table-cell>
          <table:table-cell table:style-name="ce14" office:value-type="string" calcext:value-type="string">
            <text:p>dwarf_face_2</text:p>
          </table:table-cell>
          <table:table-cell table:style-name="ce14" office:value-type="string" calcext:value-type="string">
            <text:p>dwarf_face_3</text:p>
          </table:table-cell>
          <table:table-cell table:style-name="ce15"/>
          <table:table-cell table:style-name="ce6" table:formula="of:=IF(AND([.B65]&lt;&gt;&quot;&quot;;[.C65]&lt;&gt;&quot;&quot;);CONCATENATE([Variables.$I$1];[Variables.$I$7];[.B65];[Variables.$I$7];[Variables.$I$6];[Variables.$I$7];[.C65];[Variables.$I$7];[Variables.$I$6];[Variables.$I$7];[.D65];[Variables.$I$7];[Variables.$I$6];[.E65];[Variables.$I$6];[.F65];[Variables.$I$6];[.G65];[Variables.$I$6];[.H65];[Variables.$I$6];[Variables.$I$1];[.I65];[.J65];[.K65];[.L65];[.M65];[.N65];[.O65];[Variables.$I$2];[Variables.$I$6];[.P65];[Variables.$I$6];[.Q65];[Variables.$I$6];[.R65];[Variables.$I$6];[.S65];[Variables.$I$6];[.T65];IF([.U65]&lt;&gt;&quot;&quot;;CONCATENATE([Variables.$I$6];[.U65]);&quot;&quot;);[Variables.$I$2];[Variables.$I$6]);IF([.B65]&lt;&gt;&quot;&quot;;CONCATENATE(&quot;#&quot;;[.B65]);&quot;&quot;))" office:value-type="string" office:string-value="[&quot;i1_dwarf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" calcext:value-type="string">
            <text:p>["i1_dwarf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</text:p>
          </table:table-cell>
          <table:table-cell table:number-columns-repeated="16362"/>
        </table:table-row>
        <table:table-row table:style-name="ro1">
          <table:table-cell table:style-name="ce6" table:formula="of:=IF(AND([.B66]&lt;&gt;&quot;&quot;;[.C66]&lt;&gt;&quot;&quot;);CONCATENATE([Variables.$I$1];[Variables.$I$7];[.B66];[Variables.$I$7];[Variables.$I$6];[Variables.$I$7];[.C66];[Variables.$I$7];[Variables.$I$6];[Variables.$I$7];[.D66];[Variables.$I$7];[Variables.$I$6];[.E66];[Variables.$I$6];[.F66];[Variables.$I$6];[.G66];[Variables.$I$6];[.H66];[Variables.$I$6];[Variables.$I$1];[.I66];[.J66];[.K66];[.L66];[.M66];[.N66];[.O66];[Variables.$I$2];[Variables.$I$6];[.P66];[Variables.$I$6];[.Q66];[Variables.$I$6];[.R66];[Variables.$I$6];[.S66];[Variables.$I$6];[.T66];IF([.U66]&lt;&gt;&quot;&quot;;CONCATENATE([Variables.$I$6];[.U66]);&quot;&quot;);[Variables.$I$2];[Variables.$I$6]);IF([.B66]&lt;&gt;&quot;&quot;;CONCATENATE(&quot;#&quot;;[.B66]);&quot;&quot;))" office:value-type="string" office:string-value="[&quot;i2_dwarf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" calcext:value-type="string">
            <text:p>["i2_dwarf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</text:p>
          </table:table-cell>
          <table:table-cell table:style-name="ce7" office:value-type="string" calcext:value-type="string">
            <text:p>i2_dwarf_warrior</text:p>
          </table:table-cell>
          <table:table-cell table:style-name="ce7" office:value-type="string" calcext:value-type="string">
            <text:p>Warrior-dwarf</text:p>
          </table:table-cell>
          <table:table-cell table:style-name="ce7" office:value-type="string" calcext:value-type="string">
            <text:p>Warrio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warf</text:p>
          </table:table-cell>
          <table:table-cell table:style-name="ce11" office:value-type="string" calcext:value-type="string">
            <text:p>itm_dwarf_helm_coif, itm_dwarf_miner, itm_dwarf_miner_nasal,itm_dwarf_nasal_b,</text:p>
          </table:table-cell>
          <table:table-cell table:style-name="ce11" office:value-type="string" calcext:value-type="string">
            <text:p>itm_dwarf_vest_lordly,</text:p>
          </table:table-cell>
          <table:table-cell table:style-name="ce11"/>
          <table:table-cell table:style-name="ce11" office:value-type="string" calcext:value-type="string">
            <text:p>itm_dwarf_pad_boots,</text:p>
          </table:table-cell>
          <table:table-cell table:style-name="ce11" office:value-type="string" calcext:value-type="string">
            <text:p>itm_dwarf_mattock_good, itm_dwarf_hand_axe,itm_dwarf_sword_a, itm_dwarf_spear,</text:p>
          </table:table-cell>
          <table:table-cell table:style-name="ce11" office:value-type="string" calcext:value-type="string">
            <text:p>itm_dwarf_shield_d, itm_dwarf_shield_d_good,</text:p>
          </table:table-cell>
          <table:table-cell table:style-name="ce11"/>
          <table:table-cell table:style-name="ce12" office:value-type="string" calcext:value-type="string">
            <text:p>attr_dwarf_tier_2</text:p>
          </table:table-cell>
          <table:table-cell table:style-name="ce12" office:value-type="string" calcext:value-type="string">
            <text:p>wp_dwarf_tier_2</text:p>
          </table:table-cell>
          <table:table-cell table:style-name="ce13" office:value-type="string" calcext:value-type="string">
            <text:p>knows_common|knows_ironflesh_3|knows_power_strike_1|knows_power_throw_2|knows_shield_1|knows_athletics_1|knows_trainer_1|knows_pathfinding_1|knows_spotting_1|knows_inventory_management_2|knows_wound_treatment_1|knows_trade_2</text:p>
          </table:table-cell>
          <table:table-cell table:style-name="ce14" office:value-type="string" calcext:value-type="string">
            <text:p>dwarf_face_1</text:p>
          </table:table-cell>
          <table:table-cell table:style-name="ce14" office:value-type="string" calcext:value-type="string">
            <text:p>dwarf_face_2</text:p>
          </table:table-cell>
          <table:table-cell table:style-name="ce15"/>
          <table:table-cell table:style-name="ce6" table:formula="of:=IF(AND([.B66]&lt;&gt;&quot;&quot;;[.C66]&lt;&gt;&quot;&quot;);CONCATENATE([Variables.$I$1];[Variables.$I$7];[.B66];[Variables.$I$7];[Variables.$I$6];[Variables.$I$7];[.C66];[Variables.$I$7];[Variables.$I$6];[Variables.$I$7];[.D66];[Variables.$I$7];[Variables.$I$6];[.E66];[Variables.$I$6];[.F66];[Variables.$I$6];[.G66];[Variables.$I$6];[.H66];[Variables.$I$6];[Variables.$I$1];[.I66];[.J66];[.K66];[.L66];[.M66];[.N66];[.O66];[Variables.$I$2];[Variables.$I$6];[.P66];[Variables.$I$6];[.Q66];[Variables.$I$6];[.R66];[Variables.$I$6];[.S66];[Variables.$I$6];[.T66];IF([.U66]&lt;&gt;&quot;&quot;;CONCATENATE([Variables.$I$6];[.U66]);&quot;&quot;);[Variables.$I$2];[Variables.$I$6]);IF([.B66]&lt;&gt;&quot;&quot;;CONCATENATE(&quot;#&quot;;[.B66]);&quot;&quot;))" office:value-type="string" office:string-value="[&quot;i2_dwarf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" calcext:value-type="string">
            <text:p>["i2_dwarf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</text:p>
          </table:table-cell>
          <table:table-cell table:number-columns-repeated="16362"/>
        </table:table-row>
        <table:table-row table:style-name="ro1">
          <table:table-cell table:style-name="ce6" table:formula="of:=IF(AND([.B67]&lt;&gt;&quot;&quot;;[.C67]&lt;&gt;&quot;&quot;);CONCATENATE([Variables.$I$1];[Variables.$I$7];[.B67];[Variables.$I$7];[Variables.$I$6];[Variables.$I$7];[.C67];[Variables.$I$7];[Variables.$I$6];[Variables.$I$7];[.D67];[Variables.$I$7];[Variables.$I$6];[.E67];[Variables.$I$6];[.F67];[Variables.$I$6];[.G67];[Variables.$I$6];[.H67];[Variables.$I$6];[Variables.$I$1];[.I67];[.J67];[.K67];[.L67];[.M67];[.N67];[.O67];[Variables.$I$2];[Variables.$I$6];[.P67];[Variables.$I$6];[.Q67];[Variables.$I$6];[.R67];[Variables.$I$6];[.S67];[Variables.$I$6];[.T67];IF([.U67]&lt;&gt;&quot;&quot;;CONCATENATE([Variables.$I$6];[.U67]);&quot;&quot;);[Variables.$I$2];[Variables.$I$6]);IF([.B67]&lt;&gt;&quot;&quot;;CONCATENATE(&quot;#&quot;;[.B67]);&quot;&quot;))" office:value-type="string" office:string-value="[&quot;i3_dwarf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" calcext:value-type="string">
            <text:p>["i3_dwarf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</text:p>
          </table:table-cell>
          <table:table-cell table:style-name="ce7" office:value-type="string" calcext:value-type="string">
            <text:p>i3_dwarf_hardened_warrior</text:p>
          </table:table-cell>
          <table:table-cell table:style-name="ce7" office:value-type="string" calcext:value-type="string">
            <text:p>Hardened_Warrior-dwarf</text:p>
          </table:table-cell>
          <table:table-cell table:style-name="ce7" office:value-type="string" calcext:value-type="string">
            <text:p>Hardened_Warrior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warf</text:p>
          </table:table-cell>
          <table:table-cell table:style-name="ce11" office:value-type="string" calcext:value-type="string">
            <text:p>itm_dwarf_helm_coif, itm_dwarf_helm_kettle, itm_dwarf_helm_round,itm_dwarf_nasal_b,</text:p>
          </table:table-cell>
          <table:table-cell table:style-name="ce11" office:value-type="string" calcext:value-type="string">
            <text:p>itm_dwarf_armor_a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dwarf_pad_boots,</text:p>
          </table:table-cell>
          <table:table-cell table:style-name="ce11" office:value-type="string" calcext:value-type="string">
            <text:p>itm_dwarf_mattock_good, itm_dwarf_hand_axe,itm_dwarf_sword_a, itm_dwarf_spear,</text:p>
          </table:table-cell>
          <table:table-cell table:style-name="ce11" office:value-type="string" calcext:value-type="string">
            <text:p>itm_dwarf_shield_d, itm_dwarf_shield_d_good,itm_dwarf_shield_a, itm_dwarf_shield_a_good,</text:p>
          </table:table-cell>
          <table:table-cell table:style-name="ce11"/>
          <table:table-cell table:style-name="ce12" office:value-type="string" calcext:value-type="string">
            <text:p>attr_dwarf_tier_3</text:p>
          </table:table-cell>
          <table:table-cell table:style-name="ce12" office:value-type="string" calcext:value-type="string">
            <text:p>wp_dwarf_tier_3</text:p>
          </table:table-cell>
          <table:table-cell table:style-name="ce12" office:value-type="string" calcext:value-type="string">
            <text:p>knows_common_dwarf|knows_athletics_2|knows_power_strike_2|knows_power_throw_2|knows_ironflesh_4|knows_shield_3</text:p>
          </table:table-cell>
          <table:table-cell table:style-name="ce14" office:value-type="string" calcext:value-type="string">
            <text:p>dwarf_face_3</text:p>
          </table:table-cell>
          <table:table-cell table:style-name="ce14" office:value-type="string" calcext:value-type="string">
            <text:p>dwarf_face_4</text:p>
          </table:table-cell>
          <table:table-cell table:style-name="ce15"/>
          <table:table-cell table:style-name="ce6" table:formula="of:=IF(AND([.B67]&lt;&gt;&quot;&quot;;[.C67]&lt;&gt;&quot;&quot;);CONCATENATE([Variables.$I$1];[Variables.$I$7];[.B67];[Variables.$I$7];[Variables.$I$6];[Variables.$I$7];[.C67];[Variables.$I$7];[Variables.$I$6];[Variables.$I$7];[.D67];[Variables.$I$7];[Variables.$I$6];[.E67];[Variables.$I$6];[.F67];[Variables.$I$6];[.G67];[Variables.$I$6];[.H67];[Variables.$I$6];[Variables.$I$1];[.I67];[.J67];[.K67];[.L67];[.M67];[.N67];[.O67];[Variables.$I$2];[Variables.$I$6];[.P67];[Variables.$I$6];[.Q67];[Variables.$I$6];[.R67];[Variables.$I$6];[.S67];[Variables.$I$6];[.T67];IF([.U67]&lt;&gt;&quot;&quot;;CONCATENATE([Variables.$I$6];[.U67]);&quot;&quot;);[Variables.$I$2];[Variables.$I$6]);IF([.B67]&lt;&gt;&quot;&quot;;CONCATENATE(&quot;#&quot;;[.B67]);&quot;&quot;))" office:value-type="string" office:string-value="[&quot;i3_dwarf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" calcext:value-type="string">
            <text:p>["i3_dwarf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</text:p>
          </table:table-cell>
          <table:table-cell table:number-columns-repeated="16362"/>
        </table:table-row>
        <table:table-row table:style-name="ro1">
          <table:table-cell table:style-name="ce6" table:formula="of:=IF(AND([.B68]&lt;&gt;&quot;&quot;;[.C68]&lt;&gt;&quot;&quot;);CONCATENATE([Variables.$I$1];[Variables.$I$7];[.B68];[Variables.$I$7];[Variables.$I$6];[Variables.$I$7];[.C68];[Variables.$I$7];[Variables.$I$6];[Variables.$I$7];[.D68];[Variables.$I$7];[Variables.$I$6];[.E68];[Variables.$I$6];[.F68];[Variables.$I$6];[.G68];[Variables.$I$6];[.H68];[Variables.$I$6];[Variables.$I$1];[.I68];[.J68];[.K68];[.L68];[.M68];[.N68];[.O68];[Variables.$I$2];[Variables.$I$6];[.P68];[Variables.$I$6];[.Q68];[Variables.$I$6];[.R68];[Variables.$I$6];[.S68];[Variables.$I$6];[.T68];IF([.U68]&lt;&gt;&quot;&quot;;CONCATENATE([Variables.$I$6];[.U68]);&quot;&quot;);[Variables.$I$2];[Variables.$I$6]);IF([.B68]&lt;&gt;&quot;&quot;;CONCATENATE(&quot;#&quot;;[.B68]);&quot;&quot;))" office:value-type="string" office:string-value="[&quot;i4_dwarf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" calcext:value-type="string">
            <text:p>["i4_dwarf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</text:p>
          </table:table-cell>
          <table:table-cell table:style-name="ce7" office:value-type="string" calcext:value-type="string">
            <text:p>i4_dwarf_spearman</text:p>
          </table:table-cell>
          <table:table-cell table:style-name="ce7" office:value-type="string" calcext:value-type="string">
            <text:p>Spear-dwarf</text:p>
          </table:table-cell>
          <table:table-cell table:style-name="ce7" office:value-type="string" calcext:value-type="string">
            <text:p>Spea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warf</text:p>
          </table:table-cell>
          <table:table-cell table:style-name="ce11" office:value-type="string" calcext:value-type="string">
            <text:p>itm_dwarf_helm_coif_lordly, itm_dwarf_helm_kettle, itm_dwarf_helm_round,</text:p>
          </table:table-cell>
          <table:table-cell table:style-name="ce11" office:value-type="string" calcext:value-type="string">
            <text:p>itm_dwarf_armor_b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dwarf_pad_boots,</text:p>
          </table:table-cell>
          <table:table-cell table:style-name="ce11" office:value-type="string" calcext:value-type="string">
            <text:p>itm_dwarf_spear,</text:p>
          </table:table-cell>
          <table:table-cell table:style-name="ce11" office:value-type="string" calcext:value-type="string">
            <text:p>itm_dwarf_shield_d, itm_dwarf_shield_d_good,itm_dwarf_shield_a, itm_dwarf_shield_a_good,</text:p>
          </table:table-cell>
          <table:table-cell table:style-name="ce11"/>
          <table:table-cell table:style-name="ce12" office:value-type="string" calcext:value-type="string">
            <text:p>attr_dwarf_tier_4</text:p>
          </table:table-cell>
          <table:table-cell table:style-name="ce12" office:value-type="string" calcext:value-type="string">
            <text:p>wp_dwarf_tier_4</text:p>
          </table:table-cell>
          <table:table-cell table:style-name="ce12" office:value-type="string" calcext:value-type="string">
            <text:p>knows_common_dwarf|knows_athletics_2|knows_power_strike_4|knows_ironflesh_5|knows_shield_3</text:p>
          </table:table-cell>
          <table:table-cell table:style-name="ce14" office:value-type="string" calcext:value-type="string">
            <text:p>dwarf_face_1</text:p>
          </table:table-cell>
          <table:table-cell table:style-name="ce14" office:value-type="string" calcext:value-type="string">
            <text:p>dwarf_face_2</text:p>
          </table:table-cell>
          <table:table-cell table:style-name="ce15"/>
          <table:table-cell table:style-name="ce6" table:formula="of:=IF(AND([.B68]&lt;&gt;&quot;&quot;;[.C68]&lt;&gt;&quot;&quot;);CONCATENATE([Variables.$I$1];[Variables.$I$7];[.B68];[Variables.$I$7];[Variables.$I$6];[Variables.$I$7];[.C68];[Variables.$I$7];[Variables.$I$6];[Variables.$I$7];[.D68];[Variables.$I$7];[Variables.$I$6];[.E68];[Variables.$I$6];[.F68];[Variables.$I$6];[.G68];[Variables.$I$6];[.H68];[Variables.$I$6];[Variables.$I$1];[.I68];[.J68];[.K68];[.L68];[.M68];[.N68];[.O68];[Variables.$I$2];[Variables.$I$6];[.P68];[Variables.$I$6];[.Q68];[Variables.$I$6];[.R68];[Variables.$I$6];[.S68];[Variables.$I$6];[.T68];IF([.U68]&lt;&gt;&quot;&quot;;CONCATENATE([Variables.$I$6];[.U68]);&quot;&quot;);[Variables.$I$2];[Variables.$I$6]);IF([.B68]&lt;&gt;&quot;&quot;;CONCATENATE(&quot;#&quot;;[.B68]);&quot;&quot;))" office:value-type="string" office:string-value="[&quot;i4_dwarf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" calcext:value-type="string">
            <text:p>["i4_dwarf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</text:p>
          </table:table-cell>
          <table:table-cell table:number-columns-repeated="16362"/>
        </table:table-row>
        <table:table-row table:style-name="ro1">
          <table:table-cell table:style-name="ce6" table:formula="of:=IF(AND([.B69]&lt;&gt;&quot;&quot;;[.C69]&lt;&gt;&quot;&quot;);CONCATENATE([Variables.$I$1];[Variables.$I$7];[.B69];[Variables.$I$7];[Variables.$I$6];[Variables.$I$7];[.C69];[Variables.$I$7];[Variables.$I$6];[Variables.$I$7];[.D69];[Variables.$I$7];[Variables.$I$6];[.E69];[Variables.$I$6];[.F69];[Variables.$I$6];[.G69];[Variables.$I$6];[.H69];[Variables.$I$6];[Variables.$I$1];[.I69];[.J69];[.K69];[.L69];[.M69];[.N69];[.O69];[Variables.$I$2];[Variables.$I$6];[.P69];[Variables.$I$6];[.Q69];[Variables.$I$6];[.R69];[Variables.$I$6];[.S69];[Variables.$I$6];[.T69];IF([.U69]&lt;&gt;&quot;&quot;;CONCATENATE([Variables.$I$6];[.U69]);&quot;&quot;);[Variables.$I$2];[Variables.$I$6]);IF([.B69]&lt;&gt;&quot;&quot;;CONCATENATE(&quot;#&quot;;[.B69]);&quot;&quot;))" office:value-type="string" office:string-value="[&quot;i5_dwarf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" calcext:value-type="string">
            <text:p>["i5_dwarf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</text:p>
          </table:table-cell>
          <table:table-cell table:style-name="ce7" office:value-type="string" calcext:value-type="string">
            <text:p>i5_dwarf_pikeman</text:p>
          </table:table-cell>
          <table:table-cell table:style-name="ce7" office:value-type="string" calcext:value-type="string">
            <text:p>Pike-dwarf</text:p>
          </table:table-cell>
          <table:table-cell table:style-name="ce7" office:value-type="string" calcext:value-type="string">
            <text:p>Pik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warf</text:p>
          </table:table-cell>
          <table:table-cell table:style-name="ce11" office:value-type="string" calcext:value-type="string">
            <text:p>itm_dwarf_helm_sallet,</text:p>
          </table:table-cell>
          <table:table-cell table:style-name="ce11" office:value-type="string" calcext:value-type="string">
            <text:p>itm_dwarf_armor_b_lordly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dwarf_chain_boots,</text:p>
          </table:table-cell>
          <table:table-cell table:style-name="ce11" office:value-type="string" calcext:value-type="string">
            <text:p>itm_dwarf_spear,</text:p>
          </table:table-cell>
          <table:table-cell table:style-name="ce11" office:value-type="string" calcext:value-type="string">
            <text:p>itm_dwarf_shield_c,</text:p>
          </table:table-cell>
          <table:table-cell table:style-name="ce11"/>
          <table:table-cell table:style-name="ce12" office:value-type="string" calcext:value-type="string">
            <text:p>attr_dwarf_tier_5</text:p>
          </table:table-cell>
          <table:table-cell table:style-name="ce12" office:value-type="string" calcext:value-type="string">
            <text:p>wp_dwarf_tier_5</text:p>
          </table:table-cell>
          <table:table-cell table:style-name="ce12" office:value-type="string" calcext:value-type="string">
            <text:p>knows_common_dwarf|knows_athletics_2|knows_power_strike_5|knows_ironflesh_6|knows_shield_4</text:p>
          </table:table-cell>
          <table:table-cell table:style-name="ce14" office:value-type="string" calcext:value-type="string">
            <text:p>dwarf_face_3</text:p>
          </table:table-cell>
          <table:table-cell table:style-name="ce14" office:value-type="string" calcext:value-type="string">
            <text:p>dwarf_face_4</text:p>
          </table:table-cell>
          <table:table-cell table:style-name="ce15"/>
          <table:table-cell table:style-name="ce6" table:formula="of:=IF(AND([.B69]&lt;&gt;&quot;&quot;;[.C69]&lt;&gt;&quot;&quot;);CONCATENATE([Variables.$I$1];[Variables.$I$7];[.B69];[Variables.$I$7];[Variables.$I$6];[Variables.$I$7];[.C69];[Variables.$I$7];[Variables.$I$6];[Variables.$I$7];[.D69];[Variables.$I$7];[Variables.$I$6];[.E69];[Variables.$I$6];[.F69];[Variables.$I$6];[.G69];[Variables.$I$6];[.H69];[Variables.$I$6];[Variables.$I$1];[.I69];[.J69];[.K69];[.L69];[.M69];[.N69];[.O69];[Variables.$I$2];[Variables.$I$6];[.P69];[Variables.$I$6];[.Q69];[Variables.$I$6];[.R69];[Variables.$I$6];[.S69];[Variables.$I$6];[.T69];IF([.U69]&lt;&gt;&quot;&quot;;CONCATENATE([Variables.$I$6];[.U69]);&quot;&quot;);[Variables.$I$2];[Variables.$I$6]);IF([.B69]&lt;&gt;&quot;&quot;;CONCATENATE(&quot;#&quot;;[.B69]);&quot;&quot;))" office:value-type="string" office:string-value="[&quot;i5_dwarf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" calcext:value-type="string">
            <text:p>["i5_dwarf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</text:p>
          </table:table-cell>
          <table:table-cell table:number-columns-repeated="16362"/>
        </table:table-row>
        <table:table-row table:style-name="ro1">
          <table:table-cell table:style-name="ce6" table:formula="of:=IF(AND([.B70]&lt;&gt;&quot;&quot;;[.C70]&lt;&gt;&quot;&quot;);CONCATENATE([Variables.$I$1];[Variables.$I$7];[.B70];[Variables.$I$7];[Variables.$I$6];[Variables.$I$7];[.C70];[Variables.$I$7];[Variables.$I$6];[Variables.$I$7];[.D70];[Variables.$I$7];[Variables.$I$6];[.E70];[Variables.$I$6];[.F70];[Variables.$I$6];[.G70];[Variables.$I$6];[.H70];[Variables.$I$6];[Variables.$I$1];[.I70];[.J70];[.K70];[.L70];[.M70];[.N70];[.O70];[Variables.$I$2];[Variables.$I$6];[.P70];[Variables.$I$6];[.Q70];[Variables.$I$6];[.R70];[Variables.$I$6];[.S70];[Variables.$I$6];[.T70];IF([.U70]&lt;&gt;&quot;&quot;;CONCATENATE([Variables.$I$6];[.U70]);&quot;&quot;);[Variables.$I$2];[Variables.$I$6]);IF([.B70]&lt;&gt;&quot;&quot;;CONCATENATE(&quot;#&quot;;[.B70]);&quot;&quot;))" office:value-type="string" office:string-value="[&quot;i6_dwarf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" calcext:value-type="string">
            <text:p>["i6_dwarf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</text:p>
          </table:table-cell>
          <table:table-cell table:style-name="ce7" office:value-type="string" calcext:value-type="string">
            <text:p>i6_dwarf_longpikeman</text:p>
          </table:table-cell>
          <table:table-cell table:style-name="ce7" office:value-type="string" calcext:value-type="string">
            <text:p>Longpike_Dwarf</text:p>
          </table:table-cell>
          <table:table-cell table:style-name="ce7" office:value-type="string" calcext:value-type="string">
            <text:p>Longpike_Dwarves</text:p>
          </table:table-cell>
          <table:table-cell table:style-name="ce8" office:value-type="string" calcext:value-type="string">
            <text:p>tf_dwarf| tfg_armor| tfg_shield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warf</text:p>
          </table:table-cell>
          <table:table-cell table:style-name="ce11" office:value-type="string" calcext:value-type="string">
            <text:p>itm_dwarf_helm_sallet_lordly,</text:p>
          </table:table-cell>
          <table:table-cell table:style-name="ce11" office:value-type="string" calcext:value-type="string">
            <text:p>itm_dwarf_armor_c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dwarf_chain_boots,itm_dwarf_scale_boots,</text:p>
          </table:table-cell>
          <table:table-cell table:style-name="ce11" office:value-type="string" calcext:value-type="string">
            <text:p>itm_dwarf_spear_b,</text:p>
          </table:table-cell>
          <table:table-cell table:style-name="ce11" office:value-type="string" calcext:value-type="string">
            <text:p>itm_dwarf_shield_c, itm_dwarf_shield_c_good,</text:p>
          </table:table-cell>
          <table:table-cell table:style-name="ce11"/>
          <table:table-cell table:style-name="ce12" office:value-type="string" calcext:value-type="string">
            <text:p>attr_dwarf_tier_6</text:p>
          </table:table-cell>
          <table:table-cell table:style-name="ce12" office:value-type="string" calcext:value-type="string">
            <text:p>wp_dwarf_tier_6</text:p>
          </table:table-cell>
          <table:table-cell table:style-name="ce12" office:value-type="string" calcext:value-type="string">
            <text:p>knows_common_dwarf|knows_athletics_3|knows_power_strike_6|knows_ironflesh_7|knows_shield_5</text:p>
          </table:table-cell>
          <table:table-cell table:number-columns-repeated="2" table:style-name="ce14" office:value-type="string" calcext:value-type="string">
            <text:p>dwarf_face_7</text:p>
          </table:table-cell>
          <table:table-cell table:style-name="ce15"/>
          <table:table-cell table:style-name="ce6" table:formula="of:=IF(AND([.B70]&lt;&gt;&quot;&quot;;[.C70]&lt;&gt;&quot;&quot;);CONCATENATE([Variables.$I$1];[Variables.$I$7];[.B70];[Variables.$I$7];[Variables.$I$6];[Variables.$I$7];[.C70];[Variables.$I$7];[Variables.$I$6];[Variables.$I$7];[.D70];[Variables.$I$7];[Variables.$I$6];[.E70];[Variables.$I$6];[.F70];[Variables.$I$6];[.G70];[Variables.$I$6];[.H70];[Variables.$I$6];[Variables.$I$1];[.I70];[.J70];[.K70];[.L70];[.M70];[.N70];[.O70];[Variables.$I$2];[Variables.$I$6];[.P70];[Variables.$I$6];[.Q70];[Variables.$I$6];[.R70];[Variables.$I$6];[.S70];[Variables.$I$6];[.T70];IF([.U70]&lt;&gt;&quot;&quot;;CONCATENATE([Variables.$I$6];[.U70]);&quot;&quot;);[Variables.$I$2];[Variables.$I$6]);IF([.B70]&lt;&gt;&quot;&quot;;CONCATENATE(&quot;#&quot;;[.B70]);&quot;&quot;))" office:value-type="string" office:string-value="[&quot;i6_dwarf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" calcext:value-type="string">
            <text:p>["i6_dwarf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</text:p>
          </table:table-cell>
          <table:table-cell table:number-columns-repeated="16362"/>
        </table:table-row>
        <table:table-row table:style-name="ro1">
          <table:table-cell table:style-name="ce6" table:formula="of:=IF(AND([.B71]&lt;&gt;&quot;&quot;;[.C71]&lt;&gt;&quot;&quot;);CONCATENATE([Variables.$I$1];[Variables.$I$7];[.B71];[Variables.$I$7];[Variables.$I$6];[Variables.$I$7];[.C71];[Variables.$I$7];[Variables.$I$6];[Variables.$I$7];[.D71];[Variables.$I$7];[Variables.$I$6];[.E71];[Variables.$I$6];[.F71];[Variables.$I$6];[.G71];[Variables.$I$6];[.H71];[Variables.$I$6];[Variables.$I$1];[.I71];[.J71];[.K71];[.L71];[.M71];[.N71];[.O71];[Variables.$I$2];[Variables.$I$6];[.P71];[Variables.$I$6];[.Q71];[Variables.$I$6];[.R71];[Variables.$I$6];[.S71];[Variables.$I$6];[.T71];IF([.U71]&lt;&gt;&quot;&quot;;CONCATENATE([Variables.$I$6];[.U71]);&quot;&quot;);[Variables.$I$2];[Variables.$I$6]);IF([.B71]&lt;&gt;&quot;&quot;;CONCATENATE(&quot;#&quot;;[.B71]);&quot;&quot;))" office:value-type="string" office:string-value="[&quot;i4_dwarf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" calcext:value-type="string">
            <text:p>["i4_dwarf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</text:p>
          </table:table-cell>
          <table:table-cell table:style-name="ce7" office:value-type="string" calcext:value-type="string">
            <text:p>i4_dwarf_axeman</text:p>
          </table:table-cell>
          <table:table-cell table:style-name="ce7" office:value-type="string" calcext:value-type="string">
            <text:p>Axedwarf</text:p>
          </table:table-cell>
          <table:table-cell table:style-name="ce7" office:value-type="string" calcext:value-type="string">
            <text:p>Axe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warf</text:p>
          </table:table-cell>
          <table:table-cell table:style-name="ce11" office:value-type="string" calcext:value-type="string">
            <text:p>itm_dwarf_helm_coif_lordly, itm_dwarf_helm_kettle, itm_dwarf_helm_round,</text:p>
          </table:table-cell>
          <table:table-cell table:style-name="ce11" office:value-type="string" calcext:value-type="string">
            <text:p>itm_dwarf_armor_a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dwarf_chain_boots,</text:p>
          </table:table-cell>
          <table:table-cell table:style-name="ce11" office:value-type="string" calcext:value-type="string">
            <text:p><text:s/>itm_dwarf_hand_axe,</text:p>
          </table:table-cell>
          <table:table-cell table:style-name="ce11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1"/>
          <table:table-cell table:style-name="ce12" office:value-type="string" calcext:value-type="string">
            <text:p>attr_dwarf_tier_4</text:p>
          </table:table-cell>
          <table:table-cell table:style-name="ce12" office:value-type="string" calcext:value-type="string">
            <text:p>wp_dwarf_tier_4</text:p>
          </table:table-cell>
          <table:table-cell table:style-name="ce12" office:value-type="string" calcext:value-type="string">
            <text:p>knows_common_dwarf|knows_athletics_2|knows_power_throw_2|knows_power_strike_5|knows_ironflesh_5|knows_shield_4</text:p>
          </table:table-cell>
          <table:table-cell table:style-name="ce14" office:value-type="string" calcext:value-type="string">
            <text:p>dwarf_face_1</text:p>
          </table:table-cell>
          <table:table-cell table:style-name="ce14" office:value-type="string" calcext:value-type="string">
            <text:p>dwarf_face_2</text:p>
          </table:table-cell>
          <table:table-cell table:style-name="ce15"/>
          <table:table-cell table:style-name="ce6" table:formula="of:=IF(AND([.B71]&lt;&gt;&quot;&quot;;[.C71]&lt;&gt;&quot;&quot;);CONCATENATE([Variables.$I$1];[Variables.$I$7];[.B71];[Variables.$I$7];[Variables.$I$6];[Variables.$I$7];[.C71];[Variables.$I$7];[Variables.$I$6];[Variables.$I$7];[.D71];[Variables.$I$7];[Variables.$I$6];[.E71];[Variables.$I$6];[.F71];[Variables.$I$6];[.G71];[Variables.$I$6];[.H71];[Variables.$I$6];[Variables.$I$1];[.I71];[.J71];[.K71];[.L71];[.M71];[.N71];[.O71];[Variables.$I$2];[Variables.$I$6];[.P71];[Variables.$I$6];[.Q71];[Variables.$I$6];[.R71];[Variables.$I$6];[.S71];[Variables.$I$6];[.T71];IF([.U71]&lt;&gt;&quot;&quot;;CONCATENATE([Variables.$I$6];[.U71]);&quot;&quot;);[Variables.$I$2];[Variables.$I$6]);IF([.B71]&lt;&gt;&quot;&quot;;CONCATENATE(&quot;#&quot;;[.B71]);&quot;&quot;))" office:value-type="string" office:string-value="[&quot;i4_dwarf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" calcext:value-type="string">
            <text:p>["i4_dwarf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</text:p>
          </table:table-cell>
          <table:table-cell table:number-columns-repeated="16362"/>
        </table:table-row>
        <table:table-row table:style-name="ro1">
          <table:table-cell table:style-name="ce6" table:formula="of:=IF(AND([.B72]&lt;&gt;&quot;&quot;;[.C72]&lt;&gt;&quot;&quot;);CONCATENATE([Variables.$I$1];[Variables.$I$7];[.B72];[Variables.$I$7];[Variables.$I$6];[Variables.$I$7];[.C72];[Variables.$I$7];[Variables.$I$6];[Variables.$I$7];[.D72];[Variables.$I$7];[Variables.$I$6];[.E72];[Variables.$I$6];[.F72];[Variables.$I$6];[.G72];[Variables.$I$6];[.H72];[Variables.$I$6];[Variables.$I$1];[.I72];[.J72];[.K72];[.L72];[.M72];[.N72];[.O72];[Variables.$I$2];[Variables.$I$6];[.P72];[Variables.$I$6];[.Q72];[Variables.$I$6];[.R72];[Variables.$I$6];[.S72];[Variables.$I$6];[.T72];IF([.U72]&lt;&gt;&quot;&quot;;CONCATENATE([Variables.$I$6];[.U72]);&quot;&quot;);[Variables.$I$2];[Variables.$I$6]);IF([.B72]&lt;&gt;&quot;&quot;;CONCATENATE(&quot;#&quot;;[.B72]);&quot;&quot;))" office:value-type="string" office:string-value="[&quot;i5_dwarf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" calcext:value-type="string">
            <text:p>["i5_dwarf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</text:p>
          </table:table-cell>
          <table:table-cell table:style-name="ce7" office:value-type="string" calcext:value-type="string">
            <text:p>i5_dwarf_expert_axeman</text:p>
          </table:table-cell>
          <table:table-cell table:style-name="ce7" office:value-type="string" calcext:value-type="string">
            <text:p>Expert_Axedwarf</text:p>
          </table:table-cell>
          <table:table-cell table:style-name="ce7" office:value-type="string" calcext:value-type="string">
            <text:p>Expert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warf</text:p>
          </table:table-cell>
          <table:table-cell table:style-name="ce11" office:value-type="string" calcext:value-type="string">
            <text:p>itm_dwarf_helm_sallet,</text:p>
          </table:table-cell>
          <table:table-cell table:style-name="ce11" office:value-type="string" calcext:value-type="string">
            <text:p>itm_dwarf_armor_a_lordly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dwarf_chain_boots,</text:p>
          </table:table-cell>
          <table:table-cell table:style-name="ce11" office:value-type="string" calcext:value-type="string">
            <text:p><text:s/>itm_dwarf_hand_axe, itm_dwarf_battle_axe,</text:p>
          </table:table-cell>
          <table:table-cell table:style-name="ce11" office:value-type="string" calcext:value-type="string">
            <text:p>itm_dwarf_throwing_axe,itm_dwarf_throwing_axe,itm_dwarf_shield_b,</text:p>
          </table:table-cell>
          <table:table-cell table:style-name="ce11"/>
          <table:table-cell table:style-name="ce12" office:value-type="string" calcext:value-type="string">
            <text:p>attr_dwarf_tier_5</text:p>
          </table:table-cell>
          <table:table-cell table:style-name="ce12" office:value-type="string" calcext:value-type="string">
            <text:p>wp_dwarf_tier_5</text:p>
          </table:table-cell>
          <table:table-cell table:style-name="ce12" office:value-type="string" calcext:value-type="string">
            <text:p>knows_common_dwarf|knows_athletics_3|knows_power_throw_4|knows_power_strike_6|knows_ironflesh_6|knows_shield_5</text:p>
          </table:table-cell>
          <table:table-cell table:style-name="ce14" office:value-type="string" calcext:value-type="string">
            <text:p>dwarf_face_3</text:p>
          </table:table-cell>
          <table:table-cell table:style-name="ce14" office:value-type="string" calcext:value-type="string">
            <text:p>dwarf_face_4</text:p>
          </table:table-cell>
          <table:table-cell table:style-name="ce15"/>
          <table:table-cell table:style-name="ce6" table:formula="of:=IF(AND([.B72]&lt;&gt;&quot;&quot;;[.C72]&lt;&gt;&quot;&quot;);CONCATENATE([Variables.$I$1];[Variables.$I$7];[.B72];[Variables.$I$7];[Variables.$I$6];[Variables.$I$7];[.C72];[Variables.$I$7];[Variables.$I$6];[Variables.$I$7];[.D72];[Variables.$I$7];[Variables.$I$6];[.E72];[Variables.$I$6];[.F72];[Variables.$I$6];[.G72];[Variables.$I$6];[.H72];[Variables.$I$6];[Variables.$I$1];[.I72];[.J72];[.K72];[.L72];[.M72];[.N72];[.O72];[Variables.$I$2];[Variables.$I$6];[.P72];[Variables.$I$6];[.Q72];[Variables.$I$6];[.R72];[Variables.$I$6];[.S72];[Variables.$I$6];[.T72];IF([.U72]&lt;&gt;&quot;&quot;;CONCATENATE([Variables.$I$6];[.U72]);&quot;&quot;);[Variables.$I$2];[Variables.$I$6]);IF([.B72]&lt;&gt;&quot;&quot;;CONCATENATE(&quot;#&quot;;[.B72]);&quot;&quot;))" office:value-type="string" office:string-value="[&quot;i5_dwarf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" calcext:value-type="string">
            <text:p>["i5_dwarf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</text:p>
          </table:table-cell>
          <table:table-cell table:number-columns-repeated="16362"/>
        </table:table-row>
        <table:table-row table:style-name="ro1">
          <table:table-cell table:style-name="ce6" table:formula="of:=IF(AND([.B73]&lt;&gt;&quot;&quot;;[.C73]&lt;&gt;&quot;&quot;);CONCATENATE([Variables.$I$1];[Variables.$I$7];[.B73];[Variables.$I$7];[Variables.$I$6];[Variables.$I$7];[.C73];[Variables.$I$7];[Variables.$I$6];[Variables.$I$7];[.D73];[Variables.$I$7];[Variables.$I$6];[.E73];[Variables.$I$6];[.F73];[Variables.$I$6];[.G73];[Variables.$I$6];[.H73];[Variables.$I$6];[Variables.$I$1];[.I73];[.J73];[.K73];[.L73];[.M73];[.N73];[.O73];[Variables.$I$2];[Variables.$I$6];[.P73];[Variables.$I$6];[.Q73];[Variables.$I$6];[.R73];[Variables.$I$6];[.S73];[Variables.$I$6];[.T73];IF([.U73]&lt;&gt;&quot;&quot;;CONCATENATE([Variables.$I$6];[.U73]);&quot;&quot;);[Variables.$I$2];[Variables.$I$6]);IF([.B73]&lt;&gt;&quot;&quot;;CONCATENATE(&quot;#&quot;;[.B73]);&quot;&quot;))" office:value-type="string" office:string-value="[&quot;i6_dwarf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" calcext:value-type="string">
            <text:p>["i6_dwarf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</text:p>
          </table:table-cell>
          <table:table-cell table:style-name="ce7" office:value-type="string" calcext:value-type="string">
            <text:p>i6_dwarf_longbeard_axeman</text:p>
          </table:table-cell>
          <table:table-cell table:style-name="ce7" office:value-type="string" calcext:value-type="string">
            <text:p>Longbeard_Axedwarf</text:p>
          </table:table-cell>
          <table:table-cell table:style-name="ce7" office:value-type="string" calcext:value-type="string">
            <text:p>Longbeard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warf</text:p>
          </table:table-cell>
          <table:table-cell table:style-name="ce11" office:value-type="string" calcext:value-type="string">
            <text:p>itm_dwarf_helm_sallet_lordly,</text:p>
          </table:table-cell>
          <table:table-cell table:style-name="ce11" office:value-type="string" calcext:value-type="string">
            <text:p>itm_leather_dwarf_armor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dwarf_scale_boots,</text:p>
          </table:table-cell>
          <table:table-cell table:style-name="ce11" office:value-type="string" calcext:value-type="string">
            <text:p>itm_dwarf_battle_axe,</text:p>
          </table:table-cell>
          <table:table-cell table:style-name="ce11" office:value-type="string" calcext:value-type="string">
            <text:p>itm_dwarf_throwing_axe,itm_dwarf_throwing_axe,itm_dwarf_shield_b_good,</text:p>
          </table:table-cell>
          <table:table-cell table:style-name="ce11"/>
          <table:table-cell table:style-name="ce12" office:value-type="string" calcext:value-type="string">
            <text:p>attr_dwarf_tier_6</text:p>
          </table:table-cell>
          <table:table-cell table:style-name="ce12" office:value-type="string" calcext:value-type="string">
            <text:p>wp_dwarf_tier_6</text:p>
          </table:table-cell>
          <table:table-cell table:style-name="ce12" office:value-type="string" calcext:value-type="string">
            <text:p>knows_common_dwarf|knows_athletics_3|knows_power_throw_5|knows_power_strike_7|knows_ironflesh_7|knows_shield_6</text:p>
          </table:table-cell>
          <table:table-cell table:number-columns-repeated="2" table:style-name="ce14" office:value-type="string" calcext:value-type="string">
            <text:p>dwarf_face_7</text:p>
          </table:table-cell>
          <table:table-cell table:style-name="ce15"/>
          <table:table-cell table:style-name="ce6" table:formula="of:=IF(AND([.B73]&lt;&gt;&quot;&quot;;[.C73]&lt;&gt;&quot;&quot;);CONCATENATE([Variables.$I$1];[Variables.$I$7];[.B73];[Variables.$I$7];[Variables.$I$6];[Variables.$I$7];[.C73];[Variables.$I$7];[Variables.$I$6];[Variables.$I$7];[.D73];[Variables.$I$7];[Variables.$I$6];[.E73];[Variables.$I$6];[.F73];[Variables.$I$6];[.G73];[Variables.$I$6];[.H73];[Variables.$I$6];[Variables.$I$1];[.I73];[.J73];[.K73];[.L73];[.M73];[.N73];[.O73];[Variables.$I$2];[Variables.$I$6];[.P73];[Variables.$I$6];[.Q73];[Variables.$I$6];[.R73];[Variables.$I$6];[.S73];[Variables.$I$6];[.T73];IF([.U73]&lt;&gt;&quot;&quot;;CONCATENATE([Variables.$I$6];[.U73]);&quot;&quot;);[Variables.$I$2];[Variables.$I$6]);IF([.B73]&lt;&gt;&quot;&quot;;CONCATENATE(&quot;#&quot;;[.B73]);&quot;&quot;))" office:value-type="string" office:string-value="[&quot;i6_dwarf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" calcext:value-type="string">
            <text:p>["i6_dwarf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</text:p>
          </table:table-cell>
          <table:table-cell table:number-columns-repeated="16362"/>
        </table:table-row>
        <table:table-row table:style-name="ro1">
          <table:table-cell table:style-name="ce6" table:formula="of:=IF(AND([.B74]&lt;&gt;&quot;&quot;;[.C74]&lt;&gt;&quot;&quot;);CONCATENATE([Variables.$I$1];[Variables.$I$7];[.B74];[Variables.$I$7];[Variables.$I$6];[Variables.$I$7];[.C74];[Variables.$I$7];[Variables.$I$6];[Variables.$I$7];[.D74];[Variables.$I$7];[Variables.$I$6];[.E74];[Variables.$I$6];[.F74];[Variables.$I$6];[.G74];[Variables.$I$6];[.H74];[Variables.$I$6];[Variables.$I$1];[.I74];[.J74];[.K74];[.L74];[.M74];[.N74];[.O74];[Variables.$I$2];[Variables.$I$6];[.P74];[Variables.$I$6];[.Q74];[Variables.$I$6];[.R74];[Variables.$I$6];[.S74];[Variables.$I$6];[.T74];IF([.U74]&lt;&gt;&quot;&quot;;CONCATENATE([Variables.$I$6];[.U74]);&quot;&quot;);[Variables.$I$2];[Variables.$I$6]);IF([.B74]&lt;&gt;&quot;&quot;;CONCATENATE(&quot;#&quot;;[.B74]);&quot;&quot;))" office:value-type="string" office:string-value="[&quot;a2_dwarf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" calcext:value-type="string">
            <text:p>["a2_dwarf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</text:p>
          </table:table-cell>
          <table:table-cell table:style-name="ce7" office:value-type="string" calcext:value-type="string">
            <text:p>a2_dwarf_lookout</text:p>
          </table:table-cell>
          <table:table-cell table:style-name="ce7" office:value-type="string" calcext:value-type="string">
            <text:p>Lookout-dwarf</text:p>
          </table:table-cell>
          <table:table-cell table:style-name="ce7" office:value-type="string" calcext:value-type="string">
            <text:p>Lookout-dwarves</text:p>
          </table:table-cell>
          <table:table-cell table:style-name="ce8" office:value-type="string" calcext:value-type="string">
            <text:p>tf_dwarf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warf</text:p>
          </table:table-cell>
          <table:table-cell table:style-name="ce11" office:value-type="string" calcext:value-type="string">
            <text:p>itm_dwarf_hood, itm_dwarf_miner, <text:s/>itm_dwarf_miner_nasal,</text:p>
          </table:table-cell>
          <table:table-cell table:style-name="ce11" office:value-type="string" calcext:value-type="string">
            <text:p>itm_dwarf_vest,itm_dwarf_vest_lordly,</text:p>
          </table:table-cell>
          <table:table-cell table:style-name="ce11"/>
          <table:table-cell table:style-name="ce11" office:value-type="string" calcext:value-type="string">
            <text:p>itm_dwarf_pad_boots,</text:p>
          </table:table-cell>
          <table:table-cell table:style-name="ce11" office:value-type="string" calcext:value-type="string">
            <text:p>itm_short_bow, itm_arrows,</text:p>
          </table:table-cell>
          <table:table-cell table:style-name="ce11" office:value-type="string" calcext:value-type="string">
            <text:p>itm_dwarf_hand_axe, itm_dwarf_sword_a,</text:p>
          </table:table-cell>
          <table:table-cell table:style-name="ce11"/>
          <table:table-cell table:style-name="ce12" office:value-type="string" calcext:value-type="string">
            <text:p>attr_dwarf_tier_2</text:p>
          </table:table-cell>
          <table:table-cell table:style-name="ce12" office:value-type="string" calcext:value-type="string">
            <text:p>wp_dwarf_tier_1</text:p>
          </table:table-cell>
          <table:table-cell table:style-name="ce13" office:value-type="string" calcext:value-type="string">
            <text:p>knows_common|knows_ironflesh_3|knows_power_strike_1|knows_power_throw_1|knows_power_draw_1|knows_athletics_2|knows_trainer_1|knows_pathfinding_1|knows_spotting_1|knows_inventory_management_2|knows_wound_treatment_1|knows_trade_2</text:p>
          </table:table-cell>
          <table:table-cell table:style-name="ce14" office:value-type="string" calcext:value-type="string">
            <text:p>dwarf_face_1</text:p>
          </table:table-cell>
          <table:table-cell table:style-name="ce14" office:value-type="string" calcext:value-type="string">
            <text:p>dwarf_face_2</text:p>
          </table:table-cell>
          <table:table-cell table:style-name="ce15"/>
          <table:table-cell table:style-name="ce6" table:formula="of:=IF(AND([.B74]&lt;&gt;&quot;&quot;;[.C74]&lt;&gt;&quot;&quot;);CONCATENATE([Variables.$I$1];[Variables.$I$7];[.B74];[Variables.$I$7];[Variables.$I$6];[Variables.$I$7];[.C74];[Variables.$I$7];[Variables.$I$6];[Variables.$I$7];[.D74];[Variables.$I$7];[Variables.$I$6];[.E74];[Variables.$I$6];[.F74];[Variables.$I$6];[.G74];[Variables.$I$6];[.H74];[Variables.$I$6];[Variables.$I$1];[.I74];[.J74];[.K74];[.L74];[.M74];[.N74];[.O74];[Variables.$I$2];[Variables.$I$6];[.P74];[Variables.$I$6];[.Q74];[Variables.$I$6];[.R74];[Variables.$I$6];[.S74];[Variables.$I$6];[.T74];IF([.U74]&lt;&gt;&quot;&quot;;CONCATENATE([Variables.$I$6];[.U74]);&quot;&quot;);[Variables.$I$2];[Variables.$I$6]);IF([.B74]&lt;&gt;&quot;&quot;;CONCATENATE(&quot;#&quot;;[.B74]);&quot;&quot;))" office:value-type="string" office:string-value="[&quot;a2_dwarf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" calcext:value-type="string">
            <text:p>["a2_dwarf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</text:p>
          </table:table-cell>
          <table:table-cell table:number-columns-repeated="16362"/>
        </table:table-row>
        <table:table-row table:style-name="ro1">
          <table:table-cell table:style-name="ce6" table:formula="of:=IF(AND([.B75]&lt;&gt;&quot;&quot;;[.C75]&lt;&gt;&quot;&quot;);CONCATENATE([Variables.$I$1];[Variables.$I$7];[.B75];[Variables.$I$7];[Variables.$I$6];[Variables.$I$7];[.C75];[Variables.$I$7];[Variables.$I$6];[Variables.$I$7];[.D75];[Variables.$I$7];[Variables.$I$6];[.E75];[Variables.$I$6];[.F75];[Variables.$I$6];[.G75];[Variables.$I$6];[.H75];[Variables.$I$6];[Variables.$I$1];[.I75];[.J75];[.K75];[.L75];[.M75];[.N75];[.O75];[Variables.$I$2];[Variables.$I$6];[.P75];[Variables.$I$6];[.Q75];[Variables.$I$6];[.R75];[Variables.$I$6];[.S75];[Variables.$I$6];[.T75];IF([.U75]&lt;&gt;&quot;&quot;;CONCATENATE([Variables.$I$6];[.U75]);&quot;&quot;);[Variables.$I$2];[Variables.$I$6]);IF([.B75]&lt;&gt;&quot;&quot;;CONCATENATE(&quot;#&quot;;[.B75]);&quot;&quot;))" office:value-type="string" office:string-value="[&quot;a3_dwarf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" calcext:value-type="string">
            <text:p>["a3_dwarf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</text:p>
          </table:table-cell>
          <table:table-cell table:style-name="ce7" office:value-type="string" calcext:value-type="string">
            <text:p>a3_dwarf_scout</text:p>
          </table:table-cell>
          <table:table-cell table:style-name="ce7" office:value-type="string" calcext:value-type="string">
            <text:p>Scout-dwarf</text:p>
          </table:table-cell>
          <table:table-cell table:style-name="ce7" office:value-type="string" calcext:value-type="string">
            <text:p>Scout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warf</text:p>
          </table:table-cell>
          <table:table-cell table:style-name="ce11" office:value-type="string" calcext:value-type="string">
            <text:p>itm_dwarf_hood, itm_dwarf_helm_coif, itm_dwarf_miner, <text:s/>itm_dwarf_miner_nasal,</text:p>
          </table:table-cell>
          <table:table-cell table:style-name="ce11" office:value-type="string" calcext:value-type="string">
            <text:p>itm_dwarf_vest_lordly,itm_dwarf_armor_a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dwarf_pad_boots,</text:p>
          </table:table-cell>
          <table:table-cell table:style-name="ce11" office:value-type="string" calcext:value-type="string">
            <text:p>itm_dwarf_short_bow, itm_arrows,</text:p>
          </table:table-cell>
          <table:table-cell table:style-name="ce11" office:value-type="string" calcext:value-type="string">
            <text:p>itm_dwarf_hand_axe, itm_dwarf_sword_a,</text:p>
          </table:table-cell>
          <table:table-cell table:style-name="ce11"/>
          <table:table-cell table:style-name="ce12" office:value-type="string" calcext:value-type="string">
            <text:p>attr_dwarf_tier_3</text:p>
          </table:table-cell>
          <table:table-cell table:style-name="ce12" office:value-type="string" calcext:value-type="string">
            <text:p>wp_dwarf_tier_2</text:p>
          </table:table-cell>
          <table:table-cell table:style-name="ce12" office:value-type="string" calcext:value-type="string">
            <text:p>knows_common_dwarf|knows_athletics_4|knows_power_draw_2|knows_power_strike_2|knows_ironflesh_4</text:p>
          </table:table-cell>
          <table:table-cell table:style-name="ce14" office:value-type="string" calcext:value-type="string">
            <text:p>dwarf_face_4</text:p>
          </table:table-cell>
          <table:table-cell table:style-name="ce14" office:value-type="string" calcext:value-type="string">
            <text:p>dwarf_face_5</text:p>
          </table:table-cell>
          <table:table-cell table:style-name="ce15"/>
          <table:table-cell table:style-name="ce6" table:formula="of:=IF(AND([.B75]&lt;&gt;&quot;&quot;;[.C75]&lt;&gt;&quot;&quot;);CONCATENATE([Variables.$I$1];[Variables.$I$7];[.B75];[Variables.$I$7];[Variables.$I$6];[Variables.$I$7];[.C75];[Variables.$I$7];[Variables.$I$6];[Variables.$I$7];[.D75];[Variables.$I$7];[Variables.$I$6];[.E75];[Variables.$I$6];[.F75];[Variables.$I$6];[.G75];[Variables.$I$6];[.H75];[Variables.$I$6];[Variables.$I$1];[.I75];[.J75];[.K75];[.L75];[.M75];[.N75];[.O75];[Variables.$I$2];[Variables.$I$6];[.P75];[Variables.$I$6];[.Q75];[Variables.$I$6];[.R75];[Variables.$I$6];[.S75];[Variables.$I$6];[.T75];IF([.U75]&lt;&gt;&quot;&quot;;CONCATENATE([Variables.$I$6];[.U75]);&quot;&quot;);[Variables.$I$2];[Variables.$I$6]);IF([.B75]&lt;&gt;&quot;&quot;;CONCATENATE(&quot;#&quot;;[.B75]);&quot;&quot;))" office:value-type="string" office:string-value="[&quot;a3_dwarf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" calcext:value-type="string">
            <text:p>["a3_dwarf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</text:p>
          </table:table-cell>
          <table:table-cell table:number-columns-repeated="16362"/>
        </table:table-row>
        <table:table-row table:style-name="ro1">
          <table:table-cell table:style-name="ce6" table:formula="of:=IF(AND([.B76]&lt;&gt;&quot;&quot;;[.C76]&lt;&gt;&quot;&quot;);CONCATENATE([Variables.$I$1];[Variables.$I$7];[.B76];[Variables.$I$7];[Variables.$I$6];[Variables.$I$7];[.C76];[Variables.$I$7];[Variables.$I$6];[Variables.$I$7];[.D76];[Variables.$I$7];[Variables.$I$6];[.E76];[Variables.$I$6];[.F76];[Variables.$I$6];[.G76];[Variables.$I$6];[.H76];[Variables.$I$6];[Variables.$I$1];[.I76];[.J76];[.K76];[.L76];[.M76];[.N76];[.O76];[Variables.$I$2];[Variables.$I$6];[.P76];[Variables.$I$6];[.Q76];[Variables.$I$6];[.R76];[Variables.$I$6];[.S76];[Variables.$I$6];[.T76];IF([.U76]&lt;&gt;&quot;&quot;;CONCATENATE([Variables.$I$6];[.U76]);&quot;&quot;);[Variables.$I$2];[Variables.$I$6]);IF([.B76]&lt;&gt;&quot;&quot;;CONCATENATE(&quot;#&quot;;[.B76]);&quot;&quot;))" office:value-type="string" office:string-value="[&quot;a4_dwarf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f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style-name="ce7" office:value-type="string" calcext:value-type="string">
            <text:p>a4_dwarf_bowman</text:p>
          </table:table-cell>
          <table:table-cell table:style-name="ce7" office:value-type="string" calcext:value-type="string">
            <text:p>Bow-dwarf</text:p>
          </table:table-cell>
          <table:table-cell table:style-name="ce7" office:value-type="string" calcext:value-type="string">
            <text:p>Bow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warf</text:p>
          </table:table-cell>
          <table:table-cell table:style-name="ce11" office:value-type="string" calcext:value-type="string">
            <text:p>itm_dwarf_helm_kettle, itm_dwarf_helm_round,</text:p>
          </table:table-cell>
          <table:table-cell table:style-name="ce11" office:value-type="string" calcext:value-type="string">
            <text:p>itm_dwarf_armor_a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dwarf_pad_boots,</text:p>
          </table:table-cell>
          <table:table-cell table:style-name="ce11" office:value-type="string" calcext:value-type="string">
            <text:p>itm_dwarf_horn_bow, itm_arrows,</text:p>
          </table:table-cell>
          <table:table-cell table:style-name="ce11" office:value-type="string" calcext:value-type="string">
            <text:p>itm_dwarf_hand_axe, itm_dwarf_sword_a_good,</text:p>
          </table:table-cell>
          <table:table-cell table:style-name="ce11"/>
          <table:table-cell table:style-name="ce12" office:value-type="string" calcext:value-type="string">
            <text:p>attr_dwarf_tier_4</text:p>
          </table:table-cell>
          <table:table-cell table:style-name="ce12" office:value-type="string" calcext:value-type="string">
            <text:p>wp_dwarf_tier_3</text:p>
          </table:table-cell>
          <table:table-cell table:style-name="ce12" office:value-type="string" calcext:value-type="string">
            <text:p>knows_common_dwarf|knows_athletics_6|knows_power_draw_4|knows_power_strike_4|knows_ironflesh_5</text:p>
          </table:table-cell>
          <table:table-cell table:style-name="ce14" office:value-type="string" calcext:value-type="string">
            <text:p>dwarf_face_4</text:p>
          </table:table-cell>
          <table:table-cell table:style-name="ce14" office:value-type="string" calcext:value-type="string">
            <text:p>dwarf_face_5</text:p>
          </table:table-cell>
          <table:table-cell table:style-name="ce15"/>
          <table:table-cell table:style-name="ce6" table:formula="of:=IF(AND([.B76]&lt;&gt;&quot;&quot;;[.C76]&lt;&gt;&quot;&quot;);CONCATENATE([Variables.$I$1];[Variables.$I$7];[.B76];[Variables.$I$7];[Variables.$I$6];[Variables.$I$7];[.C76];[Variables.$I$7];[Variables.$I$6];[Variables.$I$7];[.D76];[Variables.$I$7];[Variables.$I$6];[.E76];[Variables.$I$6];[.F76];[Variables.$I$6];[.G76];[Variables.$I$6];[.H76];[Variables.$I$6];[Variables.$I$1];[.I76];[.J76];[.K76];[.L76];[.M76];[.N76];[.O76];[Variables.$I$2];[Variables.$I$6];[.P76];[Variables.$I$6];[.Q76];[Variables.$I$6];[.R76];[Variables.$I$6];[.S76];[Variables.$I$6];[.T76];IF([.U76]&lt;&gt;&quot;&quot;;CONCATENATE([Variables.$I$6];[.U76]);&quot;&quot;);[Variables.$I$2];[Variables.$I$6]);IF([.B76]&lt;&gt;&quot;&quot;;CONCATENATE(&quot;#&quot;;[.B76]);&quot;&quot;))" office:value-type="string" office:string-value="[&quot;a4_dwarf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f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number-columns-repeated="16362"/>
        </table:table-row>
        <table:table-row table:style-name="ro1">
          <table:table-cell table:style-name="ce6" table:formula="of:=IF(AND([.B77]&lt;&gt;&quot;&quot;;[.C77]&lt;&gt;&quot;&quot;);CONCATENATE([Variables.$I$1];[Variables.$I$7];[.B77];[Variables.$I$7];[Variables.$I$6];[Variables.$I$7];[.C77];[Variables.$I$7];[Variables.$I$6];[Variables.$I$7];[.D77];[Variables.$I$7];[Variables.$I$6];[.E77];[Variables.$I$6];[.F77];[Variables.$I$6];[.G77];[Variables.$I$6];[.H77];[Variables.$I$6];[Variables.$I$1];[.I77];[.J77];[.K77];[.L77];[.M77];[.N77];[.O77];[Variables.$I$2];[Variables.$I$6];[.P77];[Variables.$I$6];[.Q77];[Variables.$I$6];[.R77];[Variables.$I$6];[.S77];[Variables.$I$6];[.T77];IF([.U77]&lt;&gt;&quot;&quot;;CONCATENATE([Variables.$I$6];[.U77]);&quot;&quot;);[Variables.$I$2];[Variables.$I$6]);IF([.B77]&lt;&gt;&quot;&quot;;CONCATENATE(&quot;#&quot;;[.B77]);&quot;&quot;))" office:value-type="string" office:string-value="[&quot;i6_dwarf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" calcext:value-type="string">
            <text:p>["i6_dwarf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</text:p>
          </table:table-cell>
          <table:table-cell table:style-name="ce7" office:value-type="string" calcext:value-type="string">
            <text:p>i6_dwarf_longaxeman</text:p>
          </table:table-cell>
          <table:table-cell table:style-name="ce7" office:value-type="string" calcext:value-type="string">
            <text:p>Longaxe Dwarf</text:p>
          </table:table-cell>
          <table:table-cell table:style-name="ce7" office:value-type="string" calcext:value-type="string">
            <text:p>Longaxe Dwarves</text:p>
          </table:table-cell>
          <table:table-cell table:style-name="ce8" office:value-type="string" calcext:value-type="string">
            <text:p>tf_dwarf| tfg_armor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warf</text:p>
          </table:table-cell>
          <table:table-cell table:style-name="ce11" office:value-type="string" calcext:value-type="string">
            <text:p>itm_dwarf_helm_sallet_lordly,</text:p>
          </table:table-cell>
          <table:table-cell table:style-name="ce11" office:value-type="string" calcext:value-type="string">
            <text:p>itm_dwarf_armor_c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dwarf_scale_boots,</text:p>
          </table:table-cell>
          <table:table-cell table:style-name="ce11" office:value-type="string" calcext:value-type="string">
            <text:p>itm_dwarf_spear_c,</text:p>
          </table:table-cell>
          <table:table-cell table:style-name="ce11" table:number-columns-repeated="2"/>
          <table:table-cell table:style-name="ce12" office:value-type="string" calcext:value-type="string">
            <text:p>attr_dwarf_tier_6</text:p>
          </table:table-cell>
          <table:table-cell table:style-name="ce12" office:value-type="string" calcext:value-type="string">
            <text:p>wp_dwarf_tier_6</text:p>
          </table:table-cell>
          <table:table-cell table:style-name="ce12" office:value-type="string" calcext:value-type="string">
            <text:p>knows_common_dwarf|knows_athletics_3|knows_power_strike_6|knows_ironflesh_8</text:p>
          </table:table-cell>
          <table:table-cell table:style-name="ce14" office:value-type="string" calcext:value-type="string">
            <text:p>dwarf_face_4</text:p>
          </table:table-cell>
          <table:table-cell table:style-name="ce14" office:value-type="string" calcext:value-type="string">
            <text:p>dwarf_face_5</text:p>
          </table:table-cell>
          <table:table-cell table:style-name="ce15"/>
          <table:table-cell table:style-name="ce6" table:formula="of:=IF(AND([.B77]&lt;&gt;&quot;&quot;;[.C77]&lt;&gt;&quot;&quot;);CONCATENATE([Variables.$I$1];[Variables.$I$7];[.B77];[Variables.$I$7];[Variables.$I$6];[Variables.$I$7];[.C77];[Variables.$I$7];[Variables.$I$6];[Variables.$I$7];[.D77];[Variables.$I$7];[Variables.$I$6];[.E77];[Variables.$I$6];[.F77];[Variables.$I$6];[.G77];[Variables.$I$6];[.H77];[Variables.$I$6];[Variables.$I$1];[.I77];[.J77];[.K77];[.L77];[.M77];[.N77];[.O77];[Variables.$I$2];[Variables.$I$6];[.P77];[Variables.$I$6];[.Q77];[Variables.$I$6];[.R77];[Variables.$I$6];[.S77];[Variables.$I$6];[.T77];IF([.U77]&lt;&gt;&quot;&quot;;CONCATENATE([Variables.$I$6];[.U77]);&quot;&quot;);[Variables.$I$2];[Variables.$I$6]);IF([.B77]&lt;&gt;&quot;&quot;;CONCATENATE(&quot;#&quot;;[.B77]);&quot;&quot;))" office:value-type="string" office:string-value="[&quot;i6_dwarf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" calcext:value-type="string">
            <text:p>["i6_dwarf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</text:p>
          </table:table-cell>
          <table:table-cell table:number-columns-repeated="16362"/>
        </table:table-row>
        <table:table-row table:style-name="ro1">
          <table:table-cell table:style-name="ce6" table:formula="of:=IF(AND([.B78]&lt;&gt;&quot;&quot;;[.C78]&lt;&gt;&quot;&quot;);CONCATENATE([Variables.$I$1];[Variables.$I$7];[.B78];[Variables.$I$7];[Variables.$I$6];[Variables.$I$7];[.C78];[Variables.$I$7];[Variables.$I$6];[Variables.$I$7];[.D78];[Variables.$I$7];[Variables.$I$6];[.E78];[Variables.$I$6];[.F78];[Variables.$I$6];[.G78];[Variables.$I$6];[.H78];[Variables.$I$6];[Variables.$I$1];[.I78];[.J78];[.K78];[.L78];[.M78];[.N78];[.O78];[Variables.$I$2];[Variables.$I$6];[.P78];[Variables.$I$6];[.Q78];[Variables.$I$6];[.R78];[Variables.$I$6];[.S78];[Variables.$I$6];[.T78];IF([.U78]&lt;&gt;&quot;&quot;;CONCATENATE([Variables.$I$6];[.U78]);&quot;&quot;);[Variables.$I$2];[Variables.$I$6]);IF([.B78]&lt;&gt;&quot;&quot;;CONCATENATE(&quot;#&quot;;[.B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</text:p>
          </table:table-cell>
          <table:table-cell table:style-name="ce7" office:value-type="string" calcext:value-type="string">
            <text:p>i3_iron_hills_warrior</text:p>
          </table:table-cell>
          <table:table-cell table:style-name="ce7" office:value-type="string" calcext:value-type="string">
            <text:p>Iron_Hills_Warrior</text:p>
          </table:table-cell>
          <table:table-cell table:style-name="ce7" office:value-type="string" calcext:value-type="string">
            <text:p>Iron_Hills_Warriors</text:p>
          </table:table-cell>
          <table:table-cell table:style-name="ce8" office:value-type="string" calcext:value-type="string">
            <text:p>tf_dwarf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warf</text:p>
          </table:table-cell>
          <table:table-cell table:style-name="ce11" office:value-type="string" calcext:value-type="string">
            <text:p>itm_dwarf_miner_reinf, itm_dwarf_helm_fris, itm_dwarf_nasal, itm_dwarf_helm_coif_reinf,</text:p>
          </table:table-cell>
          <table:table-cell table:style-name="ce11" office:value-type="string" calcext:value-type="string">
            <text:p>itm_leather_dwarf_armor_b, itm_dwarf_vest_b,itm_leather_dwarf_armor_b_lordly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dwarf_chain_boots,</text:p>
          </table:table-cell>
          <table:table-cell table:style-name="ce11" office:value-type="string" calcext:value-type="string">
            <text:p>itm_dwarf_mattock, itm_dwarf_mattock_good, itm_dwarf_hand_axe, itm_dwarf_sword_a,</text:p>
          </table:table-cell>
          <table:table-cell table:style-name="ce11" office:value-type="string" calcext:value-type="string">
            <text:p>itm_dwarf_shield_d, itm_dwarf_shield_d_good,</text:p>
          </table:table-cell>
          <table:table-cell table:style-name="ce11"/>
          <table:table-cell table:style-name="ce12" office:value-type="string" calcext:value-type="string">
            <text:p>attr_dwarf_tier_3</text:p>
          </table:table-cell>
          <table:table-cell table:style-name="ce12" office:value-type="string" calcext:value-type="string">
            <text:p>wp_dwarf_tier_3</text:p>
          </table:table-cell>
          <table:table-cell table:style-name="ce13" office:value-type="string" calcext:value-type="string">
            <text:p>knows_common|knows_ironflesh_2|knows_power_strike_3|knows_power_throw_1|knows_athletics_3|knows_looting_1|knows_trainer_1|knows_tactics_1|knows_pathfinding_1|knows_surgery_1|knows_prisoner_management_1|knows_trade_1</text:p>
          </table:table-cell>
          <table:table-cell table:style-name="ce14" office:value-type="string" calcext:value-type="string">
            <text:p>dwarf_face_3</text:p>
          </table:table-cell>
          <table:table-cell table:style-name="ce14" office:value-type="string" calcext:value-type="string">
            <text:p>dwarf_face_4</text:p>
          </table:table-cell>
          <table:table-cell table:style-name="ce15"/>
          <table:table-cell table:style-name="ce6" table:formula="of:=IF(AND([.B78]&lt;&gt;&quot;&quot;;[.C78]&lt;&gt;&quot;&quot;);CONCATENATE([Variables.$I$1];[Variables.$I$7];[.B78];[Variables.$I$7];[Variables.$I$6];[Variables.$I$7];[.C78];[Variables.$I$7];[Variables.$I$6];[Variables.$I$7];[.D78];[Variables.$I$7];[Variables.$I$6];[.E78];[Variables.$I$6];[.F78];[Variables.$I$6];[.G78];[Variables.$I$6];[.H78];[Variables.$I$6];[Variables.$I$1];[.I78];[.J78];[.K78];[.L78];[.M78];[.N78];[.O78];[Variables.$I$2];[Variables.$I$6];[.P78];[Variables.$I$6];[.Q78];[Variables.$I$6];[.R78];[Variables.$I$6];[.S78];[Variables.$I$6];[.T78];IF([.U78]&lt;&gt;&quot;&quot;;CONCATENATE([Variables.$I$6];[.U78]);&quot;&quot;);[Variables.$I$2];[Variables.$I$6]);IF([.B78]&lt;&gt;&quot;&quot;;CONCATENATE(&quot;#&quot;;[.B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</text:p>
          </table:table-cell>
          <table:table-cell table:number-columns-repeated="16362"/>
        </table:table-row>
        <table:table-row table:style-name="ro1">
          <table:table-cell table:style-name="ce6" table:formula="of:=IF(AND([.B79]&lt;&gt;&quot;&quot;;[.C79]&lt;&gt;&quot;&quot;);CONCATENATE([Variables.$I$1];[Variables.$I$7];[.B79];[Variables.$I$7];[Variables.$I$6];[Variables.$I$7];[.C79];[Variables.$I$7];[Variables.$I$6];[Variables.$I$7];[.D79];[Variables.$I$7];[Variables.$I$6];[.E79];[Variables.$I$6];[.F79];[Variables.$I$6];[.G79];[Variables.$I$6];[.H79];[Variables.$I$6];[Variables.$I$1];[.I79];[.J79];[.K79];[.L79];[.M79];[.N79];[.O79];[Variables.$I$2];[Variables.$I$6];[.P79];[Variables.$I$6];[.Q79];[Variables.$I$6];[.R79];[Variables.$I$6];[.S79];[Variables.$I$6];[.T79];IF([.U79]&lt;&gt;&quot;&quot;;CONCATENATE([Variables.$I$6];[.U79]);&quot;&quot;);[Variables.$I$2];[Variables.$I$6]);IF([.B79]&lt;&gt;&quot;&quot;;CONCATENATE(&quot;#&quot;;[.B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</text:p>
          </table:table-cell>
          <table:table-cell table:style-name="ce7" office:value-type="string" calcext:value-type="string">
            <text:p>i2_iron_hills_miner</text:p>
          </table:table-cell>
          <table:table-cell table:style-name="ce7" office:value-type="string" calcext:value-type="string">
            <text:p>Iron_Hills_Miner</text:p>
          </table:table-cell>
          <table:table-cell table:style-name="ce7" office:value-type="string" calcext:value-type="string">
            <text:p>Iron_Hills_Miner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warf</text:p>
          </table:table-cell>
          <table:table-cell table:style-name="ce11" office:value-type="string" calcext:value-type="string">
            <text:p>itm_dwarf_miner, itm_dwarf_miner_reinf,</text:p>
          </table:table-cell>
          <table:table-cell table:style-name="ce11" office:value-type="string" calcext:value-type="string">
            <text:p>itm_dwarf_vest,itm_dwarf_vest_lordly,itm_leather_dwarf_armor_b,</text:p>
          </table:table-cell>
          <table:table-cell table:style-name="ce11"/>
          <table:table-cell table:style-name="ce11" office:value-type="string" calcext:value-type="string">
            <text:p>itm_dwarf_pad_boots,</text:p>
          </table:table-cell>
          <table:table-cell table:style-name="ce11" office:value-type="string" calcext:value-type="string">
            <text:p>itm_dwarf_mattock, itm_dwarf_mattock_good, itm_dwarf_hand_axe, itm_dwarf_sword_a,</text:p>
          </table:table-cell>
          <table:table-cell table:style-name="ce11" office:value-type="string" calcext:value-type="string">
            <text:p>itm_dwarf_shield_d, itm_dwarf_shield_d_good,</text:p>
          </table:table-cell>
          <table:table-cell table:style-name="ce11"/>
          <table:table-cell table:style-name="ce12" office:value-type="string" calcext:value-type="string">
            <text:p>attr_dwarf_tier_2</text:p>
          </table:table-cell>
          <table:table-cell table:style-name="ce12" office:value-type="string" calcext:value-type="string">
            <text:p>wp_dwarf_tier_2</text:p>
          </table:table-cell>
          <table:table-cell table:style-name="ce13" office:value-type="string" calcext:value-type="string">
            <text:p>knows_common|knows_ironflesh_2|knows_power_strike_2|knows_power_throw_1|knows_athletics_2|knows_looting_1|knows_trainer_1|knows_tactics_1|knows_pathfinding_1|knows_surgery_1|knows_prisoner_management_1|knows_trade_1</text:p>
          </table:table-cell>
          <table:table-cell table:style-name="ce14" office:value-type="string" calcext:value-type="string">
            <text:p>dwarf_face_1</text:p>
          </table:table-cell>
          <table:table-cell table:style-name="ce14" office:value-type="string" calcext:value-type="string">
            <text:p>dwarf_face_2</text:p>
          </table:table-cell>
          <table:table-cell table:style-name="ce15"/>
          <table:table-cell table:style-name="ce6" table:formula="of:=IF(AND([.B79]&lt;&gt;&quot;&quot;;[.C79]&lt;&gt;&quot;&quot;);CONCATENATE([Variables.$I$1];[Variables.$I$7];[.B79];[Variables.$I$7];[Variables.$I$6];[Variables.$I$7];[.C79];[Variables.$I$7];[Variables.$I$6];[Variables.$I$7];[.D79];[Variables.$I$7];[Variables.$I$6];[.E79];[Variables.$I$6];[.F79];[Variables.$I$6];[.G79];[Variables.$I$6];[.H79];[Variables.$I$6];[Variables.$I$1];[.I79];[.J79];[.K79];[.L79];[.M79];[.N79];[.O79];[Variables.$I$2];[Variables.$I$6];[.P79];[Variables.$I$6];[.Q79];[Variables.$I$6];[.R79];[Variables.$I$6];[.S79];[Variables.$I$6];[.T79];IF([.U79]&lt;&gt;&quot;&quot;;CONCATENATE([Variables.$I$6];[.U79]);&quot;&quot;);[Variables.$I$2];[Variables.$I$6]);IF([.B79]&lt;&gt;&quot;&quot;;CONCATENATE(&quot;#&quot;;[.B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</text:p>
          </table:table-cell>
          <table:table-cell table:number-columns-repeated="16362"/>
        </table:table-row>
        <table:table-row table:style-name="ro1">
          <table:table-cell table:style-name="ce6" table:formula="of:=IF(AND([.B80]&lt;&gt;&quot;&quot;;[.C80]&lt;&gt;&quot;&quot;);CONCATENATE([Variables.$I$1];[Variables.$I$7];[.B80];[Variables.$I$7];[Variables.$I$6];[Variables.$I$7];[.C80];[Variables.$I$7];[Variables.$I$6];[Variables.$I$7];[.D80];[Variables.$I$7];[Variables.$I$6];[.E80];[Variables.$I$6];[.F80];[Variables.$I$6];[.G80];[Variables.$I$6];[.H80];[Variables.$I$6];[Variables.$I$1];[.I80];[.J80];[.K80];[.L80];[.M80];[.N80];[.O80];[Variables.$I$2];[Variables.$I$6];[.P80];[Variables.$I$6];[.Q80];[Variables.$I$6];[.R80];[Variables.$I$6];[.S80];[Variables.$I$6];[.T80];IF([.U80]&lt;&gt;&quot;&quot;;CONCATENATE([Variables.$I$6];[.U80]);&quot;&quot;);[Variables.$I$2];[Variables.$I$6]);IF([.B80]&lt;&gt;&quot;&quot;;CONCATENATE(&quot;#&quot;;[.B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</text:p>
          </table:table-cell>
          <table:table-cell table:style-name="ce7" office:value-type="string" calcext:value-type="string">
            <text:p>i4_iron_hills_infantry</text:p>
          </table:table-cell>
          <table:table-cell table:number-columns-repeated="2" table:style-name="ce7" office:value-type="string" calcext:value-type="string">
            <text:p>Iron_Hills_Infantry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warf</text:p>
          </table:table-cell>
          <table:table-cell table:style-name="ce11" office:value-type="string" calcext:value-type="string">
            <text:p>itm_dwarf_miner_reinf, itm_dwarf_helm_fris, itm_dwarf_nasal,</text:p>
          </table:table-cell>
          <table:table-cell table:style-name="ce11" office:value-type="string" calcext:value-type="string">
            <text:p>itm_dwarf_vest_b, itm_leather_dwarf_armor_b_lordly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dwarf_chain_boots,</text:p>
          </table:table-cell>
          <table:table-cell table:style-name="ce11" office:value-type="string" calcext:value-type="string">
            <text:p><text:s/>itm_dwarf_great_mattock, itm_dwarf_mattock_good, itm_dwarf_sword_a,</text:p>
          </table:table-cell>
          <table:table-cell table:style-name="ce11" office:value-type="string" calcext:value-type="string">
            <text:p><text:s/>itm_dwarf_sword_a_good,itm_dwarf_shield_d, itm_dwarf_shield_d_good,</text:p>
          </table:table-cell>
          <table:table-cell table:style-name="ce11"/>
          <table:table-cell table:style-name="ce12" office:value-type="string" calcext:value-type="string">
            <text:p>attr_dwarf_tier_4</text:p>
          </table:table-cell>
          <table:table-cell table:style-name="ce12" office:value-type="string" calcext:value-type="string">
            <text:p>wp_dwarf_tier_4</text:p>
          </table:table-cell>
          <table:table-cell table:style-name="ce12" office:value-type="string" calcext:value-type="string">
            <text:p>knows_common_dwarf|knows_athletics_4|knows_power_strike_3|knows_ironflesh_5|knows_shield_2</text:p>
          </table:table-cell>
          <table:table-cell table:style-name="ce14" office:value-type="string" calcext:value-type="string">
            <text:p>dwarf_face_3</text:p>
          </table:table-cell>
          <table:table-cell table:style-name="ce14" office:value-type="string" calcext:value-type="string">
            <text:p>dwarf_face_4</text:p>
          </table:table-cell>
          <table:table-cell table:style-name="ce15"/>
          <table:table-cell table:style-name="ce6" table:formula="of:=IF(AND([.B80]&lt;&gt;&quot;&quot;;[.C80]&lt;&gt;&quot;&quot;);CONCATENATE([Variables.$I$1];[Variables.$I$7];[.B80];[Variables.$I$7];[Variables.$I$6];[Variables.$I$7];[.C80];[Variables.$I$7];[Variables.$I$6];[Variables.$I$7];[.D80];[Variables.$I$7];[Variables.$I$6];[.E80];[Variables.$I$6];[.F80];[Variables.$I$6];[.G80];[Variables.$I$6];[.H80];[Variables.$I$6];[Variables.$I$1];[.I80];[.J80];[.K80];[.L80];[.M80];[.N80];[.O80];[Variables.$I$2];[Variables.$I$6];[.P80];[Variables.$I$6];[.Q80];[Variables.$I$6];[.R80];[Variables.$I$6];[.S80];[Variables.$I$6];[.T80];IF([.U80]&lt;&gt;&quot;&quot;;CONCATENATE([Variables.$I$6];[.U80]);&quot;&quot;);[Variables.$I$2];[Variables.$I$6]);IF([.B80]&lt;&gt;&quot;&quot;;CONCATENATE(&quot;#&quot;;[.B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</text:p>
          </table:table-cell>
          <table:table-cell table:number-columns-repeated="16362"/>
        </table:table-row>
        <table:table-row table:style-name="ro1">
          <table:table-cell table:style-name="ce6" table:formula="of:=IF(AND([.B81]&lt;&gt;&quot;&quot;;[.C81]&lt;&gt;&quot;&quot;);CONCATENATE([Variables.$I$1];[Variables.$I$7];[.B81];[Variables.$I$7];[Variables.$I$6];[Variables.$I$7];[.C81];[Variables.$I$7];[Variables.$I$6];[Variables.$I$7];[.D81];[Variables.$I$7];[Variables.$I$6];[.E81];[Variables.$I$6];[.F81];[Variables.$I$6];[.G81];[Variables.$I$6];[.H81];[Variables.$I$6];[Variables.$I$1];[.I81];[.J81];[.K81];[.L81];[.M81];[.N81];[.O81];[Variables.$I$2];[Variables.$I$6];[.P81];[Variables.$I$6];[.Q81];[Variables.$I$6];[.R81];[Variables.$I$6];[.S81];[Variables.$I$6];[.T81];IF([.U81]&lt;&gt;&quot;&quot;;CONCATENATE([Variables.$I$6];[.U81]);&quot;&quot;);[Variables.$I$2];[Variables.$I$6]);IF([.B81]&lt;&gt;&quot;&quot;;CONCATENATE(&quot;#&quot;;[.B81]);&quot;&quot;))"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" calcext:value-type="string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</text:p>
          </table:table-cell>
          <table:table-cell table:style-name="ce7" office:value-type="string" calcext:value-type="string">
            <text:p>i5_iron_hills_battle_dwarf</text:p>
          </table:table-cell>
          <table:table-cell table:style-name="ce7" office:value-type="string" calcext:value-type="string">
            <text:p>Iron_Hills_Battle-dwarf</text:p>
          </table:table-cell>
          <table:table-cell table:style-name="ce7" office:value-type="string" calcext:value-type="string">
            <text:p>Iron_Hills_Battl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warf</text:p>
          </table:table-cell>
          <table:table-cell table:style-name="ce11" office:value-type="string" calcext:value-type="string">
            <text:p>itm_dwarf_nasal_reinf, itm_dwarf_helm_fris_reinf,</text:p>
          </table:table-cell>
          <table:table-cell table:style-name="ce11" office:value-type="string" calcext:value-type="string">
            <text:p>itm_dwarf_vest_b,itm_dwarf_vest_b_lordly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dwarf_scale_boots,</text:p>
          </table:table-cell>
          <table:table-cell table:style-name="ce11" office:value-type="string" calcext:value-type="string">
            <text:p>itm_dwarf_great_pick, itm_dwarf_great_mattock,itm_dwarf_great_axe</text:p>
          </table:table-cell>
          <table:table-cell table:style-name="ce11" table:number-columns-repeated="2"/>
          <table:table-cell table:style-name="ce12" office:value-type="string" calcext:value-type="string">
            <text:p>attr_dwarf_tier_5</text:p>
          </table:table-cell>
          <table:table-cell table:style-name="ce12" office:value-type="string" calcext:value-type="string">
            <text:p>wp_dwarf_tier_5</text:p>
          </table:table-cell>
          <table:table-cell table:style-name="ce12" office:value-type="string" calcext:value-type="string">
            <text:p>knows_common_dwarf|knows_athletics_5|knows_power_strike_4|knows_ironflesh_7|knows_shield_3</text:p>
          </table:table-cell>
          <table:table-cell table:style-name="ce14" office:value-type="string" calcext:value-type="string">
            <text:p>dwarf_face_1</text:p>
          </table:table-cell>
          <table:table-cell table:style-name="ce14" office:value-type="string" calcext:value-type="string">
            <text:p>dwarf_face_2</text:p>
          </table:table-cell>
          <table:table-cell table:style-name="ce15"/>
          <table:table-cell table:style-name="ce6" table:formula="of:=IF(AND([.B81]&lt;&gt;&quot;&quot;;[.C81]&lt;&gt;&quot;&quot;);CONCATENATE([Variables.$I$1];[Variables.$I$7];[.B81];[Variables.$I$7];[Variables.$I$6];[Variables.$I$7];[.C81];[Variables.$I$7];[Variables.$I$6];[Variables.$I$7];[.D81];[Variables.$I$7];[Variables.$I$6];[.E81];[Variables.$I$6];[.F81];[Variables.$I$6];[.G81];[Variables.$I$6];[.H81];[Variables.$I$6];[Variables.$I$1];[.I81];[.J81];[.K81];[.L81];[.M81];[.N81];[.O81];[Variables.$I$2];[Variables.$I$6];[.P81];[Variables.$I$6];[.Q81];[Variables.$I$6];[.R81];[Variables.$I$6];[.S81];[Variables.$I$6];[.T81];IF([.U81]&lt;&gt;&quot;&quot;;CONCATENATE([Variables.$I$6];[.U81]);&quot;&quot;);[Variables.$I$2];[Variables.$I$6]);IF([.B81]&lt;&gt;&quot;&quot;;CONCATENATE(&quot;#&quot;;[.B81]);&quot;&quot;))"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" calcext:value-type="string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</text:p>
          </table:table-cell>
          <table:table-cell table:number-columns-repeated="16362"/>
        </table:table-row>
        <table:table-row table:style-name="ro1">
          <table:table-cell table:style-name="ce6" table:formula="of:=IF(AND([.B82]&lt;&gt;&quot;&quot;;[.C82]&lt;&gt;&quot;&quot;);CONCATENATE([Variables.$I$1];[Variables.$I$7];[.B82];[Variables.$I$7];[Variables.$I$6];[Variables.$I$7];[.C82];[Variables.$I$7];[Variables.$I$6];[Variables.$I$7];[.D82];[Variables.$I$7];[Variables.$I$6];[.E82];[Variables.$I$6];[.F82];[Variables.$I$6];[.G82];[Variables.$I$6];[.H82];[Variables.$I$6];[Variables.$I$1];[.I82];[.J82];[.K82];[.L82];[.M82];[.N82];[.O82];[Variables.$I$2];[Variables.$I$6];[.P82];[Variables.$I$6];[.Q82];[Variables.$I$6];[.R82];[Variables.$I$6];[.S82];[Variables.$I$6];[.T82];IF([.U82]&lt;&gt;&quot;&quot;;CONCATENATE([Variables.$I$6];[.U82]);&quot;&quot;);[Variables.$I$2];[Variables.$I$6]);IF([.B82]&lt;&gt;&quot;&quot;;CONCATENATE(&quot;#&quot;;[.B82]);&quot;&quot;))" office:value-type="string" office:string-value="[&quot;i6_iron_hills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" calcext:value-type="string">
            <text:p>["i6_iron_hills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</text:p>
          </table:table-cell>
          <table:table-cell table:style-name="ce7" office:value-type="string" calcext:value-type="string">
            <text:p>i6_iron_hills_grors_guard</text:p>
          </table:table-cell>
          <table:table-cell table:style-name="ce7" office:value-type="string" calcext:value-type="string">
            <text:p>Gror's_Guard</text:p>
          </table:table-cell>
          <table:table-cell table:style-name="ce7" office:value-type="string" calcext:value-type="string">
            <text:p>Gror's_Guard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warf</text:p>
          </table:table-cell>
          <table:table-cell table:style-name="ce11" office:value-type="string" calcext:value-type="string">
            <text:p>itm_dwarf_nasal_lordly, itm_dwarf_helm_fris_lordly,</text:p>
          </table:table-cell>
          <table:table-cell table:style-name="ce11" office:value-type="string" calcext:value-type="string">
            <text:p>itm_dwarf_armor_d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dwarf_scale_boots,</text:p>
          </table:table-cell>
          <table:table-cell table:style-name="ce11" office:value-type="string" calcext:value-type="string">
            <text:p>itm_dwarf_great_pick_good,itm_dwarf_great_mattock_good,itm_dwarf_great_axe,itm_dwarf_great_axe_good,</text:p>
          </table:table-cell>
          <table:table-cell table:style-name="ce11" table:number-columns-repeated="2"/>
          <table:table-cell table:style-name="ce12" office:value-type="string" calcext:value-type="string">
            <text:p>attr_dwarf_tier_6</text:p>
          </table:table-cell>
          <table:table-cell table:style-name="ce12" office:value-type="string" calcext:value-type="string">
            <text:p>wp_dwarf_tier_6</text:p>
          </table:table-cell>
          <table:table-cell table:style-name="ce12" office:value-type="string" calcext:value-type="string">
            <text:p>knows_common_dwarf|knows_athletics_6|knows_power_strike_6|knows_ironflesh_9|knows_shield_5</text:p>
          </table:table-cell>
          <table:table-cell table:number-columns-repeated="2" table:style-name="ce14" office:value-type="string" calcext:value-type="string">
            <text:p>dwarf_face_7</text:p>
          </table:table-cell>
          <table:table-cell table:style-name="ce15"/>
          <table:table-cell table:style-name="ce6" table:formula="of:=IF(AND([.B82]&lt;&gt;&quot;&quot;;[.C82]&lt;&gt;&quot;&quot;);CONCATENATE([Variables.$I$1];[Variables.$I$7];[.B82];[Variables.$I$7];[Variables.$I$6];[Variables.$I$7];[.C82];[Variables.$I$7];[Variables.$I$6];[Variables.$I$7];[.D82];[Variables.$I$7];[Variables.$I$6];[.E82];[Variables.$I$6];[.F82];[Variables.$I$6];[.G82];[Variables.$I$6];[.H82];[Variables.$I$6];[Variables.$I$1];[.I82];[.J82];[.K82];[.L82];[.M82];[.N82];[.O82];[Variables.$I$2];[Variables.$I$6];[.P82];[Variables.$I$6];[.Q82];[Variables.$I$6];[.R82];[Variables.$I$6];[.S82];[Variables.$I$6];[.T82];IF([.U82]&lt;&gt;&quot;&quot;;CONCATENATE([Variables.$I$6];[.U82]);&quot;&quot;);[Variables.$I$2];[Variables.$I$6]);IF([.B82]&lt;&gt;&quot;&quot;;CONCATENATE(&quot;#&quot;;[.B82]);&quot;&quot;))" office:value-type="string" office:string-value="[&quot;i6_iron_hills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" calcext:value-type="string">
            <text:p>["i6_iron_hills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</text:p>
          </table:table-cell>
          <table:table-cell table:number-columns-repeated="16362"/>
        </table:table-row>
        <table:table-row table:style-name="ro1">
          <table:table-cell table:formula="of:=IF(AND([.B83]&lt;&gt;&quot;&quot;;[.C83]&lt;&gt;&quot;&quot;);CONCATENATE([Variables.$I$1];[Variables.$I$7];[.B83];[Variables.$I$7];[Variables.$I$6];[Variables.$I$7];[.C83];[Variables.$I$7];[Variables.$I$6];[Variables.$I$7];[.D83];[Variables.$I$7];[Variables.$I$6];[.E83];[Variables.$I$6];[.F83];[Variables.$I$6];[.G83];[Variables.$I$6];[.H83];[Variables.$I$6];[Variables.$I$1];[.I83];[.J83];[.K83];[.L83];[.M83];[.N83];[.O83];[Variables.$I$2];[Variables.$I$6];[.P83];[Variables.$I$6];[.Q83];[Variables.$I$6];[.R83];[Variables.$I$6];[.S83];[Variables.$I$6];[.T83];IF([.U83]&lt;&gt;&quot;&quot;;CONCATENATE([Variables.$I$6];[.U83]);&quot;&quot;);[Variables.$I$2];[Variables.$I$6]);IF([.B83]&lt;&gt;&quot;&quot;;CONCATENATE(&quot;#&quot;;[.B83]);&quot;&quot;))">
            <text:p/>
          </table:table-cell>
          <table:table-cell table:style-name="ce6" table:number-columns-repeated="20"/>
          <table:table-cell table:style-name="ce36" table:formula="of:=IF(AND([.B83]&lt;&gt;&quot;&quot;;[.C83]&lt;&gt;&quot;&quot;);CONCATENATE([Variables.$I$1];[Variables.$I$7];[.B83];[Variables.$I$7];[Variables.$I$6];[Variables.$I$7];[.C83];[Variables.$I$7];[Variables.$I$6];[Variables.$I$7];[.D83];[Variables.$I$7];[Variables.$I$6];[.E83];[Variables.$I$6];[.F83];[Variables.$I$6];[.G83];[Variables.$I$6];[.H83];[Variables.$I$6];[Variables.$I$1];[.I83];[.J83];[.K83];[.L83];[.M83];[.N83];[.O83];[Variables.$I$2];[Variables.$I$6];[.P83];[Variables.$I$6];[.Q83];[Variables.$I$6];[.R83];[Variables.$I$6];[.S83];[Variables.$I$6];[.T83];IF([.U83]&lt;&gt;&quot;&quot;;CONCATENATE([Variables.$I$6];[.U83]);&quot;&quot;);[Variables.$I$2];[Variables.$I$6]);IF([.B83]&lt;&gt;&quot;&quot;;CONCATENATE(&quot;#&quot;;[.B83]);&quot;&quot;))">
            <text:p/>
          </table:table-cell>
          <table:table-cell table:number-columns-repeated="16362"/>
        </table:table-row>
        <table:table-row table:style-name="ro1">
          <table:table-cell table:style-name="ce6" table:formula="of:=IF(AND([.B84]&lt;&gt;&quot;&quot;;[.C84]&lt;&gt;&quot;&quot;);CONCATENATE([Variables.$I$1];[Variables.$I$7];[.B84];[Variables.$I$7];[Variables.$I$6];[Variables.$I$7];[.C84];[Variables.$I$7];[Variables.$I$6];[Variables.$I$7];[.D84];[Variables.$I$7];[Variables.$I$6];[.E84];[Variables.$I$6];[.F84];[Variables.$I$6];[.G84];[Variables.$I$6];[.H84];[Variables.$I$6];[Variables.$I$1];[.I84];[.J84];[.K84];[.L84];[.M84];[.N84];[.O84];[Variables.$I$2];[Variables.$I$6];[.P84];[Variables.$I$6];[.Q84];[Variables.$I$6];[.R84];[Variables.$I$6];[.S84];[Variables.$I$6];[.T84];IF([.U84]&lt;&gt;&quot;&quot;;CONCATENATE([Variables.$I$6];[.U84]);&quot;&quot;);[Variables.$I$2];[Variables.$I$6]);IF([.B84]&lt;&gt;&quot;&quot;;CONCATENATE(&quot;#&quot;;[.B84]);&quot;&quot;))" office:value-type="string" office:string-value="#Gondor" calcext:value-type="string">
            <text:p>#Gondor</text:p>
          </table:table-cell>
          <table:table-cell table:style-name="ce5" office:value-type="string" calcext:value-type="string">
            <text:p>Gondor</text:p>
          </table:table-cell>
          <table:table-cell table:style-name="ce6" table:number-columns-repeated="9"/>
          <table:table-cell table:style-name="ce5"/>
          <table:table-cell table:style-name="ce6" table:number-columns-repeated="9"/>
          <table:table-cell table:style-name="ce6" table:formula="of:=IF(AND([.B84]&lt;&gt;&quot;&quot;;[.C84]&lt;&gt;&quot;&quot;);CONCATENATE([Variables.$I$1];[Variables.$I$7];[.B84];[Variables.$I$7];[Variables.$I$6];[Variables.$I$7];[.C84];[Variables.$I$7];[Variables.$I$6];[Variables.$I$7];[.D84];[Variables.$I$7];[Variables.$I$6];[.E84];[Variables.$I$6];[.F84];[Variables.$I$6];[.G84];[Variables.$I$6];[.H84];[Variables.$I$6];[Variables.$I$1];[.I84];[.J84];[.K84];[.L84];[.M84];[.N84];[.O84];[Variables.$I$2];[Variables.$I$6];[.P84];[Variables.$I$6];[.Q84];[Variables.$I$6];[.R84];[Variables.$I$6];[.S84];[Variables.$I$6];[.T84];IF([.U84]&lt;&gt;&quot;&quot;;CONCATENATE([Variables.$I$6];[.U84]);&quot;&quot;);[Variables.$I$2];[Variables.$I$6]);IF([.B84]&lt;&gt;&quot;&quot;;CONCATENATE(&quot;#&quot;;[.B84]);&quot;&quot;))" office:value-type="string" office:string-value="#Gondor" calcext:value-type="string">
            <text:p>#Gondor</text:p>
          </table:table-cell>
          <table:table-cell table:number-columns-repeated="16362"/>
        </table:table-row>
        <table:table-row table:style-name="ro1">
          <table:table-cell table:style-name="ce6" table:formula="of:=IF(AND([.B85]&lt;&gt;&quot;&quot;;[.C85]&lt;&gt;&quot;&quot;);CONCATENATE([Variables.$I$1];[Variables.$I$7];[.B85];[Variables.$I$7];[Variables.$I$6];[Variables.$I$7];[.C85];[Variables.$I$7];[Variables.$I$6];[Variables.$I$7];[.D85];[Variables.$I$7];[Variables.$I$6];[.E85];[Variables.$I$6];[.F85];[Variables.$I$6];[.G85];[Variables.$I$6];[.H85];[Variables.$I$6];[Variables.$I$1];[.I85];[.J85];[.K85];[.L85];[.M85];[.N85];[.O85];[Variables.$I$2];[Variables.$I$6];[.P85];[Variables.$I$6];[.Q85];[Variables.$I$6];[.R85];[Variables.$I$6];[.S85];[Variables.$I$6];[.T85];IF([.U85]&lt;&gt;&quot;&quot;;CONCATENATE([Variables.$I$6];[.U85]);&quot;&quot;);[Variables.$I$2];[Variables.$I$6]);IF([.B85]&lt;&gt;&quot;&quot;;CONCATENATE(&quot;#&quot;;[.B85]);&quot;&quot;))" office:value-type="string" office:string-value="[&quot;i1_gon_levy&quot;,&quot;Gondor_Levy&quot;,&quot;Gondor_Levies&quot;,tf_gondor| tfg_armor| tfg_boots,0,0,fac_gondor,[itm_gondor_auxila_helm_bad,itm_gon_jerkin,itm_white_tunic_a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" calcext:value-type="string">
            <text:p>["i1_gon_levy","Gondor_Levy","Gondor_Levies",tf_gondor| tfg_armor| tfg_boots,0,0,fac_gondor,[itm_gondor_auxila_helm_bad,itm_gon_jerkin,itm_white_tunic_a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</text:p>
          </table:table-cell>
          <table:table-cell table:style-name="ce7" office:value-type="string" calcext:value-type="string">
            <text:p>i1_gon_levy</text:p>
          </table:table-cell>
          <table:table-cell table:style-name="ce7" office:value-type="string" calcext:value-type="string">
            <text:p>Gondor_Levy</text:p>
          </table:table-cell>
          <table:table-cell table:style-name="ce7" office:value-type="string" calcext:value-type="string">
            <text:p>Gondor_Levies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gondor_auxila_helm_bad,</text:p>
          </table:table-cell>
          <table:table-cell table:style-name="ce11" office:value-type="string" calcext:value-type="string">
            <text:p>itm_gon_jerkin,itm_white_tunic_a,</text:p>
          </table:table-cell>
          <table:table-cell table:style-name="ce16"/>
          <table:table-cell table:style-name="ce11" office:value-type="string" calcext:value-type="string">
            <text:p>itm_gondor_light_greaves,</text:p>
          </table:table-cell>
          <table:table-cell table:style-name="ce11" office:value-type="string" calcext:value-type="string">
            <text:p>itm_shortened_spear,</text:p>
          </table:table-cell>
          <table:table-cell table:style-name="ce11" office:value-type="string" calcext:value-type="string">
            <text:p>itm_metal_scraps_bad,itm_metal_scraps_medium,itm_metal_scraps_good,</text:p>
          </table:table-cell>
          <table:table-cell table:style-name="ce11"/>
          <table:table-cell table:style-name="ce12" office:value-type="string" calcext:value-type="string">
            <text:p>attr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power_strike_1|knows_power_draw_1|knows_weapon_master_1|knows_shield_1|knows_trainer_1|knows_tactics_1|knows_spotting_1|knows_inventory_management_1|knows_wound_treatment_1|knows_first_aid_1|knows_leadership_2|knows_trade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85]&lt;&gt;&quot;&quot;;[.C85]&lt;&gt;&quot;&quot;);CONCATENATE([Variables.$I$1];[Variables.$I$7];[.B85];[Variables.$I$7];[Variables.$I$6];[Variables.$I$7];[.C85];[Variables.$I$7];[Variables.$I$6];[Variables.$I$7];[.D85];[Variables.$I$7];[Variables.$I$6];[.E85];[Variables.$I$6];[.F85];[Variables.$I$6];[.G85];[Variables.$I$6];[.H85];[Variables.$I$6];[Variables.$I$1];[.I85];[.J85];[.L85];[.L85];[.M85];[.N85];[.O85];[Variables.$I$2];[Variables.$I$6];[.P85];[Variables.$I$6];[.Q85];[Variables.$I$6];[.R85];[Variables.$I$6];[.S85];[Variables.$I$6];[.T85];IF([.U85]&lt;&gt;&quot;&quot;;CONCATENATE([Variables.$I$6];[.U85]);&quot;&quot;);[Variables.$I$2];[Variables.$I$6]);IF([.B85]&lt;&gt;&quot;&quot;;CONCATENATE(&quot;#&quot;;[.B85]);&quot;&quot;))" office:value-type="string" office:string-value="[&quot;i1_gon_levy&quot;,&quot;Gondor_Levy&quot;,&quot;Gondor_Levies&quot;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" calcext:value-type="string">
            <text:p>["i1_gon_levy","Gondor_Levy","Gondor_Levies"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86]&lt;&gt;&quot;&quot;;[.C86]&lt;&gt;&quot;&quot;);CONCATENATE([Variables.$I$1];[Variables.$I$7];[.B86];[Variables.$I$7];[Variables.$I$6];[Variables.$I$7];[.C86];[Variables.$I$7];[Variables.$I$6];[Variables.$I$7];[.D86];[Variables.$I$7];[Variables.$I$6];[.E86];[Variables.$I$6];[.F86];[Variables.$I$6];[.G86];[Variables.$I$6];[.H86];[Variables.$I$6];[Variables.$I$1];[.I86];[.J86];[.K86];[.L86];[.M86];[.N86];[.O86];[Variables.$I$2];[Variables.$I$6];[.P86];[Variables.$I$6];[.Q86];[Variables.$I$6];[.R86];[Variables.$I$6];[.S86];[Variables.$I$6];[.T86];IF([.U86]&lt;&gt;&quot;&quot;;CONCATENATE([Variables.$I$6];[.U86]);&quot;&quot;);[Variables.$I$2];[Variables.$I$6]);IF([.B86]&lt;&gt;&quot;&quot;;CONCATENATE(&quot;#&quot;;[.B86]);&quot;&quot;))" office:value-type="string" office:string-value="[&quot;i2_gon_watchman&quot;,&quot;Gondor_Watchman&quot;,&quot;Gondor_Watchmen&quot;,tf_gondor| tfg_armor| tfg_shield| tfg_boots| tfg_helm,0,0,fac_gondor,[itm_gondor_auxila_helm,itm_mail_coif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" calcext:value-type="string">
            <text:p>["i2_gon_watchman","Gondor_Watchman","Gondor_Watchmen",tf_gondor| tfg_armor| tfg_shield| tfg_boots| tfg_helm,0,0,fac_gondor,[itm_gondor_auxila_helm,itm_mail_coif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</text:p>
          </table:table-cell>
          <table:table-cell table:style-name="ce7" office:value-type="string" calcext:value-type="string">
            <text:p>i2_gon_watchman</text:p>
          </table:table-cell>
          <table:table-cell table:style-name="ce7" office:value-type="string" calcext:value-type="string">
            <text:p>Gondor_Watchman</text:p>
          </table:table-cell>
          <table:table-cell table:style-name="ce7" office:value-type="string" calcext:value-type="string">
            <text:p>Gondor_Watchmen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gondor_auxila_helm,itm_mail_coif,</text:p>
          </table:table-cell>
          <table:table-cell table:style-name="ce11" office:value-type="string" calcext:value-type="string">
            <text:p>itm_gon_jerkin,</text:p>
          </table:table-cell>
          <table:table-cell table:style-name="ce11"/>
          <table:table-cell table:style-name="ce11" office:value-type="string" calcext:value-type="string">
            <text:p>itm_gondor_light_greaves,</text:p>
          </table:table-cell>
          <table:table-cell table:style-name="ce11" office:value-type="string" calcext:value-type="string">
            <text:p>itm_shortened_spear,itm_gondor_short_sword,itm_good_mace,</text:p>
          </table:table-cell>
          <table:table-cell table:style-name="ce11" office:value-type="string" calcext:value-type="string">
            <text:p>itm_gon_tab_shield_a,</text:p>
          </table:table-cell>
          <table:table-cell table:style-name="ce11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power_strike_1|knows_power_draw_1|knows_weapon_master_1|knows_shield_2|knows_athletics_1|knows_trainer_1|knows_tactics_1|knows_spotting_1|knows_inventory_management_1|knows_wound_treatment_1|knows_first_aid_1|knows_leadership_2|knows_trade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86]&lt;&gt;&quot;&quot;;[.C86]&lt;&gt;&quot;&quot;);CONCATENATE([Variables.$I$1];[Variables.$I$7];[.B86];[Variables.$I$7];[Variables.$I$6];[Variables.$I$7];[.C86];[Variables.$I$7];[Variables.$I$6];[Variables.$I$7];[.D86];[Variables.$I$7];[Variables.$I$6];[.E86];[Variables.$I$6];[.F86];[Variables.$I$6];[.G86];[Variables.$I$6];[.H86];[Variables.$I$6];[Variables.$I$1];[.I86];[.J86];[.K86];[.L86];[.M86];[.N86];[.O86];[Variables.$I$2];[Variables.$I$6];[.P86];[Variables.$I$6];[.Q86];[Variables.$I$6];[.R86];[Variables.$I$6];[.S86];[Variables.$I$6];[.T86];IF([.U86]&lt;&gt;&quot;&quot;;CONCATENATE([Variables.$I$6];[.U86]);&quot;&quot;);[Variables.$I$2];[Variables.$I$6]);IF([.B86]&lt;&gt;&quot;&quot;;CONCATENATE(&quot;#&quot;;[.B86]);&quot;&quot;))" office:value-type="string" office:string-value="[&quot;i2_gon_watchman&quot;,&quot;Gondor_Watchman&quot;,&quot;Gondor_Watchmen&quot;,tf_gondor| tfg_armor| tfg_shield| tfg_boots| tfg_helm,0,0,fac_gondor,[itm_gondor_auxila_helm,itm_mail_coif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" calcext:value-type="string">
            <text:p>["i2_gon_watchman","Gondor_Watchman","Gondor_Watchmen",tf_gondor| tfg_armor| tfg_shield| tfg_boots| tfg_helm,0,0,fac_gondor,[itm_gondor_auxila_helm,itm_mail_coif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87]&lt;&gt;&quot;&quot;;[.C87]&lt;&gt;&quot;&quot;);CONCATENATE([Variables.$I$1];[Variables.$I$7];[.B87];[Variables.$I$7];[Variables.$I$6];[Variables.$I$7];[.C87];[Variables.$I$7];[Variables.$I$6];[Variables.$I$7];[.D87];[Variables.$I$7];[Variables.$I$6];[.E87];[Variables.$I$6];[.F87];[Variables.$I$6];[.G87];[Variables.$I$6];[.H87];[Variables.$I$6];[Variables.$I$1];[.I87];[.J87];[.K87];[.L87];[.M87];[.N87];[.O87];[Variables.$I$2];[Variables.$I$6];[.P87];[Variables.$I$6];[.Q87];[Variables.$I$6];[.R87];[Variables.$I$6];[.S87];[Variables.$I$6];[.T87];IF([.U87]&lt;&gt;&quot;&quot;;CONCATENATE([Variables.$I$6];[.U87]);&quot;&quot;);[Variables.$I$2];[Variables.$I$6]);IF([.B87]&lt;&gt;&quot;&quot;;CONCATENATE(&quot;#&quot;;[.B87]);&quot;&quot;))" office:value-type="string" office:string-value="[&quot;i3_gon_footman&quot;,&quot;Footman_of_Gondor&quot;,&quot;Footmen_of_Gondor&quot;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" calcext:value-type="string">
            <text:p>["i3_gon_footman","Footman_of_Gondor","Footmen_of_Gondor"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</text:p>
          </table:table-cell>
          <table:table-cell table:style-name="ce7" office:value-type="string" calcext:value-type="string">
            <text:p>i3_gon_footman</text:p>
          </table:table-cell>
          <table:table-cell table:style-name="ce7" office:value-type="string" calcext:value-type="string">
            <text:p>Footman_of_Gondor</text:p>
          </table:table-cell>
          <table:table-cell table:style-name="ce17" office:value-type="string" calcext:value-type="string">
            <text:p>Foot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gondor_infantry_helm_bad,</text:p>
          </table:table-cell>
          <table:table-cell table:style-name="ce11" office:value-type="string" calcext:value-type="string">
            <text:p>itm_gon_footman,</text:p>
          </table:table-cell>
          <table:table-cell table:style-name="ce18"/>
          <table:table-cell table:style-name="ce19" office:value-type="string" calcext:value-type="string">
            <text:p>itm_gondor_med_greaves,</text:p>
          </table:table-cell>
          <table:table-cell table:style-name="ce19" office:value-type="string" calcext:value-type="string">
            <text:p>itm_gondor_spear,itm_gondor_short_sword,itm_good_mace,</text:p>
          </table:table-cell>
          <table:table-cell table:style-name="ce20" office:value-type="string" calcext:value-type="string">
            <text:p>itm_gondor_shield_c,</text:p>
          </table:table-cell>
          <table:table-cell table:style-name="ce11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2|knows_shield_2|knows_power_strike_2|knows_ironflesh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87]&lt;&gt;&quot;&quot;;[.C87]&lt;&gt;&quot;&quot;);CONCATENATE([Variables.$I$1];[Variables.$I$7];[.B87];[Variables.$I$7];[Variables.$I$6];[Variables.$I$7];[.C87];[Variables.$I$7];[Variables.$I$6];[Variables.$I$7];[.D87];[Variables.$I$7];[Variables.$I$6];[.E87];[Variables.$I$6];[.F87];[Variables.$I$6];[.G87];[Variables.$I$6];[.H87];[Variables.$I$6];[Variables.$I$1];[.I87];[.J87];[.K87];[.L87];[.M87];[.N87];[.O87];[Variables.$I$2];[Variables.$I$6];[.P87];[Variables.$I$6];[.Q87];[Variables.$I$6];[.R87];[Variables.$I$6];[.S87];[Variables.$I$6];[.T87];IF([.U87]&lt;&gt;&quot;&quot;;CONCATENATE([Variables.$I$6];[.U87]);&quot;&quot;);[Variables.$I$2];[Variables.$I$6]);IF([.B87]&lt;&gt;&quot;&quot;;CONCATENATE(&quot;#&quot;;[.B87]);&quot;&quot;))" office:value-type="string" office:string-value="[&quot;i3_gon_footman&quot;,&quot;Footman_of_Gondor&quot;,&quot;Footmen_of_Gondor&quot;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" calcext:value-type="string">
            <text:p>["i3_gon_footman","Footman_of_Gondor","Footmen_of_Gondor"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88]&lt;&gt;&quot;&quot;;[.C88]&lt;&gt;&quot;&quot;);CONCATENATE([Variables.$I$1];[Variables.$I$7];[.B88];[Variables.$I$7];[Variables.$I$6];[Variables.$I$7];[.C88];[Variables.$I$7];[Variables.$I$6];[Variables.$I$7];[.D88];[Variables.$I$7];[Variables.$I$6];[.E88];[Variables.$I$6];[.F88];[Variables.$I$6];[.G88];[Variables.$I$6];[.H88];[Variables.$I$6];[Variables.$I$1];[.I88];[.J88];[.K88];[.L88];[.M88];[.N88];[.O88];[Variables.$I$2];[Variables.$I$6];[.P88];[Variables.$I$6];[.Q88];[Variables.$I$6];[.R88];[Variables.$I$6];[.S88];[Variables.$I$6];[.T88];IF([.U88]&lt;&gt;&quot;&quot;;CONCATENATE([Variables.$I$6];[.U88]);&quot;&quot;);[Variables.$I$2];[Variables.$I$6]);IF([.B88]&lt;&gt;&quot;&quot;;CONCATENATE(&quot;#&quot;;[.B88]);&quot;&quot;))" office:value-type="string" office:string-value="#Gondor Spearmen" calcext:value-type="string">
            <text:p>#Gondor Spearmen</text:p>
          </table:table-cell>
          <table:table-cell table:style-name="ce21" office:value-type="string" calcext:value-type="string">
            <text:p>Gondor Spearmen</text:p>
          </table:table-cell>
          <table:table-cell table:style-name="ce21" table:number-columns-repeated="12"/>
          <table:table-cell table:style-name="ce22"/>
          <table:table-cell table:style-name="ce21" table:number-columns-repeated="5"/>
          <table:table-cell table:style-name="ce23"/>
          <table:table-cell table:style-name="ce23" table:formula="of:=IF(AND([.B88]&lt;&gt;&quot;&quot;;[.C88]&lt;&gt;&quot;&quot;);CONCATENATE([Variables.$I$1];[Variables.$I$7];[.B88];[Variables.$I$7];[Variables.$I$6];[Variables.$I$7];[.C88];[Variables.$I$7];[Variables.$I$6];[Variables.$I$7];[.D88];[Variables.$I$7];[Variables.$I$6];[.E88];[Variables.$I$6];[.F88];[Variables.$I$6];[.G88];[Variables.$I$6];[.H88];[Variables.$I$6];[Variables.$I$1];[.I88];[.J88];[.K88];[.L88];[.M88];[.N88];[.N88];[Variables.$I$2];[Variables.$I$6];[.P88];[Variables.$I$6];[.Q88];[Variables.$I$6];[.R88];[Variables.$I$6];[.S88];[Variables.$I$6];[.T88];IF([.U88]&lt;&gt;&quot;&quot;;CONCATENATE([Variables.$I$6];[.U88]);&quot;&quot;);[Variables.$I$2];[Variables.$I$6]);IF([.B88]&lt;&gt;&quot;&quot;;CONCATENATE(&quot;#&quot;;[.B88]);&quot;&quot;))" office:value-type="string" office:string-value="#Gondor Spearmen" calcext:value-type="string">
            <text:p>#Gondor Spearmen</text:p>
          </table:table-cell>
          <table:table-cell table:style-name="ce24" table:number-columns-repeated="43"/>
          <table:table-cell table:number-columns-repeated="16319"/>
        </table:table-row>
        <table:table-row table:style-name="ro1">
          <table:table-cell table:style-name="ce6" table:formula="of:=IF(AND([.B89]&lt;&gt;&quot;&quot;;[.C89]&lt;&gt;&quot;&quot;);CONCATENATE([Variables.$I$1];[Variables.$I$7];[.B89];[Variables.$I$7];[Variables.$I$6];[Variables.$I$7];[.C89];[Variables.$I$7];[Variables.$I$6];[Variables.$I$7];[.D89];[Variables.$I$7];[Variables.$I$6];[.E89];[Variables.$I$6];[.F89];[Variables.$I$6];[.G89];[Variables.$I$6];[.H89];[Variables.$I$6];[Variables.$I$1];[.I89];[.J89];[.K89];[.L89];[.M89];[.N89];[.O89];[Variables.$I$2];[Variables.$I$6];[.P89];[Variables.$I$6];[.Q89];[Variables.$I$6];[.R89];[Variables.$I$6];[.S89];[Variables.$I$6];[.T89];IF([.U89]&lt;&gt;&quot;&quot;;CONCATENATE([Variables.$I$6];[.U89]);&quot;&quot;);[Variables.$I$2];[Variables.$I$6]);IF([.B89]&lt;&gt;&quot;&quot;;CONCATENATE(&quot;#&quot;;[.B89]);&quot;&quot;))" office:value-type="string" office:string-value="[&quot;i4_gon_spearman&quot;,&quot;Spearman_of_Gondor&quot;,&quot;Spearmen_of_Gondor&quot;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_spearman","Spearman_of_Gondor","Spearmen_of_Gondor"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style-name="ce7" office:value-type="string" calcext:value-type="string">
            <text:p>i4_gon_spearman</text:p>
          </table:table-cell>
          <table:table-cell table:style-name="ce7" office:value-type="string" calcext:value-type="string">
            <text:p>Spearman_of_Gondor</text:p>
          </table:table-cell>
          <table:table-cell table:style-name="ce7" office:value-type="string" calcext:value-type="string">
            <text:p>Spear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gondor_infantry_helm,</text:p>
          </table:table-cell>
          <table:table-cell table:style-name="ce11" office:value-type="string" calcext:value-type="string">
            <text:p>itm_gon_regular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gondor_med_greaves,</text:p>
          </table:table-cell>
          <table:table-cell table:style-name="ce11" office:value-type="string" calcext:value-type="string">
            <text:p>itm_gondor_spear,</text:p>
          </table:table-cell>
          <table:table-cell table:style-name="ce11" office:value-type="string" calcext:value-type="string">
            <text:p>itm_gondor_shield_c,</text:p>
          </table:table-cell>
          <table:table-cell table:style-name="ce11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2|knows_shield_3|knows_power_strike_3|knows_ironflesh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B89]&lt;&gt;&quot;&quot;;[.C89]&lt;&gt;&quot;&quot;);CONCATENATE([Variables.$I$1];[Variables.$I$7];[.B89];[Variables.$I$7];[Variables.$I$6];[Variables.$I$7];[.C89];[Variables.$I$7];[Variables.$I$6];[Variables.$I$7];[.D89];[Variables.$I$7];[Variables.$I$6];[.E89];[Variables.$I$6];[.F89];[Variables.$I$6];[.G89];[Variables.$I$6];[.H89];[Variables.$I$6];[Variables.$I$1];[.I89];[.J89];[.K89];[.L89];[.M89];[.N89];[.O89];[Variables.$I$2];[Variables.$I$6];[.P89];[Variables.$I$6];[.Q89];[Variables.$I$6];[.R89];[Variables.$I$6];[.S89];[Variables.$I$6];[.T89];IF([.U89]&lt;&gt;&quot;&quot;;CONCATENATE([Variables.$I$6];[.U89]);&quot;&quot;);[Variables.$I$2];[Variables.$I$6]);IF([.B89]&lt;&gt;&quot;&quot;;CONCATENATE(&quot;#&quot;;[.B89]);&quot;&quot;))" office:value-type="string" office:string-value="[&quot;i4_gon_spearman&quot;,&quot;Spearman_of_Gondor&quot;,&quot;Spearmen_of_Gondor&quot;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_spearman","Spearman_of_Gondor","Spearmen_of_Gondor"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16362"/>
        </table:table-row>
        <table:table-row table:style-name="ro1">
          <table:table-cell table:style-name="ce6" table:formula="of:=IF(AND([.B90]&lt;&gt;&quot;&quot;;[.C90]&lt;&gt;&quot;&quot;);CONCATENATE([Variables.$I$1];[Variables.$I$7];[.B90];[Variables.$I$7];[Variables.$I$6];[Variables.$I$7];[.C90];[Variables.$I$7];[Variables.$I$6];[Variables.$I$7];[.D90];[Variables.$I$7];[Variables.$I$6];[.E90];[Variables.$I$6];[.F90];[Variables.$I$6];[.G90];[Variables.$I$6];[.H90];[Variables.$I$6];[Variables.$I$1];[.I90];[.J90];[.K90];[.L90];[.M90];[.N90];[.O90];[Variables.$I$2];[Variables.$I$6];[.P90];[Variables.$I$6];[.Q90];[Variables.$I$6];[.R90];[Variables.$I$6];[.S90];[Variables.$I$6];[.T90];IF([.U90]&lt;&gt;&quot;&quot;;CONCATENATE([Variables.$I$6];[.U90]);&quot;&quot;);[Variables.$I$2];[Variables.$I$6]);IF([.B90]&lt;&gt;&quot;&quot;;CONCATENATE(&quot;#&quot;;[.B90]);&quot;&quot;))" office:value-type="string" office:string-value="[&quot;i5_gon_vet_spearman&quot;,&quot;Veteran_Spearman_of_Gondor&quot;,&quot;Veteran_Spearmen_of_Gondor&quot;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_vet_spearman","Veteran_Spearman_of_Gondor","Veteran_Spearmen_of_Gondor"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style-name="ce7" office:value-type="string" calcext:value-type="string">
            <text:p>i5_gon_vet_spearman</text:p>
          </table:table-cell>
          <table:table-cell table:style-name="ce7" office:value-type="string" calcext:value-type="string">
            <text:p>Veteran_Spearman_of_Gondor</text:p>
          </table:table-cell>
          <table:table-cell table:style-name="ce7" office:value-type="string" calcext:value-type="string">
            <text:p>Veteran_Spear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gondor_infantry_helm_good,</text:p>
          </table:table-cell>
          <table:table-cell table:style-name="ce11" office:value-type="string" calcext:value-type="string">
            <text:p>itm_gon_regular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19" office:value-type="string" calcext:value-type="string">
            <text:p>itm_gondor_spear,</text:p>
          </table:table-cell>
          <table:table-cell table:style-name="ce19" office:value-type="string" calcext:value-type="string">
            <text:p>itm_gondor_shield_c,</text:p>
          </table:table-cell>
          <table:table-cell table:style-name="ce11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2|knows_shield_4|knows_power_strike_4|knows_ironflesh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90]&lt;&gt;&quot;&quot;;[.C90]&lt;&gt;&quot;&quot;);CONCATENATE([Variables.$I$1];[Variables.$I$7];[.B90];[Variables.$I$7];[Variables.$I$6];[Variables.$I$7];[.C90];[Variables.$I$7];[Variables.$I$6];[Variables.$I$7];[.D90];[Variables.$I$7];[Variables.$I$6];[.E90];[Variables.$I$6];[.F90];[Variables.$I$6];[.G90];[Variables.$I$6];[.H90];[Variables.$I$6];[Variables.$I$1];[.I90];[.J90];[.K90];[.L90];[.M90];[.N90];[.O90];[Variables.$I$2];[Variables.$I$6];[.P90];[Variables.$I$6];[.Q90];[Variables.$I$6];[.R90];[Variables.$I$6];[.S90];[Variables.$I$6];[.T90];IF([.U90]&lt;&gt;&quot;&quot;;CONCATENATE([Variables.$I$6];[.U90]);&quot;&quot;);[Variables.$I$2];[Variables.$I$6]);IF([.B90]&lt;&gt;&quot;&quot;;CONCATENATE(&quot;#&quot;;[.B90]);&quot;&quot;))" office:value-type="string" office:string-value="[&quot;i5_gon_vet_spearman&quot;,&quot;Veteran_Spearman_of_Gondor&quot;,&quot;Veteran_Spearmen_of_Gondor&quot;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_vet_spearman","Veteran_Spearman_of_Gondor","Veteran_Spearmen_of_Gondor"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91]&lt;&gt;&quot;&quot;;[.C91]&lt;&gt;&quot;&quot;);CONCATENATE([Variables.$I$1];[Variables.$I$7];[.B91];[Variables.$I$7];[Variables.$I$6];[Variables.$I$7];[.C91];[Variables.$I$7];[Variables.$I$6];[Variables.$I$7];[.D91];[Variables.$I$7];[Variables.$I$6];[.E91];[Variables.$I$6];[.F91];[Variables.$I$6];[.G91];[Variables.$I$6];[.H91];[Variables.$I$6];[Variables.$I$1];[.I91];[.J91];[.K91];[.L91];[.M91];[.N91];[.O91];[Variables.$I$2];[Variables.$I$6];[.P91];[Variables.$I$6];[.Q91];[Variables.$I$6];[.R91];[Variables.$I$6];[.S91];[Variables.$I$6];[.T91];IF([.U91]&lt;&gt;&quot;&quot;;CONCATENATE([Variables.$I$6];[.U91]);&quot;&quot;);[Variables.$I$2];[Variables.$I$6]);IF([.B91]&lt;&gt;&quot;&quot;;CONCATENATE(&quot;#&quot;;[.B91]);&quot;&quot;))" office:value-type="string" office:string-value="[&quot;i6_gon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style-name="ce7" office:value-type="string" calcext:value-type="string">
            <text:p>i6_gon_tower_spearman</text:p>
          </table:table-cell>
          <table:table-cell table:style-name="ce7" office:value-type="string" calcext:value-type="string">
            <text:p>Guard_of_the_Fountain_Court</text:p>
          </table:table-cell>
          <table:table-cell table:style-name="ce7" office:value-type="string" calcext:value-type="string">
            <text:p>Guards_of_the_Fountain_Court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tower_guard_helm,</text:p>
          </table:table-cell>
          <table:table-cell table:style-name="ce19" office:value-type="string" calcext:value-type="string">
            <text:p>itm_gon_tower_guard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gondor_heavy_greaves,</text:p>
          </table:table-cell>
          <table:table-cell table:style-name="ce19" office:value-type="string" calcext:value-type="string">
            <text:p>itm_gondor_tower_spear,</text:p>
          </table:table-cell>
          <table:table-cell table:style-name="ce11" office:value-type="string" calcext:value-type="string">
            <text:p>itm_gondor_shield_a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2|knows_shield_6|knows_power_strike_6|knows_ironflesh_4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B91]&lt;&gt;&quot;&quot;;[.C91]&lt;&gt;&quot;&quot;);CONCATENATE([Variables.$I$1];[Variables.$I$7];[.B91];[Variables.$I$7];[Variables.$I$6];[Variables.$I$7];[.C91];[Variables.$I$7];[Variables.$I$6];[Variables.$I$7];[.D91];[Variables.$I$7];[Variables.$I$6];[.E91];[Variables.$I$6];[.F91];[Variables.$I$6];[.G91];[Variables.$I$6];[.H91];[Variables.$I$6];[Variables.$I$1];[.I91];[.J91];[.K91];[.L91];[.M91];[.N91];[.O91];[Variables.$I$2];[Variables.$I$6];[.P91];[Variables.$I$6];[.Q91];[Variables.$I$6];[.R91];[Variables.$I$6];[.S91];[Variables.$I$6];[.T91];IF([.U91]&lt;&gt;&quot;&quot;;CONCATENATE([Variables.$I$6];[.U91]);&quot;&quot;);[Variables.$I$2];[Variables.$I$6]);IF([.B91]&lt;&gt;&quot;&quot;;CONCATENATE(&quot;#&quot;;[.B91]);&quot;&quot;))" office:value-type="string" office:string-value="[&quot;i6_gon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number-columns-repeated="16362"/>
        </table:table-row>
        <table:table-row table:style-name="ro1">
          <table:table-cell table:style-name="ce6" table:formula="of:=IF(AND([.B92]&lt;&gt;&quot;&quot;;[.C92]&lt;&gt;&quot;&quot;);CONCATENATE([Variables.$I$1];[Variables.$I$7];[.B92];[Variables.$I$7];[Variables.$I$6];[Variables.$I$7];[.C92];[Variables.$I$7];[Variables.$I$6];[Variables.$I$7];[.D92];[Variables.$I$7];[Variables.$I$6];[.E92];[Variables.$I$6];[.F92];[Variables.$I$6];[.G92];[Variables.$I$6];[.H92];[Variables.$I$6];[Variables.$I$1];[.I92];[.J92];[.K92];[.L92];[.M92];[.N92];[.O92];[Variables.$I$2];[Variables.$I$6];[.P92];[Variables.$I$6];[.Q92];[Variables.$I$6];[.R92];[Variables.$I$6];[.S92];[Variables.$I$6];[.T92];IF([.U92]&lt;&gt;&quot;&quot;;CONCATENATE([Variables.$I$6];[.U92]);&quot;&quot;);[Variables.$I$2];[Variables.$I$6]);IF([.B92]&lt;&gt;&quot;&quot;;CONCATENATE(&quot;#&quot;;[.B92]);&quot;&quot;))" office:value-type="string" office:string-value="#Gondor swordsmen" calcext:value-type="string">
            <text:p>#Gondor swordsmen</text:p>
          </table:table-cell>
          <table:table-cell table:style-name="ce21" office:value-type="string" calcext:value-type="string">
            <text:p>Gondor swordsmen</text:p>
          </table:table-cell>
          <table:table-cell table:style-name="ce21" table:number-columns-repeated="9"/>
          <table:table-cell table:style-name="ce25" table:number-columns-repeated="2"/>
          <table:table-cell table:style-name="ce21" table:number-columns-repeated="7"/>
          <table:table-cell table:style-name="ce23"/>
          <table:table-cell table:style-name="ce23" table:formula="of:=IF(AND([.B92]&lt;&gt;&quot;&quot;;[.C92]&lt;&gt;&quot;&quot;);CONCATENATE([Variables.$I$1];[Variables.$I$7];[.B92];[Variables.$I$7];[Variables.$I$6];[Variables.$I$7];[.C92];[Variables.$I$7];[Variables.$I$6];[Variables.$I$7];[.D92];[Variables.$I$7];[Variables.$I$6];[.E92];[Variables.$I$6];[.F92];[Variables.$I$6];[.G92];[Variables.$I$6];[.H92];[Variables.$I$6];[Variables.$I$1];[.I92];[.J92];[.K92];[.L92];[.M92];[.N92];[.O92];[Variables.$I$2];[Variables.$I$6];[.P92];[Variables.$I$6];[.Q92];[Variables.$I$6];[.R92];[Variables.$I$6];[.S92];[Variables.$I$6];[.T92];IF([.U92]&lt;&gt;&quot;&quot;;CONCATENATE([Variables.$I$6];[.U92]);&quot;&quot;);[Variables.$I$2];[Variables.$I$6]);IF([.B92]&lt;&gt;&quot;&quot;;CONCATENATE(&quot;#&quot;;[.B92]);&quot;&quot;))" office:value-type="string" office:string-value="#Gondor swordsmen" calcext:value-type="string">
            <text:p>#Gondor swordsmen</text:p>
          </table:table-cell>
          <table:table-cell table:number-columns-repeated="16362"/>
        </table:table-row>
        <table:table-row table:style-name="ro1">
          <table:table-cell table:style-name="ce6" table:formula="of:=IF(AND([.B93]&lt;&gt;&quot;&quot;;[.C93]&lt;&gt;&quot;&quot;);CONCATENATE([Variables.$I$1];[Variables.$I$7];[.B93];[Variables.$I$7];[Variables.$I$6];[Variables.$I$7];[.C93];[Variables.$I$7];[Variables.$I$6];[Variables.$I$7];[.D93];[Variables.$I$7];[Variables.$I$6];[.E93];[Variables.$I$6];[.F93];[Variables.$I$6];[.G93];[Variables.$I$6];[.H93];[Variables.$I$6];[Variables.$I$1];[.I93];[.J93];[.K93];[.L93];[.M93];[.N93];[.O93];[Variables.$I$2];[Variables.$I$6];[.P93];[Variables.$I$6];[.Q93];[Variables.$I$6];[.R93];[Variables.$I$6];[.S93];[Variables.$I$6];[.T93];IF([.U93]&lt;&gt;&quot;&quot;;CONCATENATE([Variables.$I$6];[.U93]);&quot;&quot;);[Variables.$I$2];[Variables.$I$6]);IF([.B93]&lt;&gt;&quot;&quot;;CONCATENATE(&quot;#&quot;;[.B93]);&quot;&quot;))" office:value-type="string" office:string-value="[&quot;i4_gon_swordsman&quot;,&quot;Swordsman_of_Gondor&quot;,&quot;Swordsmen_of_Gondor&quot;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_swordsman","Swordsman_of_Gondor","Swordsmen_of_Gondor"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style-name="ce7" office:value-type="string" calcext:value-type="string">
            <text:p>i4_gon_swordsman</text:p>
          </table:table-cell>
          <table:table-cell table:style-name="ce7" office:value-type="string" calcext:value-type="string">
            <text:p>Swordsman_of_Gondor</text:p>
          </table:table-cell>
          <table:table-cell table:style-name="ce7" office:value-type="string" calcext:value-type="string">
            <text:p>Swords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gondor_infantry_helm,</text:p>
          </table:table-cell>
          <table:table-cell table:style-name="ce11" office:value-type="string" calcext:value-type="string">
            <text:p>itm_gon_regular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gondor_med_greaves,</text:p>
          </table:table-cell>
          <table:table-cell table:style-name="ce19" office:value-type="string" calcext:value-type="string">
            <text:p>itm_gondor_sword,</text:p>
          </table:table-cell>
          <table:table-cell table:style-name="ce11" office:value-type="string" calcext:value-type="string">
            <text:p>itm_gondor_shield_c,</text:p>
          </table:table-cell>
          <table:table-cell table:style-name="ce11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2|knows_shield_3|knows_power_strike_3|knows_ironflesh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B93]&lt;&gt;&quot;&quot;;[.C93]&lt;&gt;&quot;&quot;);CONCATENATE([Variables.$I$1];[Variables.$I$7];[.B93];[Variables.$I$7];[Variables.$I$6];[Variables.$I$7];[.C93];[Variables.$I$7];[Variables.$I$6];[Variables.$I$7];[.D93];[Variables.$I$7];[Variables.$I$6];[.E93];[Variables.$I$6];[.F93];[Variables.$I$6];[.G93];[Variables.$I$6];[.H93];[Variables.$I$6];[Variables.$I$1];[.I93];[.J93];[.K93];[.L93];[.M93];[.N93];[.O93];[Variables.$I$2];[Variables.$I$6];[.P93];[Variables.$I$6];[.Q93];[Variables.$I$6];[.R93];[Variables.$I$6];[.S93];[Variables.$I$6];[.T93];IF([.U93]&lt;&gt;&quot;&quot;;CONCATENATE([Variables.$I$6];[.U93]);&quot;&quot;);[Variables.$I$2];[Variables.$I$6]);IF([.B93]&lt;&gt;&quot;&quot;;CONCATENATE(&quot;#&quot;;[.B93]);&quot;&quot;))" office:value-type="string" office:string-value="[&quot;i4_gon_swordsman&quot;,&quot;Swordsman_of_Gondor&quot;,&quot;Swordsmen_of_Gondor&quot;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_swordsman","Swordsman_of_Gondor","Swordsmen_of_Gondor"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16362"/>
        </table:table-row>
        <table:table-row table:style-name="ro1">
          <table:table-cell table:style-name="ce6" table:formula="of:=IF(AND([.B94]&lt;&gt;&quot;&quot;;[.C94]&lt;&gt;&quot;&quot;);CONCATENATE([Variables.$I$1];[Variables.$I$7];[.B94];[Variables.$I$7];[Variables.$I$6];[Variables.$I$7];[.C94];[Variables.$I$7];[Variables.$I$6];[Variables.$I$7];[.D94];[Variables.$I$7];[Variables.$I$6];[.E94];[Variables.$I$6];[.F94];[Variables.$I$6];[.G94];[Variables.$I$6];[.H94];[Variables.$I$6];[Variables.$I$1];[.I94];[.J94];[.K94];[.L94];[.M94];[.N94];[.O94];[Variables.$I$2];[Variables.$I$6];[.P94];[Variables.$I$6];[.Q94];[Variables.$I$6];[.R94];[Variables.$I$6];[.S94];[Variables.$I$6];[.T94];IF([.U94]&lt;&gt;&quot;&quot;;CONCATENATE([Variables.$I$6];[.U94]);&quot;&quot;);[Variables.$I$2];[Variables.$I$6]);IF([.B94]&lt;&gt;&quot;&quot;;CONCATENATE(&quot;#&quot;;[.B94]);&quot;&quot;))" office:value-type="string" office:string-value="[&quot;i5_gon_vet_swordsman&quot;,&quot;Veteran_Swordsman_of_Gondor&quot;,&quot;Veteran_Swordsmen_of_Gondor&quot;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_vet_swordsman","Veteran_Swordsman_of_Gondor","Veteran_Swordsmen_of_Gondor"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style-name="ce7" office:value-type="string" calcext:value-type="string">
            <text:p>i5_gon_vet_swordsman</text:p>
          </table:table-cell>
          <table:table-cell table:style-name="ce7" office:value-type="string" calcext:value-type="string">
            <text:p>Veteran_Swordsman_of_Gondor</text:p>
          </table:table-cell>
          <table:table-cell table:style-name="ce7" office:value-type="string" calcext:value-type="string">
            <text:p>Veteran_Swords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gondor_infantry_helm_good,</text:p>
          </table:table-cell>
          <table:table-cell table:style-name="ce11" office:value-type="string" calcext:value-type="string">
            <text:p>itm_gon_regular,</text:p>
          </table:table-cell>
          <table:table-cell table:style-name="ce11" office:value-type="string" calcext:value-type="string">
            <text:p>itm_mail_mitten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19" office:value-type="string" calcext:value-type="string">
            <text:p>itm_gondor_sword,</text:p>
          </table:table-cell>
          <table:table-cell table:style-name="ce11" office:value-type="string" calcext:value-type="string">
            <text:p>itm_gondor_shield_c,</text:p>
          </table:table-cell>
          <table:table-cell table:style-name="ce11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2|knows_shield_4|knows_power_strike_4|knows_ironflesh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94]&lt;&gt;&quot;&quot;;[.C94]&lt;&gt;&quot;&quot;);CONCATENATE([Variables.$I$1];[Variables.$I$7];[.B94];[Variables.$I$7];[Variables.$I$6];[Variables.$I$7];[.C94];[Variables.$I$7];[Variables.$I$6];[Variables.$I$7];[.D94];[Variables.$I$7];[Variables.$I$6];[.E94];[Variables.$I$6];[.F94];[Variables.$I$6];[.G94];[Variables.$I$6];[.H94];[Variables.$I$6];[Variables.$I$1];[.I94];[.J94];[.K94];[.L94];[.M94];[.N94];[.O94];[Variables.$I$2];[Variables.$I$6];[.P94];[Variables.$I$6];[.Q94];[Variables.$I$6];[.R94];[Variables.$I$6];[.S94];[Variables.$I$6];[.T94];IF([.U94]&lt;&gt;&quot;&quot;;CONCATENATE([Variables.$I$6];[.U94]);&quot;&quot;);[Variables.$I$2];[Variables.$I$6]);IF([.B94]&lt;&gt;&quot;&quot;;CONCATENATE(&quot;#&quot;;[.B94]);&quot;&quot;))" office:value-type="string" office:string-value="[&quot;i5_gon_vet_swordsman&quot;,&quot;Veteran_Swordsman_of_Gondor&quot;,&quot;Veteran_Swordsmen_of_Gondor&quot;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_vet_swordsman","Veteran_Swordsman_of_Gondor","Veteran_Swordsmen_of_Gondor"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95]&lt;&gt;&quot;&quot;;[.C95]&lt;&gt;&quot;&quot;);CONCATENATE([Variables.$I$1];[Variables.$I$7];[.B95];[Variables.$I$7];[Variables.$I$6];[Variables.$I$7];[.C95];[Variables.$I$7];[Variables.$I$6];[Variables.$I$7];[.D95];[Variables.$I$7];[Variables.$I$6];[.E95];[Variables.$I$6];[.F95];[Variables.$I$6];[.G95];[Variables.$I$6];[.H95];[Variables.$I$6];[Variables.$I$1];[.I95];[.J95];[.K95];[.L95];[.M95];[.N95];[.O95];[Variables.$I$2];[Variables.$I$6];[.P95];[Variables.$I$6];[.Q95];[Variables.$I$6];[.R95];[Variables.$I$6];[.S95];[Variables.$I$6];[.T95];IF([.U95]&lt;&gt;&quot;&quot;;CONCATENATE([Variables.$I$6];[.U95]);&quot;&quot;);[Variables.$I$2];[Variables.$I$6]);IF([.B95]&lt;&gt;&quot;&quot;;CONCATENATE(&quot;#&quot;;[.B95]);&quot;&quot;))" office:value-type="string" office:string-value="[&quot;i6_gon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style-name="ce7" office:value-type="string" calcext:value-type="string">
            <text:p>i6_gon_tower_swordsman</text:p>
          </table:table-cell>
          <table:table-cell table:style-name="ce7" office:value-type="string" calcext:value-type="string">
            <text:p>Swordsman_of_the_Tower_Guard</text:p>
          </table:table-cell>
          <table:table-cell table:style-name="ce7" office:value-type="string" calcext:value-type="string">
            <text:p>Swordsmen_of_the_Tower_Guard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tower_guard_helm,</text:p>
          </table:table-cell>
          <table:table-cell table:style-name="ce11" office:value-type="string" calcext:value-type="string">
            <text:p>itm_gon_tower_guard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19" office:value-type="string" calcext:value-type="string">
            <text:p>itm_gondor_citadel_sword,</text:p>
          </table:table-cell>
          <table:table-cell table:style-name="ce19" office:value-type="string" calcext:value-type="string">
            <text:p>itm_gondor_shield_a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3|knows_shield_5|knows_power_strike_5|knows_ironflesh_4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B95]&lt;&gt;&quot;&quot;;[.C95]&lt;&gt;&quot;&quot;);CONCATENATE([Variables.$I$1];[Variables.$I$7];[.B95];[Variables.$I$7];[Variables.$I$6];[Variables.$I$7];[.C95];[Variables.$I$7];[Variables.$I$6];[Variables.$I$7];[.D95];[Variables.$I$7];[Variables.$I$6];[.E95];[Variables.$I$6];[.F95];[Variables.$I$6];[.G95];[Variables.$I$6];[.H95];[Variables.$I$6];[Variables.$I$1];[.I95];[.J95];[.K95];[.L95];[.M95];[.N95];[.O95];[Variables.$I$2];[Variables.$I$6];[.P95];[Variables.$I$6];[.Q95];[Variables.$I$6];[.R95];[Variables.$I$6];[.S95];[Variables.$I$6];[.T95];IF([.U95]&lt;&gt;&quot;&quot;;CONCATENATE([Variables.$I$6];[.U95]);&quot;&quot;);[Variables.$I$2];[Variables.$I$6]);IF([.B95]&lt;&gt;&quot;&quot;;CONCATENATE(&quot;#&quot;;[.B95]);&quot;&quot;))" office:value-type="string" office:string-value="[&quot;i6_gon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number-columns-repeated="16362"/>
        </table:table-row>
        <table:table-row table:style-name="ro1">
          <table:table-cell table:style-name="ce6" table:formula="of:=IF(AND([.B96]&lt;&gt;&quot;&quot;;[.C96]&lt;&gt;&quot;&quot;);CONCATENATE([Variables.$I$1];[Variables.$I$7];[.B96];[Variables.$I$7];[Variables.$I$6];[Variables.$I$7];[.C96];[Variables.$I$7];[Variables.$I$6];[Variables.$I$7];[.D96];[Variables.$I$7];[Variables.$I$6];[.E96];[Variables.$I$6];[.F96];[Variables.$I$6];[.G96];[Variables.$I$6];[.H96];[Variables.$I$6];[Variables.$I$1];[.I96];[.J96];[.K96];[.L96];[.M96];[.N96];[.O96];[Variables.$I$2];[Variables.$I$6];[.P96];[Variables.$I$6];[.Q96];[Variables.$I$6];[.R96];[Variables.$I$6];[.S96];[Variables.$I$6];[.T96];IF([.U96]&lt;&gt;&quot;&quot;;CONCATENATE([Variables.$I$6];[.U96]);&quot;&quot;);[Variables.$I$2];[Variables.$I$6]);IF([.B96]&lt;&gt;&quot;&quot;;CONCATENATE(&quot;#&quot;;[.B96]);&quot;&quot;))" office:value-type="string" office:string-value="#Gondor Noble Line" calcext:value-type="string">
            <text:p>#Gondor Noble Line</text:p>
          </table:table-cell>
          <table:table-cell table:style-name="ce21" office:value-type="string" calcext:value-type="string">
            <text:p>Gondor Noble Line</text:p>
          </table:table-cell>
          <table:table-cell table:style-name="ce21" table:number-columns-repeated="6"/>
          <table:table-cell table:style-name="ce25"/>
          <table:table-cell table:style-name="ce21"/>
          <table:table-cell table:style-name="ce25" table:number-columns-repeated="2"/>
          <table:table-cell table:style-name="ce21"/>
          <table:table-cell table:style-name="ce25" table:number-columns-repeated="2"/>
          <table:table-cell table:style-name="ce21" table:number-columns-repeated="5"/>
          <table:table-cell table:style-name="ce23"/>
          <table:table-cell table:style-name="ce23" table:formula="of:=IF(AND([.B96]&lt;&gt;&quot;&quot;;[.C96]&lt;&gt;&quot;&quot;);CONCATENATE([Variables.$I$1];[Variables.$I$7];[.B96];[Variables.$I$7];[Variables.$I$6];[Variables.$I$7];[.C96];[Variables.$I$7];[Variables.$I$6];[Variables.$I$7];[.D96];[Variables.$I$7];[Variables.$I$6];[.E96];[Variables.$I$6];[.F96];[Variables.$I$6];[.G96];[Variables.$I$6];[.H96];[Variables.$I$6];[Variables.$I$1];[.I96];[.J96];[.K96];[.L96];[.M96];[.N96];[.O96];[Variables.$I$2];[Variables.$I$6];[.P96];[Variables.$I$6];[.Q96];[Variables.$I$6];[.R96];[Variables.$I$6];[.S96];[Variables.$I$6];[.T96];IF([.U96]&lt;&gt;&quot;&quot;;CONCATENATE([Variables.$I$6];[.U96]);&quot;&quot;);[Variables.$I$2];[Variables.$I$6]);IF([.B96]&lt;&gt;&quot;&quot;;CONCATENATE(&quot;#&quot;;[.B96]);&quot;&quot;))" office:value-type="string" office:string-value="#Gondor Noble Line" calcext:value-type="string">
            <text:p>#Gondor Noble Line</text:p>
          </table:table-cell>
          <table:table-cell table:number-columns-repeated="16362"/>
        </table:table-row>
        <table:table-row table:style-name="ro1">
          <table:table-cell table:style-name="ce6" table:formula="of:=IF(AND([.B97]&lt;&gt;&quot;&quot;;[.C97]&lt;&gt;&quot;&quot;);CONCATENATE([Variables.$I$1];[Variables.$I$7];[.B97];[Variables.$I$7];[Variables.$I$6];[Variables.$I$7];[.C97];[Variables.$I$7];[Variables.$I$6];[Variables.$I$7];[.D97];[Variables.$I$7];[Variables.$I$6];[.E97];[Variables.$I$6];[.F97];[Variables.$I$6];[.G97];[Variables.$I$6];[.H97];[Variables.$I$6];[Variables.$I$1];[.I97];[.J97];[.K97];[.L97];[.M97];[.N97];[.O97];[Variables.$I$2];[Variables.$I$6];[.P97];[Variables.$I$6];[.Q97];[Variables.$I$6];[.R97];[Variables.$I$6];[.S97];[Variables.$I$6];[.T97];IF([.U97]&lt;&gt;&quot;&quot;;CONCATENATE([Variables.$I$6];[.U97]);&quot;&quot;);[Variables.$I$2];[Variables.$I$6]);IF([.B97]&lt;&gt;&quot;&quot;;CONCATENATE(&quot;#&quot;;[.B97]);&quot;&quot;))" office:value-type="string" office:string-value="[&quot;c1_gon_nobleman&quot;,&quot;Gondor_Noble&quot;,&quot;Gondor_Noble&quot;,tf_gondor| tf_mounted| tfg_armor| tfg_boots| tfg_horse,0,0,fac_gondor,[itm_gondor_auxila_helm,itm_gondor_infantry_helm_bad,itm_gon_jerkin,itm_gondor_light_greaves,itm_gondor_sword,itm_saddle_horse,],attr_tier_1,wp_tier_1,knows_common|knows_power_strike_2|knows_weapon_master_1|knows_riding_2|knows_trainer_2|knows_tactics_1|knows_inventory_management_1|knows_wound_treatment_1|knows_leadership_3,gondor_face1,gondor_face2]," calcext:value-type="string">
            <text:p>["c1_gon_nobleman","Gondor_Noble","Gondor_Noble",tf_gondor| tf_mounted| tfg_armor| tfg_boots| tfg_horse,0,0,fac_gondor,[itm_gondor_auxila_helm,itm_gondor_infantry_helm_bad,itm_gon_jerkin,itm_gondor_light_greaves,itm_gondor_sword,itm_saddle_horse,],attr_tier_1,wp_tier_1,knows_common|knows_power_strike_2|knows_weapon_master_1|knows_riding_2|knows_trainer_2|knows_tactics_1|knows_inventory_management_1|knows_wound_treatment_1|knows_leadership_3,gondor_face1,gondor_face2],</text:p>
          </table:table-cell>
          <table:table-cell table:style-name="ce7" office:value-type="string" calcext:value-type="string">
            <text:p>c1_gon_nobleman</text:p>
          </table:table-cell>
          <table:table-cell table:number-columns-repeated="2" table:style-name="ce7" office:value-type="string" calcext:value-type="string">
            <text:p>Gondor_Noble</text:p>
          </table:table-cell>
          <table:table-cell table:style-name="ce8" office:value-type="string" calcext:value-type="string">
            <text:p>tf_gondor| tf_mounted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gondor_auxila_helm,itm_gondor_infantry_helm_bad,</text:p>
          </table:table-cell>
          <table:table-cell table:style-name="ce11" office:value-type="string" calcext:value-type="string">
            <text:p>itm_gon_jerkin,</text:p>
          </table:table-cell>
          <table:table-cell table:style-name="ce11"/>
          <table:table-cell table:style-name="ce11" office:value-type="string" calcext:value-type="string">
            <text:p>itm_gondor_light_greaves,</text:p>
          </table:table-cell>
          <table:table-cell table:style-name="ce19" office:value-type="string" calcext:value-type="string">
            <text:p>itm_gondor_sword,</text:p>
          </table:table-cell>
          <table:table-cell table:style-name="ce11"/>
          <table:table-cell table:style-name="ce11" office:value-type="string" calcext:value-type="string">
            <text:p>itm_saddle_horse,</text:p>
          </table:table-cell>
          <table:table-cell table:style-name="ce12" office:value-type="string" calcext:value-type="string">
            <text:p>attr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power_strike_2|knows_weapon_master_1|knows_riding_2|knows_trainer_2|knows_tactics_1|knows_inventory_management_1|knows_wound_treatment_1|knows_leadership_3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97]&lt;&gt;&quot;&quot;;[.C97]&lt;&gt;&quot;&quot;);CONCATENATE([Variables.$I$1];[Variables.$I$7];[.B97];[Variables.$I$7];[Variables.$I$6];[Variables.$I$7];[.C97];[Variables.$I$7];[Variables.$I$6];[Variables.$I$7];[.D97];[Variables.$I$7];[Variables.$I$6];[.E97];[Variables.$I$6];[.F97];[Variables.$I$6];[.G97];[Variables.$I$6];[.H97];[Variables.$I$6];[Variables.$I$1];[.I97];[.J97];[.K97];[.L97];[.M97];[.N97];[.O97];[Variables.$I$2];[Variables.$I$6];[.P97];[Variables.$I$6];[.Q97];[Variables.$I$6];[.R97];[Variables.$I$6];[.S97];[Variables.$I$6];[.T97];IF([.U97]&lt;&gt;&quot;&quot;;CONCATENATE([Variables.$I$6];[.U97]);&quot;&quot;);[Variables.$I$2];[Variables.$I$6]);IF([.B97]&lt;&gt;&quot;&quot;;CONCATENATE(&quot;#&quot;;[.B97]);&quot;&quot;))" office:value-type="string" office:string-value="[&quot;c1_gon_nobleman&quot;,&quot;Gondor_Noble&quot;,&quot;Gondor_Noble&quot;,tf_gondor| tf_mounted| tfg_armor| tfg_boots| tfg_horse,0,0,fac_gondor,[itm_gondor_auxila_helm,itm_gondor_infantry_helm_bad,itm_gon_jerkin,itm_gondor_light_greaves,itm_gondor_sword,itm_saddle_horse,],attr_tier_1,wp_tier_1,knows_common|knows_power_strike_2|knows_weapon_master_1|knows_riding_2|knows_trainer_2|knows_tactics_1|knows_inventory_management_1|knows_wound_treatment_1|knows_leadership_3,gondor_face1,gondor_face2]," calcext:value-type="string">
            <text:p>["c1_gon_nobleman","Gondor_Noble","Gondor_Noble",tf_gondor| tf_mounted| tfg_armor| tfg_boots| tfg_horse,0,0,fac_gondor,[itm_gondor_auxila_helm,itm_gondor_infantry_helm_bad,itm_gon_jerkin,itm_gondor_light_greaves,itm_gondor_sword,itm_saddle_horse,],attr_tier_1,wp_tier_1,knows_common|knows_power_strike_2|knows_weapon_master_1|knows_riding_2|knows_trainer_2|knows_tactics_1|knows_inventory_management_1|knows_wound_treatment_1|knows_leadership_3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98]&lt;&gt;&quot;&quot;;[.C98]&lt;&gt;&quot;&quot;);CONCATENATE([Variables.$I$1];[Variables.$I$7];[.B98];[Variables.$I$7];[Variables.$I$6];[Variables.$I$7];[.C98];[Variables.$I$7];[Variables.$I$6];[Variables.$I$7];[.D98];[Variables.$I$7];[Variables.$I$6];[.E98];[Variables.$I$6];[.F98];[Variables.$I$6];[.G98];[Variables.$I$6];[.H98];[Variables.$I$6];[Variables.$I$1];[.I98];[.J98];[.K98];[.L98];[.M98];[.N98];[.O98];[Variables.$I$2];[Variables.$I$6];[.P98];[Variables.$I$6];[.Q98];[Variables.$I$6];[.R98];[Variables.$I$6];[.S98];[Variables.$I$6];[.T98];IF([.U98]&lt;&gt;&quot;&quot;;CONCATENATE([Variables.$I$6];[.U98]);&quot;&quot;);[Variables.$I$2];[Variables.$I$6]);IF([.B98]&lt;&gt;&quot;&quot;;CONCATENATE(&quot;#&quot;;[.B98]);&quot;&quot;))" office:value-type="string" office:string-value="[&quot;c2_gon_squire&quot;,&quot;Squire_of_Gondor&quot;,&quot;Squires_of_Gondor&quot;,tf_gondor| tf_mounted| tfg_helm| tfg_armor| tfg_boots| tfg_horse,0,0,fac_gondor,[itm_gondor_auxila_helm_good,itm_gon_noble_cloak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" calcext:value-type="string">
            <text:p>["c2_gon_squire","Squire_of_Gondor","Squires_of_Gondor",tf_gondor| tf_mounted| tfg_helm| tfg_armor| tfg_boots| tfg_horse,0,0,fac_gondor,[itm_gondor_auxila_helm_good,itm_gon_noble_cloak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</text:p>
          </table:table-cell>
          <table:table-cell table:style-name="ce7" office:value-type="string" calcext:value-type="string">
            <text:p>c2_gon_squire</text:p>
          </table:table-cell>
          <table:table-cell table:style-name="ce7" office:value-type="string" calcext:value-type="string">
            <text:p>Squire_of_Gondor</text:p>
          </table:table-cell>
          <table:table-cell table:style-name="ce7" office:value-type="string" calcext:value-type="string">
            <text:p>Squires_of_Gondor</text:p>
          </table:table-cell>
          <table:table-cell table:style-name="ce8" office:value-type="string" calcext:value-type="string">
            <text:p>tf_gondor| tf_mounted| tfg_helm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gondor_auxila_helm_good,</text:p>
          </table:table-cell>
          <table:table-cell table:style-name="ce19" office:value-type="string" calcext:value-type="string">
            <text:p>itm_gon_noble_cloak,</text:p>
          </table:table-cell>
          <table:table-cell table:style-name="ce11"/>
          <table:table-cell table:style-name="ce19" office:value-type="string" calcext:value-type="string">
            <text:p>itm_gondor_med_greaves,</text:p>
          </table:table-cell>
          <table:table-cell table:style-name="ce19" office:value-type="string" calcext:value-type="string">
            <text:p>itm_gondor_cav_sword,</text:p>
          </table:table-cell>
          <table:table-cell table:style-name="ce11"/>
          <table:table-cell table:style-name="ce11" office:value-type="string" calcext:value-type="string">
            <text:p>itm_gondor_courser,</text:p>
          </table:table-cell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power_strike_2|knows_weapon_master_2|knows_shield_1|knows_riding_2|knows_trainer_2|knows_tactics_1|knows_inventory_management_1|knows_wound_treatment_1|knows_leadership_3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98]&lt;&gt;&quot;&quot;;[.C98]&lt;&gt;&quot;&quot;);CONCATENATE([Variables.$I$1];[Variables.$I$7];[.B98];[Variables.$I$7];[Variables.$I$6];[Variables.$I$7];[.C98];[Variables.$I$7];[Variables.$I$6];[Variables.$I$7];[.D98];[Variables.$I$7];[Variables.$I$6];[.E98];[Variables.$I$6];[.F98];[Variables.$I$6];[.G98];[Variables.$I$6];[.H98];[Variables.$I$6];[Variables.$I$1];[.I98];[.J98];[.K98];[.L98];[.M98];[.N98];[.O98];[Variables.$I$2];[Variables.$I$6];[.P98];[Variables.$I$6];[.Q98];[Variables.$I$6];[.R98];[Variables.$I$6];[.S98];[Variables.$I$6];[.T98];IF([.U98]&lt;&gt;&quot;&quot;;CONCATENATE([Variables.$I$6];[.U98]);&quot;&quot;);[Variables.$I$2];[Variables.$I$6]);IF([.B98]&lt;&gt;&quot;&quot;;CONCATENATE(&quot;#&quot;;[.B98]);&quot;&quot;))" office:value-type="string" office:string-value="[&quot;c2_gon_squire&quot;,&quot;Squire_of_Gondor&quot;,&quot;Squires_of_Gondor&quot;,tf_gondor| tf_mounted| tfg_helm| tfg_armor| tfg_boots| tfg_horse,0,0,fac_gondor,[itm_gondor_auxila_helm_good,itm_gon_noble_cloak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" calcext:value-type="string">
            <text:p>["c2_gon_squire","Squire_of_Gondor","Squires_of_Gondor",tf_gondor| tf_mounted| tfg_helm| tfg_armor| tfg_boots| tfg_horse,0,0,fac_gondor,[itm_gondor_auxila_helm_good,itm_gon_noble_cloak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99]&lt;&gt;&quot;&quot;;[.C99]&lt;&gt;&quot;&quot;);CONCATENATE([Variables.$I$1];[Variables.$I$7];[.B99];[Variables.$I$7];[Variables.$I$6];[Variables.$I$7];[.C99];[Variables.$I$7];[Variables.$I$6];[Variables.$I$7];[.D99];[Variables.$I$7];[Variables.$I$6];[.E99];[Variables.$I$6];[.F99];[Variables.$I$6];[.G99];[Variables.$I$6];[.H99];[Variables.$I$6];[Variables.$I$1];[.I99];[.J99];[.K99];[.L99];[.M99];[.N99];[.O99];[Variables.$I$2];[Variables.$I$6];[.P99];[Variables.$I$6];[.Q99];[Variables.$I$6];[.R99];[Variables.$I$6];[.S99];[Variables.$I$6];[.T99];IF([.U99]&lt;&gt;&quot;&quot;;CONCATENATE([Variables.$I$6];[.U99]);&quot;&quot;);[Variables.$I$2];[Variables.$I$6]);IF([.B99]&lt;&gt;&quot;&quot;;CONCATENATE(&quot;#&quot;;[.B99]);&quot;&quot;))" office:value-type="string" office:string-value="[&quot;c3_gon_vet_squire&quot;,&quot;Veteran_Squire_of_Gondor&quot;,&quot;Veteran_Squires_of_Gondor&quot;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_vet_squire","Veteran_Squire_of_Gondor","Veteran_Squires_of_Gondor"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style-name="ce7" office:value-type="string" calcext:value-type="string">
            <text:p>c3_gon_vet_squire</text:p>
          </table:table-cell>
          <table:table-cell table:style-name="ce7" office:value-type="string" calcext:value-type="string">
            <text:p>Veteran_Squire_of_Gondor</text:p>
          </table:table-cell>
          <table:table-cell table:style-name="ce7" office:value-type="string" calcext:value-type="string">
            <text:p>Veteran_Squire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gondor_knight_helm_bad,</text:p>
          </table:table-cell>
          <table:table-cell table:style-name="ce11" office:value-type="string" calcext:value-type="string">
            <text:p>itm_gon_squire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gondor_med_greaves,</text:p>
          </table:table-cell>
          <table:table-cell table:style-name="ce19" office:value-type="string" calcext:value-type="string">
            <text:p>itm_gondor_cav_sword,</text:p>
          </table:table-cell>
          <table:table-cell table:style-name="ce11" office:value-type="string" calcext:value-type="string">
            <text:p>itm_gondor_shield_d,</text:p>
          </table:table-cell>
          <table:table-cell table:style-name="ce11" office:value-type="string" calcext:value-type="string">
            <text:p>itm_gondor_courser,</text:p>
          </table:table-cell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riding_2|knows_shield_2|knows_power_strike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99]&lt;&gt;&quot;&quot;;[.C99]&lt;&gt;&quot;&quot;);CONCATENATE([Variables.$I$1];[Variables.$I$7];[.B99];[Variables.$I$7];[Variables.$I$6];[Variables.$I$7];[.C99];[Variables.$I$7];[Variables.$I$6];[Variables.$I$7];[.D99];[Variables.$I$7];[Variables.$I$6];[.E99];[Variables.$I$6];[.F99];[Variables.$I$6];[.G99];[Variables.$I$6];[.H99];[Variables.$I$6];[Variables.$I$1];[.I99];[.J99];[.K99];[.L99];[.M99];[.N99];[.O99];[Variables.$I$2];[Variables.$I$6];[.P99];[Variables.$I$6];[.Q99];[Variables.$I$6];[.R99];[Variables.$I$6];[.S99];[Variables.$I$6];[.T99];IF([.U99]&lt;&gt;&quot;&quot;;CONCATENATE([Variables.$I$6];[.U99]);&quot;&quot;);[Variables.$I$2];[Variables.$I$6]);IF([.B99]&lt;&gt;&quot;&quot;;CONCATENATE(&quot;#&quot;;[.B99]);&quot;&quot;))" office:value-type="string" office:string-value="[&quot;c3_gon_vet_squire&quot;,&quot;Veteran_Squire_of_Gondor&quot;,&quot;Veteran_Squires_of_Gondor&quot;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_vet_squire","Veteran_Squire_of_Gondor","Veteran_Squires_of_Gondor"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00]&lt;&gt;&quot;&quot;;[.C100]&lt;&gt;&quot;&quot;);CONCATENATE([Variables.$I$1];[Variables.$I$7];[.B100];[Variables.$I$7];[Variables.$I$6];[Variables.$I$7];[.C100];[Variables.$I$7];[Variables.$I$6];[Variables.$I$7];[.D100];[Variables.$I$7];[Variables.$I$6];[.E100];[Variables.$I$6];[.F100];[Variables.$I$6];[.G100];[Variables.$I$6];[.H100];[Variables.$I$6];[Variables.$I$1];[.I100];[.J100];[.K100];[.L100];[.M100];[.N100];[.O100];[Variables.$I$2];[Variables.$I$6];[.P100];[Variables.$I$6];[.Q100];[Variables.$I$6];[.R100];[Variables.$I$6];[.S100];[Variables.$I$6];[.T100];IF([.U100]&lt;&gt;&quot;&quot;;CONCATENATE([Variables.$I$6];[.U100]);&quot;&quot;);[Variables.$I$2];[Variables.$I$6]);IF([.B100]&lt;&gt;&quot;&quot;;CONCATENATE(&quot;#&quot;;[.B100]);&quot;&quot;))" office:value-type="string" office:string-value="[&quot;c4_gon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style-name="ce7" office:value-type="string" calcext:value-type="string">
            <text:p>c4_gon_knight</text:p>
          </table:table-cell>
          <table:table-cell table:style-name="ce7" office:value-type="string" calcext:value-type="string">
            <text:p>Knight_of_Gondor</text:p>
          </table:table-cell>
          <table:table-cell table:style-name="ce7" office:value-type="string" calcext:value-type="string">
            <text:p>Knight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gondor_knight_helm,</text:p>
          </table:table-cell>
          <table:table-cell table:style-name="ce19" office:value-type="string" calcext:value-type="string">
            <text:p>itm_gon_knight,</text:p>
          </table:table-cell>
          <table:table-cell table:style-name="ce11" office:value-type="string" calcext:value-type="string">
            <text:p>itm_mail_mitten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19" office:value-type="string" calcext:value-type="string">
            <text:p>itm_gondor_cav_sword,itm_gondor_lance,</text:p>
          </table:table-cell>
          <table:table-cell table:style-name="ce11" office:value-type="string" calcext:value-type="string">
            <text:p>itm_gondor_shield_d,</text:p>
          </table:table-cell>
          <table:table-cell table:style-name="ce11" office:value-type="string" calcext:value-type="string">
            <text:p>itm_gondor_hunter,</text:p>
          </table:table-cell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riding_3|knows_shield_3|knows_power_strike_3|knows_ironflesh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00]&lt;&gt;&quot;&quot;;[.C100]&lt;&gt;&quot;&quot;);CONCATENATE([Variables.$I$1];[Variables.$I$7];[.B100];[Variables.$I$7];[Variables.$I$6];[Variables.$I$7];[.C100];[Variables.$I$7];[Variables.$I$6];[Variables.$I$7];[.D100];[Variables.$I$7];[Variables.$I$6];[.E100];[Variables.$I$6];[.F100];[Variables.$I$6];[.G100];[Variables.$I$6];[.H100];[Variables.$I$6];[Variables.$I$1];[.I100];[.J100];[.K100];[.L100];[.M100];[.N100];[.O100];[Variables.$I$2];[Variables.$I$6];[.P100];[Variables.$I$6];[.Q100];[Variables.$I$6];[.R100];[Variables.$I$6];[.S100];[Variables.$I$6];[.T100];IF([.U100]&lt;&gt;&quot;&quot;;CONCATENATE([Variables.$I$6];[.U100]);&quot;&quot;);[Variables.$I$2];[Variables.$I$6]);IF([.B100]&lt;&gt;&quot;&quot;;CONCATENATE(&quot;#&quot;;[.B100]);&quot;&quot;))" office:value-type="string" office:string-value="[&quot;c4_gon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01]&lt;&gt;&quot;&quot;;[.C101]&lt;&gt;&quot;&quot;);CONCATENATE([Variables.$I$1];[Variables.$I$7];[.B101];[Variables.$I$7];[Variables.$I$6];[Variables.$I$7];[.C101];[Variables.$I$7];[Variables.$I$6];[Variables.$I$7];[.D101];[Variables.$I$7];[Variables.$I$6];[.E101];[Variables.$I$6];[.F101];[Variables.$I$6];[.G101];[Variables.$I$6];[.H101];[Variables.$I$6];[Variables.$I$1];[.I101];[.J101];[.K101];[.L101];[.M101];[.N101];[.O101];[Variables.$I$2];[Variables.$I$6];[.P101];[Variables.$I$6];[.Q101];[Variables.$I$6];[.R101];[Variables.$I$6];[.S101];[Variables.$I$6];[.T101];IF([.U101]&lt;&gt;&quot;&quot;;CONCATENATE([Variables.$I$6];[.U101]);&quot;&quot;);[Variables.$I$2];[Variables.$I$6]);IF([.B101]&lt;&gt;&quot;&quot;;CONCATENATE(&quot;#&quot;;[.B101]);&quot;&quot;))" office:value-type="string" office:string-value="[&quot;c5_gon_vet_knight&quot;,&quot;Veteran_Knight_of_Gondor&quot;,&quot;Veteran_Knights_of_Gondor&quot;,tf_gondor| tf_mounted| tfg_gloves| tfg_shield| tfg_armor| tfg_helm| tfg_horse| tfg_boots,0,0,fac_gondor,[itm_gondor_knight_helm_good,itm_gon_knight,itm_mail_mittens,itm_gondor_heavy_greaves,itm_gondor_cav_sword,itm_gondor_lance,itm_gondor_shield_d,itm_gondor_warhorse,],attr_tier_5,wp_tier_5,knows_common|knows_riding_4|knows_shield_3|knows_power_strike_4|knows_ironflesh_4,gondor_face1,gondor_face3]," calcext:value-type="string">
            <text:p>["c5_gon_vet_knight","Veteran_Knight_of_Gondor","Veteran_Knights_of_Gondor",tf_gondor| tf_mounted| tfg_gloves| tfg_shield| tfg_armor| tfg_helm| tfg_horse| tfg_boots,0,0,fac_gondor,[itm_gondor_knight_helm_good,itm_gon_knight,itm_mail_mittens,itm_gondor_heavy_greaves,itm_gondor_cav_sword,itm_gondor_lance,itm_gondor_shield_d,itm_gondor_warhorse,],attr_tier_5,wp_tier_5,knows_common|knows_riding_4|knows_shield_3|knows_power_strike_4|knows_ironflesh_4,gondor_face1,gondor_face3],</text:p>
          </table:table-cell>
          <table:table-cell table:style-name="ce7" office:value-type="string" calcext:value-type="string">
            <text:p>c5_gon_vet_knight</text:p>
          </table:table-cell>
          <table:table-cell table:style-name="ce7" office:value-type="string" calcext:value-type="string">
            <text:p>Veteran_Knight_of_Gondor</text:p>
          </table:table-cell>
          <table:table-cell table:style-name="ce7" office:value-type="string" calcext:value-type="string">
            <text:p>Veteran_Knights_of_Gondor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gondor_knight_helm_good,</text:p>
          </table:table-cell>
          <table:table-cell table:style-name="ce11" office:value-type="string" calcext:value-type="string">
            <text:p>itm_gon_knight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19" office:value-type="string" calcext:value-type="string">
            <text:p>itm_gondor_cav_sword,itm_gondor_lance,</text:p>
          </table:table-cell>
          <table:table-cell table:style-name="ce19" office:value-type="string" calcext:value-type="string">
            <text:p>itm_gondor_shield_d,</text:p>
          </table:table-cell>
          <table:table-cell table:style-name="ce19" office:value-type="string" calcext:value-type="string">
            <text:p>itm_gondor_warhorse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riding_4|knows_shield_3|knows_power_strike_4|knows_ironflesh_4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B101]&lt;&gt;&quot;&quot;;[.C101]&lt;&gt;&quot;&quot;);CONCATENATE([Variables.$I$1];[Variables.$I$7];[.B101];[Variables.$I$7];[Variables.$I$6];[Variables.$I$7];[.C101];[Variables.$I$7];[Variables.$I$6];[Variables.$I$7];[.D101];[Variables.$I$7];[Variables.$I$6];[.E101];[Variables.$I$6];[.F101];[Variables.$I$6];[.G101];[Variables.$I$6];[.H101];[Variables.$I$6];[Variables.$I$1];[.I101];[.J101];[.K101];[.L101];[.M101];[.N101];[.O101];[Variables.$I$2];[Variables.$I$6];[.P101];[Variables.$I$6];[.Q101];[Variables.$I$6];[.R101];[Variables.$I$6];[.S101];[Variables.$I$6];[.T101];IF([.U101]&lt;&gt;&quot;&quot;;CONCATENATE([Variables.$I$6];[.U101]);&quot;&quot;);[Variables.$I$2];[Variables.$I$6]);IF([.B101]&lt;&gt;&quot;&quot;;CONCATENATE(&quot;#&quot;;[.B101]);&quot;&quot;))" office:value-type="string" office:string-value="[&quot;c5_gon_vet_knight&quot;,&quot;Veteran_Knight_of_Gondor&quot;,&quot;Veteran_Knights_of_Gondor&quot;,tf_gondor| tf_mounted| tfg_gloves| tfg_shield| tfg_armor| tfg_helm| tfg_horse| tfg_boots,0,0,fac_gondor,[itm_gondor_knight_helm_good,itm_gon_knight,itm_mail_mittens,itm_gondor_heavy_greaves,itm_gondor_cav_sword,itm_gondor_lance,itm_gondor_shield_d,itm_gondor_warhorse,],attr_tier_5,wp_tier_5,knows_common|knows_riding_4|knows_shield_3|knows_power_strike_4|knows_ironflesh_4,gondor_face1,gondor_face3]," calcext:value-type="string">
            <text:p>["c5_gon_vet_knight","Veteran_Knight_of_Gondor","Veteran_Knights_of_Gondor",tf_gondor| tf_mounted| tfg_gloves| tfg_shield| tfg_armor| tfg_helm| tfg_horse| tfg_boots,0,0,fac_gondor,[itm_gondor_knight_helm_good,itm_gon_knight,itm_mail_mittens,itm_gondor_heavy_greaves,itm_gondor_cav_sword,itm_gondor_lance,itm_gondor_shield_d,itm_gondor_warhorse,],attr_tier_5,wp_tier_5,knows_common|knows_riding_4|knows_shield_3|knows_power_strike_4|knows_ironflesh_4,gondor_face1,gondor_face3],</text:p>
          </table:table-cell>
          <table:table-cell table:number-columns-repeated="16362"/>
        </table:table-row>
        <table:table-row table:style-name="ro1">
          <table:table-cell table:style-name="ce6" table:formula="of:=IF(AND([.B102]&lt;&gt;&quot;&quot;;[.C102]&lt;&gt;&quot;&quot;);CONCATENATE([Variables.$I$1];[Variables.$I$7];[.B102];[Variables.$I$7];[Variables.$I$6];[Variables.$I$7];[.C102];[Variables.$I$7];[Variables.$I$6];[Variables.$I$7];[.D102];[Variables.$I$7];[Variables.$I$6];[.E102];[Variables.$I$6];[.F102];[Variables.$I$6];[.G102];[Variables.$I$6];[.H102];[Variables.$I$6];[Variables.$I$1];[.I102];[.J102];[.K102];[.L102];[.M102];[.N102];[.O102];[Variables.$I$2];[Variables.$I$6];[.P102];[Variables.$I$6];[.Q102];[Variables.$I$6];[.R102];[Variables.$I$6];[.S102];[Variables.$I$6];[.T102];IF([.U102]&lt;&gt;&quot;&quot;;CONCATENATE([Variables.$I$6];[.U102]);&quot;&quot;);[Variables.$I$2];[Variables.$I$6]);IF([.B102]&lt;&gt;&quot;&quot;;CONCATENATE(&quot;#&quot;;[.B102]);&quot;&quot;))" office:value-type="string" office:string-value="[&quot;c6_gon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_heavy,],attr_tier_6,wp_tier_6,knows_common|knows_riding_6|knows_shield_4|knows_power_strike_6|knows_ironflesh_6,gondor_face1,gondor_face3]," calcext:value-type="string">
            <text:p>["c6_gon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_heavy,],attr_tier_6,wp_tier_6,knows_common|knows_riding_6|knows_shield_4|knows_power_strike_6|knows_ironflesh_6,gondor_face1,gondor_face3],</text:p>
          </table:table-cell>
          <table:table-cell table:style-name="ce7" office:value-type="string" calcext:value-type="string">
            <text:p>c6_gon_tower_knight</text:p>
          </table:table-cell>
          <table:table-cell table:style-name="ce7" office:value-type="string" calcext:value-type="string">
            <text:p>Knight_of_the_Citadel</text:p>
          </table:table-cell>
          <table:table-cell table:style-name="ce7" office:value-type="string" calcext:value-type="string">
            <text:p>Knights_of_the_Citadel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gondor_citadel_knight_helm,</text:p>
          </table:table-cell>
          <table:table-cell table:style-name="ce11" office:value-type="string" calcext:value-type="string">
            <text:p>itm_gon_tower_knight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11" office:value-type="string" calcext:value-type="string">
            <text:p>itm_gondor_lance_banner,itm_gondor_citadel_sword,</text:p>
          </table:table-cell>
          <table:table-cell table:style-name="ce19" office:value-type="string" calcext:value-type="string">
            <text:p>itm_gondor_shield_b,</text:p>
          </table:table-cell>
          <table:table-cell table:style-name="ce19" office:value-type="string" calcext:value-type="string">
            <text:p>itm_gondor_warhorse_heavy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6|knows_shield_4|knows_power_strike_6|knows_ironflesh_6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B102]&lt;&gt;&quot;&quot;;[.C102]&lt;&gt;&quot;&quot;);CONCATENATE([Variables.$I$1];[Variables.$I$7];[.B102];[Variables.$I$7];[Variables.$I$6];[Variables.$I$7];[.C102];[Variables.$I$7];[Variables.$I$6];[Variables.$I$7];[.D102];[Variables.$I$7];[Variables.$I$6];[.E102];[Variables.$I$6];[.F102];[Variables.$I$6];[.G102];[Variables.$I$6];[.H102];[Variables.$I$6];[Variables.$I$1];[.I102];[.J102];[.K102];[.L102];[.M102];[.N102];[.O102];[Variables.$I$2];[Variables.$I$6];[.P102];[Variables.$I$6];[.Q102];[Variables.$I$6];[.R102];[Variables.$I$6];[.S102];[Variables.$I$6];[.T102];IF([.U102]&lt;&gt;&quot;&quot;;CONCATENATE([Variables.$I$6];[.U102]);&quot;&quot;);[Variables.$I$2];[Variables.$I$6]);IF([.B102]&lt;&gt;&quot;&quot;;CONCATENATE(&quot;#&quot;;[.B102]);&quot;&quot;))" office:value-type="string" office:string-value="[&quot;c6_gon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_heavy,],attr_tier_6,wp_tier_6,knows_common|knows_riding_6|knows_shield_4|knows_power_strike_6|knows_ironflesh_6,gondor_face1,gondor_face3]," calcext:value-type="string">
            <text:p>["c6_gon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_heavy,],attr_tier_6,wp_tier_6,knows_common|knows_riding_6|knows_shield_4|knows_power_strike_6|knows_ironflesh_6,gondor_face1,gondor_face3],</text:p>
          </table:table-cell>
          <table:table-cell table:number-columns-repeated="16362"/>
        </table:table-row>
        <table:table-row table:style-name="ro1">
          <table:table-cell table:style-name="ce6" table:formula="of:=IF(AND([.B103]&lt;&gt;&quot;&quot;;[.C103]&lt;&gt;&quot;&quot;);CONCATENATE([Variables.$I$1];[Variables.$I$7];[.B103];[Variables.$I$7];[Variables.$I$6];[Variables.$I$7];[.C103];[Variables.$I$7];[Variables.$I$6];[Variables.$I$7];[.D103];[Variables.$I$7];[Variables.$I$6];[.E103];[Variables.$I$6];[.F103];[Variables.$I$6];[.G103];[Variables.$I$6];[.H103];[Variables.$I$6];[Variables.$I$1];[.I103];[.J103];[.K103];[.L103];[.M103];[.N103];[.O103];[Variables.$I$2];[Variables.$I$6];[.P103];[Variables.$I$6];[.Q103];[Variables.$I$6];[.R103];[Variables.$I$6];[.S103];[Variables.$I$6];[.T103];IF([.U103]&lt;&gt;&quot;&quot;;CONCATENATE([Variables.$I$6];[.U103]);&quot;&quot;);[Variables.$I$2];[Variables.$I$6]);IF([.B103]&lt;&gt;&quot;&quot;;CONCATENATE(&quot;#&quot;;[.B103]);&quot;&quot;))" office:value-type="string" office:string-value="#Gondor Archers" calcext:value-type="string">
            <text:p>#Gondor Archers</text:p>
          </table:table-cell>
          <table:table-cell table:style-name="ce21" office:value-type="string" calcext:value-type="string">
            <text:p>Gondor Archers</text:p>
          </table:table-cell>
          <table:table-cell table:style-name="ce21" table:number-columns-repeated="9"/>
          <table:table-cell table:style-name="ce25" table:number-columns-repeated="2"/>
          <table:table-cell table:style-name="ce21" table:number-columns-repeated="7"/>
          <table:table-cell table:style-name="ce23"/>
          <table:table-cell table:style-name="ce23" table:formula="of:=IF(AND([.B103]&lt;&gt;&quot;&quot;;[.C103]&lt;&gt;&quot;&quot;);CONCATENATE([Variables.$I$1];[Variables.$I$7];[.B103];[Variables.$I$7];[Variables.$I$6];[Variables.$I$7];[.C103];[Variables.$I$7];[Variables.$I$6];[Variables.$I$7];[.D103];[Variables.$I$7];[Variables.$I$6];[.E103];[Variables.$I$6];[.F103];[Variables.$I$6];[.G103];[Variables.$I$6];[.H103];[Variables.$I$6];[Variables.$I$1];[.I103];[.J103];[.K103];[.L103];[.M103];[.N103];[.O103];[Variables.$I$2];[Variables.$I$6];[.P103];[Variables.$I$6];[.Q103];[Variables.$I$6];[.R103];[Variables.$I$6];[.S103];[Variables.$I$6];[.T103];IF([.U103]&lt;&gt;&quot;&quot;;CONCATENATE([Variables.$I$6];[.U103]);&quot;&quot;);[Variables.$I$2];[Variables.$I$6]);IF([.B103]&lt;&gt;&quot;&quot;;CONCATENATE(&quot;#&quot;;[.B103]);&quot;&quot;))" office:value-type="string" office:string-value="#Gondor Archers" calcext:value-type="string">
            <text:p>#Gondor Archers</text:p>
          </table:table-cell>
          <table:table-cell table:style-name="ce24" table:number-columns-repeated="43"/>
          <table:table-cell table:number-columns-repeated="16319"/>
        </table:table-row>
        <table:table-row table:style-name="ro1">
          <table:table-cell table:style-name="ce6" table:formula="of:=IF(AND([.B104]&lt;&gt;&quot;&quot;;[.C104]&lt;&gt;&quot;&quot;);CONCATENATE([Variables.$I$1];[Variables.$I$7];[.B104];[Variables.$I$7];[Variables.$I$6];[Variables.$I$7];[.C104];[Variables.$I$7];[Variables.$I$6];[Variables.$I$7];[.D104];[Variables.$I$7];[Variables.$I$6];[.E104];[Variables.$I$6];[.F104];[Variables.$I$6];[.G104];[Variables.$I$6];[.H104];[Variables.$I$6];[Variables.$I$1];[.I104];[.J104];[.K104];[.L104];[.M104];[.N104];[.O104];[Variables.$I$2];[Variables.$I$6];[.P104];[Variables.$I$6];[.Q104];[Variables.$I$6];[.R104];[Variables.$I$6];[.S104];[Variables.$I$6];[.T104];IF([.U104]&lt;&gt;&quot;&quot;;CONCATENATE([Variables.$I$6];[.U104]);&quot;&quot;);[Variables.$I$2];[Variables.$I$6]);IF([.B104]&lt;&gt;&quot;&quot;;CONCATENATE(&quot;#&quot;;[.B104]);&quot;&quot;))" office:value-type="string" office:string-value="[&quot;a3_gon_bowman&quot;,&quot;Bowman_of_Gondor&quot;,&quot;Bowmen_of_Gondor&quot;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" calcext:value-type="string">
            <text:p>["a3_gon_bowman","Bowman_of_Gondor","Bowmen_of_Gondor"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</text:p>
          </table:table-cell>
          <table:table-cell table:style-name="ce7" office:value-type="string" calcext:value-type="string">
            <text:p>a3_gon_bowman</text:p>
          </table:table-cell>
          <table:table-cell table:style-name="ce7" office:value-type="string" calcext:value-type="string">
            <text:p>Bowman_of_Gondor</text:p>
          </table:table-cell>
          <table:table-cell table:style-name="ce7" office:value-type="string" calcext:value-type="string">
            <text:p>Bowmen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gondorian_archer_helm_bad,</text:p>
          </table:table-cell>
          <table:table-cell table:style-name="ce19" office:value-type="string" calcext:value-type="string">
            <text:p>itm_gon_bowman,</text:p>
          </table:table-cell>
          <table:table-cell table:style-name="ce11"/>
          <table:table-cell table:style-name="ce11" office:value-type="string" calcext:value-type="string">
            <text:p>itm_gondor_med_greaves,</text:p>
          </table:table-cell>
          <table:table-cell table:style-name="ce19" office:value-type="string" calcext:value-type="string">
            <text:p>itm_gondor_arrows,itm_regular_bow,</text:p>
          </table:table-cell>
          <table:table-cell table:style-name="ce11" office:value-type="string" calcext:value-type="string">
            <text:p>itm_gondor_short_sword,</text:p>
          </table:table-cell>
          <table:table-cell table:style-name="ce11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bow_3</text:p>
          </table:table-cell>
          <table:table-cell table:style-name="ce12" office:value-type="string" calcext:value-type="string">
            <text:p>knows_common|knows_athletics_1|knows_power_draw_2|knows_ironflesh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04]&lt;&gt;&quot;&quot;;[.C104]&lt;&gt;&quot;&quot;);CONCATENATE([Variables.$I$1];[Variables.$I$7];[.B104];[Variables.$I$7];[Variables.$I$6];[Variables.$I$7];[.C104];[Variables.$I$7];[Variables.$I$6];[Variables.$I$7];[.D104];[Variables.$I$7];[Variables.$I$6];[.E104];[Variables.$I$6];[.F104];[Variables.$I$6];[.G104];[Variables.$I$6];[.H104];[Variables.$I$6];[Variables.$I$1];[.I104];[.J104];[.K104];[.L104];[.M104];[.N104];[.O104];[Variables.$I$2];[Variables.$I$6];[.P104];[Variables.$I$6];[.Q104];[Variables.$I$6];[.R104];[Variables.$I$6];[.S104];[Variables.$I$6];[.T104];IF([.U104]&lt;&gt;&quot;&quot;;CONCATENATE([Variables.$I$6];[.U104]);&quot;&quot;);[Variables.$I$2];[Variables.$I$6]);IF([.B104]&lt;&gt;&quot;&quot;;CONCATENATE(&quot;#&quot;;[.B104]);&quot;&quot;))" office:value-type="string" office:string-value="[&quot;a3_gon_bowman&quot;,&quot;Bowman_of_Gondor&quot;,&quot;Bowmen_of_Gondor&quot;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" calcext:value-type="string">
            <text:p>["a3_gon_bowman","Bowman_of_Gondor","Bowmen_of_Gondor"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05]&lt;&gt;&quot;&quot;;[.C105]&lt;&gt;&quot;&quot;);CONCATENATE([Variables.$I$1];[Variables.$I$7];[.B105];[Variables.$I$7];[Variables.$I$6];[Variables.$I$7];[.C105];[Variables.$I$7];[Variables.$I$6];[Variables.$I$7];[.D105];[Variables.$I$7];[Variables.$I$6];[.E105];[Variables.$I$6];[.F105];[Variables.$I$6];[.G105];[Variables.$I$6];[.H105];[Variables.$I$6];[Variables.$I$1];[.I105];[.J105];[.K105];[.L105];[.M105];[.N105];[.O105];[Variables.$I$2];[Variables.$I$6];[.P105];[Variables.$I$6];[.Q105];[Variables.$I$6];[.R105];[Variables.$I$6];[.S105];[Variables.$I$6];[.T105];IF([.U105]&lt;&gt;&quot;&quot;;CONCATENATE([Variables.$I$6];[.U105]);&quot;&quot;);[Variables.$I$2];[Variables.$I$6]);IF([.B105]&lt;&gt;&quot;&quot;;CONCATENATE(&quot;#&quot;;[.B105]);&quot;&quot;))" office:value-type="string" office:string-value="[&quot;a4_gon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" calcext:value-type="string">
            <text:p>["a4_gon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</text:p>
          </table:table-cell>
          <table:table-cell table:style-name="ce7" office:value-type="string" calcext:value-type="string">
            <text:p>a4_gon_archer</text:p>
          </table:table-cell>
          <table:table-cell table:style-name="ce7" office:value-type="string" calcext:value-type="string">
            <text:p>Archer_of_Gondor</text:p>
          </table:table-cell>
          <table:table-cell table:style-name="ce7" office:value-type="string" calcext:value-type="string">
            <text:p>Archers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gondorian_archer_helm,</text:p>
          </table:table-cell>
          <table:table-cell table:style-name="ce11" office:value-type="string" calcext:value-type="string">
            <text:p>itm_gon_archer,</text:p>
          </table:table-cell>
          <table:table-cell table:style-name="ce11"/>
          <table:table-cell table:style-name="ce19" office:value-type="string" calcext:value-type="string">
            <text:p>itm_gondor_med_greaves,</text:p>
          </table:table-cell>
          <table:table-cell table:style-name="ce19" office:value-type="string" calcext:value-type="string">
            <text:p>itm_gondor_arrows,itm_gondor_bow,</text:p>
          </table:table-cell>
          <table:table-cell table:style-name="ce11" office:value-type="string" calcext:value-type="string">
            <text:p>itm_gondor_short_sword,</text:p>
          </table:table-cell>
          <table:table-cell table:style-name="ce11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bow_4</text:p>
          </table:table-cell>
          <table:table-cell table:style-name="ce12" office:value-type="string" calcext:value-type="string">
            <text:p>knows_common|knows_athletics_2|knows_power_draw_3|knows_ironflesh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05]&lt;&gt;&quot;&quot;;[.C105]&lt;&gt;&quot;&quot;);CONCATENATE([Variables.$I$1];[Variables.$I$7];[.B105];[Variables.$I$7];[Variables.$I$6];[Variables.$I$7];[.C105];[Variables.$I$7];[Variables.$I$6];[Variables.$I$7];[.D105];[Variables.$I$7];[Variables.$I$6];[.E105];[Variables.$I$6];[.F105];[Variables.$I$6];[.G105];[Variables.$I$6];[.H105];[Variables.$I$6];[Variables.$I$1];[.I105];[.J105];[.K105];[.L105];[.M105];[.N105];[.O105];[Variables.$I$2];[Variables.$I$6];[.P105];[Variables.$I$6];[.Q105];[Variables.$I$6];[.R105];[Variables.$I$6];[.S105];[Variables.$I$6];[.T105];IF([.U105]&lt;&gt;&quot;&quot;;CONCATENATE([Variables.$I$6];[.U105]);&quot;&quot;);[Variables.$I$2];[Variables.$I$6]);IF([.B105]&lt;&gt;&quot;&quot;;CONCATENATE(&quot;#&quot;;[.B105]);&quot;&quot;))" office:value-type="string" office:string-value="[&quot;a4_gon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" calcext:value-type="string">
            <text:p>["a4_gon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06]&lt;&gt;&quot;&quot;;[.C106]&lt;&gt;&quot;&quot;);CONCATENATE([Variables.$I$1];[Variables.$I$7];[.B106];[Variables.$I$7];[Variables.$I$6];[Variables.$I$7];[.C106];[Variables.$I$7];[Variables.$I$6];[Variables.$I$7];[.D106];[Variables.$I$7];[Variables.$I$6];[.E106];[Variables.$I$6];[.F106];[Variables.$I$6];[.G106];[Variables.$I$6];[.H106];[Variables.$I$6];[Variables.$I$1];[.I106];[.J106];[.K106];[.L106];[.M106];[.N106];[.O106];[Variables.$I$2];[Variables.$I$6];[.P106];[Variables.$I$6];[.Q106];[Variables.$I$6];[.R106];[Variables.$I$6];[.S106];[Variables.$I$6];[.T106];IF([.U106]&lt;&gt;&quot;&quot;;CONCATENATE([Variables.$I$6];[.U106]);&quot;&quot;);[Variables.$I$2];[Variables.$I$6]);IF([.B106]&lt;&gt;&quot;&quot;;CONCATENATE(&quot;#&quot;;[.B106]);&quot;&quot;))" office:value-type="string" office:string-value="[&quot;a5_gon_vet_archer&quot;,&quot;Veteran_Archer_of_Gondor&quot;,&quot;Veteran_Archers_of_Gondor&quot;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" calcext:value-type="string">
            <text:p>["a5_gon_vet_archer","Veteran_Archer_of_Gondor","Veteran_Archers_of_Gondor"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style-name="ce7" office:value-type="string" calcext:value-type="string">
            <text:p>a5_gon_vet_archer</text:p>
          </table:table-cell>
          <table:table-cell table:style-name="ce7" office:value-type="string" calcext:value-type="string">
            <text:p>Veteran_Archer_of_Gondor</text:p>
          </table:table-cell>
          <table:table-cell table:style-name="ce7" office:value-type="string" calcext:value-type="string">
            <text:p>Veteran_Archers_of_Gondo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gondorian_archer_helm_good,</text:p>
          </table:table-cell>
          <table:table-cell table:style-name="ce11" office:value-type="string" calcext:value-type="string">
            <text:p>itm_gon_footman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gondor_med_greaves,</text:p>
          </table:table-cell>
          <table:table-cell table:style-name="ce19" office:value-type="string" calcext:value-type="string">
            <text:p>itm_gondor_bow,itm_gondor_arrows,</text:p>
          </table:table-cell>
          <table:table-cell table:style-name="ce11" office:value-type="string" calcext:value-type="string">
            <text:p>itm_gondor_sword,</text:p>
          </table:table-cell>
          <table:table-cell table:style-name="ce11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bow_5</text:p>
          </table:table-cell>
          <table:table-cell table:style-name="ce12" office:value-type="string" calcext:value-type="string">
            <text:p>knows_common|knows_athletics_2|knows_power_draw_4|knows_power_strike_2|knows_ironflesh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06]&lt;&gt;&quot;&quot;;[.C106]&lt;&gt;&quot;&quot;);CONCATENATE([Variables.$I$1];[Variables.$I$7];[.B106];[Variables.$I$7];[Variables.$I$6];[Variables.$I$7];[.C106];[Variables.$I$7];[Variables.$I$6];[Variables.$I$7];[.D106];[Variables.$I$7];[Variables.$I$6];[.E106];[Variables.$I$6];[.F106];[Variables.$I$6];[.G106];[Variables.$I$6];[.H106];[Variables.$I$6];[Variables.$I$1];[.I106];[.J106];[.K106];[.L106];[.M106];[.N106];[.O106];[Variables.$I$2];[Variables.$I$6];[.P106];[Variables.$I$6];[.Q106];[Variables.$I$6];[.R106];[Variables.$I$6];[.S106];[Variables.$I$6];[.T106];IF([.U106]&lt;&gt;&quot;&quot;;CONCATENATE([Variables.$I$6];[.U106]);&quot;&quot;);[Variables.$I$2];[Variables.$I$6]);IF([.B106]&lt;&gt;&quot;&quot;;CONCATENATE(&quot;#&quot;;[.B106]);&quot;&quot;))" office:value-type="string" office:string-value="[&quot;a5_gon_vet_archer&quot;,&quot;Veteran_Archer_of_Gondor&quot;,&quot;Veteran_Archers_of_Gondor&quot;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" calcext:value-type="string">
            <text:p>["a5_gon_vet_archer","Veteran_Archer_of_Gondor","Veteran_Archers_of_Gondor"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07]&lt;&gt;&quot;&quot;;[.C107]&lt;&gt;&quot;&quot;);CONCATENATE([Variables.$I$1];[Variables.$I$7];[.B107];[Variables.$I$7];[Variables.$I$6];[Variables.$I$7];[.C107];[Variables.$I$7];[Variables.$I$6];[Variables.$I$7];[.D107];[Variables.$I$7];[Variables.$I$6];[.E107];[Variables.$I$6];[.F107];[Variables.$I$6];[.G107];[Variables.$I$6];[.H107];[Variables.$I$6];[Variables.$I$1];[.I107];[.J107];[.K107];[.L107];[.M107];[.N107];[.O107];[Variables.$I$2];[Variables.$I$6];[.P107];[Variables.$I$6];[.Q107];[Variables.$I$6];[.R107];[Variables.$I$6];[.S107];[Variables.$I$6];[.T107];IF([.U107]&lt;&gt;&quot;&quot;;CONCATENATE([Variables.$I$6];[.U107]);&quot;&quot;);[Variables.$I$2];[Variables.$I$6]);IF([.B107]&lt;&gt;&quot;&quot;;CONCATENATE(&quot;#&quot;;[.B107]);&quot;&quot;))" office:value-type="string" office:string-value="[&quot;a6_gon_tower_archer&quot;,&quot;Archer_of_the_Tower_Guard&quot;,&quot;Archers_of_the_Tower_Guard&quot;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" calcext:value-type="string">
            <text:p>["a6_gon_tower_archer","Archer_of_the_Tower_Guard","Archers_of_the_Tower_Guard"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</text:p>
          </table:table-cell>
          <table:table-cell table:style-name="ce7" office:value-type="string" calcext:value-type="string">
            <text:p>a6_gon_tower_archer</text:p>
          </table:table-cell>
          <table:table-cell table:style-name="ce7" office:value-type="string" calcext:value-type="string">
            <text:p>Archer_of_the_Tower_Guard</text:p>
          </table:table-cell>
          <table:table-cell table:style-name="ce7" office:value-type="string" calcext:value-type="string">
            <text:p>Archers_of_the_Tower_Guard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tower_archer_helm,</text:p>
          </table:table-cell>
          <table:table-cell table:style-name="ce19" office:value-type="string" calcext:value-type="string">
            <text:p>itm_gon_steward_guard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19" office:value-type="string" calcext:value-type="string">
            <text:p>itm_gondor_bow,itm_gondor_arrows,itm_gondor_arrows,</text:p>
          </table:table-cell>
          <table:table-cell table:style-name="ce11" office:value-type="string" calcext:value-type="string">
            <text:p>itm_gondor_citadel_sword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bow_6</text:p>
          </table:table-cell>
          <table:table-cell table:style-name="ce12" office:value-type="string" calcext:value-type="string">
            <text:p>knows_common|knows_athletics_3|knows_power_draw_6|knows_power_strike_2|knows_ironflesh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B107]&lt;&gt;&quot;&quot;;[.C107]&lt;&gt;&quot;&quot;);CONCATENATE([Variables.$I$1];[Variables.$I$7];[.B107];[Variables.$I$7];[Variables.$I$6];[Variables.$I$7];[.C107];[Variables.$I$7];[Variables.$I$6];[Variables.$I$7];[.D107];[Variables.$I$7];[Variables.$I$6];[.E107];[Variables.$I$6];[.F107];[Variables.$I$6];[.G107];[Variables.$I$6];[.H107];[Variables.$I$6];[Variables.$I$1];[.I107];[.J107];[.K107];[.L107];[.M107];[.N107];[.O107];[Variables.$I$2];[Variables.$I$6];[.P107];[Variables.$I$6];[.Q107];[Variables.$I$6];[.R107];[Variables.$I$6];[.S107];[Variables.$I$6];[.T107];IF([.U107]&lt;&gt;&quot;&quot;;CONCATENATE([Variables.$I$6];[.U107]);&quot;&quot;);[Variables.$I$2];[Variables.$I$6]);IF([.B107]&lt;&gt;&quot;&quot;;CONCATENATE(&quot;#&quot;;[.B107]);&quot;&quot;))" office:value-type="string" office:string-value="[&quot;a6_gon_tower_archer&quot;,&quot;Archer_of_the_Tower_Guard&quot;,&quot;Archers_of_the_Tower_Guard&quot;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" calcext:value-type="string">
            <text:p>["a6_gon_tower_archer","Archer_of_the_Tower_Guard","Archers_of_the_Tower_Guard"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</text:p>
          </table:table-cell>
          <table:table-cell table:number-columns-repeated="16362"/>
        </table:table-row>
        <table:table-row table:style-name="ro1">
          <table:table-cell table:style-name="ce6" table:formula="of:=IF(AND([.B108]&lt;&gt;&quot;&quot;;[.C108]&lt;&gt;&quot;&quot;);CONCATENATE([Variables.$I$1];[Variables.$I$7];[.B108];[Variables.$I$7];[Variables.$I$6];[Variables.$I$7];[.C108];[Variables.$I$7];[Variables.$I$6];[Variables.$I$7];[.D108];[Variables.$I$7];[Variables.$I$6];[.E108];[Variables.$I$6];[.F108];[Variables.$I$6];[.G108];[Variables.$I$6];[.H108];[Variables.$I$6];[Variables.$I$1];[.I108];[.J108];[.K108];[.L108];[.M108];[.N108];[.O108];[Variables.$I$2];[Variables.$I$6];[.P108];[Variables.$I$6];[.Q108];[Variables.$I$6];[.R108];[Variables.$I$6];[.S108];[Variables.$I$6];[.T108];IF([.U108]&lt;&gt;&quot;&quot;;CONCATENATE([Variables.$I$6];[.U108]);&quot;&quot;);[Variables.$I$2];[Variables.$I$6]);IF([.B108]&lt;&gt;&quot;&quot;;CONCATENATE(&quot;#&quot;;[.B108]);&quot;&quot;))" office:value-type="string" office:string-value="#Special Denethor Guards (only for scene)" calcext:value-type="string">
            <text:p>#Special Denethor Guards (only for scene)</text:p>
          </table:table-cell>
          <table:table-cell table:style-name="ce21" office:value-type="string" calcext:value-type="string">
            <text:p>Special Denethor Guards (only for scene)</text:p>
          </table:table-cell>
          <table:table-cell table:style-name="ce21" table:number-columns-repeated="6"/>
          <table:table-cell table:style-name="ce25"/>
          <table:table-cell table:style-name="ce21"/>
          <table:table-cell table:style-name="ce25" table:number-columns-repeated="4"/>
          <table:table-cell table:style-name="ce21" table:number-columns-repeated="6"/>
          <table:table-cell table:style-name="ce23"/>
          <table:table-cell table:style-name="ce23" table:formula="of:=IF(AND([.B108]&lt;&gt;&quot;&quot;;[.C108]&lt;&gt;&quot;&quot;);CONCATENATE([Variables.$I$1];[Variables.$I$7];[.B108];[Variables.$I$7];[Variables.$I$6];[Variables.$I$7];[.C108];[Variables.$I$7];[Variables.$I$6];[Variables.$I$7];[.D108];[Variables.$I$7];[Variables.$I$6];[.E108];[Variables.$I$6];[.F108];[Variables.$I$6];[.G108];[Variables.$I$6];[.H108];[Variables.$I$6];[Variables.$I$1];[.I108];[.J108];[.K108];[.L108];[.M108];[.N108];[.O108];[Variables.$I$2];[Variables.$I$6];[.P108];[Variables.$I$6];[.Q108];[Variables.$I$6];[.R108];[Variables.$I$6];[.S108];[Variables.$I$6];[.T108];IF([.U108]&lt;&gt;&quot;&quot;;CONCATENATE([Variables.$I$6];[.U108]);&quot;&quot;);[Variables.$I$2];[Variables.$I$6]);IF([.B108]&lt;&gt;&quot;&quot;;CONCATENATE(&quot;#&quot;;[.B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16362"/>
        </table:table-row>
        <table:table-row table:style-name="ro1">
          <table:table-cell table:style-name="ce6" table:formula="of:=IF(AND([.B109]&lt;&gt;&quot;&quot;;[.C109]&lt;&gt;&quot;&quot;);CONCATENATE([Variables.$I$1];[Variables.$I$7];[.B109];[Variables.$I$7];[Variables.$I$6];[Variables.$I$7];[.C109];[Variables.$I$7];[Variables.$I$6];[Variables.$I$7];[.D109];[Variables.$I$7];[Variables.$I$6];[.E109];[Variables.$I$6];[.F109];[Variables.$I$6];[.G109];[Variables.$I$6];[.H109];[Variables.$I$6];[Variables.$I$1];[.I109];[.J109];[.K109];[.L109];[.M109];[.N109];[.O109];[Variables.$I$2];[Variables.$I$6];[.P109];[Variables.$I$6];[.Q109];[Variables.$I$6];[.R109];[Variables.$I$6];[.S109];[Variables.$I$6];[.T109];IF([.U109]&lt;&gt;&quot;&quot;;CONCATENATE([Variables.$I$6];[.U109]);&quot;&quot;);[Variables.$I$2];[Variables.$I$6]);IF([.B109]&lt;&gt;&quot;&quot;;CONCATENATE(&quot;#&quot;;[.B109]);&quot;&quot;))" office:value-type="string" office:string-value="[&quot;steward_guard&quot;,&quot;Steward's_Guard&quot;,&quot;Steward's_Guards&quot;,tf_gondor| tfg_gloves| tfg_armor| tfg_helm| tfg_boots,0,0,fac_gondor,[itm_gondor_leader_helm,itm_gon_steward_guard,itm_mail_mittens,itm_gondor_heavy_greaves,itm_gondor_tower_spear,itm_gondor_citadel_sword,itm_gondor_2h_sword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armor| tfg_helm| tfg_boots,0,0,fac_gondor,[itm_gondor_leader_helm,itm_gon_steward_guard,itm_mail_mittens,itm_gondor_heavy_greaves,itm_gondor_tower_spear,itm_gondor_citadel_sword,itm_gondor_2h_sword,itm_gon_tab_shield_b,],attr_tier_6,wp_tier_6,knows_common|knows_athletics_4|knows_shield_6|knows_power_strike_6|knows_ironflesh_4,gondor_face1,gondor_face3],</text:p>
          </table:table-cell>
          <table:table-cell table:style-name="ce7" office:value-type="string" calcext:value-type="string">
            <text:p>steward_guard</text:p>
          </table:table-cell>
          <table:table-cell table:style-name="ce7" office:value-type="string" calcext:value-type="string">
            <text:p>Steward's_Guard</text:p>
          </table:table-cell>
          <table:table-cell table:style-name="ce7" office:value-type="string" calcext:value-type="string">
            <text:p>Steward's_Guards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gondor_leader_helm,</text:p>
          </table:table-cell>
          <table:table-cell table:style-name="ce11" office:value-type="string" calcext:value-type="string">
            <text:p>itm_gon_steward_guard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11" office:value-type="string" calcext:value-type="string">
            <text:p>itm_gondor_tower_spear,itm_gondor_citadel_sword,itm_gondor_2h_sword,</text:p>
          </table:table-cell>
          <table:table-cell table:style-name="ce19" office:value-type="string" calcext:value-type="string">
            <text:p>itm_gon_tab_shield_b,</text:p>
          </table:table-cell>
          <table:table-cell table:style-name="ce19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4|knows_shield_6|knows_power_strike_6|knows_ironflesh_4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B109]&lt;&gt;&quot;&quot;;[.C109]&lt;&gt;&quot;&quot;);CONCATENATE([Variables.$I$1];[Variables.$I$7];[.B109];[Variables.$I$7];[Variables.$I$6];[Variables.$I$7];[.C109];[Variables.$I$7];[Variables.$I$6];[Variables.$I$7];[.D109];[Variables.$I$7];[Variables.$I$6];[.E109];[Variables.$I$6];[.F109];[Variables.$I$6];[.G109];[Variables.$I$6];[.H109];[Variables.$I$6];[Variables.$I$1];[.I109];[.J109];[.K109];[.L109];[.M109];[.N109];[.O109];[Variables.$I$2];[Variables.$I$6];[.P109];[Variables.$I$6];[.Q109];[Variables.$I$6];[.R109];[Variables.$I$6];[.S109];[Variables.$I$6];[.T109];IF([.U109]&lt;&gt;&quot;&quot;;CONCATENATE([Variables.$I$6];[.U109]);&quot;&quot;);[Variables.$I$2];[Variables.$I$6]);IF([.B109]&lt;&gt;&quot;&quot;;CONCATENATE(&quot;#&quot;;[.B109]);&quot;&quot;))" office:value-type="string" office:string-value="[&quot;steward_guard&quot;,&quot;Steward's_Guard&quot;,&quot;Steward's_Guards&quot;,tf_gondor| tfg_gloves| tfg_armor| tfg_helm| tfg_boots,0,0,fac_gondor,[itm_gondor_leader_helm,itm_gon_steward_guard,itm_mail_mittens,itm_gondor_heavy_greaves,itm_gondor_tower_spear,itm_gondor_citadel_sword,itm_gondor_2h_sword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armor| tfg_helm| tfg_boots,0,0,fac_gondor,[itm_gondor_leader_helm,itm_gon_steward_guard,itm_mail_mittens,itm_gondor_heavy_greaves,itm_gondor_tower_spear,itm_gondor_citadel_sword,itm_gondor_2h_sword,itm_gon_tab_shield_b,],attr_tier_6,wp_tier_6,knows_common|knows_athletics_4|knows_shield_6|knows_power_strike_6|knows_ironflesh_4,gondor_face1,gondor_face3],</text:p>
          </table:table-cell>
          <table:table-cell table:number-columns-repeated="16362"/>
        </table:table-row>
        <table:table-row table:style-name="ro1">
          <table:table-cell table:style-name="ce6" table:formula="of:=IF(AND([.B110]&lt;&gt;&quot;&quot;;[.C110]&lt;&gt;&quot;&quot;);CONCATENATE([Variables.$I$1];[Variables.$I$7];[.B110];[Variables.$I$7];[Variables.$I$6];[Variables.$I$7];[.C110];[Variables.$I$7];[Variables.$I$6];[Variables.$I$7];[.D110];[Variables.$I$7];[Variables.$I$6];[.E110];[Variables.$I$6];[.F110];[Variables.$I$6];[.G110];[Variables.$I$6];[.H110];[Variables.$I$6];[Variables.$I$1];[.I110];[.J110];[.K110];[.L110];[.M110];[.N110];[.O110];[Variables.$I$2];[Variables.$I$6];[.P110];[Variables.$I$6];[.Q110];[Variables.$I$6];[.R110];[Variables.$I$6];[.S110];[Variables.$I$6];[.T110];IF([.U110]&lt;&gt;&quot;&quot;;CONCATENATE([Variables.$I$6];[.U110]);&quot;&quot;);[Variables.$I$2];[Variables.$I$6]);IF([.B110]&lt;&gt;&quot;&quot;;CONCATENATE(&quot;#&quot;;[.B110]);&quot;&quot;))" office:value-type="string" office:string-value="#Rangers" calcext:value-type="string">
            <text:p>#Rangers</text:p>
          </table:table-cell>
          <table:table-cell table:style-name="ce5" office:value-type="string" calcext:value-type="string">
            <text:p>Rangers</text:p>
          </table:table-cell>
          <table:table-cell table:style-name="ce6" table:number-columns-repeated="19"/>
          <table:table-cell table:style-name="ce6" table:formula="of:=IF(AND([.B110]&lt;&gt;&quot;&quot;;[.C110]&lt;&gt;&quot;&quot;);CONCATENATE([Variables.$I$1];[Variables.$I$7];[.B110];[Variables.$I$7];[Variables.$I$6];[Variables.$I$7];[.C110];[Variables.$I$7];[Variables.$I$6];[Variables.$I$7];[.D110];[Variables.$I$7];[Variables.$I$6];[.E110];[Variables.$I$6];[.F110];[Variables.$I$6];[.G110];[Variables.$I$6];[.H110];[Variables.$I$6];[Variables.$I$1];[.I110];[.J110];[.K110];[.L110];[.M110];[.N110];[.O110];[Variables.$I$2];[Variables.$I$6];[.P110];[Variables.$I$6];[.Q110];[Variables.$I$6];[.R110];[Variables.$I$6];[.S110];[Variables.$I$6];[.T110];IF([.U110]&lt;&gt;&quot;&quot;;CONCATENATE([Variables.$I$6];[.U110]);&quot;&quot;);[Variables.$I$2];[Variables.$I$6]);IF([.B110]&lt;&gt;&quot;&quot;;CONCATENATE(&quot;#&quot;;[.B110]);&quot;&quot;))" office:value-type="string" office:string-value="#Rangers" calcext:value-type="string">
            <text:p>#Rangers</text:p>
          </table:table-cell>
          <table:table-cell table:number-columns-repeated="16362"/>
        </table:table-row>
        <table:table-row table:style-name="ro1">
          <table:table-cell table:style-name="ce6" table:formula="of:=IF(AND([.B111]&lt;&gt;&quot;&quot;;[.C111]&lt;&gt;&quot;&quot;);CONCATENATE([Variables.$I$1];[Variables.$I$7];[.B111];[Variables.$I$7];[Variables.$I$6];[Variables.$I$7];[.C111];[Variables.$I$7];[Variables.$I$6];[Variables.$I$7];[.D111];[Variables.$I$7];[Variables.$I$6];[.E111];[Variables.$I$6];[.F111];[Variables.$I$6];[.G111];[Variables.$I$6];[.H111];[Variables.$I$6];[Variables.$I$1];[.I111];[.J111];[.K111];[.L111];[.M111];[.N111];[.O111];[Variables.$I$2];[Variables.$I$6];[.P111];[Variables.$I$6];[.Q111];[Variables.$I$6];[.R111];[Variables.$I$6];[.S111];[Variables.$I$6];[.T111];IF([.U111]&lt;&gt;&quot;&quot;;CONCATENATE([Variables.$I$6];[.U111]);&quot;&quot;);[Variables.$I$2];[Variables.$I$6]);IF([.B111]&lt;&gt;&quot;&quot;;CONCATENATE(&quot;#&quot;;[.B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leather_gloves,itm_gondor_light_greaves,itm_leather_boot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leather_gloves,itm_gondor_light_greaves,itm_leather_boot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style-name="ce7" office:value-type="string" calcext:value-type="string">
            <text:p>a4_ithilien_ranger</text:p>
          </table:table-cell>
          <table:table-cell table:style-name="ce7" office:value-type="string" calcext:value-type="string">
            <text:p>Ranger_of_Ithilien</text:p>
          </table:table-cell>
          <table:table-cell table:style-name="ce7" office:value-type="string" calcext:value-type="string">
            <text:p>Rangers_of_Ithilien</text:p>
          </table:table-cell>
          <table:table-cell table:style-name="ce8" office:value-type="string" calcext:value-type="string">
            <text:p>tf_gondor| tfg_ranged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gondor_ranger_hood,</text:p>
          </table:table-cell>
          <table:table-cell table:style-name="ce19" office:value-type="string" calcext:value-type="string">
            <text:p>itm_gon_ranger_cloak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gondor_light_greaves,itm_leather_boots,</text:p>
          </table:table-cell>
          <table:table-cell table:style-name="ce19" office:value-type="string" calcext:value-type="string">
            <text:p>itm_ithilien_arrows,itm_gondor_bow,</text:p>
          </table:table-cell>
          <table:table-cell table:style-name="ce11" office:value-type="string" calcext:value-type="string">
            <text:p>itm_gondor_ranger_sword,</text:p>
          </table:table-cell>
          <table:table-cell table:style-name="ce11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archery(170)|wp(170)</text:p>
          </table:table-cell>
          <table:table-cell table:style-name="ce12" office:value-type="string" calcext:value-type="string">
            <text:p>knows_common|knows_pathfinding_1|knows_riding_1|knows_athletics_6|knows_power_draw_3|knows_power_strike_3|knows_ironflesh_3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11]&lt;&gt;&quot;&quot;;[.C111]&lt;&gt;&quot;&quot;);CONCATENATE([Variables.$I$1];[Variables.$I$7];[.B111];[Variables.$I$7];[Variables.$I$6];[Variables.$I$7];[.C111];[Variables.$I$7];[Variables.$I$6];[Variables.$I$7];[.D111];[Variables.$I$7];[Variables.$I$6];[.E111];[Variables.$I$6];[.F111];[Variables.$I$6];[.G111];[Variables.$I$6];[.H111];[Variables.$I$6];[Variables.$I$1];[.I111];[.J111];[.K111];[.L111];[.M111];[.N111];[.O111];[Variables.$I$2];[Variables.$I$6];[.P111];[Variables.$I$6];[.Q111];[Variables.$I$6];[.R111];[Variables.$I$6];[.S111];[Variables.$I$6];[.T111];IF([.U111]&lt;&gt;&quot;&quot;;CONCATENATE([Variables.$I$6];[.U111]);&quot;&quot;);[Variables.$I$2];[Variables.$I$6]);IF([.B111]&lt;&gt;&quot;&quot;;CONCATENATE(&quot;#&quot;;[.B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leather_gloves,itm_gondor_light_greaves,itm_leather_boot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leather_gloves,itm_gondor_light_greaves,itm_leather_boot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12]&lt;&gt;&quot;&quot;;[.C112]&lt;&gt;&quot;&quot;);CONCATENATE([Variables.$I$1];[Variables.$I$7];[.B112];[Variables.$I$7];[Variables.$I$6];[Variables.$I$7];[.C112];[Variables.$I$7];[Variables.$I$6];[Variables.$I$7];[.D112];[Variables.$I$7];[Variables.$I$6];[.E112];[Variables.$I$6];[.F112];[Variables.$I$6];[.G112];[Variables.$I$6];[.H112];[Variables.$I$6];[Variables.$I$1];[.I112];[.J112];[.K112];[.L112];[.M112];[.N112];[.O112];[Variables.$I$2];[Variables.$I$6];[.P112];[Variables.$I$6];[.Q112];[Variables.$I$6];[.R112];[Variables.$I$6];[.S112];[Variables.$I$6];[.T112];IF([.U112]&lt;&gt;&quot;&quot;;CONCATENATE([Variables.$I$6];[.U112]);&quot;&quot;);[Variables.$I$2];[Variables.$I$6]);IF([.B112]&lt;&gt;&quot;&quot;;CONCATENATE(&quot;#&quot;;[.B112]);&quot;&quot;))" office:value-type="string" office:string-value="[&quot;a5_ithilien_vet_ranger&quot;,&quot;Veteran_Ranger_of_Ithilien&quot;,&quot;Veteran_Rangers_of_Ithilien&quot;,tf_gondor| tfg_ranged| tfg_armor| tfg_helm| tfg_boots,0,subfac_rangers,fac_gondor,[itm_gondor_ranger_hood,itm_gon_ranger_cloak,itm_gon_ranger_skirt,itm_leather_gloves,itm_gondor_light_greaves,itm_ithilien_arrows,itm_gondor_bow,itm_gondor_ranger_sword,],attr_tier_5,wp(220),knows_common|knows_pathfinding_2|knows_riding_1|knows_athletics_7|knows_power_draw_4|knows_power_strike_4|knows_ironflesh_4,gondor_face1,gondor_face2]," calcext:value-type="string">
            <text:p>["a5_ithilien_vet_ranger","Veteran_Ranger_of_Ithilien","Veteran_Rangers_of_Ithilien",tf_gondor| tfg_ranged| tfg_armor| tfg_helm| tfg_boots,0,subfac_rangers,fac_gondor,[itm_gondor_ranger_hood,itm_gon_ranger_cloak,itm_gon_ranger_skirt,itm_leather_gloves,itm_gondor_light_greaves,itm_ithilien_arrows,itm_gondor_bow,itm_gondor_ranger_sword,],attr_tier_5,wp(220),knows_common|knows_pathfinding_2|knows_riding_1|knows_athletics_7|knows_power_draw_4|knows_power_strike_4|knows_ironflesh_4,gondor_face1,gondor_face2],</text:p>
          </table:table-cell>
          <table:table-cell table:style-name="ce7" office:value-type="string" calcext:value-type="string">
            <text:p>a5_ithilien_vet_ranger</text:p>
          </table:table-cell>
          <table:table-cell table:style-name="ce7" office:value-type="string" calcext:value-type="string">
            <text:p>Veteran_Ranger_of_Ithilien</text:p>
          </table:table-cell>
          <table:table-cell table:style-name="ce7" office:value-type="string" calcext:value-type="string">
            <text:p>Veteran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gondor_ranger_hood,</text:p>
          </table:table-cell>
          <table:table-cell table:style-name="ce11" office:value-type="string" calcext:value-type="string">
            <text:p>itm_gon_ranger_cloak,itm_gon_ranger_skirt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ithilien_arrows,itm_gondor_bow,</text:p>
          </table:table-cell>
          <table:table-cell table:style-name="ce11" office:value-type="string" calcext:value-type="string">
            <text:p>itm_gondor_ranger_sword,</text:p>
          </table:table-cell>
          <table:table-cell table:style-name="ce11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(220)</text:p>
          </table:table-cell>
          <table:table-cell table:style-name="ce12" office:value-type="string" calcext:value-type="string">
            <text:p>knows_common|knows_pathfinding_2|knows_riding_1|knows_athletics_7|knows_power_draw_4|knows_power_strike_4|knows_ironflesh_4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12]&lt;&gt;&quot;&quot;;[.C112]&lt;&gt;&quot;&quot;);CONCATENATE([Variables.$I$1];[Variables.$I$7];[.B112];[Variables.$I$7];[Variables.$I$6];[Variables.$I$7];[.C112];[Variables.$I$7];[Variables.$I$6];[Variables.$I$7];[.D112];[Variables.$I$7];[Variables.$I$6];[.E112];[Variables.$I$6];[.F112];[Variables.$I$6];[.G112];[Variables.$I$6];[.H112];[Variables.$I$6];[Variables.$I$1];[.I112];[.J112];[.K112];[.L112];[.M112];[.N112];[.O112];[Variables.$I$2];[Variables.$I$6];[.P112];[Variables.$I$6];[.Q112];[Variables.$I$6];[.R112];[Variables.$I$6];[.S112];[Variables.$I$6];[.T112];IF([.U112]&lt;&gt;&quot;&quot;;CONCATENATE([Variables.$I$6];[.U112]);&quot;&quot;);[Variables.$I$2];[Variables.$I$6]);IF([.B112]&lt;&gt;&quot;&quot;;CONCATENATE(&quot;#&quot;;[.B112]);&quot;&quot;))" office:value-type="string" office:string-value="[&quot;a5_ithilien_vet_ranger&quot;,&quot;Veteran_Ranger_of_Ithilien&quot;,&quot;Veteran_Rangers_of_Ithilien&quot;,tf_gondor| tfg_ranged| tfg_armor| tfg_helm| tfg_boots,0,subfac_rangers,fac_gondor,[itm_gondor_ranger_hood,itm_gon_ranger_cloak,itm_gon_ranger_skirt,itm_leather_gloves,itm_gondor_light_greaves,itm_ithilien_arrows,itm_gondor_bow,itm_gondor_ranger_sword,],attr_tier_5,wp(220),knows_common|knows_pathfinding_2|knows_riding_1|knows_athletics_7|knows_power_draw_4|knows_power_strike_4|knows_ironflesh_4,gondor_face1,gondor_face2]," calcext:value-type="string">
            <text:p>["a5_ithilien_vet_ranger","Veteran_Ranger_of_Ithilien","Veteran_Rangers_of_Ithilien",tf_gondor| tfg_ranged| tfg_armor| tfg_helm| tfg_boots,0,subfac_rangers,fac_gondor,[itm_gondor_ranger_hood,itm_gon_ranger_cloak,itm_gon_ranger_skirt,itm_leather_gloves,itm_gondor_light_greaves,itm_ithilien_arrows,itm_gondor_bow,itm_gondor_ranger_sword,],attr_tier_5,wp(220),knows_common|knows_pathfinding_2|knows_riding_1|knows_athletics_7|knows_power_draw_4|knows_power_strike_4|knows_ironflesh_4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13]&lt;&gt;&quot;&quot;;[.C113]&lt;&gt;&quot;&quot;);CONCATENATE([Variables.$I$1];[Variables.$I$7];[.B113];[Variables.$I$7];[Variables.$I$6];[Variables.$I$7];[.C113];[Variables.$I$7];[Variables.$I$6];[Variables.$I$7];[.D113];[Variables.$I$7];[Variables.$I$6];[.E113];[Variables.$I$6];[.F113];[Variables.$I$6];[.G113];[Variables.$I$6];[.H113];[Variables.$I$6];[Variables.$I$1];[.I113];[.J113];[.K113];[.L113];[.M113];[.N113];[.O113];[Variables.$I$2];[Variables.$I$6];[.P113];[Variables.$I$6];[.Q113];[Variables.$I$6];[.R113];[Variables.$I$6];[.S113];[Variables.$I$6];[.T113];IF([.U113]&lt;&gt;&quot;&quot;;CONCATENATE([Variables.$I$6];[.U113]);&quot;&quot;);[Variables.$I$2];[Variables.$I$6]);IF([.B113]&lt;&gt;&quot;&quot;;CONCATENATE(&quot;#&quot;;[.B113]);&quot;&quot;))" office:value-type="string" office:string-value="[&quot;a6_ithilien_master_ranger&quot;,&quot;Master_Ranger_of_Ithilien&quot;,&quot;Master_Rangers_of_Ithilien&quot;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" calcext:value-type="string">
            <text:p>["a6_ithilien_master_ranger","Master_Ranger_of_Ithilien","Master_Rangers_of_Ithilien"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</text:p>
          </table:table-cell>
          <table:table-cell table:style-name="ce7" office:value-type="string" calcext:value-type="string">
            <text:p>a6_ithilien_master_ranger</text:p>
          </table:table-cell>
          <table:table-cell table:style-name="ce7" office:value-type="string" calcext:value-type="string">
            <text:p>Master_Ranger_of_Ithilien</text:p>
          </table:table-cell>
          <table:table-cell table:style-name="ce7" office:value-type="string" calcext:value-type="string">
            <text:p>Master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gondor_ranger_hood_mask,</text:p>
          </table:table-cell>
          <table:table-cell table:style-name="ce11" office:value-type="string" calcext:value-type="string">
            <text:p>(itm_gon_ranger_skirt, imod_reinforced)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ithilien_arrows,itm_ithilien_arrows,itm_gondor_bow,</text:p>
          </table:table-cell>
          <table:table-cell table:style-name="ce11" office:value-type="string" calcext:value-type="string">
            <text:p>itm_gondor_ranger_sword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melee(320)|wp_archery(300)</text:p>
          </table:table-cell>
          <table:table-cell table:style-name="ce12" office:value-type="string" calcext:value-type="string">
            <text:p>knows_common|knows_pathfinding_3|knows_riding_1|knows_athletics_8|knows_power_draw_6|knows_power_strike_5|knows_ironflesh_6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B113]&lt;&gt;&quot;&quot;;[.C113]&lt;&gt;&quot;&quot;);CONCATENATE([Variables.$I$1];[Variables.$I$7];[.B113];[Variables.$I$7];[Variables.$I$6];[Variables.$I$7];[.C113];[Variables.$I$7];[Variables.$I$6];[Variables.$I$7];[.D113];[Variables.$I$7];[Variables.$I$6];[.E113];[Variables.$I$6];[.F113];[Variables.$I$6];[.G113];[Variables.$I$6];[.H113];[Variables.$I$6];[Variables.$I$1];[.I113];[.J113];[.K113];[.L113];[.M113];[.N113];[.O113];[Variables.$I$2];[Variables.$I$6];[.P113];[Variables.$I$6];[.Q113];[Variables.$I$6];[.R113];[Variables.$I$6];[.S113];[Variables.$I$6];[.T113];IF([.U113]&lt;&gt;&quot;&quot;;CONCATENATE([Variables.$I$6];[.U113]);&quot;&quot;);[Variables.$I$2];[Variables.$I$6]);IF([.B113]&lt;&gt;&quot;&quot;;CONCATENATE(&quot;#&quot;;[.B113]);&quot;&quot;))" office:value-type="string" office:string-value="[&quot;a6_ithilien_master_ranger&quot;,&quot;Master_Ranger_of_Ithilien&quot;,&quot;Master_Rangers_of_Ithilien&quot;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" calcext:value-type="string">
            <text:p>["a6_ithilien_master_ranger","Master_Ranger_of_Ithilien","Master_Rangers_of_Ithilien"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</text:p>
          </table:table-cell>
          <table:table-cell table:number-columns-repeated="16362"/>
        </table:table-row>
        <table:table-row table:style-name="ro1">
          <table:table-cell table:style-name="ce6" table:formula="of:=IF(AND([.B114]&lt;&gt;&quot;&quot;;[.C114]&lt;&gt;&quot;&quot;);CONCATENATE([Variables.$I$1];[Variables.$I$7];[.B114];[Variables.$I$7];[Variables.$I$6];[Variables.$I$7];[.C114];[Variables.$I$7];[Variables.$I$6];[Variables.$I$7];[.D114];[Variables.$I$7];[Variables.$I$6];[.E114];[Variables.$I$6];[.F114];[Variables.$I$6];[.G114];[Variables.$I$6];[.H114];[Variables.$I$6];[Variables.$I$1];[.I114];[.J114];[.K114];[.L114];[.M114];[.N114];[.O114];[Variables.$I$2];[Variables.$I$6];[.P114];[Variables.$I$6];[.Q114];[Variables.$I$6];[.R114];[Variables.$I$6];[.S114];[Variables.$I$6];[.T114];IF([.U114]&lt;&gt;&quot;&quot;;CONCATENATE([Variables.$I$6];[.U114]);&quot;&quot;);[Variables.$I$2];[Variables.$I$6]);IF([.B114]&lt;&gt;&quot;&quot;;CONCATENATE(&quot;#&quot;;[.B114]);&quot;&quot;))" office:value-type="string" office:string-value="[&quot;a6_ithilien_leader&quot;,&quot;Captain_of_Ithilien_Rangers&quot;,&quot;Captains_of_Ithilien_Rangers&quot;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style-name="ce7" office:value-type="string" calcext:value-type="string">
            <text:p>a6_ithilien_leader</text:p>
          </table:table-cell>
          <table:table-cell table:style-name="ce7" office:value-type="string" calcext:value-type="string">
            <text:p>Captain_of_Ithilien_Rangers</text:p>
          </table:table-cell>
          <table:table-cell table:style-name="ce7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gondor_ranger_hood_mask,</text:p>
          </table:table-cell>
          <table:table-cell table:style-name="ce26" office:value-type="string" calcext:value-type="string">
            <text:p>(itm_gon_ranger_skirt, imod_lordly)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ithilien_arrows,itm_ithilien_arrows,itm_gondor_bow,</text:p>
          </table:table-cell>
          <table:table-cell table:style-name="ce11" office:value-type="string" calcext:value-type="string">
            <text:p>itm_gondor_ranger_sword,</text:p>
          </table:table-cell>
          <table:table-cell table:style-name="ce11"/>
          <table:table-cell table:style-name="ce12" office:value-type="string" calcext:value-type="string">
            <text:p>attr_tier_7</text:p>
          </table:table-cell>
          <table:table-cell table:style-name="ce12" office:value-type="string" calcext:value-type="string">
            <text:p>wp_tier_7</text:p>
          </table:table-cell>
          <table:table-cell table:style-name="ce12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14]&lt;&gt;&quot;&quot;;[.C114]&lt;&gt;&quot;&quot;);CONCATENATE([Variables.$I$1];[Variables.$I$7];[.B114];[Variables.$I$7];[Variables.$I$6];[Variables.$I$7];[.C114];[Variables.$I$7];[Variables.$I$6];[Variables.$I$7];[.D114];[Variables.$I$7];[Variables.$I$6];[.E114];[Variables.$I$6];[.F114];[Variables.$I$6];[.G114];[Variables.$I$6];[.H114];[Variables.$I$6];[Variables.$I$1];[.I114];[.J114];[.K114];[.L114];[.M114];[.N114];[.O114];[Variables.$I$2];[Variables.$I$6];[.P114];[Variables.$I$6];[.Q114];[Variables.$I$6];[.R114];[Variables.$I$6];[.S114];[Variables.$I$6];[.T114];IF([.U114]&lt;&gt;&quot;&quot;;CONCATENATE([Variables.$I$6];[.U114]);&quot;&quot;);[Variables.$I$2];[Variables.$I$6]);IF([.B114]&lt;&gt;&quot;&quot;;CONCATENATE(&quot;#&quot;;[.B114]);&quot;&quot;))" office:value-type="string" office:string-value="[&quot;a6_ithilien_leader&quot;,&quot;Captain_of_Ithilien_Rangers&quot;,&quot;Captains_of_Ithilien_Rangers&quot;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15]&lt;&gt;&quot;&quot;;[.C115]&lt;&gt;&quot;&quot;);CONCATENATE([Variables.$I$1];[Variables.$I$7];[.B115];[Variables.$I$7];[Variables.$I$6];[Variables.$I$7];[.C115];[Variables.$I$7];[Variables.$I$6];[Variables.$I$7];[.D115];[Variables.$I$7];[Variables.$I$6];[.E115];[Variables.$I$6];[.F115];[Variables.$I$6];[.G115];[Variables.$I$6];[.H115];[Variables.$I$6];[Variables.$I$1];[.I115];[.J115];[.K115];[.L115];[.M115];[.N115];[.O115];[Variables.$I$2];[Variables.$I$6];[.P115];[Variables.$I$6];[.Q115];[Variables.$I$6];[.R115];[Variables.$I$6];[.S115];[Variables.$I$6];[.T115];IF([.U115]&lt;&gt;&quot;&quot;;CONCATENATE([Variables.$I$6];[.U115]);&quot;&quot;);[Variables.$I$2];[Variables.$I$6]);IF([.B115]&lt;&gt;&quot;&quot;;CONCATENATE(&quot;#&quot;;[.B115]);&quot;&quot;))" office:value-type="string" office:string-value="#Lossarnach" calcext:value-type="string">
            <text:p>#Lossarnach</text:p>
          </table:table-cell>
          <table:table-cell table:style-name="ce21" office:value-type="string" calcext:value-type="string">
            <text:p>Lossarnach</text:p>
          </table:table-cell>
          <table:table-cell table:style-name="ce21" table:number-columns-repeated="6"/>
          <table:table-cell table:style-name="ce25"/>
          <table:table-cell table:style-name="ce21"/>
          <table:table-cell table:style-name="ce25" table:number-columns-repeated="4"/>
          <table:table-cell table:style-name="ce21" table:number-columns-repeated="6"/>
          <table:table-cell table:style-name="ce23"/>
          <table:table-cell table:style-name="ce23" table:formula="of:=IF(AND([.B115]&lt;&gt;&quot;&quot;;[.C115]&lt;&gt;&quot;&quot;);CONCATENATE([Variables.$I$1];[Variables.$I$7];[.B115];[Variables.$I$7];[Variables.$I$6];[Variables.$I$7];[.C115];[Variables.$I$7];[Variables.$I$6];[Variables.$I$7];[.D115];[Variables.$I$7];[Variables.$I$6];[.E115];[Variables.$I$6];[.F115];[Variables.$I$6];[.G115];[Variables.$I$6];[.H115];[Variables.$I$6];[Variables.$I$1];[.I115];[.J115];[.K115];[.L115];[.M115];[.N115];[.O115];[Variables.$I$2];[Variables.$I$6];[.P115];[Variables.$I$6];[.Q115];[Variables.$I$6];[.R115];[Variables.$I$6];[.S115];[Variables.$I$6];[.T115];IF([.U115]&lt;&gt;&quot;&quot;;CONCATENATE([Variables.$I$6];[.U115]);&quot;&quot;);[Variables.$I$2];[Variables.$I$6]);IF([.B115]&lt;&gt;&quot;&quot;;CONCATENATE(&quot;#&quot;;[.B115]);&quot;&quot;))" office:value-type="string" office:string-value="#Lossarnach" calcext:value-type="string">
            <text:p>#Lossarnach</text:p>
          </table:table-cell>
          <table:table-cell table:number-columns-repeated="16362"/>
        </table:table-row>
        <table:table-row table:style-name="ro1">
          <table:table-cell table:style-name="ce6" table:formula="of:=IF(AND([.B116]&lt;&gt;&quot;&quot;;[.C116]&lt;&gt;&quot;&quot;);CONCATENATE([Variables.$I$1];[Variables.$I$7];[.B116];[Variables.$I$7];[Variables.$I$6];[Variables.$I$7];[.C116];[Variables.$I$7];[Variables.$I$6];[Variables.$I$7];[.D116];[Variables.$I$7];[Variables.$I$6];[.E116];[Variables.$I$6];[.F116];[Variables.$I$6];[.G116];[Variables.$I$6];[.H116];[Variables.$I$6];[Variables.$I$1];[.I116];[.J116];[.K116];[.L116];[.M116];[.N116];[.O116];[Variables.$I$2];[Variables.$I$6];[.P116];[Variables.$I$6];[.Q116];[Variables.$I$6];[.R116];[Variables.$I$6];[.S116];[Variables.$I$6];[.T116];IF([.U116]&lt;&gt;&quot;&quot;;CONCATENATE([Variables.$I$6];[.U116]);&quot;&quot;);[Variables.$I$2];[Variables.$I$6]);IF([.B116]&lt;&gt;&quot;&quot;;CONCATENATE(&quot;#&quot;;[.B116]);&quot;&quot;))" office:value-type="string" office:string-value="[&quot;i1_loss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attr_fief_tier_1,wp_tier_1,knows_common|knows_ironflesh_1|knows_power_strike_1|knows_power_throw_2|knows_weapon_master_1|knows_looting_1|knows_tracking_1|knows_pathfinding_1|knows_wound_treatment_1|knows_surgery_1|knows_first_aid_1|knows_persuasion_1|knows_trade_1,gondor_face1,gondor_face2]," calcext:value-type="string">
            <text:p>["i1_loss_woodsman","Woodsman_of_Lossarnach","Woodsmen_of_Lossarnach",tf_gondor| tfg_armor| tfg_boots,0,subfac_lossarnach,fac_gondor,[itm_lossarnach_cloth_cap,itm_lossarnach_shirt,itm_gondor_light_greaves,itm_loss_axe,itm_gon_tab_shield_a,itm_loss_throwing_axes,],attr_fief_tier_1,wp_tier_1,knows_common|knows_ironflesh_1|knows_power_strike_1|knows_power_throw_2|knows_weapon_master_1|knows_looting_1|knows_tracking_1|knows_pathfinding_1|knows_wound_treatment_1|knows_surgery_1|knows_first_aid_1|knows_persuasion_1|knows_trade_1,gondor_face1,gondor_face2],</text:p>
          </table:table-cell>
          <table:table-cell table:style-name="ce7" office:value-type="string" calcext:value-type="string">
            <text:p>i1_loss_woodsman</text:p>
          </table:table-cell>
          <table:table-cell table:style-name="ce7" office:value-type="string" calcext:value-type="string">
            <text:p>Woodsman_of_Lossarnach</text:p>
          </table:table-cell>
          <table:table-cell table:style-name="ce7" office:value-type="string" calcext:value-type="string">
            <text:p>Woodsmen_of_Lossarnach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lossarnach_cloth_cap,</text:p>
          </table:table-cell>
          <table:table-cell table:style-name="ce11" office:value-type="string" calcext:value-type="string">
            <text:p>itm_lossarnach_shirt,</text:p>
          </table:table-cell>
          <table:table-cell table:style-name="ce11"/>
          <table:table-cell table:style-name="ce11" office:value-type="string" calcext:value-type="string">
            <text:p>itm_gondor_light_greaves,</text:p>
          </table:table-cell>
          <table:table-cell table:style-name="ce11" office:value-type="string" calcext:value-type="string">
            <text:p>itm_loss_axe,</text:p>
          </table:table-cell>
          <table:table-cell table:style-name="ce11" office:value-type="string" calcext:value-type="string">
            <text:p>itm_gon_tab_shield_a,itm_loss_throwing_axes,</text:p>
          </table:table-cell>
          <table:table-cell table:style-name="ce11"/>
          <table:table-cell table:style-name="ce12" office:value-type="string" calcext:value-type="string">
            <text:p>attr_fief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ironflesh_1|knows_power_strike_1|knows_power_throw_2|knows_weapon_master_1|knows_looting_1|knows_tracking_1|knows_pathfinding_1|knows_wound_treatment_1|knows_surgery_1|knows_first_aid_1|knows_persuasion_1|knows_trade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16]&lt;&gt;&quot;&quot;;[.C116]&lt;&gt;&quot;&quot;);CONCATENATE([Variables.$I$1];[Variables.$I$7];[.B116];[Variables.$I$7];[Variables.$I$6];[Variables.$I$7];[.C116];[Variables.$I$7];[Variables.$I$6];[Variables.$I$7];[.D116];[Variables.$I$7];[Variables.$I$6];[.E116];[Variables.$I$6];[.F116];[Variables.$I$6];[.G116];[Variables.$I$6];[.H116];[Variables.$I$6];[Variables.$I$1];[.I116];[.J116];[.K116];[.L116];[.M116];[.N116];[.O116];[Variables.$I$2];[Variables.$I$6];[.P116];[Variables.$I$6];[.Q116];[Variables.$I$6];[.R116];[Variables.$I$6];[.S116];[Variables.$I$6];[.T116];IF([.U116]&lt;&gt;&quot;&quot;;CONCATENATE([Variables.$I$6];[.U116]);&quot;&quot;);[Variables.$I$2];[Variables.$I$6]);IF([.B116]&lt;&gt;&quot;&quot;;CONCATENATE(&quot;#&quot;;[.B116]);&quot;&quot;))" office:value-type="string" office:string-value="[&quot;i1_loss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attr_fief_tier_1,wp_tier_1,knows_common|knows_ironflesh_1|knows_power_strike_1|knows_power_throw_2|knows_weapon_master_1|knows_looting_1|knows_tracking_1|knows_pathfinding_1|knows_wound_treatment_1|knows_surgery_1|knows_first_aid_1|knows_persuasion_1|knows_trade_1,gondor_face1,gondor_face2]," calcext:value-type="string">
            <text:p>["i1_loss_woodsman","Woodsman_of_Lossarnach","Woodsmen_of_Lossarnach",tf_gondor| tfg_armor| tfg_boots,0,subfac_lossarnach,fac_gondor,[itm_lossarnach_cloth_cap,itm_lossarnach_shirt,itm_gondor_light_greaves,itm_loss_axe,itm_gon_tab_shield_a,itm_loss_throwing_axes,],attr_fief_tier_1,wp_tier_1,knows_common|knows_ironflesh_1|knows_power_strike_1|knows_power_throw_2|knows_weapon_master_1|knows_looting_1|knows_tracking_1|knows_pathfinding_1|knows_wound_treatment_1|knows_surgery_1|knows_first_aid_1|knows_persuasion_1|knows_trade_1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17]&lt;&gt;&quot;&quot;;[.C117]&lt;&gt;&quot;&quot;);CONCATENATE([Variables.$I$1];[Variables.$I$7];[.B117];[Variables.$I$7];[Variables.$I$6];[Variables.$I$7];[.C117];[Variables.$I$7];[Variables.$I$6];[Variables.$I$7];[.D117];[Variables.$I$7];[Variables.$I$6];[.E117];[Variables.$I$6];[.F117];[Variables.$I$6];[.G117];[Variables.$I$6];[.H117];[Variables.$I$6];[Variables.$I$1];[.I117];[.J117];[.K117];[.L117];[.M117];[.N117];[.O117];[Variables.$I$2];[Variables.$I$6];[.P117];[Variables.$I$6];[.Q117];[Variables.$I$6];[.R117];[Variables.$I$6];[.S117];[Variables.$I$6];[.T117];IF([.U117]&lt;&gt;&quot;&quot;;CONCATENATE([Variables.$I$6];[.U117]);&quot;&quot;);[Variables.$I$2];[Variables.$I$6]);IF([.B117]&lt;&gt;&quot;&quot;;CONCATENATE(&quot;#&quot;;[.B117]);&quot;&quot;))" office:value-type="string" office:string-value="[&quot;i2_loss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attr_fief_tier_2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" calcext:value-type="string">
            <text:p>["i2_loss_axeman","Axeman_of_Lossarnach","Axemen_of_Lossarnach",tf_gondor| tfg_armor| tfg_shield| tfg_boots| tfg_helm,0,subfac_lossarnach,fac_gondor,[itm_lossarnach_leather_cap,itm_lossarnach_axeman,itm_gondor_light_greaves,itm_loss_axe,itm_gon_tab_shield_a,itm_loss_throwing_axes,],attr_fief_tier_2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</text:p>
          </table:table-cell>
          <table:table-cell table:style-name="ce7" office:value-type="string" calcext:value-type="string">
            <text:p>i2_loss_axeman</text:p>
          </table:table-cell>
          <table:table-cell table:style-name="ce7" office:value-type="string" calcext:value-type="string">
            <text:p>Axeman_of_Lossarnach</text:p>
          </table:table-cell>
          <table:table-cell table:style-name="ce7" office:value-type="string" calcext:value-type="string">
            <text:p>Axemen_of_Lossarnach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lossarnach_leather_cap,</text:p>
          </table:table-cell>
          <table:table-cell table:style-name="ce19" office:value-type="string" calcext:value-type="string">
            <text:p>itm_lossarnach_axeman,</text:p>
          </table:table-cell>
          <table:table-cell table:style-name="ce19"/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loss_axe,</text:p>
          </table:table-cell>
          <table:table-cell table:style-name="ce11" office:value-type="string" calcext:value-type="string">
            <text:p>itm_gon_tab_shield_a,itm_loss_throwing_axes,</text:p>
          </table:table-cell>
          <table:table-cell table:style-name="ce11"/>
          <table:table-cell table:style-name="ce12" office:value-type="string" calcext:value-type="string">
            <text:p>attr_fief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2|knows_power_strike_1|knows_power_throw_3|knows_weapon_master_1|knows_athletics_1|knows_looting_1|knows_tracking_1|knows_pathfinding_1|knows_wound_treatment_1|knows_surgery_1|knows_first_aid_1|knows_persuasion_1|knows_trade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17]&lt;&gt;&quot;&quot;;[.C117]&lt;&gt;&quot;&quot;);CONCATENATE([Variables.$I$1];[Variables.$I$7];[.B117];[Variables.$I$7];[Variables.$I$6];[Variables.$I$7];[.C117];[Variables.$I$7];[Variables.$I$6];[Variables.$I$7];[.D117];[Variables.$I$7];[Variables.$I$6];[.E117];[Variables.$I$6];[.F117];[Variables.$I$6];[.G117];[Variables.$I$6];[.H117];[Variables.$I$6];[Variables.$I$1];[.I117];[.J117];[.K117];[.L117];[.M117];[.N117];[.O117];[Variables.$I$2];[Variables.$I$6];[.P117];[Variables.$I$6];[.Q117];[Variables.$I$6];[.R117];[Variables.$I$6];[.S117];[Variables.$I$6];[.T117];IF([.U117]&lt;&gt;&quot;&quot;;CONCATENATE([Variables.$I$6];[.U117]);&quot;&quot;);[Variables.$I$2];[Variables.$I$6]);IF([.B117]&lt;&gt;&quot;&quot;;CONCATENATE(&quot;#&quot;;[.B117]);&quot;&quot;))" office:value-type="string" office:string-value="[&quot;i2_loss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attr_fief_tier_2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" calcext:value-type="string">
            <text:p>["i2_loss_axeman","Axeman_of_Lossarnach","Axemen_of_Lossarnach",tf_gondor| tfg_armor| tfg_shield| tfg_boots| tfg_helm,0,subfac_lossarnach,fac_gondor,[itm_lossarnach_leather_cap,itm_lossarnach_axeman,itm_gondor_light_greaves,itm_loss_axe,itm_gon_tab_shield_a,itm_loss_throwing_axes,],attr_fief_tier_2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18]&lt;&gt;&quot;&quot;;[.C118]&lt;&gt;&quot;&quot;);CONCATENATE([Variables.$I$1];[Variables.$I$7];[.B118];[Variables.$I$7];[Variables.$I$6];[Variables.$I$7];[.C118];[Variables.$I$7];[Variables.$I$6];[Variables.$I$7];[.D118];[Variables.$I$7];[Variables.$I$6];[.E118];[Variables.$I$6];[.F118];[Variables.$I$6];[.G118];[Variables.$I$6];[.H118];[Variables.$I$6];[Variables.$I$1];[.I118];[.J118];[.K118];[.L118];[.M118];[.N118];[.O118];[Variables.$I$2];[Variables.$I$6];[.P118];[Variables.$I$6];[.Q118];[Variables.$I$6];[.R118];[Variables.$I$6];[.S118];[Variables.$I$6];[.T118];IF([.U118]&lt;&gt;&quot;&quot;;CONCATENATE([Variables.$I$6];[.U118]);&quot;&quot;);[Variables.$I$2];[Variables.$I$6]);IF([.B118]&lt;&gt;&quot;&quot;;CONCATENATE(&quot;#&quot;;[.B118]);&quot;&quot;))" office:value-type="string" office:string-value="[&quot;i3_loss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attr_fief_tier_3,wp_tier_3,knows_common|knows_power_throw_4|knows_athletics_3|knows_power_strike_3|knows_ironflesh_3,gondor_face1,gondor_face2]," calcext:value-type="string">
            <text:p>["i3_loss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attr_fief_tier_3,wp_tier_3,knows_common|knows_power_throw_4|knows_athletics_3|knows_power_strike_3|knows_ironflesh_3,gondor_face1,gondor_face2],</text:p>
          </table:table-cell>
          <table:table-cell table:style-name="ce7" office:value-type="string" calcext:value-type="string">
            <text:p>i3_loss_vet_axeman</text:p>
          </table:table-cell>
          <table:table-cell table:style-name="ce7" office:value-type="string" calcext:value-type="string">
            <text:p>Lossarnach_Veteran_Axeman</text:p>
          </table:table-cell>
          <table:table-cell table:style-name="ce7" office:value-type="string" calcext:value-type="string">
            <text:p>Lossarnach_Veteran_Axeme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lossarnach_leather_cap,</text:p>
          </table:table-cell>
          <table:table-cell table:style-name="ce11" office:value-type="string" calcext:value-type="string">
            <text:p>itm_lossarnach_vet_axeman,</text:p>
          </table:table-cell>
          <table:table-cell table:style-name="ce11"/>
          <table:table-cell table:style-name="ce11" office:value-type="string" calcext:value-type="string">
            <text:p>itm_gondor_light_greaves,</text:p>
          </table:table-cell>
          <table:table-cell table:style-name="ce19" office:value-type="string" calcext:value-type="string">
            <text:p>itm_loss_axe,</text:p>
          </table:table-cell>
          <table:table-cell table:style-name="ce11" office:value-type="string" calcext:value-type="string">
            <text:p>itm_gon_tab_shield_a,itm_loss_throwing_axes,</text:p>
          </table:table-cell>
          <table:table-cell table:style-name="ce11"/>
          <table:table-cell table:style-name="ce12" office:value-type="string" calcext:value-type="string">
            <text:p>attr_fief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power_throw_4|knows_athletics_3|knows_power_strike_3|knows_ironflesh_3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18]&lt;&gt;&quot;&quot;;[.C118]&lt;&gt;&quot;&quot;);CONCATENATE([Variables.$I$1];[Variables.$I$7];[.B118];[Variables.$I$7];[Variables.$I$6];[Variables.$I$7];[.C118];[Variables.$I$7];[Variables.$I$6];[Variables.$I$7];[.D118];[Variables.$I$7];[Variables.$I$6];[.E118];[Variables.$I$6];[.F118];[Variables.$I$6];[.G118];[Variables.$I$6];[.H118];[Variables.$I$6];[Variables.$I$1];[.I118];[.J118];[.K118];[.L118];[.M118];[.N118];[.O118];[Variables.$I$2];[Variables.$I$6];[.P118];[Variables.$I$6];[.Q118];[Variables.$I$6];[.R118];[Variables.$I$6];[.S118];[Variables.$I$6];[.T118];IF([.U118]&lt;&gt;&quot;&quot;;CONCATENATE([Variables.$I$6];[.U118]);&quot;&quot;);[Variables.$I$2];[Variables.$I$6]);IF([.B118]&lt;&gt;&quot;&quot;;CONCATENATE(&quot;#&quot;;[.B118]);&quot;&quot;))" office:value-type="string" office:string-value="[&quot;i3_loss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attr_fief_tier_3,wp_tier_3,knows_common|knows_power_throw_4|knows_athletics_3|knows_power_strike_3|knows_ironflesh_3,gondor_face1,gondor_face2]," calcext:value-type="string">
            <text:p>["i3_loss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attr_fief_tier_3,wp_tier_3,knows_common|knows_power_throw_4|knows_athletics_3|knows_power_strike_3|knows_ironflesh_3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19]&lt;&gt;&quot;&quot;;[.C119]&lt;&gt;&quot;&quot;);CONCATENATE([Variables.$I$1];[Variables.$I$7];[.B119];[Variables.$I$7];[Variables.$I$6];[Variables.$I$7];[.C119];[Variables.$I$7];[Variables.$I$6];[Variables.$I$7];[.D119];[Variables.$I$7];[Variables.$I$6];[.E119];[Variables.$I$6];[.F119];[Variables.$I$6];[.G119];[Variables.$I$6];[.H119];[Variables.$I$6];[Variables.$I$1];[.I119];[.J119];[.K119];[.L119];[.M119];[.N119];[.O119];[Variables.$I$2];[Variables.$I$6];[.P119];[Variables.$I$6];[.Q119];[Variables.$I$6];[.R119];[Variables.$I$6];[.S119];[Variables.$I$6];[.T119];IF([.U119]&lt;&gt;&quot;&quot;;CONCATENATE([Variables.$I$6];[.U119]);&quot;&quot;);[Variables.$I$2];[Variables.$I$6]);IF([.B119]&lt;&gt;&quot;&quot;;CONCATENATE(&quot;#&quot;;[.B119]);&quot;&quot;))" office:value-type="string" office:string-value="[&quot;i4_loss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attr_fief_tier_4,wp_tier_4,knows_common|knows_athletics_4|knows_power_strike_5|knows_ironflesh_4|knows_power_throw_5,gondor_face1,gondor_face2]," calcext:value-type="string">
            <text:p>["i4_loss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attr_fief_tier_4,wp_tier_4,knows_common|knows_athletics_4|knows_power_strike_5|knows_ironflesh_4|knows_power_throw_5,gondor_face1,gondor_face2],</text:p>
          </table:table-cell>
          <table:table-cell table:style-name="ce7" office:value-type="string" calcext:value-type="string">
            <text:p>i4_loss_heavy_axeman</text:p>
          </table:table-cell>
          <table:table-cell table:style-name="ce7" office:value-type="string" calcext:value-type="string">
            <text:p>Heavy_Lossarnach_Axeman</text:p>
          </table:table-cell>
          <table:table-cell table:style-name="ce7" office:value-type="string" calcext:value-type="string">
            <text:p>Heavy_Lossarnach_Axemen</text:p>
          </table:table-cell>
          <table:table-cell table:style-name="ce8" office:value-type="string" calcext:value-type="string">
            <text:p>tf_gondor| tfg_shield| tfg_armor| tfg_helm| tfg_boots| tfg_glove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lossarnach_scale_cap,</text:p>
          </table:table-cell>
          <table:table-cell table:style-name="ce11" office:value-type="string" calcext:value-type="string">
            <text:p>itm_lossarnach_warrior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lossarnach_greaves,</text:p>
          </table:table-cell>
          <table:table-cell table:style-name="ce11" office:value-type="string" calcext:value-type="string">
            <text:p>itm_loss_axe,</text:p>
          </table:table-cell>
          <table:table-cell table:style-name="ce11" office:value-type="string" calcext:value-type="string">
            <text:p>itm_gon_tab_shield_a,itm_loss_throwing_axes,</text:p>
          </table:table-cell>
          <table:table-cell table:style-name="ce11"/>
          <table:table-cell table:style-name="ce12" office:value-type="string" calcext:value-type="string">
            <text:p>attr_fief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4|knows_power_strike_5|knows_ironflesh_4|knows_power_throw_5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19]&lt;&gt;&quot;&quot;;[.C119]&lt;&gt;&quot;&quot;);CONCATENATE([Variables.$I$1];[Variables.$I$7];[.B119];[Variables.$I$7];[Variables.$I$6];[Variables.$I$7];[.C119];[Variables.$I$7];[Variables.$I$6];[Variables.$I$7];[.D119];[Variables.$I$7];[Variables.$I$6];[.E119];[Variables.$I$6];[.F119];[Variables.$I$6];[.G119];[Variables.$I$6];[.H119];[Variables.$I$6];[Variables.$I$1];[.I119];[.J119];[.K119];[.L119];[.M119];[.N119];[.O119];[Variables.$I$2];[Variables.$I$6];[.P119];[Variables.$I$6];[.Q119];[Variables.$I$6];[.R119];[Variables.$I$6];[.S119];[Variables.$I$6];[.T119];IF([.U119]&lt;&gt;&quot;&quot;;CONCATENATE([Variables.$I$6];[.U119]);&quot;&quot;);[Variables.$I$2];[Variables.$I$6]);IF([.B119]&lt;&gt;&quot;&quot;;CONCATENATE(&quot;#&quot;;[.B119]);&quot;&quot;))" office:value-type="string" office:string-value="[&quot;i4_loss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attr_fief_tier_4,wp_tier_4,knows_common|knows_athletics_4|knows_power_strike_5|knows_ironflesh_4|knows_power_throw_5,gondor_face1,gondor_face2]," calcext:value-type="string">
            <text:p>["i4_loss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attr_fief_tier_4,wp_tier_4,knows_common|knows_athletics_4|knows_power_strike_5|knows_ironflesh_4|knows_power_throw_5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20]&lt;&gt;&quot;&quot;;[.C120]&lt;&gt;&quot;&quot;);CONCATENATE([Variables.$I$1];[Variables.$I$7];[.B120];[Variables.$I$7];[Variables.$I$6];[Variables.$I$7];[.C120];[Variables.$I$7];[Variables.$I$6];[Variables.$I$7];[.D120];[Variables.$I$7];[Variables.$I$6];[.E120];[Variables.$I$6];[.F120];[Variables.$I$6];[.G120];[Variables.$I$6];[.H120];[Variables.$I$6];[Variables.$I$1];[.I120];[.J120];[.K120];[.L120];[.M120];[.N120];[.O120];[Variables.$I$2];[Variables.$I$6];[.P120];[Variables.$I$6];[.Q120];[Variables.$I$6];[.R120];[Variables.$I$6];[.S120];[Variables.$I$6];[.T120];IF([.U120]&lt;&gt;&quot;&quot;;CONCATENATE([Variables.$I$6];[.U120]);&quot;&quot;);[Variables.$I$2];[Variables.$I$6]);IF([.B120]&lt;&gt;&quot;&quot;;CONCATENATE(&quot;#&quot;;[.B120]);&quot;&quot;))" office:value-type="string" office:string-value="[&quot;i5_loss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itm_marker_hp_shield,],attr_tier_5,wp_tier_5,knows_common|knows_athletics_5|knows_power_strike_7|knows_ironflesh_5|knows_power_throw_6,gondor_face1,gondor_face2]," calcext:value-type="string">
            <text:p>["i5_loss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itm_marker_hp_shield,],attr_tier_5,wp_tier_5,knows_common|knows_athletics_5|knows_power_strike_7|knows_ironflesh_5|knows_power_throw_6,gondor_face1,gondor_face2],</text:p>
          </table:table-cell>
          <table:table-cell table:style-name="ce7" office:value-type="string" calcext:value-type="string">
            <text:p>i5_loss_axemaster</text:p>
          </table:table-cell>
          <table:table-cell table:style-name="ce7" office:value-type="string" calcext:value-type="string">
            <text:p>Axemaster_of_Lossarnach</text:p>
          </table:table-cell>
          <table:table-cell table:style-name="ce7" office:value-type="string" calcext:value-type="string">
            <text:p>Axemasters_of_Lossarnach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lossarnach_scale_cap,</text:p>
          </table:table-cell>
          <table:table-cell table:style-name="ce11" office:value-type="string" calcext:value-type="string">
            <text:p>itm_lossarnach_vet_warrior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lossarnach_greaves,</text:p>
          </table:table-cell>
          <table:table-cell table:style-name="ce19" office:value-type="string" calcext:value-type="string">
            <text:p>itm_loss_war_axe,</text:p>
          </table:table-cell>
          <table:table-cell table:style-name="ce19" office:value-type="string" calcext:value-type="string">
            <text:p>itm_gon_tab_shield_a,itm_loss_throwing_axes,</text:p>
          </table:table-cell>
          <table:table-cell table:style-name="ce11" office:value-type="string" calcext:value-type="string">
            <text:p>itm_marker_hp_shield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5|knows_power_strike_7|knows_ironflesh_5|knows_power_throw_6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20]&lt;&gt;&quot;&quot;;[.C120]&lt;&gt;&quot;&quot;);CONCATENATE([Variables.$I$1];[Variables.$I$7];[.B120];[Variables.$I$7];[Variables.$I$6];[Variables.$I$7];[.C120];[Variables.$I$7];[Variables.$I$6];[Variables.$I$7];[.D120];[Variables.$I$7];[Variables.$I$6];[.E120];[Variables.$I$6];[.F120];[Variables.$I$6];[.G120];[Variables.$I$6];[.H120];[Variables.$I$6];[Variables.$I$1];[.I120];[.J120];[.K120];[.L120];[.M120];[.N120];[.O120];[Variables.$I$2];[Variables.$I$6];[.P120];[Variables.$I$6];[.Q120];[Variables.$I$6];[.R120];[Variables.$I$6];[.S120];[Variables.$I$6];[.T120];IF([.U120]&lt;&gt;&quot;&quot;;CONCATENATE([Variables.$I$6];[.U120]);&quot;&quot;);[Variables.$I$2];[Variables.$I$6]);IF([.B120]&lt;&gt;&quot;&quot;;CONCATENATE(&quot;#&quot;;[.B120]);&quot;&quot;))" office:value-type="string" office:string-value="[&quot;i5_loss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itm_marker_hp_shield,],attr_tier_5,wp_tier_5,knows_common|knows_athletics_5|knows_power_strike_7|knows_ironflesh_5|knows_power_throw_6,gondor_face1,gondor_face2]," calcext:value-type="string">
            <text:p>["i5_loss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itm_marker_hp_shield,],attr_tier_5,wp_tier_5,knows_common|knows_athletics_5|knows_power_strike_7|knows_ironflesh_5|knows_power_throw_6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21]&lt;&gt;&quot;&quot;;[.C121]&lt;&gt;&quot;&quot;);CONCATENATE([Variables.$I$1];[Variables.$I$7];[.B121];[Variables.$I$7];[Variables.$I$6];[Variables.$I$7];[.C121];[Variables.$I$7];[Variables.$I$6];[Variables.$I$7];[.D121];[Variables.$I$7];[Variables.$I$6];[.E121];[Variables.$I$6];[.F121];[Variables.$I$6];[.G121];[Variables.$I$6];[.H121];[Variables.$I$6];[Variables.$I$1];[.I121];[.J121];[.K121];[.L121];[.M121];[.N121];[.O121];[Variables.$I$2];[Variables.$I$6];[.P121];[Variables.$I$6];[.Q121];[Variables.$I$6];[.R121];[Variables.$I$6];[.S121];[Variables.$I$6];[.T121];IF([.U121]&lt;&gt;&quot;&quot;;CONCATENATE([Variables.$I$6];[.U121]);&quot;&quot;);[Variables.$I$2];[Variables.$I$6]);IF([.B121]&lt;&gt;&quot;&quot;;CONCATENATE(&quot;#&quot;;[.B121]);&quot;&quot;))" office:value-type="string" office:string-value="[&quot;i6_loss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style-name="ce7" office:value-type="string" calcext:value-type="string">
            <text:p>i6_loss_leader</text:p>
          </table:table-cell>
          <table:table-cell table:style-name="ce7" office:value-type="string" calcext:value-type="string">
            <text:p>Captain_of_Lossarnach</text:p>
          </table:table-cell>
          <table:table-cell table:style-name="ce7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gondor_leader_helm,</text:p>
          </table:table-cell>
          <table:table-cell table:style-name="ce19" office:value-type="string" calcext:value-type="string">
            <text:p>itm_lossarnach_leader,</text:p>
          </table:table-cell>
          <table:table-cell table:style-name="ce11" office:value-type="string" calcext:value-type="string">
            <text:p>itm_mail_mittens,</text:p>
          </table:table-cell>
          <table:table-cell table:style-name="ce19" office:value-type="string" calcext:value-type="string">
            <text:p>itm_lossarnach_greaves,</text:p>
          </table:table-cell>
          <table:table-cell table:style-name="ce19" office:value-type="string" calcext:value-type="string">
            <text:p>itm_gondor_cav_sword,itm_loss_axe,</text:p>
          </table:table-cell>
          <table:table-cell table:style-name="ce11" office:value-type="string" calcext:value-type="string">
            <text:p>itm_gon_tab_shield_a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8|knows_shield_9|knows_power_strike_8|knows_ironflesh_10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B121]&lt;&gt;&quot;&quot;;[.C121]&lt;&gt;&quot;&quot;);CONCATENATE([Variables.$I$1];[Variables.$I$7];[.B121];[Variables.$I$7];[Variables.$I$6];[Variables.$I$7];[.C121];[Variables.$I$7];[Variables.$I$6];[Variables.$I$7];[.D121];[Variables.$I$7];[Variables.$I$6];[.E121];[Variables.$I$6];[.F121];[Variables.$I$6];[.G121];[Variables.$I$6];[.H121];[Variables.$I$6];[Variables.$I$1];[.I121];[.J121];[.K121];[.L121];[.M121];[.N121];[.O121];[Variables.$I$2];[Variables.$I$6];[.P121];[Variables.$I$6];[.Q121];[Variables.$I$6];[.R121];[Variables.$I$6];[.S121];[Variables.$I$6];[.T121];IF([.U121]&lt;&gt;&quot;&quot;;CONCATENATE([Variables.$I$6];[.U121]);&quot;&quot;);[Variables.$I$2];[Variables.$I$6]);IF([.B121]&lt;&gt;&quot;&quot;;CONCATENATE(&quot;#&quot;;[.B121]);&quot;&quot;))" office:value-type="string" office:string-value="[&quot;i6_loss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number-columns-repeated="16362"/>
        </table:table-row>
        <table:table-row table:style-name="ro1">
          <table:table-cell table:style-name="ce6" table:formula="of:=IF(AND([.B122]&lt;&gt;&quot;&quot;;[.C122]&lt;&gt;&quot;&quot;);CONCATENATE([Variables.$I$1];[Variables.$I$7];[.B122];[Variables.$I$7];[Variables.$I$6];[Variables.$I$7];[.C122];[Variables.$I$7];[Variables.$I$6];[Variables.$I$7];[.D122];[Variables.$I$7];[Variables.$I$6];[.E122];[Variables.$I$6];[.F122];[Variables.$I$6];[.G122];[Variables.$I$6];[.H122];[Variables.$I$6];[Variables.$I$1];[.I122];[.J122];[.K122];[.L122];[.M122];[.N122];[.O122];[Variables.$I$2];[Variables.$I$6];[.P122];[Variables.$I$6];[.Q122];[Variables.$I$6];[.R122];[Variables.$I$6];[.S122];[Variables.$I$6];[.T122];IF([.U122]&lt;&gt;&quot;&quot;;CONCATENATE([Variables.$I$6];[.U122]);&quot;&quot;);[Variables.$I$2];[Variables.$I$6]);IF([.B122]&lt;&gt;&quot;&quot;;CONCATENATE(&quot;#&quot;;[.B122]);&quot;&quot;))" office:value-type="string" office:string-value="#Pelargir" calcext:value-type="string">
            <text:p>#Pelargir</text:p>
          </table:table-cell>
          <table:table-cell table:style-name="ce21" office:value-type="string" calcext:value-type="string">
            <text:p>Pelargir</text:p>
          </table:table-cell>
          <table:table-cell table:style-name="ce21" table:number-columns-repeated="6"/>
          <table:table-cell table:style-name="ce25"/>
          <table:table-cell table:style-name="ce21"/>
          <table:table-cell table:style-name="ce25" table:number-columns-repeated="2"/>
          <table:table-cell table:style-name="ce21"/>
          <table:table-cell table:style-name="ce25" table:number-columns-repeated="2"/>
          <table:table-cell table:style-name="ce21" table:number-columns-repeated="5"/>
          <table:table-cell table:style-name="ce23"/>
          <table:table-cell table:style-name="ce23" table:formula="of:=IF(AND([.B122]&lt;&gt;&quot;&quot;;[.C122]&lt;&gt;&quot;&quot;);CONCATENATE([Variables.$I$1];[Variables.$I$7];[.B122];[Variables.$I$7];[Variables.$I$6];[Variables.$I$7];[.C122];[Variables.$I$7];[Variables.$I$6];[Variables.$I$7];[.D122];[Variables.$I$7];[Variables.$I$6];[.E122];[Variables.$I$6];[.F122];[Variables.$I$6];[.G122];[Variables.$I$6];[.H122];[Variables.$I$6];[Variables.$I$1];[.I122];[.J122];[.K122];[.L122];[.M122];[.N122];[.O122];[Variables.$I$2];[Variables.$I$6];[.P122];[Variables.$I$6];[.Q122];[Variables.$I$6];[.R122];[Variables.$I$6];[.S122];[Variables.$I$6];[.T122];IF([.U122]&lt;&gt;&quot;&quot;;CONCATENATE([Variables.$I$6];[.U122]);&quot;&quot;);[Variables.$I$2];[Variables.$I$6]);IF([.B122]&lt;&gt;&quot;&quot;;CONCATENATE(&quot;#&quot;;[.B122]);&quot;&quot;))" office:value-type="string" office:string-value="#Pelargir" calcext:value-type="string">
            <text:p>#Pelargir</text:p>
          </table:table-cell>
          <table:table-cell table:number-columns-repeated="16362"/>
        </table:table-row>
        <table:table-row table:style-name="ro1">
          <table:table-cell table:style-name="ce6" table:formula="of:=IF(AND([.B123]&lt;&gt;&quot;&quot;;[.C123]&lt;&gt;&quot;&quot;);CONCATENATE([Variables.$I$1];[Variables.$I$7];[.B123];[Variables.$I$7];[Variables.$I$6];[Variables.$I$7];[.C123];[Variables.$I$7];[Variables.$I$6];[Variables.$I$7];[.D123];[Variables.$I$7];[Variables.$I$6];[.E123];[Variables.$I$6];[.F123];[Variables.$I$6];[.G123];[Variables.$I$6];[.H123];[Variables.$I$6];[Variables.$I$1];[.I123];[.J123];[.K123];[.L123];[.M123];[.N123];[.O123];[Variables.$I$2];[Variables.$I$6];[.P123];[Variables.$I$6];[.Q123];[Variables.$I$6];[.R123];[Variables.$I$6];[.S123];[Variables.$I$6];[.T123];IF([.U123]&lt;&gt;&quot;&quot;;CONCATENATE([Variables.$I$6];[.U123]);&quot;&quot;);[Variables.$I$2];[Variables.$I$6]);IF([.B123]&lt;&gt;&quot;&quot;;CONCATENATE(&quot;#&quot;;[.B123]);&quot;&quot;))" office:value-type="string" office:string-value="[&quot;i1_pel_watchman&quot;,&quot;Pelargir_Watchman&quot;,&quot;Pelargir_Watchmen&quot;,tf_gondor| tfg_armor| tfg_helm| tfg_boots,0,subfac_pelargir,fac_gondor,[itm_pel_jerkin,itm_gondor_light_greaves,itm_pelargir_eket,itm_shortened_spear,],attr_fief_tier_1,wp_tier_2,knows_common|knows_ironflesh_1|knows_power_throw_1|knows_weapon_master_1|knows_shield_1|knows_athletics_1|knows_trainer_1|knows_tactics_2|knows_spotting_1|knows_inventory_management_1|knows_leadership_1|knows_trade_2,gondor_face1,gondor_face2]," calcext:value-type="string">
            <text:p>["i1_pel_watchman","Pelargir_Watchman","Pelargir_Watchmen",tf_gondor| tfg_armor| tfg_helm| tfg_boots,0,subfac_pelargir,fac_gondor,[itm_pel_jerkin,itm_gondor_light_greaves,itm_pelargir_eket,itm_shortened_spear,],attr_fief_tier_1,wp_tier_2,knows_common|knows_ironflesh_1|knows_power_throw_1|knows_weapon_master_1|knows_shield_1|knows_athletics_1|knows_trainer_1|knows_tactics_2|knows_spotting_1|knows_inventory_management_1|knows_leadership_1|knows_trade_2,gondor_face1,gondor_face2],</text:p>
          </table:table-cell>
          <table:table-cell table:style-name="ce7" office:value-type="string" calcext:value-type="string">
            <text:p>i1_pel_watchman</text:p>
          </table:table-cell>
          <table:table-cell table:style-name="ce7" office:value-type="string" calcext:value-type="string">
            <text:p>Pelargir_Watchman</text:p>
          </table:table-cell>
          <table:table-cell table:style-name="ce7" office:value-type="string" calcext:value-type="string">
            <text:p>Pelargir_Watchmen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0" office:value-type="string" calcext:value-type="string">
            <text:p>fac_gondor</text:p>
          </table:table-cell>
          <table:table-cell table:style-name="ce11"/>
          <table:table-cell table:style-name="ce11" office:value-type="string" calcext:value-type="string">
            <text:p>itm_pel_jerkin,</text:p>
          </table:table-cell>
          <table:table-cell table:style-name="ce11"/>
          <table:table-cell table:style-name="ce11" office:value-type="string" calcext:value-type="string">
            <text:p>itm_gondor_light_greaves,</text:p>
          </table:table-cell>
          <table:table-cell table:style-name="ce19" office:value-type="string" calcext:value-type="string">
            <text:p>itm_pelargir_eket,</text:p>
          </table:table-cell>
          <table:table-cell table:style-name="ce11" office:value-type="string" calcext:value-type="string">
            <text:p>itm_shortened_spear,</text:p>
          </table:table-cell>
          <table:table-cell table:style-name="ce11"/>
          <table:table-cell table:style-name="ce12" office:value-type="string" calcext:value-type="string">
            <text:p>attr_fief_tier_1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1|knows_power_throw_1|knows_weapon_master_1|knows_shield_1|knows_athletics_1|knows_trainer_1|knows_tactics_2|knows_spotting_1|knows_inventory_management_1|knows_leadership_1|knows_trade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23]&lt;&gt;&quot;&quot;;[.C123]&lt;&gt;&quot;&quot;);CONCATENATE([Variables.$I$1];[Variables.$I$7];[.B123];[Variables.$I$7];[Variables.$I$6];[Variables.$I$7];[.C123];[Variables.$I$7];[Variables.$I$6];[Variables.$I$7];[.D123];[Variables.$I$7];[Variables.$I$6];[.E123];[Variables.$I$6];[.F123];[Variables.$I$6];[.G123];[Variables.$I$6];[.H123];[Variables.$I$6];[Variables.$I$1];[.I123];[.J123];[.K123];[.L123];[.M123];[.N123];[.O123];[Variables.$I$2];[Variables.$I$6];[.P123];[Variables.$I$6];[.Q123];[Variables.$I$6];[.R123];[Variables.$I$6];[.S123];[Variables.$I$6];[.T123];IF([.U123]&lt;&gt;&quot;&quot;;CONCATENATE([Variables.$I$6];[.U123]);&quot;&quot;);[Variables.$I$2];[Variables.$I$6]);IF([.B123]&lt;&gt;&quot;&quot;;CONCATENATE(&quot;#&quot;;[.B123]);&quot;&quot;))" office:value-type="string" office:string-value="[&quot;i1_pel_watchman&quot;,&quot;Pelargir_Watchman&quot;,&quot;Pelargir_Watchmen&quot;,tf_gondor| tfg_armor| tfg_helm| tfg_boots,0,subfac_pelargir,fac_gondor,[itm_pel_jerkin,itm_gondor_light_greaves,itm_pelargir_eket,itm_shortened_spear,],attr_fief_tier_1,wp_tier_2,knows_common|knows_ironflesh_1|knows_power_throw_1|knows_weapon_master_1|knows_shield_1|knows_athletics_1|knows_trainer_1|knows_tactics_2|knows_spotting_1|knows_inventory_management_1|knows_leadership_1|knows_trade_2,gondor_face1,gondor_face2]," calcext:value-type="string">
            <text:p>["i1_pel_watchman","Pelargir_Watchman","Pelargir_Watchmen",tf_gondor| tfg_armor| tfg_helm| tfg_boots,0,subfac_pelargir,fac_gondor,[itm_pel_jerkin,itm_gondor_light_greaves,itm_pelargir_eket,itm_shortened_spear,],attr_fief_tier_1,wp_tier_2,knows_common|knows_ironflesh_1|knows_power_throw_1|knows_weapon_master_1|knows_shield_1|knows_athletics_1|knows_trainer_1|knows_tactics_2|knows_spotting_1|knows_inventory_management_1|knows_leadership_1|knows_trade_2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24]&lt;&gt;&quot;&quot;;[.C124]&lt;&gt;&quot;&quot;);CONCATENATE([Variables.$I$1];[Variables.$I$7];[.B124];[Variables.$I$7];[Variables.$I$6];[Variables.$I$7];[.C124];[Variables.$I$7];[Variables.$I$6];[Variables.$I$7];[.D124];[Variables.$I$7];[Variables.$I$6];[.E124];[Variables.$I$6];[.F124];[Variables.$I$6];[.G124];[Variables.$I$6];[.H124];[Variables.$I$6];[Variables.$I$1];[.I124];[.J124];[.K124];[.L124];[.M124];[.N124];[.O124];[Variables.$I$2];[Variables.$I$6];[.P124];[Variables.$I$6];[.Q124];[Variables.$I$6];[.R124];[Variables.$I$6];[.S124];[Variables.$I$6];[.T124];IF([.U124]&lt;&gt;&quot;&quot;;CONCATENATE([Variables.$I$6];[.U124]);&quot;&quot;);[Variables.$I$2];[Variables.$I$6]);IF([.B124]&lt;&gt;&quot;&quot;;CONCATENATE(&quot;#&quot;;[.B124]);&quot;&quot;))" office:value-type="string" office:string-value="[&quot;a2_pel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attr_tier_2,wp_tier_3,knows_common|knows_ironflesh_1|knows_power_throw_3|knows_weapon_master_1|knows_shield_1|knows_athletics_3|knows_trainer_1|knows_tactics_2|knows_spotting_1|knows_inventory_management_1|knows_leadership_1|knows_trade_2,gondor_face1,gondor_face2]," calcext:value-type="string">
            <text:p>["a2_pel_marine","Pelargir_Marine","Pelargir_Marines",tf_gondor| tfg_ranged| tfg_shield| tfg_armor| tfg_helm| tfg_boots,0,subfac_pelargir,fac_gondor,[itm_pelargir_hood,itm_pel_marine,itm_gondor_light_greaves,itm_pelargir_eket,itm_gondor_javelin,itm_gon_tab_shield_a,],attr_tier_2,wp_tier_3,knows_common|knows_ironflesh_1|knows_power_throw_3|knows_weapon_master_1|knows_shield_1|knows_athletics_3|knows_trainer_1|knows_tactics_2|knows_spotting_1|knows_inventory_management_1|knows_leadership_1|knows_trade_2,gondor_face1,gondor_face2],</text:p>
          </table:table-cell>
          <table:table-cell table:style-name="ce7" office:value-type="string" calcext:value-type="string">
            <text:p>a2_pel_marine</text:p>
          </table:table-cell>
          <table:table-cell table:style-name="ce7" office:value-type="string" calcext:value-type="string">
            <text:p>Pelargir_Marine</text:p>
          </table:table-cell>
          <table:table-cell table:style-name="ce7" office:value-type="string" calcext:value-type="string">
            <text:p>Pelargir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pelargir_hood,</text:p>
          </table:table-cell>
          <table:table-cell table:style-name="ce19" office:value-type="string" calcext:value-type="string">
            <text:p>itm_pel_marine,</text:p>
          </table:table-cell>
          <table:table-cell table:style-name="ce19"/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pelargir_eket,</text:p>
          </table:table-cell>
          <table:table-cell table:style-name="ce11" office:value-type="string" calcext:value-type="string">
            <text:p>itm_gondor_javelin,itm_gon_tab_shield_a,</text:p>
          </table:table-cell>
          <table:table-cell table:style-name="ce11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3</text:p>
          </table:table-cell>
          <table:table-cell table:style-name="ce13" office:value-type="string" calcext:value-type="string">
            <text:p>knows_common|knows_ironflesh_1|knows_power_throw_3|knows_weapon_master_1|knows_shield_1|knows_athletics_3|knows_trainer_1|knows_tactics_2|knows_spotting_1|knows_inventory_management_1|knows_leadership_1|knows_trade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24]&lt;&gt;&quot;&quot;;[.C124]&lt;&gt;&quot;&quot;);CONCATENATE([Variables.$I$1];[Variables.$I$7];[.B124];[Variables.$I$7];[Variables.$I$6];[Variables.$I$7];[.C124];[Variables.$I$7];[Variables.$I$6];[Variables.$I$7];[.D124];[Variables.$I$7];[Variables.$I$6];[.E124];[Variables.$I$6];[.F124];[Variables.$I$6];[.G124];[Variables.$I$6];[.H124];[Variables.$I$6];[Variables.$I$1];[.I124];[.J124];[.K124];[.L124];[.M124];[.N124];[.O124];[Variables.$I$2];[Variables.$I$6];[.P124];[Variables.$I$6];[.Q124];[Variables.$I$6];[.R124];[Variables.$I$6];[.S124];[Variables.$I$6];[.T124];IF([.U124]&lt;&gt;&quot;&quot;;CONCATENATE([Variables.$I$6];[.U124]);&quot;&quot;);[Variables.$I$2];[Variables.$I$6]);IF([.B124]&lt;&gt;&quot;&quot;;CONCATENATE(&quot;#&quot;;[.B124]);&quot;&quot;))" office:value-type="string" office:string-value="[&quot;a2_pel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attr_tier_2,wp_tier_3,knows_common|knows_ironflesh_1|knows_power_throw_3|knows_weapon_master_1|knows_shield_1|knows_athletics_3|knows_trainer_1|knows_tactics_2|knows_spotting_1|knows_inventory_management_1|knows_leadership_1|knows_trade_2,gondor_face1,gondor_face2]," calcext:value-type="string">
            <text:p>["a2_pel_marine","Pelargir_Marine","Pelargir_Marines",tf_gondor| tfg_ranged| tfg_shield| tfg_armor| tfg_helm| tfg_boots,0,subfac_pelargir,fac_gondor,[itm_pelargir_hood,itm_pel_marine,itm_gondor_light_greaves,itm_pelargir_eket,itm_gondor_javelin,itm_gon_tab_shield_a,],attr_tier_2,wp_tier_3,knows_common|knows_ironflesh_1|knows_power_throw_3|knows_weapon_master_1|knows_shield_1|knows_athletics_3|knows_trainer_1|knows_tactics_2|knows_spotting_1|knows_inventory_management_1|knows_leadership_1|knows_trade_2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25]&lt;&gt;&quot;&quot;;[.C125]&lt;&gt;&quot;&quot;);CONCATENATE([Variables.$I$1];[Variables.$I$7];[.B125];[Variables.$I$7];[Variables.$I$6];[Variables.$I$7];[.C125];[Variables.$I$7];[Variables.$I$6];[Variables.$I$7];[.D125];[Variables.$I$7];[Variables.$I$6];[.E125];[Variables.$I$6];[.F125];[Variables.$I$6];[.G125];[Variables.$I$6];[.H125];[Variables.$I$6];[Variables.$I$1];[.I125];[.J125];[.K125];[.L125];[.M125];[.N125];[.O125];[Variables.$I$2];[Variables.$I$6];[.P125];[Variables.$I$6];[.Q125];[Variables.$I$6];[.R125];[Variables.$I$6];[.S125];[Variables.$I$6];[.T125];IF([.U125]&lt;&gt;&quot;&quot;;CONCATENATE([Variables.$I$6];[.U125]);&quot;&quot;);[Variables.$I$2];[Variables.$I$6]);IF([.B125]&lt;&gt;&quot;&quot;;CONCATENATE(&quot;#&quot;;[.B125]);&quot;&quot;))" office:value-type="string" office:string-value="[&quot;a3_pel_vet_marine&quot;,&quot;Pelargir_Veteran_Marine&quot;,&quot;Pelargir_Veteran_Marines&quot;,tf_gondor| tfg_ranged| tfg_shield| tfg_armor| tfg_helm| tfg_boots,0,subfac_pelargir,fac_gondor,[itm_pelargir_hood,itm_pel_marine,itm_gondor_light_greaves,itm_pelargir_eket,itm_gondor_javelin,itm_gondor_javelin,itm_gon_tab_shield_a,],attr_tier_5,wp_tier_5,knows_common|knows_athletics_6|knows_power_throw_5|knows_power_strike_2|knows_ironflesh_3,gondor_face1,gondor_face2]," calcext:value-type="string">
            <text:p>["a3_pel_vet_marine","Pelargir_Veteran_Marine","Pelargir_Veteran_Marines",tf_gondor| tfg_ranged| tfg_shield| tfg_armor| tfg_helm| tfg_boots,0,subfac_pelargir,fac_gondor,[itm_pelargir_hood,itm_pel_marine,itm_gondor_light_greaves,itm_pelargir_eket,itm_gondor_javelin,itm_gondor_javelin,itm_gon_tab_shield_a,],attr_tier_5,wp_tier_5,knows_common|knows_athletics_6|knows_power_throw_5|knows_power_strike_2|knows_ironflesh_3,gondor_face1,gondor_face2],</text:p>
          </table:table-cell>
          <table:table-cell table:style-name="ce7" office:value-type="string" calcext:value-type="string">
            <text:p>a3_pel_vet_marine</text:p>
          </table:table-cell>
          <table:table-cell table:style-name="ce7" office:value-type="string" calcext:value-type="string">
            <text:p>Pelargir_Veteran_Marine</text:p>
          </table:table-cell>
          <table:table-cell table:style-name="ce7" office:value-type="string" calcext:value-type="string">
            <text:p>Pelargir_Veteran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pelargir_hood,</text:p>
          </table:table-cell>
          <table:table-cell table:style-name="ce11" office:value-type="string" calcext:value-type="string">
            <text:p>itm_pel_marine,</text:p>
          </table:table-cell>
          <table:table-cell table:style-name="ce11"/>
          <table:table-cell table:style-name="ce11" office:value-type="string" calcext:value-type="string">
            <text:p>itm_gondor_light_greaves,</text:p>
          </table:table-cell>
          <table:table-cell table:style-name="ce19" office:value-type="string" calcext:value-type="string">
            <text:p>itm_pelargir_eket,</text:p>
          </table:table-cell>
          <table:table-cell table:style-name="ce11" office:value-type="string" calcext:value-type="string">
            <text:p>itm_gondor_javelin,itm_gondor_javelin,itm_gon_tab_shield_a,</text:p>
          </table:table-cell>
          <table:table-cell table:style-name="ce11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6|knows_power_throw_5|knows_power_strike_2|knows_ironflesh_3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25]&lt;&gt;&quot;&quot;;[.C125]&lt;&gt;&quot;&quot;);CONCATENATE([Variables.$I$1];[Variables.$I$7];[.B125];[Variables.$I$7];[Variables.$I$6];[Variables.$I$7];[.C125];[Variables.$I$7];[Variables.$I$6];[Variables.$I$7];[.D125];[Variables.$I$7];[Variables.$I$6];[.E125];[Variables.$I$6];[.F125];[Variables.$I$6];[.G125];[Variables.$I$6];[.H125];[Variables.$I$6];[Variables.$I$1];[.I125];[.J125];[.K125];[.L125];[.M125];[.N125];[.O125];[Variables.$I$2];[Variables.$I$6];[.P125];[Variables.$I$6];[.Q125];[Variables.$I$6];[.R125];[Variables.$I$6];[.S125];[Variables.$I$6];[.T125];IF([.U125]&lt;&gt;&quot;&quot;;CONCATENATE([Variables.$I$6];[.U125]);&quot;&quot;);[Variables.$I$2];[Variables.$I$6]);IF([.B125]&lt;&gt;&quot;&quot;;CONCATENATE(&quot;#&quot;;[.B125]);&quot;&quot;))" office:value-type="string" office:string-value="[&quot;a3_pel_vet_marine&quot;,&quot;Pelargir_Veteran_Marine&quot;,&quot;Pelargir_Veteran_Marines&quot;,tf_gondor| tfg_ranged| tfg_shield| tfg_armor| tfg_helm| tfg_boots,0,subfac_pelargir,fac_gondor,[itm_pelargir_hood,itm_pel_marine,itm_gondor_light_greaves,itm_pelargir_eket,itm_gondor_javelin,itm_gondor_javelin,itm_gon_tab_shield_a,],attr_tier_5,wp_tier_5,knows_common|knows_athletics_6|knows_power_throw_5|knows_power_strike_2|knows_ironflesh_3,gondor_face1,gondor_face2]," calcext:value-type="string">
            <text:p>["a3_pel_vet_marine","Pelargir_Veteran_Marine","Pelargir_Veteran_Marines",tf_gondor| tfg_ranged| tfg_shield| tfg_armor| tfg_helm| tfg_boots,0,subfac_pelargir,fac_gondor,[itm_pelargir_hood,itm_pel_marine,itm_gondor_light_greaves,itm_pelargir_eket,itm_gondor_javelin,itm_gondor_javelin,itm_gon_tab_shield_a,],attr_tier_5,wp_tier_5,knows_common|knows_athletics_6|knows_power_throw_5|knows_power_strike_2|knows_ironflesh_3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26]&lt;&gt;&quot;&quot;;[.C126]&lt;&gt;&quot;&quot;);CONCATENATE([Variables.$I$1];[Variables.$I$7];[.B126];[Variables.$I$7];[Variables.$I$6];[Variables.$I$7];[.C126];[Variables.$I$7];[Variables.$I$6];[Variables.$I$7];[.D126];[Variables.$I$7];[Variables.$I$6];[.E126];[Variables.$I$6];[.F126];[Variables.$I$6];[.G126];[Variables.$I$6];[.H126];[Variables.$I$6];[Variables.$I$1];[.I126];[.J126];[.K126];[.L126];[.M126];[.N126];[.O126];[Variables.$I$2];[Variables.$I$6];[.P126];[Variables.$I$6];[.Q126];[Variables.$I$6];[.R126];[Variables.$I$6];[.S126];[Variables.$I$6];[.T126];IF([.U126]&lt;&gt;&quot;&quot;;CONCATENATE([Variables.$I$6];[.U126]);&quot;&quot;);[Variables.$I$2];[Variables.$I$6]);IF([.B126]&lt;&gt;&quot;&quot;;CONCATENATE(&quot;#&quot;;[.B126]);&quot;&quot;))" office:value-type="string" office:string-value="[&quot;i2_pel_infantry&quot;,&quot;Pelargir_Infantryman&quot;,&quot;Pelargir_Infantrymen&quot;,tf_gondor| tfg_gloves| tfg_shield| tfg_armor| tfg_helm| tfg_boots,0,subfac_pelargir,fac_gondor,[itm_pelargir_helmet_light,itm_pel_footman,itm_leather_gloves,itm_gondor_light_greaves,itm_pelargir_sword,itm_gon_tab_shield_b,],attr_tier_2,wp_tier_3,knows_common|knows_ironflesh_1|knows_power_strike_1|knows_power_throw_1|knows_weapon_master_1|knows_shield_4|knows_athletics_1|knows_trainer_1|knows_tactics_2|knows_spotting_1|knows_inventory_management_1|knows_leadership_1|knows_trade_2,gondor_face1,gondor_face2]," calcext:value-type="string">
            <text:p>["i2_pel_infantry","Pelargir_Infantryman","Pelargir_Infantrymen",tf_gondor| tfg_gloves| tfg_shield| tfg_armor| tfg_helm| tfg_boots,0,subfac_pelargir,fac_gondor,[itm_pelargir_helmet_light,itm_pel_footman,itm_leather_gloves,itm_gondor_light_greaves,itm_pelargir_sword,itm_gon_tab_shield_b,],attr_tier_2,wp_tier_3,knows_common|knows_ironflesh_1|knows_power_strike_1|knows_power_throw_1|knows_weapon_master_1|knows_shield_4|knows_athletics_1|knows_trainer_1|knows_tactics_2|knows_spotting_1|knows_inventory_management_1|knows_leadership_1|knows_trade_2,gondor_face1,gondor_face2],</text:p>
          </table:table-cell>
          <table:table-cell table:style-name="ce7" office:value-type="string" calcext:value-type="string">
            <text:p>i2_pel_infantry</text:p>
          </table:table-cell>
          <table:table-cell table:style-name="ce7" office:value-type="string" calcext:value-type="string">
            <text:p>Pelargir_Infantryman</text:p>
          </table:table-cell>
          <table:table-cell table:style-name="ce7" office:value-type="string" calcext:value-type="string">
            <text:p>Pelargir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pelargir_helmet_light,</text:p>
          </table:table-cell>
          <table:table-cell table:style-name="ce11" office:value-type="string" calcext:value-type="string">
            <text:p>itm_pel_footman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gondor_light_greaves,</text:p>
          </table:table-cell>
          <table:table-cell table:style-name="ce11" office:value-type="string" calcext:value-type="string">
            <text:p>itm_pelargir_sword,</text:p>
          </table:table-cell>
          <table:table-cell table:style-name="ce19" office:value-type="string" calcext:value-type="string">
            <text:p>itm_gon_tab_shield_b,</text:p>
          </table:table-cell>
          <table:table-cell table:style-name="ce11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3</text:p>
          </table:table-cell>
          <table:table-cell table:style-name="ce13" office:value-type="string" calcext:value-type="string">
            <text:p>knows_common|knows_ironflesh_1|knows_power_strike_1|knows_power_throw_1|knows_weapon_master_1|knows_shield_4|knows_athletics_1|knows_trainer_1|knows_tactics_2|knows_spotting_1|knows_inventory_management_1|knows_leadership_1|knows_trade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26]&lt;&gt;&quot;&quot;;[.C126]&lt;&gt;&quot;&quot;);CONCATENATE([Variables.$I$1];[Variables.$I$7];[.B126];[Variables.$I$7];[Variables.$I$6];[Variables.$I$7];[.C126];[Variables.$I$7];[Variables.$I$6];[Variables.$I$7];[.D126];[Variables.$I$7];[Variables.$I$6];[.E126];[Variables.$I$6];[.F126];[Variables.$I$6];[.G126];[Variables.$I$6];[.H126];[Variables.$I$6];[Variables.$I$1];[.I126];[.J126];[.K126];[.L126];[.M126];[.N126];[.O126];[Variables.$I$2];[Variables.$I$6];[.P126];[Variables.$I$6];[.Q126];[Variables.$I$6];[.R126];[Variables.$I$6];[.S126];[Variables.$I$6];[.T126];IF([.U126]&lt;&gt;&quot;&quot;;CONCATENATE([Variables.$I$6];[.U126]);&quot;&quot;);[Variables.$I$2];[Variables.$I$6]);IF([.B126]&lt;&gt;&quot;&quot;;CONCATENATE(&quot;#&quot;;[.B126]);&quot;&quot;))" office:value-type="string" office:string-value="[&quot;i2_pel_infantry&quot;,&quot;Pelargir_Infantryman&quot;,&quot;Pelargir_Infantrymen&quot;,tf_gondor| tfg_gloves| tfg_shield| tfg_armor| tfg_helm| tfg_boots,0,subfac_pelargir,fac_gondor,[itm_pelargir_helmet_light,itm_pel_footman,itm_leather_gloves,itm_gondor_light_greaves,itm_pelargir_sword,itm_gon_tab_shield_b,],attr_tier_2,wp_tier_3,knows_common|knows_ironflesh_1|knows_power_strike_1|knows_power_throw_1|knows_weapon_master_1|knows_shield_4|knows_athletics_1|knows_trainer_1|knows_tactics_2|knows_spotting_1|knows_inventory_management_1|knows_leadership_1|knows_trade_2,gondor_face1,gondor_face2]," calcext:value-type="string">
            <text:p>["i2_pel_infantry","Pelargir_Infantryman","Pelargir_Infantrymen",tf_gondor| tfg_gloves| tfg_shield| tfg_armor| tfg_helm| tfg_boots,0,subfac_pelargir,fac_gondor,[itm_pelargir_helmet_light,itm_pel_footman,itm_leather_gloves,itm_gondor_light_greaves,itm_pelargir_sword,itm_gon_tab_shield_b,],attr_tier_2,wp_tier_3,knows_common|knows_ironflesh_1|knows_power_strike_1|knows_power_throw_1|knows_weapon_master_1|knows_shield_4|knows_athletics_1|knows_trainer_1|knows_tactics_2|knows_spotting_1|knows_inventory_management_1|knows_leadership_1|knows_trade_2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27]&lt;&gt;&quot;&quot;;[.C127]&lt;&gt;&quot;&quot;);CONCATENATE([Variables.$I$1];[Variables.$I$7];[.B127];[Variables.$I$7];[Variables.$I$6];[Variables.$I$7];[.C127];[Variables.$I$7];[Variables.$I$6];[Variables.$I$7];[.D127];[Variables.$I$7];[Variables.$I$6];[.E127];[Variables.$I$6];[.F127];[Variables.$I$6];[.G127];[Variables.$I$6];[.H127];[Variables.$I$6];[Variables.$I$1];[.I127];[.J127];[.K127];[.L127];[.M127];[.N127];[.O127];[Variables.$I$2];[Variables.$I$6];[.P127];[Variables.$I$6];[.Q127];[Variables.$I$6];[.R127];[Variables.$I$6];[.S127];[Variables.$I$6];[.T127];IF([.U127]&lt;&gt;&quot;&quot;;CONCATENATE([Variables.$I$6];[.U127]);&quot;&quot;);[Variables.$I$2];[Variables.$I$6]);IF([.B127]&lt;&gt;&quot;&quot;;CONCATENATE(&quot;#&quot;;[.B127]);&quot;&quot;))" office:value-type="string" office:string-value="[&quot;i3_pel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attr_tier_5,wp_tier_5,knows_common|knows_athletics_2|knows_shield_5|knows_power_strike_5|knows_ironflesh_5,gondor_face1,gondor_face2]," calcext:value-type="string">
            <text:p>["i3_pel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attr_tier_5,wp_tier_5,knows_common|knows_athletics_2|knows_shield_5|knows_power_strike_5|knows_ironflesh_5,gondor_face1,gondor_face2],</text:p>
          </table:table-cell>
          <table:table-cell table:style-name="ce7" office:value-type="string" calcext:value-type="string">
            <text:p>i3_pel_vet_infantry</text:p>
          </table:table-cell>
          <table:table-cell table:style-name="ce7" office:value-type="string" calcext:value-type="string">
            <text:p>Pelargir_Veteran_Infantryman</text:p>
          </table:table-cell>
          <table:table-cell table:style-name="ce7" office:value-type="string" calcext:value-type="string">
            <text:p>Pelargir_Veteran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pelargir_helmet_heavy,</text:p>
          </table:table-cell>
          <table:table-cell table:style-name="ce11" office:value-type="string" calcext:value-type="string">
            <text:p>itm_pelargir_regular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pelargir_greaves,</text:p>
          </table:table-cell>
          <table:table-cell table:style-name="ce19" office:value-type="string" calcext:value-type="string">
            <text:p>itm_pelargir_sword,</text:p>
          </table:table-cell>
          <table:table-cell table:style-name="ce19" office:value-type="string" calcext:value-type="string">
            <text:p>itm_gon_tab_shield_b,</text:p>
          </table:table-cell>
          <table:table-cell table:style-name="ce11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2|knows_shield_5|knows_power_strike_5|knows_ironflesh_5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27]&lt;&gt;&quot;&quot;;[.C127]&lt;&gt;&quot;&quot;);CONCATENATE([Variables.$I$1];[Variables.$I$7];[.B127];[Variables.$I$7];[Variables.$I$6];[Variables.$I$7];[.C127];[Variables.$I$7];[Variables.$I$6];[Variables.$I$7];[.D127];[Variables.$I$7];[Variables.$I$6];[.E127];[Variables.$I$6];[.F127];[Variables.$I$6];[.G127];[Variables.$I$6];[.H127];[Variables.$I$6];[Variables.$I$1];[.I127];[.J127];[.K127];[.L127];[.M127];[.N127];[.O127];[Variables.$I$2];[Variables.$I$6];[.P127];[Variables.$I$6];[.Q127];[Variables.$I$6];[.R127];[Variables.$I$6];[.S127];[Variables.$I$6];[.T127];IF([.U127]&lt;&gt;&quot;&quot;;CONCATENATE([Variables.$I$6];[.U127]);&quot;&quot;);[Variables.$I$2];[Variables.$I$6]);IF([.B127]&lt;&gt;&quot;&quot;;CONCATENATE(&quot;#&quot;;[.B127]);&quot;&quot;))" office:value-type="string" office:string-value="[&quot;i3_pel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attr_tier_5,wp_tier_5,knows_common|knows_athletics_2|knows_shield_5|knows_power_strike_5|knows_ironflesh_5,gondor_face1,gondor_face2]," calcext:value-type="string">
            <text:p>["i3_pel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attr_tier_5,wp_tier_5,knows_common|knows_athletics_2|knows_shield_5|knows_power_strike_5|knows_ironflesh_5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28]&lt;&gt;&quot;&quot;;[.C128]&lt;&gt;&quot;&quot;);CONCATENATE([Variables.$I$1];[Variables.$I$7];[.B128];[Variables.$I$7];[Variables.$I$6];[Variables.$I$7];[.C128];[Variables.$I$7];[Variables.$I$6];[Variables.$I$7];[.D128];[Variables.$I$7];[Variables.$I$6];[.E128];[Variables.$I$6];[.F128];[Variables.$I$6];[.G128];[Variables.$I$6];[.H128];[Variables.$I$6];[Variables.$I$1];[.I128];[.J128];[.K128];[.L128];[.M128];[.N128];[.O128];[Variables.$I$2];[Variables.$I$6];[.P128];[Variables.$I$6];[.Q128];[Variables.$I$6];[.R128];[Variables.$I$6];[.S128];[Variables.$I$6];[.T128];IF([.U128]&lt;&gt;&quot;&quot;;CONCATENATE([Variables.$I$6];[.U128]);&quot;&quot;);[Variables.$I$2];[Variables.$I$6]);IF([.B128]&lt;&gt;&quot;&quot;;CONCATENATE(&quot;#&quot;;[.B128]);&quot;&quot;))" office:value-type="string" office:string-value="[&quot;i6_pel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" calcext:value-type="string">
            <text:p>["i6_pel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</text:p>
          </table:table-cell>
          <table:table-cell table:style-name="ce7" office:value-type="string" calcext:value-type="string">
            <text:p>i6_pel_leader</text:p>
          </table:table-cell>
          <table:table-cell table:style-name="ce7" office:value-type="string" calcext:value-type="string">
            <text:p>Captain_of_Pelargir</text:p>
          </table:table-cell>
          <table:table-cell table:style-name="ce7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pelargir_helmet_light,</text:p>
          </table:table-cell>
          <table:table-cell table:style-name="ce19" office:value-type="string" calcext:value-type="string">
            <text:p>itm_pel_leader,</text:p>
          </table:table-cell>
          <table:table-cell table:style-name="ce11" office:value-type="string" calcext:value-type="string">
            <text:p>itm_mail_mittens,</text:p>
          </table:table-cell>
          <table:table-cell table:style-name="ce19" office:value-type="string" calcext:value-type="string">
            <text:p>itm_pelargir_greaves,</text:p>
          </table:table-cell>
          <table:table-cell table:style-name="ce19" office:value-type="string" calcext:value-type="string">
            <text:p>itm_pelargir_sword,</text:p>
          </table:table-cell>
          <table:table-cell table:style-name="ce11" office:value-type="string" calcext:value-type="string">
            <text:p>itm_gon_tab_shield_c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3|knows_shield_9|knows_power_strike_8|knows_ironflesh_10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28]&lt;&gt;&quot;&quot;;[.C128]&lt;&gt;&quot;&quot;);CONCATENATE([Variables.$I$1];[Variables.$I$7];[.B128];[Variables.$I$7];[Variables.$I$6];[Variables.$I$7];[.C128];[Variables.$I$7];[Variables.$I$6];[Variables.$I$7];[.D128];[Variables.$I$7];[Variables.$I$6];[.E128];[Variables.$I$6];[.F128];[Variables.$I$6];[.G128];[Variables.$I$6];[.H128];[Variables.$I$6];[Variables.$I$1];[.I128];[.J128];[.K128];[.L128];[.M128];[.N128];[.O128];[Variables.$I$2];[Variables.$I$6];[.P128];[Variables.$I$6];[.Q128];[Variables.$I$6];[.R128];[Variables.$I$6];[.S128];[Variables.$I$6];[.T128];IF([.U128]&lt;&gt;&quot;&quot;;CONCATENATE([Variables.$I$6];[.U128]);&quot;&quot;);[Variables.$I$2];[Variables.$I$6]);IF([.B128]&lt;&gt;&quot;&quot;;CONCATENATE(&quot;#&quot;;[.B128]);&quot;&quot;))" office:value-type="string" office:string-value="[&quot;i6_pel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" calcext:value-type="string">
            <text:p>["i6_pel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29]&lt;&gt;&quot;&quot;;[.C129]&lt;&gt;&quot;&quot;);CONCATENATE([Variables.$I$1];[Variables.$I$7];[.B129];[Variables.$I$7];[Variables.$I$6];[Variables.$I$7];[.C129];[Variables.$I$7];[Variables.$I$6];[Variables.$I$7];[.D129];[Variables.$I$7];[Variables.$I$6];[.E129];[Variables.$I$6];[.F129];[Variables.$I$6];[.G129];[Variables.$I$6];[.H129];[Variables.$I$6];[Variables.$I$1];[.I129];[.J129];[.K129];[.L129];[.M129];[.N129];[.O129];[Variables.$I$2];[Variables.$I$6];[.P129];[Variables.$I$6];[.Q129];[Variables.$I$6];[.R129];[Variables.$I$6];[.S129];[Variables.$I$6];[.T129];IF([.U129]&lt;&gt;&quot;&quot;;CONCATENATE([Variables.$I$6];[.U129]);&quot;&quot;);[Variables.$I$2];[Variables.$I$6]);IF([.B129]&lt;&gt;&quot;&quot;;CONCATENATE(&quot;#&quot;;[.B129]);&quot;&quot;))" office:value-type="string" office:string-value="[&quot;a6_pel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" calcext:value-type="string">
            <text:p>["a6_pel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</text:p>
          </table:table-cell>
          <table:table-cell table:style-name="ce7" office:value-type="string" calcext:value-type="string">
            <text:p>a6_pel_marine_leader</text:p>
          </table:table-cell>
          <table:table-cell table:style-name="ce7" office:value-type="string" calcext:value-type="string">
            <text:p>Captain_of_Pelargir_Marines</text:p>
          </table:table-cell>
          <table:table-cell table:style-name="ce7" office:value-type="string" calcext:value-type="string">
            <text:p>Captains_of_Pelargir_Marine</text:p>
          </table:table-cell>
          <table:table-cell table:style-name="ce8" office:value-type="string" calcext:value-type="string">
            <text:p>tf_gondor| tfg_rang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pelargir_helmet_light,</text:p>
          </table:table-cell>
          <table:table-cell table:style-name="ce11" office:value-type="string" calcext:value-type="string">
            <text:p>itm_pelargir_marine_leader,</text:p>
          </table:table-cell>
          <table:table-cell table:style-name="ce11"/>
          <table:table-cell table:style-name="ce11" office:value-type="string" calcext:value-type="string">
            <text:p>itm_pelargir_greaves,</text:p>
          </table:table-cell>
          <table:table-cell table:style-name="ce11" office:value-type="string" calcext:value-type="string">
            <text:p>itm_pelargir_sword,</text:p>
          </table:table-cell>
          <table:table-cell table:style-name="ce11" office:value-type="string" calcext:value-type="string">
            <text:p>itm_gon_tab_shield_c,itm_gondor_javelin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7|knows_shield_9|knows_power_strike_8|knows_ironflesh_10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29]&lt;&gt;&quot;&quot;;[.C129]&lt;&gt;&quot;&quot;);CONCATENATE([Variables.$I$1];[Variables.$I$7];[.B129];[Variables.$I$7];[Variables.$I$6];[Variables.$I$7];[.C129];[Variables.$I$7];[Variables.$I$6];[Variables.$I$7];[.D129];[Variables.$I$7];[Variables.$I$6];[.E129];[Variables.$I$6];[.F129];[Variables.$I$6];[.G129];[Variables.$I$6];[.H129];[Variables.$I$6];[Variables.$I$1];[.I129];[.J129];[.K129];[.L129];[.M129];[.N129];[.O129];[Variables.$I$2];[Variables.$I$6];[.P129];[Variables.$I$6];[.Q129];[Variables.$I$6];[.R129];[Variables.$I$6];[.S129];[Variables.$I$6];[.T129];IF([.U129]&lt;&gt;&quot;&quot;;CONCATENATE([Variables.$I$6];[.U129]);&quot;&quot;);[Variables.$I$2];[Variables.$I$6]);IF([.B129]&lt;&gt;&quot;&quot;;CONCATENATE(&quot;#&quot;;[.B129]);&quot;&quot;))" office:value-type="string" office:string-value="[&quot;a6_pel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" calcext:value-type="string">
            <text:p>["a6_pel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30]&lt;&gt;&quot;&quot;;[.C130]&lt;&gt;&quot;&quot;);CONCATENATE([Variables.$I$1];[Variables.$I$7];[.B130];[Variables.$I$7];[Variables.$I$6];[Variables.$I$7];[.C130];[Variables.$I$7];[Variables.$I$6];[Variables.$I$7];[.D130];[Variables.$I$7];[Variables.$I$6];[.E130];[Variables.$I$6];[.F130];[Variables.$I$6];[.G130];[Variables.$I$6];[.H130];[Variables.$I$6];[Variables.$I$1];[.I130];[.J130];[.K130];[.L130];[.M130];[.N130];[.O130];[Variables.$I$2];[Variables.$I$6];[.P130];[Variables.$I$6];[.Q130];[Variables.$I$6];[.R130];[Variables.$I$6];[.S130];[Variables.$I$6];[.T130];IF([.U130]&lt;&gt;&quot;&quot;;CONCATENATE([Variables.$I$6];[.U130]);&quot;&quot;);[Variables.$I$2];[Variables.$I$6]);IF([.B130]&lt;&gt;&quot;&quot;;CONCATENATE(&quot;#&quot;;[.B130]);&quot;&quot;))" office:value-type="string" office:string-value="#Lamedon" calcext:value-type="string">
            <text:p>#Lamedon</text:p>
          </table:table-cell>
          <table:table-cell table:style-name="ce21" office:value-type="string" calcext:value-type="string">
            <text:p>Lamedon</text:p>
          </table:table-cell>
          <table:table-cell table:style-name="ce21" table:number-columns-repeated="18"/>
          <table:table-cell table:style-name="ce23"/>
          <table:table-cell table:style-name="ce23" table:formula="of:=IF(AND([.B130]&lt;&gt;&quot;&quot;;[.C130]&lt;&gt;&quot;&quot;);CONCATENATE([Variables.$I$1];[Variables.$I$7];[.B130];[Variables.$I$7];[Variables.$I$6];[Variables.$I$7];[.C130];[Variables.$I$7];[Variables.$I$6];[Variables.$I$7];[.D130];[Variables.$I$7];[Variables.$I$6];[.E130];[Variables.$I$6];[.F130];[Variables.$I$6];[.G130];[Variables.$I$6];[.H130];[Variables.$I$6];[Variables.$I$1];[.I130];[.J130];[.K130];[.L130];[.M130];[.N130];[.O130];[Variables.$I$2];[Variables.$I$6];[.P130];[Variables.$I$6];[.Q130];[Variables.$I$6];[.R130];[Variables.$I$6];[.S130];[Variables.$I$6];[.T130];IF([.U130]&lt;&gt;&quot;&quot;;CONCATENATE([Variables.$I$6];[.U130]);&quot;&quot;);[Variables.$I$2];[Variables.$I$6]);IF([.B130]&lt;&gt;&quot;&quot;;CONCATENATE(&quot;#&quot;;[.B130]);&quot;&quot;))" office:value-type="string" office:string-value="#Lamedon" calcext:value-type="string">
            <text:p>#Lamedon</text:p>
          </table:table-cell>
          <table:table-cell table:number-columns-repeated="16362"/>
        </table:table-row>
        <table:table-row table:style-name="ro1">
          <table:table-cell table:style-name="ce6" table:formula="of:=IF(AND([.B131]&lt;&gt;&quot;&quot;;[.C131]&lt;&gt;&quot;&quot;);CONCATENATE([Variables.$I$1];[Variables.$I$7];[.B131];[Variables.$I$7];[Variables.$I$6];[Variables.$I$7];[.C131];[Variables.$I$7];[Variables.$I$6];[Variables.$I$7];[.D131];[Variables.$I$7];[Variables.$I$6];[.E131];[Variables.$I$6];[.F131];[Variables.$I$6];[.G131];[Variables.$I$6];[.H131];[Variables.$I$6];[Variables.$I$1];[.I131];[.J131];[.K131];[.L131];[.M131];[.N131];[.O131];[Variables.$I$2];[Variables.$I$6];[.P131];[Variables.$I$6];[.Q131];[Variables.$I$6];[.R131];[Variables.$I$6];[.S131];[Variables.$I$6];[.T131];IF([.U131]&lt;&gt;&quot;&quot;;CONCATENATE([Variables.$I$6];[.U131]);&quot;&quot;);[Variables.$I$2];[Variables.$I$6]);IF([.B131]&lt;&gt;&quot;&quot;;CONCATENATE(&quot;#&quot;;[.B131]);&quot;&quot;))" office:value-type="string" office:string-value="[&quot;i1_lam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attr_fief_tier_1,wp_tier_1,knows_common|knows_ironflesh_2|knows_power_strike_1|knows_weapon_master_1|knows_athletics_1|knows_looting_1|knows_pathfinding_1|knows_spotting_1|knows_inventory_management_1|knows_surgery_1|knows_first_aid_1|knows_leadership_1|knows_trade_1,gondor_face1,gondor_face2]," calcext:value-type="string">
            <text:p>["i1_lam_clansman","Clansman_of_Lamedon","Clansmen_of_Lamedon",tf_gondor| tfg_armor| tfg_boots,0,subfac_ethring,fac_gondor,[itm_lamedon_clansman,itm_gondor_light_greaves,itm_loss_axe,itm_spear,itm_gondor_arrows,itm_gondor_javelin,itm_gondor_javelin,itm_short_bow,],attr_fief_tier_1,wp_tier_1,knows_common|knows_ironflesh_2|knows_power_strike_1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style-name="ce7" office:value-type="string" calcext:value-type="string">
            <text:p>i1_lam_clansman</text:p>
          </table:table-cell>
          <table:table-cell table:style-name="ce7" office:value-type="string" calcext:value-type="string">
            <text:p>Clansman_of_Lamedon</text:p>
          </table:table-cell>
          <table:table-cell table:style-name="ce7" office:value-type="string" calcext:value-type="string">
            <text:p>Clansmen_of_Lamedo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0" office:value-type="string" calcext:value-type="string">
            <text:p>fac_gondor</text:p>
          </table:table-cell>
          <table:table-cell table:style-name="ce19"/>
          <table:table-cell table:style-name="ce19" office:value-type="string" calcext:value-type="string">
            <text:p>itm_lamedon_clansman,</text:p>
          </table:table-cell>
          <table:table-cell table:style-name="ce19"/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loss_axe,itm_spear,</text:p>
          </table:table-cell>
          <table:table-cell table:style-name="ce11" office:value-type="string" calcext:value-type="string">
            <text:p>itm_gondor_arrows,itm_gondor_javelin,itm_gondor_javelin,itm_short_bow,</text:p>
          </table:table-cell>
          <table:table-cell table:style-name="ce11"/>
          <table:table-cell table:style-name="ce12" office:value-type="string" calcext:value-type="string">
            <text:p>attr_fief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ironflesh_2|knows_power_strike_1|knows_weapon_master_1|knows_athletics_1|knows_looting_1|knows_pathfinding_1|knows_spotting_1|knows_inventory_management_1|knows_surgery_1|knows_first_aid_1|knows_leadership_1|knows_trade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31]&lt;&gt;&quot;&quot;;[.C131]&lt;&gt;&quot;&quot;);CONCATENATE([Variables.$I$1];[Variables.$I$7];[.B131];[Variables.$I$7];[Variables.$I$6];[Variables.$I$7];[.C131];[Variables.$I$7];[Variables.$I$6];[Variables.$I$7];[.D131];[Variables.$I$7];[Variables.$I$6];[.E131];[Variables.$I$6];[.F131];[Variables.$I$6];[.G131];[Variables.$I$6];[.H131];[Variables.$I$6];[Variables.$I$1];[.I131];[.J131];[.K131];[.L131];[.M131];[.N131];[.O131];[Variables.$I$2];[Variables.$I$6];[.P131];[Variables.$I$6];[.Q131];[Variables.$I$6];[.R131];[Variables.$I$6];[.S131];[Variables.$I$6];[.T131];IF([.U131]&lt;&gt;&quot;&quot;;CONCATENATE([Variables.$I$6];[.U131]);&quot;&quot;);[Variables.$I$2];[Variables.$I$6]);IF([.B131]&lt;&gt;&quot;&quot;;CONCATENATE(&quot;#&quot;;[.B131]);&quot;&quot;))" office:value-type="string" office:string-value="[&quot;i1_lam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attr_fief_tier_1,wp_tier_1,knows_common|knows_ironflesh_2|knows_power_strike_1|knows_weapon_master_1|knows_athletics_1|knows_looting_1|knows_pathfinding_1|knows_spotting_1|knows_inventory_management_1|knows_surgery_1|knows_first_aid_1|knows_leadership_1|knows_trade_1,gondor_face1,gondor_face2]," calcext:value-type="string">
            <text:p>["i1_lam_clansman","Clansman_of_Lamedon","Clansmen_of_Lamedon",tf_gondor| tfg_armor| tfg_boots,0,subfac_ethring,fac_gondor,[itm_lamedon_clansman,itm_gondor_light_greaves,itm_loss_axe,itm_spear,itm_gondor_arrows,itm_gondor_javelin,itm_gondor_javelin,itm_short_bow,],attr_fief_tier_1,wp_tier_1,knows_common|knows_ironflesh_2|knows_power_strike_1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32]&lt;&gt;&quot;&quot;;[.C132]&lt;&gt;&quot;&quot;);CONCATENATE([Variables.$I$1];[Variables.$I$7];[.B132];[Variables.$I$7];[Variables.$I$6];[Variables.$I$7];[.C132];[Variables.$I$7];[Variables.$I$6];[Variables.$I$7];[.D132];[Variables.$I$7];[Variables.$I$6];[.E132];[Variables.$I$6];[.F132];[Variables.$I$6];[.G132];[Variables.$I$6];[.H132];[Variables.$I$6];[Variables.$I$1];[.I132];[.J132];[.K132];[.L132];[.M132];[.N132];[.O132];[Variables.$I$2];[Variables.$I$6];[.P132];[Variables.$I$6];[.Q132];[Variables.$I$6];[.R132];[Variables.$I$6];[.S132];[Variables.$I$6];[.T132];IF([.U132]&lt;&gt;&quot;&quot;;CONCATENATE([Variables.$I$6];[.U132]);&quot;&quot;);[Variables.$I$2];[Variables.$I$6]);IF([.B132]&lt;&gt;&quot;&quot;;CONCATENATE(&quot;#&quot;;[.B132]);&quot;&quot;))" office:value-type="string" office:string-value="[&quot;i2_lam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attr_fief_tier_2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2_lam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attr_fief_tier_2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style-name="ce7" office:value-type="string" calcext:value-type="string">
            <text:p>i2_lam_footman</text:p>
          </table:table-cell>
          <table:table-cell table:style-name="ce7" office:value-type="string" calcext:value-type="string">
            <text:p>Footman_of_Lamedon</text:p>
          </table:table-cell>
          <table:table-cell table:style-name="ce7" office:value-type="string" calcext:value-type="string">
            <text:p>Footmen_of_Lamedon</text:p>
          </table:table-cell>
          <table:table-cell table:style-name="ce8" office:value-type="string" calcext:value-type="string">
            <text:p>tf_gondor| tfg_shield| tfg_armor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lamedon_hood,</text:p>
          </table:table-cell>
          <table:table-cell table:style-name="ce11" office:value-type="string" calcext:value-type="string">
            <text:p>itm_lamedon_footman,</text:p>
          </table:table-cell>
          <table:table-cell table:style-name="ce11"/>
          <table:table-cell table:style-name="ce11" office:value-type="string" calcext:value-type="string">
            <text:p>itm_gondor_light_greaves,</text:p>
          </table:table-cell>
          <table:table-cell table:style-name="ce11" office:value-type="string" calcext:value-type="string">
            <text:p>itm_gondor_spear,itm_loss_axe,itm_loss_axe,</text:p>
          </table:table-cell>
          <table:table-cell table:style-name="ce11" office:value-type="string" calcext:value-type="string">
            <text:p>itm_gondor_javelin,itm_gon_tab_shield_a,</text:p>
          </table:table-cell>
          <table:table-cell table:style-name="ce11"/>
          <table:table-cell table:style-name="ce12" office:value-type="string" calcext:value-type="string">
            <text:p>attr_fief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32]&lt;&gt;&quot;&quot;;[.C132]&lt;&gt;&quot;&quot;);CONCATENATE([Variables.$I$1];[Variables.$I$7];[.B132];[Variables.$I$7];[Variables.$I$6];[Variables.$I$7];[.C132];[Variables.$I$7];[Variables.$I$6];[Variables.$I$7];[.D132];[Variables.$I$7];[Variables.$I$6];[.E132];[Variables.$I$6];[.F132];[Variables.$I$6];[.G132];[Variables.$I$6];[.H132];[Variables.$I$6];[Variables.$I$1];[.I132];[.J132];[.K132];[.L132];[.M132];[.N132];[.O132];[Variables.$I$2];[Variables.$I$6];[.P132];[Variables.$I$6];[.Q132];[Variables.$I$6];[.R132];[Variables.$I$6];[.S132];[Variables.$I$6];[.T132];IF([.U132]&lt;&gt;&quot;&quot;;CONCATENATE([Variables.$I$6];[.U132]);&quot;&quot;);[Variables.$I$2];[Variables.$I$6]);IF([.B132]&lt;&gt;&quot;&quot;;CONCATENATE(&quot;#&quot;;[.B132]);&quot;&quot;))" office:value-type="string" office:string-value="[&quot;i2_lam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attr_fief_tier_2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2_lam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attr_fief_tier_2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33]&lt;&gt;&quot;&quot;;[.C133]&lt;&gt;&quot;&quot;);CONCATENATE([Variables.$I$1];[Variables.$I$7];[.B133];[Variables.$I$7];[Variables.$I$6];[Variables.$I$7];[.C133];[Variables.$I$7];[Variables.$I$6];[Variables.$I$7];[.D133];[Variables.$I$7];[Variables.$I$6];[.E133];[Variables.$I$6];[.F133];[Variables.$I$6];[.G133];[Variables.$I$6];[.H133];[Variables.$I$6];[Variables.$I$1];[.I133];[.J133];[.K133];[.L133];[.M133];[.N133];[.O133];[Variables.$I$2];[Variables.$I$6];[.P133];[Variables.$I$6];[.Q133];[Variables.$I$6];[.R133];[Variables.$I$6];[.S133];[Variables.$I$6];[.T133];IF([.U133]&lt;&gt;&quot;&quot;;CONCATENATE([Variables.$I$6];[.U133]);&quot;&quot;);[Variables.$I$2];[Variables.$I$6]);IF([.B133]&lt;&gt;&quot;&quot;;CONCATENATE(&quot;#&quot;;[.B133]);&quot;&quot;))" office:value-type="string" office:string-value="[&quot;i3_lam_veteran&quot;,&quot;Veteran_of_Lamedon&quot;,&quot;Veterans_of_Lamedon&quot;,tf_gondor| tfg_shield| tfg_armor| tfg_helm| tfg_boots,0,subfac_ethring,fac_gondor,[itm_gondor_auxila_helm,itm_mail_coif,itm_lamedon_veteran,itm_gondor_light_greaves,itm_loss_axe,itm_gondor_spear,itm_gondor_sword,itm_gon_tab_shield_a,],attr_fief_tier_3,wp_tier_3,knows_common|knows_athletics_4|knows_power_strike_4|knows_ironflesh_5,gondor_face1,gondor_face2]," calcext:value-type="string">
            <text:p>["i3_lam_veteran","Veteran_of_Lamedon","Veterans_of_Lamedon",tf_gondor| tfg_shield| tfg_armor| tfg_helm| tfg_boots,0,subfac_ethring,fac_gondor,[itm_gondor_auxila_helm,itm_mail_coif,itm_lamedon_veteran,itm_gondor_light_greaves,itm_loss_axe,itm_gondor_spear,itm_gondor_sword,itm_gon_tab_shield_a,],attr_fief_tier_3,wp_tier_3,knows_common|knows_athletics_4|knows_power_strike_4|knows_ironflesh_5,gondor_face1,gondor_face2],</text:p>
          </table:table-cell>
          <table:table-cell table:style-name="ce7" office:value-type="string" calcext:value-type="string">
            <text:p>i3_lam_veteran</text:p>
          </table:table-cell>
          <table:table-cell table:style-name="ce7" office:value-type="string" calcext:value-type="string">
            <text:p>Veteran_of_Lamedon</text:p>
          </table:table-cell>
          <table:table-cell table:style-name="ce7" office:value-type="string" calcext:value-type="string">
            <text:p>Veteran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gondor_auxila_helm,itm_mail_coif,</text:p>
          </table:table-cell>
          <table:table-cell table:style-name="ce11" office:value-type="string" calcext:value-type="string">
            <text:p>itm_lamedon_veteran,</text:p>
          </table:table-cell>
          <table:table-cell table:style-name="ce11"/>
          <table:table-cell table:style-name="ce11" office:value-type="string" calcext:value-type="string">
            <text:p>itm_gondor_light_greaves,</text:p>
          </table:table-cell>
          <table:table-cell table:style-name="ce11" office:value-type="string" calcext:value-type="string">
            <text:p>itm_loss_axe,itm_gondor_spear,itm_gondor_sword,</text:p>
          </table:table-cell>
          <table:table-cell table:style-name="ce11" office:value-type="string" calcext:value-type="string">
            <text:p>itm_gon_tab_shield_a,</text:p>
          </table:table-cell>
          <table:table-cell table:style-name="ce11"/>
          <table:table-cell table:style-name="ce12" office:value-type="string" calcext:value-type="string">
            <text:p>attr_fief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4|knows_power_strike_4|knows_ironflesh_5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33]&lt;&gt;&quot;&quot;;[.C133]&lt;&gt;&quot;&quot;);CONCATENATE([Variables.$I$1];[Variables.$I$7];[.B133];[Variables.$I$7];[Variables.$I$6];[Variables.$I$7];[.C133];[Variables.$I$7];[Variables.$I$6];[Variables.$I$7];[.D133];[Variables.$I$7];[Variables.$I$6];[.E133];[Variables.$I$6];[.F133];[Variables.$I$6];[.G133];[Variables.$I$6];[.H133];[Variables.$I$6];[Variables.$I$1];[.I133];[.J133];[.K133];[.L133];[.M133];[.N133];[.O133];[Variables.$I$2];[Variables.$I$6];[.P133];[Variables.$I$6];[.Q133];[Variables.$I$6];[.R133];[Variables.$I$6];[.S133];[Variables.$I$6];[.T133];IF([.U133]&lt;&gt;&quot;&quot;;CONCATENATE([Variables.$I$6];[.U133]);&quot;&quot;);[Variables.$I$2];[Variables.$I$6]);IF([.B133]&lt;&gt;&quot;&quot;;CONCATENATE(&quot;#&quot;;[.B133]);&quot;&quot;))" office:value-type="string" office:string-value="[&quot;i3_lam_veteran&quot;,&quot;Veteran_of_Lamedon&quot;,&quot;Veterans_of_Lamedon&quot;,tf_gondor| tfg_shield| tfg_armor| tfg_helm| tfg_boots,0,subfac_ethring,fac_gondor,[itm_gondor_auxila_helm,itm_mail_coif,itm_lamedon_veteran,itm_gondor_light_greaves,itm_loss_axe,itm_gondor_spear,itm_gondor_sword,itm_gon_tab_shield_a,],attr_fief_tier_3,wp_tier_3,knows_common|knows_athletics_4|knows_power_strike_4|knows_ironflesh_5,gondor_face1,gondor_face2]," calcext:value-type="string">
            <text:p>["i3_lam_veteran","Veteran_of_Lamedon","Veterans_of_Lamedon",tf_gondor| tfg_shield| tfg_armor| tfg_helm| tfg_boots,0,subfac_ethring,fac_gondor,[itm_gondor_auxila_helm,itm_mail_coif,itm_lamedon_veteran,itm_gondor_light_greaves,itm_loss_axe,itm_gondor_spear,itm_gondor_sword,itm_gon_tab_shield_a,],attr_fief_tier_3,wp_tier_3,knows_common|knows_athletics_4|knows_power_strike_4|knows_ironflesh_5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34]&lt;&gt;&quot;&quot;;[.C134]&lt;&gt;&quot;&quot;);CONCATENATE([Variables.$I$1];[Variables.$I$7];[.B134];[Variables.$I$7];[Variables.$I$6];[Variables.$I$7];[.C134];[Variables.$I$7];[Variables.$I$6];[Variables.$I$7];[.D134];[Variables.$I$7];[Variables.$I$6];[.E134];[Variables.$I$6];[.F134];[Variables.$I$6];[.G134];[Variables.$I$6];[.H134];[Variables.$I$6];[Variables.$I$1];[.I134];[.J134];[.K134];[.L134];[.M134];[.N134];[.O134];[Variables.$I$2];[Variables.$I$6];[.P134];[Variables.$I$6];[.Q134];[Variables.$I$6];[.R134];[Variables.$I$6];[.S134];[Variables.$I$6];[.T134];IF([.U134]&lt;&gt;&quot;&quot;;CONCATENATE([Variables.$I$6];[.U134]);&quot;&quot;);[Variables.$I$2];[Variables.$I$6]);IF([.B134]&lt;&gt;&quot;&quot;;CONCATENATE(&quot;#&quot;;[.B134]);&quot;&quot;))" office:value-type="string" office:string-value="[&quot;i4_lam_warrior&quot;,&quot;Warrior_of_Lamedon&quot;,&quot;Warriors_of_Lamedon&quot;,tf_gondor| tfg_shield| tfg_armor| tfg_helm| tfg_boots,0,subfac_ethring,fac_gondor,[itm_gondor_auxila_helm,itm_mail_coif,itm_lamedon_warrior,itm_gondor_med_greaves,itm_loss_axe,itm_gondor_sword,itm_gon_tab_shield_d,],attr_fief_tier_4,wp_tier_4,knows_common|knows_athletics_4|knows_power_strike_5|knows_ironflesh_5,gondor_face1,gondor_face2]," calcext:value-type="string">
            <text:p>["i4_lam_warrior","Warrior_of_Lamedon","Warriors_of_Lamedon",tf_gondor| tfg_shield| tfg_armor| tfg_helm| tfg_boots,0,subfac_ethring,fac_gondor,[itm_gondor_auxila_helm,itm_mail_coif,itm_lamedon_warrior,itm_gondor_med_greaves,itm_loss_axe,itm_gondor_sword,itm_gon_tab_shield_d,],attr_fief_tier_4,wp_tier_4,knows_common|knows_athletics_4|knows_power_strike_5|knows_ironflesh_5,gondor_face1,gondor_face2],</text:p>
          </table:table-cell>
          <table:table-cell table:style-name="ce7" office:value-type="string" calcext:value-type="string">
            <text:p>i4_lam_warrior</text:p>
          </table:table-cell>
          <table:table-cell table:style-name="ce7" office:value-type="string" calcext:value-type="string">
            <text:p>Warrior_of_Lamedon</text:p>
          </table:table-cell>
          <table:table-cell table:style-name="ce7" office:value-type="string" calcext:value-type="string">
            <text:p>Warrior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gondor_auxila_helm,itm_mail_coif,</text:p>
          </table:table-cell>
          <table:table-cell table:style-name="ce11" office:value-type="string" calcext:value-type="string">
            <text:p>itm_lamedon_warrior,</text:p>
          </table:table-cell>
          <table:table-cell table:style-name="ce19"/>
          <table:table-cell table:style-name="ce19" office:value-type="string" calcext:value-type="string">
            <text:p>itm_gondor_med_greaves,</text:p>
          </table:table-cell>
          <table:table-cell table:style-name="ce19" office:value-type="string" calcext:value-type="string">
            <text:p>itm_loss_axe,itm_gondor_sword,</text:p>
          </table:table-cell>
          <table:table-cell table:style-name="ce19" office:value-type="string" calcext:value-type="string">
            <text:p>itm_gon_tab_shield_d,</text:p>
          </table:table-cell>
          <table:table-cell table:style-name="ce11"/>
          <table:table-cell table:style-name="ce12" office:value-type="string" calcext:value-type="string">
            <text:p>attr_fief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4|knows_power_strike_5|knows_ironflesh_5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34]&lt;&gt;&quot;&quot;;[.C134]&lt;&gt;&quot;&quot;);CONCATENATE([Variables.$I$1];[Variables.$I$7];[.B134];[Variables.$I$7];[Variables.$I$6];[Variables.$I$7];[.C134];[Variables.$I$7];[Variables.$I$6];[Variables.$I$7];[.D134];[Variables.$I$7];[Variables.$I$6];[.E134];[Variables.$I$6];[.F134];[Variables.$I$6];[.G134];[Variables.$I$6];[.H134];[Variables.$I$6];[Variables.$I$1];[.I134];[.J134];[.K134];[.L134];[.M134];[.N134];[.O134];[Variables.$I$2];[Variables.$I$6];[.P134];[Variables.$I$6];[.Q134];[Variables.$I$6];[.R134];[Variables.$I$6];[.S134];[Variables.$I$6];[.T134];IF([.U134]&lt;&gt;&quot;&quot;;CONCATENATE([Variables.$I$6];[.U134]);&quot;&quot;);[Variables.$I$2];[Variables.$I$6]);IF([.B134]&lt;&gt;&quot;&quot;;CONCATENATE(&quot;#&quot;;[.B134]);&quot;&quot;))" office:value-type="string" office:string-value="[&quot;i4_lam_warrior&quot;,&quot;Warrior_of_Lamedon&quot;,&quot;Warriors_of_Lamedon&quot;,tf_gondor| tfg_shield| tfg_armor| tfg_helm| tfg_boots,0,subfac_ethring,fac_gondor,[itm_gondor_auxila_helm,itm_mail_coif,itm_lamedon_warrior,itm_gondor_med_greaves,itm_loss_axe,itm_gondor_sword,itm_gon_tab_shield_d,],attr_fief_tier_4,wp_tier_4,knows_common|knows_athletics_4|knows_power_strike_5|knows_ironflesh_5,gondor_face1,gondor_face2]," calcext:value-type="string">
            <text:p>["i4_lam_warrior","Warrior_of_Lamedon","Warriors_of_Lamedon",tf_gondor| tfg_shield| tfg_armor| tfg_helm| tfg_boots,0,subfac_ethring,fac_gondor,[itm_gondor_auxila_helm,itm_mail_coif,itm_lamedon_warrior,itm_gondor_med_greaves,itm_loss_axe,itm_gondor_sword,itm_gon_tab_shield_d,],attr_fief_tier_4,wp_tier_4,knows_common|knows_athletics_4|knows_power_strike_5|knows_ironflesh_5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35]&lt;&gt;&quot;&quot;;[.C135]&lt;&gt;&quot;&quot;);CONCATENATE([Variables.$I$1];[Variables.$I$7];[.B135];[Variables.$I$7];[Variables.$I$6];[Variables.$I$7];[.C135];[Variables.$I$7];[Variables.$I$6];[Variables.$I$7];[.D135];[Variables.$I$7];[Variables.$I$6];[.E135];[Variables.$I$6];[.F135];[Variables.$I$6];[.G135];[Variables.$I$6];[.H135];[Variables.$I$6];[Variables.$I$1];[.I135];[.J135];[.K135];[.L135];[.M135];[.N135];[.O135];[Variables.$I$2];[Variables.$I$6];[.P135];[Variables.$I$6];[.Q135];[Variables.$I$6];[.R135];[Variables.$I$6];[.S135];[Variables.$I$6];[.T135];IF([.U135]&lt;&gt;&quot;&quot;;CONCATENATE([Variables.$I$6];[.U135]);&quot;&quot;);[Variables.$I$2];[Variables.$I$6]);IF([.B135]&lt;&gt;&quot;&quot;;CONCATENATE(&quot;#&quot;;[.B135]);&quot;&quot;))" office:value-type="string" office:string-value="[&quot;i5_lam_champion&quot;,&quot;Champion_of_Lamedon&quot;,&quot;Champions_of_Lamedon&quot;,tf_gondor| tfg_gloves| tfg_armor| tfg_helm| tfg_boots,0,subfac_ethring,fac_gondor,[itm_gondor_lamedon_helm,itm_mail_coif_good,itm_lamedon_vet_warrior,itm_mail_mittens,itm_gondor_heavy_greaves,itm_gondor_2h_sword,itm_gondor_2h_sword,itm_loss_war_axe,],attr_tier_5,wp_tier_5,knows_common|knows_athletics_5|knows_power_strike_5|knows_ironflesh_6,gondor_face1,gondor_face2]," calcext:value-type="string">
            <text:p>["i5_lam_champion","Champion_of_Lamedon","Champions_of_Lamedon",tf_gondor| tfg_gloves| tfg_armor| tfg_helm| tfg_boots,0,subfac_ethring,fac_gondor,[itm_gondor_lamedon_helm,itm_mail_coif_good,itm_lamedon_vet_warrior,itm_mail_mittens,itm_gondor_heavy_greaves,itm_gondor_2h_sword,itm_gondor_2h_sword,itm_loss_war_axe,],attr_tier_5,wp_tier_5,knows_common|knows_athletics_5|knows_power_strike_5|knows_ironflesh_6,gondor_face1,gondor_face2],</text:p>
          </table:table-cell>
          <table:table-cell table:style-name="ce7" office:value-type="string" calcext:value-type="string">
            <text:p>i5_lam_champion</text:p>
          </table:table-cell>
          <table:table-cell table:style-name="ce7" office:value-type="string" calcext:value-type="string">
            <text:p>Champion_of_Lamedon</text:p>
          </table:table-cell>
          <table:table-cell table:style-name="ce7" office:value-type="string" calcext:value-type="string">
            <text:p>Champions_of_Lamedon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gondor_lamedon_helm,itm_mail_coif_good,</text:p>
          </table:table-cell>
          <table:table-cell table:style-name="ce19" office:value-type="string" calcext:value-type="string">
            <text:p>itm_lamedon_vet_warrior,</text:p>
          </table:table-cell>
          <table:table-cell table:style-name="ce11" office:value-type="string" calcext:value-type="string">
            <text:p>itm_mail_mitten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19" office:value-type="string" calcext:value-type="string">
            <text:p>itm_gondor_2h_sword,itm_gondor_2h_sword,itm_loss_war_axe,</text:p>
          </table:table-cell>
          <table:table-cell table:style-name="ce11" table:number-columns-repeated="2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5|knows_power_strike_5|knows_ironflesh_6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35]&lt;&gt;&quot;&quot;;[.C135]&lt;&gt;&quot;&quot;);CONCATENATE([Variables.$I$1];[Variables.$I$7];[.B135];[Variables.$I$7];[Variables.$I$6];[Variables.$I$7];[.C135];[Variables.$I$7];[Variables.$I$6];[Variables.$I$7];[.D135];[Variables.$I$7];[Variables.$I$6];[.E135];[Variables.$I$6];[.F135];[Variables.$I$6];[.G135];[Variables.$I$6];[.H135];[Variables.$I$6];[Variables.$I$1];[.I135];[.J135];[.K135];[.L135];[.M135];[.N135];[.O135];[Variables.$I$2];[Variables.$I$6];[.P135];[Variables.$I$6];[.Q135];[Variables.$I$6];[.R135];[Variables.$I$6];[.S135];[Variables.$I$6];[.T135];IF([.U135]&lt;&gt;&quot;&quot;;CONCATENATE([Variables.$I$6];[.U135]);&quot;&quot;);[Variables.$I$2];[Variables.$I$6]);IF([.B135]&lt;&gt;&quot;&quot;;CONCATENATE(&quot;#&quot;;[.B135]);&quot;&quot;))" office:value-type="string" office:string-value="[&quot;i5_lam_champion&quot;,&quot;Champion_of_Lamedon&quot;,&quot;Champions_of_Lamedon&quot;,tf_gondor| tfg_gloves| tfg_armor| tfg_helm| tfg_boots,0,subfac_ethring,fac_gondor,[itm_gondor_lamedon_helm,itm_mail_coif_good,itm_lamedon_vet_warrior,itm_mail_mittens,itm_gondor_heavy_greaves,itm_gondor_2h_sword,itm_gondor_2h_sword,itm_loss_war_axe,],attr_tier_5,wp_tier_5,knows_common|knows_athletics_5|knows_power_strike_5|knows_ironflesh_6,gondor_face1,gondor_face2]," calcext:value-type="string">
            <text:p>["i5_lam_champion","Champion_of_Lamedon","Champions_of_Lamedon",tf_gondor| tfg_gloves| tfg_armor| tfg_helm| tfg_boots,0,subfac_ethring,fac_gondor,[itm_gondor_lamedon_helm,itm_mail_coif_good,itm_lamedon_vet_warrior,itm_mail_mittens,itm_gondor_heavy_greaves,itm_gondor_2h_sword,itm_gondor_2h_sword,itm_loss_war_axe,],attr_tier_5,wp_tier_5,knows_common|knows_athletics_5|knows_power_strike_5|knows_ironflesh_6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36]&lt;&gt;&quot;&quot;;[.C136]&lt;&gt;&quot;&quot;);CONCATENATE([Variables.$I$1];[Variables.$I$7];[.B136];[Variables.$I$7];[Variables.$I$6];[Variables.$I$7];[.C136];[Variables.$I$7];[Variables.$I$6];[Variables.$I$7];[.D136];[Variables.$I$7];[Variables.$I$6];[.E136];[Variables.$I$6];[.F136];[Variables.$I$6];[.G136];[Variables.$I$6];[.H136];[Variables.$I$6];[Variables.$I$1];[.I136];[.J136];[.K136];[.L136];[.M136];[.N136];[.O136];[Variables.$I$2];[Variables.$I$6];[.P136];[Variables.$I$6];[.Q136];[Variables.$I$6];[.R136];[Variables.$I$6];[.S136];[Variables.$I$6];[.T136];IF([.U136]&lt;&gt;&quot;&quot;;CONCATENATE([Variables.$I$6];[.U136]);&quot;&quot;);[Variables.$I$2];[Variables.$I$6]);IF([.B136]&lt;&gt;&quot;&quot;;CONCATENATE(&quot;#&quot;;[.B136]);&quot;&quot;))" office:value-type="string" office:string-value="[&quot;c5_lam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attr_tier_5,wp_tier_5,knows_common|knows_riding_6|knows_power_strike_6|knows_ironflesh_7,gondor_face1,gondor_face2]," calcext:value-type="string">
            <text:p>["c5_lam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attr_tier_5,wp_tier_5,knows_common|knows_riding_6|knows_power_strike_6|knows_ironflesh_7,gondor_face1,gondor_face2],</text:p>
          </table:table-cell>
          <table:table-cell table:style-name="ce7" office:value-type="string" calcext:value-type="string">
            <text:p>c5_lam_knight</text:p>
          </table:table-cell>
          <table:table-cell table:style-name="ce7" office:value-type="string" calcext:value-type="string">
            <text:p>Knight_of_Lamedon</text:p>
          </table:table-cell>
          <table:table-cell table:style-name="ce7" office:value-type="string" calcext:value-type="string">
            <text:p>Knights_of_Lamedon</text:p>
          </table:table-cell>
          <table:table-cell table:style-name="ce8" office:value-type="string" calcext:value-type="string">
            <text:p>tf_gondor| tf_mounted | tfg_gloves| tfg_shield| tfg_horse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gondor_lamedon_helm,</text:p>
          </table:table-cell>
          <table:table-cell table:style-name="ce11" office:value-type="string" calcext:value-type="string">
            <text:p>itm_lamedon_knight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gondor_heavy_greaves,</text:p>
          </table:table-cell>
          <table:table-cell table:style-name="ce11" office:value-type="string" calcext:value-type="string">
            <text:p>itm_gondor_cav_sword,</text:p>
          </table:table-cell>
          <table:table-cell table:style-name="ce11" office:value-type="string" calcext:value-type="string">
            <text:p>itm_gon_tab_shield_c,</text:p>
          </table:table-cell>
          <table:table-cell table:style-name="ce11" office:value-type="string" calcext:value-type="string">
            <text:p>itm_gondor_lam_horse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riding_6|knows_power_strike_6|knows_ironflesh_7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36]&lt;&gt;&quot;&quot;;[.C136]&lt;&gt;&quot;&quot;);CONCATENATE([Variables.$I$1];[Variables.$I$7];[.B136];[Variables.$I$7];[Variables.$I$6];[Variables.$I$7];[.C136];[Variables.$I$7];[Variables.$I$6];[Variables.$I$7];[.D136];[Variables.$I$7];[Variables.$I$6];[.E136];[Variables.$I$6];[.F136];[Variables.$I$6];[.G136];[Variables.$I$6];[.H136];[Variables.$I$6];[Variables.$I$1];[.I136];[.J136];[.K136];[.L136];[.M136];[.N136];[.O136];[Variables.$I$2];[Variables.$I$6];[.P136];[Variables.$I$6];[.Q136];[Variables.$I$6];[.R136];[Variables.$I$6];[.S136];[Variables.$I$6];[.T136];IF([.U136]&lt;&gt;&quot;&quot;;CONCATENATE([Variables.$I$6];[.U136]);&quot;&quot;);[Variables.$I$2];[Variables.$I$6]);IF([.B136]&lt;&gt;&quot;&quot;;CONCATENATE(&quot;#&quot;;[.B136]);&quot;&quot;))" office:value-type="string" office:string-value="[&quot;c5_lam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attr_tier_5,wp_tier_5,knows_common|knows_riding_6|knows_power_strike_6|knows_ironflesh_7,gondor_face1,gondor_face2]," calcext:value-type="string">
            <text:p>["c5_lam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attr_tier_5,wp_tier_5,knows_common|knows_riding_6|knows_power_strike_6|knows_ironflesh_7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37]&lt;&gt;&quot;&quot;;[.C137]&lt;&gt;&quot;&quot;);CONCATENATE([Variables.$I$1];[Variables.$I$7];[.B137];[Variables.$I$7];[Variables.$I$6];[Variables.$I$7];[.C137];[Variables.$I$7];[Variables.$I$6];[Variables.$I$7];[.D137];[Variables.$I$7];[Variables.$I$6];[.E137];[Variables.$I$6];[.F137];[Variables.$I$6];[.G137];[Variables.$I$6];[.H137];[Variables.$I$6];[Variables.$I$1];[.I137];[.J137];[.K137];[.L137];[.M137];[.N137];[.O137];[Variables.$I$2];[Variables.$I$6];[.P137];[Variables.$I$6];[.Q137];[Variables.$I$6];[.R137];[Variables.$I$6];[.S137];[Variables.$I$6];[.T137];IF([.U137]&lt;&gt;&quot;&quot;;CONCATENATE([Variables.$I$6];[.U137]);&quot;&quot;);[Variables.$I$2];[Variables.$I$6]);IF([.B137]&lt;&gt;&quot;&quot;;CONCATENATE(&quot;#&quot;;[.B137]);&quot;&quot;))" office:value-type="string" office:string-value="[&quot;c6_lam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style-name="ce7" office:value-type="string" calcext:value-type="string">
            <text:p>c6_lam_leader</text:p>
          </table:table-cell>
          <table:table-cell table:style-name="ce7" office:value-type="string" calcext:value-type="string">
            <text:p>Captain_of_Lamedon</text:p>
          </table:table-cell>
          <table:table-cell table:style-name="ce7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gondor_lamedon_leader_helm,</text:p>
          </table:table-cell>
          <table:table-cell table:style-name="ce19" office:value-type="string" calcext:value-type="string">
            <text:p>itm_lamedon_leader_surcoat_cloak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19" office:value-type="string" calcext:value-type="string">
            <text:p>itm_gondor_cav_sword,</text:p>
          </table:table-cell>
          <table:table-cell table:style-name="ce11" office:value-type="string" calcext:value-type="string">
            <text:p>itm_gon_tab_shield_c,</text:p>
          </table:table-cell>
          <table:table-cell table:style-name="ce11" office:value-type="string" calcext:value-type="string">
            <text:p>itm_gondor_lam_horse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8|knows_shield_9|knows_power_strike_8|knows_ironflesh_10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B137]&lt;&gt;&quot;&quot;;[.C137]&lt;&gt;&quot;&quot;);CONCATENATE([Variables.$I$1];[Variables.$I$7];[.B137];[Variables.$I$7];[Variables.$I$6];[Variables.$I$7];[.C137];[Variables.$I$7];[Variables.$I$6];[Variables.$I$7];[.D137];[Variables.$I$7];[Variables.$I$6];[.E137];[Variables.$I$6];[.F137];[Variables.$I$6];[.G137];[Variables.$I$6];[.H137];[Variables.$I$6];[Variables.$I$1];[.I137];[.J137];[.K137];[.L137];[.M137];[.N137];[.O137];[Variables.$I$2];[Variables.$I$6];[.P137];[Variables.$I$6];[.Q137];[Variables.$I$6];[.R137];[Variables.$I$6];[.S137];[Variables.$I$6];[.T137];IF([.U137]&lt;&gt;&quot;&quot;;CONCATENATE([Variables.$I$6];[.U137]);&quot;&quot;);[Variables.$I$2];[Variables.$I$6]);IF([.B137]&lt;&gt;&quot;&quot;;CONCATENATE(&quot;#&quot;;[.B137]);&quot;&quot;))" office:value-type="string" office:string-value="[&quot;c6_lam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16362"/>
        </table:table-row>
        <table:table-row table:style-name="ro1">
          <table:table-cell table:style-name="ce6" table:formula="of:=IF(AND([.B138]&lt;&gt;&quot;&quot;;[.C138]&lt;&gt;&quot;&quot;);CONCATENATE([Variables.$I$1];[Variables.$I$7];[.B138];[Variables.$I$7];[Variables.$I$6];[Variables.$I$7];[.C138];[Variables.$I$7];[Variables.$I$6];[Variables.$I$7];[.D138];[Variables.$I$7];[Variables.$I$6];[.E138];[Variables.$I$6];[.F138];[Variables.$I$6];[.G138];[Variables.$I$6];[.H138];[Variables.$I$6];[Variables.$I$1];[.I138];[.J138];[.K138];[.L138];[.M138];[.N138];[.O138];[Variables.$I$2];[Variables.$I$6];[.P138];[Variables.$I$6];[.Q138];[Variables.$I$6];[.R138];[Variables.$I$6];[.S138];[Variables.$I$6];[.T138];IF([.U138]&lt;&gt;&quot;&quot;;CONCATENATE([Variables.$I$6];[.U138]);&quot;&quot;);[Variables.$I$2];[Variables.$I$6]);IF([.B138]&lt;&gt;&quot;&quot;;CONCATENATE(&quot;#&quot;;[.B138]);&quot;&quot;))" office:value-type="string" office:string-value="#Pinnath Gelin" calcext:value-type="string">
            <text:p>#Pinnath Gelin</text:p>
          </table:table-cell>
          <table:table-cell table:style-name="ce21" office:value-type="string" calcext:value-type="string">
            <text:p>Pinnath Gelin</text:p>
          </table:table-cell>
          <table:table-cell table:style-name="ce21" table:number-columns-repeated="6"/>
          <table:table-cell table:style-name="ce25"/>
          <table:table-cell table:style-name="ce21" table:number-columns-repeated="3"/>
          <table:table-cell table:style-name="ce25"/>
          <table:table-cell table:style-name="ce21" table:number-columns-repeated="7"/>
          <table:table-cell table:style-name="ce23"/>
          <table:table-cell table:style-name="ce23" table:formula="of:=IF(AND([.B138]&lt;&gt;&quot;&quot;;[.C138]&lt;&gt;&quot;&quot;);CONCATENATE([Variables.$I$1];[Variables.$I$7];[.B138];[Variables.$I$7];[Variables.$I$6];[Variables.$I$7];[.C138];[Variables.$I$7];[Variables.$I$6];[Variables.$I$7];[.D138];[Variables.$I$7];[Variables.$I$6];[.E138];[Variables.$I$6];[.F138];[Variables.$I$6];[.G138];[Variables.$I$6];[.H138];[Variables.$I$6];[Variables.$I$1];[.I138];[.J138];[.K138];[.L138];[.M138];[.N138];[.O138];[Variables.$I$2];[Variables.$I$6];[.P138];[Variables.$I$6];[.Q138];[Variables.$I$6];[.R138];[Variables.$I$6];[.S138];[Variables.$I$6];[.T138];IF([.U138]&lt;&gt;&quot;&quot;;CONCATENATE([Variables.$I$6];[.U138]);&quot;&quot;);[Variables.$I$2];[Variables.$I$6]);IF([.B138]&lt;&gt;&quot;&quot;;CONCATENATE(&quot;#&quot;;[.B138]);&quot;&quot;))" office:value-type="string" office:string-value="#Pinnath Gelin" calcext:value-type="string">
            <text:p>#Pinnath Gelin</text:p>
          </table:table-cell>
          <table:table-cell table:number-columns-repeated="16362"/>
        </table:table-row>
        <table:table-row table:style-name="ro1">
          <table:table-cell table:style-name="ce6" table:formula="of:=IF(AND([.B139]&lt;&gt;&quot;&quot;;[.C139]&lt;&gt;&quot;&quot;);CONCATENATE([Variables.$I$1];[Variables.$I$7];[.B139];[Variables.$I$7];[Variables.$I$6];[Variables.$I$7];[.C139];[Variables.$I$7];[Variables.$I$6];[Variables.$I$7];[.D139];[Variables.$I$7];[Variables.$I$6];[.E139];[Variables.$I$6];[.F139];[Variables.$I$6];[.G139];[Variables.$I$6];[.H139];[Variables.$I$6];[Variables.$I$1];[.I139];[.J139];[.K139];[.L139];[.M139];[.N139];[.O139];[Variables.$I$2];[Variables.$I$6];[.P139];[Variables.$I$6];[.Q139];[Variables.$I$6];[.R139];[Variables.$I$6];[.S139];[Variables.$I$6];[.T139];IF([.U139]&lt;&gt;&quot;&quot;;CONCATENATE([Variables.$I$6];[.U139]);&quot;&quot;);[Variables.$I$2];[Variables.$I$6]);IF([.B139]&lt;&gt;&quot;&quot;;CONCATENATE(&quot;#&quot;;[.B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attr_fief_tier_1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attr_fief_tier_1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style-name="ce7" office:value-type="string" calcext:value-type="string">
            <text:p>i1_pinnath_plainsman</text:p>
          </table:table-cell>
          <table:table-cell table:style-name="ce7" office:value-type="string" calcext:value-type="string">
            <text:p>Plainsman_of_Pinnath_Gelin</text:p>
          </table:table-cell>
          <table:table-cell table:style-name="ce7" office:value-type="string" calcext:value-type="string">
            <text:p>Plainsmen_of_Pinnath_Geli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gondor_ranger_hood,</text:p>
          </table:table-cell>
          <table:table-cell table:style-name="ce11" office:value-type="string" calcext:value-type="string">
            <text:p>itm_pinnath_footman,</text:p>
          </table:table-cell>
          <table:table-cell table:style-name="ce11"/>
          <table:table-cell table:style-name="ce11" office:value-type="string" calcext:value-type="string">
            <text:p>itm_gondor_light_greaves,</text:p>
          </table:table-cell>
          <table:table-cell table:style-name="ce11" office:value-type="string" calcext:value-type="string">
            <text:p>itm_shortened_spear,</text:p>
          </table:table-cell>
          <table:table-cell table:style-name="ce11" office:value-type="string" calcext:value-type="string">
            <text:p>itm_gondor_arrows,itm_short_bow,</text:p>
          </table:table-cell>
          <table:table-cell table:style-name="ce11"/>
          <table:table-cell table:style-name="ce12" office:value-type="string" calcext:value-type="string">
            <text:p>attr_fief_tier_1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39]&lt;&gt;&quot;&quot;;[.C139]&lt;&gt;&quot;&quot;);CONCATENATE([Variables.$I$1];[Variables.$I$7];[.B139];[Variables.$I$7];[Variables.$I$6];[Variables.$I$7];[.C139];[Variables.$I$7];[Variables.$I$6];[Variables.$I$7];[.D139];[Variables.$I$7];[Variables.$I$6];[.E139];[Variables.$I$6];[.F139];[Variables.$I$6];[.G139];[Variables.$I$6];[.H139];[Variables.$I$6];[Variables.$I$1];[.I139];[.J139];[.K139];[.L139];[.M139];[.N139];[.O139];[Variables.$I$2];[Variables.$I$6];[.P139];[Variables.$I$6];[.Q139];[Variables.$I$6];[.R139];[Variables.$I$6];[.S139];[Variables.$I$6];[.T139];IF([.U139]&lt;&gt;&quot;&quot;;CONCATENATE([Variables.$I$6];[.U139]);&quot;&quot;);[Variables.$I$2];[Variables.$I$6]);IF([.B139]&lt;&gt;&quot;&quot;;CONCATENATE(&quot;#&quot;;[.B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attr_fief_tier_1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attr_fief_tier_1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40]&lt;&gt;&quot;&quot;;[.C140]&lt;&gt;&quot;&quot;);CONCATENATE([Variables.$I$1];[Variables.$I$7];[.B140];[Variables.$I$7];[Variables.$I$6];[Variables.$I$7];[.C140];[Variables.$I$7];[Variables.$I$6];[Variables.$I$7];[.D140];[Variables.$I$7];[Variables.$I$6];[.E140];[Variables.$I$6];[.F140];[Variables.$I$6];[.G140];[Variables.$I$6];[.H140];[Variables.$I$6];[Variables.$I$1];[.I140];[.J140];[.K140];[.L140];[.M140];[.N140];[.O140];[Variables.$I$2];[Variables.$I$6];[.P140];[Variables.$I$6];[.Q140];[Variables.$I$6];[.R140];[Variables.$I$6];[.S140];[Variables.$I$6];[.T140];IF([.U140]&lt;&gt;&quot;&quot;;CONCATENATE([Variables.$I$6];[.U140]);&quot;&quot;);[Variables.$I$2];[Variables.$I$6]);IF([.B140]&lt;&gt;&quot;&quot;;CONCATENATE(&quot;#&quot;;[.B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mail_coif,itm_pinnath_warrior,itm_leather_gloves,itm_gondor_light_greaves,itm_good_mace,itm_gon_tab_shield_a,itm_gondor_courser,],attr_tier_2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mail_coif,itm_pinnath_warrior,itm_leather_gloves,itm_gondor_light_greaves,itm_good_mace,itm_gon_tab_shield_a,itm_gondor_courser,],attr_tier_2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</text:p>
          </table:table-cell>
          <table:table-cell table:style-name="ce7" office:value-type="string" calcext:value-type="string">
            <text:p>c2_pinnath_rider</text:p>
          </table:table-cell>
          <table:table-cell table:style-name="ce7" office:value-type="string" calcext:value-type="string">
            <text:p>Rider_of_Pinnath_Gelin</text:p>
          </table:table-cell>
          <table:table-cell table:style-name="ce7" office:value-type="string" calcext:value-type="string">
            <text:p>Riders_of_Pinnath_Gelin</text:p>
          </table:table-cell>
          <table:table-cell table:style-name="ce8" office:value-type="string" calcext:value-type="string">
            <text:p>tf_gondor|tf_mounted|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gondor_auxila_helm,itm_mail_coif,</text:p>
          </table:table-cell>
          <table:table-cell table:style-name="ce11" office:value-type="string" calcext:value-type="string">
            <text:p>itm_pinnath_warrior,</text:p>
          </table:table-cell>
          <table:table-cell table:style-name="ce19" office:value-type="string" calcext:value-type="string">
            <text:p>itm_leather_gloves,</text:p>
          </table:table-cell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good_mace,</text:p>
          </table:table-cell>
          <table:table-cell table:style-name="ce19" office:value-type="string" calcext:value-type="string">
            <text:p>itm_gon_tab_shield_a,</text:p>
          </table:table-cell>
          <table:table-cell table:style-name="ce11" office:value-type="string" calcext:value-type="string">
            <text:p>itm_gondor_courser,</text:p>
          </table:table-cell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4</text:p>
          </table:table-cell>
          <table:table-cell table:style-name="ce13" office:value-type="string" calcext:value-type="string">
            <text:p>knows_common|knows_ironflesh_1|knows_power_strike_2|knows_power_draw_1|knows_athletics_2|knows_riding_3|knows_horse_archery_1|knows_trainer_1|knows_pathfinding_1|knows_spotting_1|knows_inventory_management_1|knows_first_aid_1|knows_persuasion_1|knows_trade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40]&lt;&gt;&quot;&quot;;[.C140]&lt;&gt;&quot;&quot;);CONCATENATE([Variables.$I$1];[Variables.$I$7];[.B140];[Variables.$I$7];[Variables.$I$6];[Variables.$I$7];[.C140];[Variables.$I$7];[Variables.$I$6];[Variables.$I$7];[.D140];[Variables.$I$7];[Variables.$I$6];[.E140];[Variables.$I$6];[.F140];[Variables.$I$6];[.G140];[Variables.$I$6];[.H140];[Variables.$I$6];[Variables.$I$1];[.I140];[.J140];[.K140];[.L140];[.M140];[.N140];[.O140];[Variables.$I$2];[Variables.$I$6];[.P140];[Variables.$I$6];[.Q140];[Variables.$I$6];[.R140];[Variables.$I$6];[.S140];[Variables.$I$6];[.T140];IF([.U140]&lt;&gt;&quot;&quot;;CONCATENATE([Variables.$I$6];[.U140]);&quot;&quot;);[Variables.$I$2];[Variables.$I$6]);IF([.B140]&lt;&gt;&quot;&quot;;CONCATENATE(&quot;#&quot;;[.B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mail_coif,itm_pinnath_warrior,itm_leather_gloves,itm_gondor_light_greaves,itm_good_mace,itm_gon_tab_shield_a,itm_gondor_courser,],attr_tier_2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mail_coif,itm_pinnath_warrior,itm_leather_gloves,itm_gondor_light_greaves,itm_good_mace,itm_gon_tab_shield_a,itm_gondor_courser,],attr_tier_2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41]&lt;&gt;&quot;&quot;;[.C141]&lt;&gt;&quot;&quot;);CONCATENATE([Variables.$I$1];[Variables.$I$7];[.B141];[Variables.$I$7];[Variables.$I$6];[Variables.$I$7];[.C141];[Variables.$I$7];[Variables.$I$6];[Variables.$I$7];[.D141];[Variables.$I$7];[Variables.$I$6];[.E141];[Variables.$I$6];[.F141];[Variables.$I$6];[.G141];[Variables.$I$6];[.H141];[Variables.$I$6];[Variables.$I$1];[.I141];[.J141];[.K141];[.L141];[.M141];[.N141];[.O141];[Variables.$I$2];[Variables.$I$6];[.P141];[Variables.$I$6];[.Q141];[Variables.$I$6];[.R141];[Variables.$I$6];[.S141];[Variables.$I$6];[.T141];IF([.U141]&lt;&gt;&quot;&quot;;CONCATENATE([Variables.$I$6];[.U141]);&quot;&quot;);[Variables.$I$2];[Variables.$I$6]);IF([.B141]&lt;&gt;&quot;&quot;;CONCATENATE(&quot;#&quot;;[.B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knight_helm_bad,itm_pinnath_leader,itm_leather_gloves,itm_gondor_med_greaves,itm_gondor_heavy_greaves,itm_good_mace,itm_gondor_lance,itm_gon_tab_shield_c,itm_gondor_hunter,],attr_tier_5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knight_helm_bad,itm_pinnath_leader,itm_leather_gloves,itm_gondor_med_greaves,itm_gondor_heavy_greaves,itm_good_mace,itm_gondor_lance,itm_gon_tab_shield_c,itm_gondor_hunter,],attr_tier_5,wp_tier_5,knows_common|knows_athletics_5|knows_riding_6|knows_power_strike_4|knows_ironflesh_5,gondor_face1,gondor_face2],</text:p>
          </table:table-cell>
          <table:table-cell table:style-name="ce7" office:value-type="string" calcext:value-type="string">
            <text:p>c3_pinnath_knight</text:p>
          </table:table-cell>
          <table:table-cell table:style-name="ce7" office:value-type="string" calcext:value-type="string">
            <text:p>Knight_of_Pinnath_Gelin</text:p>
          </table:table-cell>
          <table:table-cell table:style-name="ce7" office:value-type="string" calcext:value-type="string">
            <text:p>Knights_of_Pinnath_Gelin</text:p>
          </table:table-cell>
          <table:table-cell table:style-name="ce8" office:value-type="string" calcext:value-type="string">
            <text:p>tf_gondor|tf_mounted| tfg_gloves| 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gondor_knight_helm_bad,</text:p>
          </table:table-cell>
          <table:table-cell table:style-name="ce11" office:value-type="string" calcext:value-type="string">
            <text:p>itm_pinnath_leader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gondor_med_greaves,itm_gondor_heavy_greaves,</text:p>
          </table:table-cell>
          <table:table-cell table:style-name="ce27" office:value-type="string" calcext:value-type="string">
            <text:p>itm_good_mace,itm_gondor_lance,</text:p>
          </table:table-cell>
          <table:table-cell table:style-name="ce11" office:value-type="string" calcext:value-type="string">
            <text:p>itm_gon_tab_shield_c,</text:p>
          </table:table-cell>
          <table:table-cell table:style-name="ce11" office:value-type="string" calcext:value-type="string">
            <text:p>itm_gondor_hunter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5|knows_riding_6|knows_power_strike_4|knows_ironflesh_5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41]&lt;&gt;&quot;&quot;;[.C141]&lt;&gt;&quot;&quot;);CONCATENATE([Variables.$I$1];[Variables.$I$7];[.B141];[Variables.$I$7];[Variables.$I$6];[Variables.$I$7];[.C141];[Variables.$I$7];[Variables.$I$6];[Variables.$I$7];[.D141];[Variables.$I$7];[Variables.$I$6];[.E141];[Variables.$I$6];[.F141];[Variables.$I$6];[.G141];[Variables.$I$6];[.H141];[Variables.$I$6];[Variables.$I$1];[.I141];[.J141];[.K141];[.L141];[.M141];[.N141];[.O141];[Variables.$I$2];[Variables.$I$6];[.P141];[Variables.$I$6];[.Q141];[Variables.$I$6];[.R141];[Variables.$I$6];[.S141];[Variables.$I$6];[.T141];IF([.U141]&lt;&gt;&quot;&quot;;CONCATENATE([Variables.$I$6];[.U141]);&quot;&quot;);[Variables.$I$2];[Variables.$I$6]);IF([.B141]&lt;&gt;&quot;&quot;;CONCATENATE(&quot;#&quot;;[.B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knight_helm_bad,itm_pinnath_leader,itm_leather_gloves,itm_gondor_med_greaves,itm_gondor_heavy_greaves,itm_good_mace,itm_gondor_lance,itm_gon_tab_shield_c,itm_gondor_hunter,],attr_tier_5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knight_helm_bad,itm_pinnath_leader,itm_leather_gloves,itm_gondor_med_greaves,itm_gondor_heavy_greaves,itm_good_mace,itm_gondor_lance,itm_gon_tab_shield_c,itm_gondor_hunter,],attr_tier_5,wp_tier_5,knows_common|knows_athletics_5|knows_riding_6|knows_power_strike_4|knows_ironflesh_5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42]&lt;&gt;&quot;&quot;;[.C142]&lt;&gt;&quot;&quot;);CONCATENATE([Variables.$I$1];[Variables.$I$7];[.B142];[Variables.$I$7];[Variables.$I$6];[Variables.$I$7];[.C142];[Variables.$I$7];[Variables.$I$6];[Variables.$I$7];[.D142];[Variables.$I$7];[Variables.$I$6];[.E142];[Variables.$I$6];[.F142];[Variables.$I$6];[.G142];[Variables.$I$6];[.H142];[Variables.$I$6];[Variables.$I$1];[.I142];[.J142];[.K142];[.L142];[.M142];[.N142];[.O142];[Variables.$I$2];[Variables.$I$6];[.P142];[Variables.$I$6];[.Q142];[Variables.$I$6];[.R142];[Variables.$I$6];[.S142];[Variables.$I$6];[.T142];IF([.U142]&lt;&gt;&quot;&quot;;CONCATENATE([Variables.$I$6];[.U142]);&quot;&quot;);[Variables.$I$2];[Variables.$I$6]);IF([.B142]&lt;&gt;&quot;&quot;;CONCATENATE(&quot;#&quot;;[.B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attr_tier_2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attr_tier_2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</text:p>
          </table:table-cell>
          <table:table-cell table:style-name="ce7" office:value-type="string" calcext:value-type="string">
            <text:p>a2_pinnath_bowman</text:p>
          </table:table-cell>
          <table:table-cell table:style-name="ce7" office:value-type="string" calcext:value-type="string">
            <text:p>Bowman_of_Pinnath_Gelin</text:p>
          </table:table-cell>
          <table:table-cell table:style-name="ce7" office:value-type="string" calcext:value-type="string">
            <text:p>Bowmen_of_Pinnath_Geli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gondor_ranger_hood,</text:p>
          </table:table-cell>
          <table:table-cell table:style-name="ce19" office:value-type="string" calcext:value-type="string">
            <text:p>itm_pinnath_vet_footman,</text:p>
          </table:table-cell>
          <table:table-cell table:style-name="ce19"/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gondor_arrows,itm_regular_bow,</text:p>
          </table:table-cell>
          <table:table-cell table:style-name="ce19" office:value-type="string" calcext:value-type="string">
            <text:p>itm_good_mace,</text:p>
          </table:table-cell>
          <table:table-cell table:style-name="ce11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bow_4</text:p>
          </table:table-cell>
          <table:table-cell table:style-name="ce13" office:value-type="string" calcext:value-type="string">
            <text:p>knows_common|knows_power_strike_1|knows_power_draw_3|knows_athletics_4|knows_riding_1|knows_horse_archery_1|knows_trainer_1|knows_pathfinding_1|knows_spotting_1|knows_inventory_management_1|knows_first_aid_1|knows_persuasion_1|knows_trade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42]&lt;&gt;&quot;&quot;;[.C142]&lt;&gt;&quot;&quot;);CONCATENATE([Variables.$I$1];[Variables.$I$7];[.B142];[Variables.$I$7];[Variables.$I$6];[Variables.$I$7];[.C142];[Variables.$I$7];[Variables.$I$6];[Variables.$I$7];[.D142];[Variables.$I$7];[Variables.$I$6];[.E142];[Variables.$I$6];[.F142];[Variables.$I$6];[.G142];[Variables.$I$6];[.H142];[Variables.$I$6];[Variables.$I$1];[.I142];[.J142];[.K142];[.L142];[.M142];[.N142];[.O142];[Variables.$I$2];[Variables.$I$6];[.P142];[Variables.$I$6];[.Q142];[Variables.$I$6];[.R142];[Variables.$I$6];[.S142];[Variables.$I$6];[.T142];IF([.U142]&lt;&gt;&quot;&quot;;CONCATENATE([Variables.$I$6];[.U142]);&quot;&quot;);[Variables.$I$2];[Variables.$I$6]);IF([.B142]&lt;&gt;&quot;&quot;;CONCATENATE(&quot;#&quot;;[.B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attr_tier_2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attr_tier_2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43]&lt;&gt;&quot;&quot;;[.C143]&lt;&gt;&quot;&quot;);CONCATENATE([Variables.$I$1];[Variables.$I$7];[.B143];[Variables.$I$7];[Variables.$I$6];[Variables.$I$7];[.C143];[Variables.$I$7];[Variables.$I$6];[Variables.$I$7];[.D143];[Variables.$I$7];[Variables.$I$6];[.E143];[Variables.$I$6];[.F143];[Variables.$I$6];[.G143];[Variables.$I$6];[.H143];[Variables.$I$6];[Variables.$I$1];[.I143];[.J143];[.K143];[.L143];[.M143];[.N143];[.O143];[Variables.$I$2];[Variables.$I$6];[.P143];[Variables.$I$6];[.Q143];[Variables.$I$6];[.R143];[Variables.$I$6];[.S143];[Variables.$I$6];[.T143];IF([.U143]&lt;&gt;&quot;&quot;;CONCATENATE([Variables.$I$6];[.U143]);&quot;&quot;);[Variables.$I$2];[Variables.$I$6]);IF([.B143]&lt;&gt;&quot;&quot;;CONCATENATE(&quot;#&quot;;[.B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attr_fief_tier_4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attr_fief_tier_4,wp_tier_bow_5,knows_common|knows_athletics_6|knows_power_draw_5|knows_power_strike_5|knows_ironflesh_4,gondor_face1,gondor_face2],</text:p>
          </table:table-cell>
          <table:table-cell table:style-name="ce7" office:value-type="string" calcext:value-type="string">
            <text:p>a3_pinnath_archer</text:p>
          </table:table-cell>
          <table:table-cell table:style-name="ce7" office:value-type="string" calcext:value-type="string">
            <text:p>Archer_of_Pinnath_Gelin</text:p>
          </table:table-cell>
          <table:table-cell table:style-name="ce7" office:value-type="string" calcext:value-type="string">
            <text:p>Archers_of_Pinnath_Gelin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gondor_ranger_hood,itm_gondor_auxila_helm,</text:p>
          </table:table-cell>
          <table:table-cell table:style-name="ce11" office:value-type="string" calcext:value-type="string">
            <text:p>itm_pinnath_archer,</text:p>
          </table:table-cell>
          <table:table-cell table:style-name="ce11"/>
          <table:table-cell table:style-name="ce11" office:value-type="string" calcext:value-type="string">
            <text:p>itm_gondor_med_greaves,</text:p>
          </table:table-cell>
          <table:table-cell table:style-name="ce19" office:value-type="string" calcext:value-type="string">
            <text:p>itm_gondor_arrows,itm_regular_bow,</text:p>
          </table:table-cell>
          <table:table-cell table:style-name="ce19" office:value-type="string" calcext:value-type="string">
            <text:p>itm_good_mace,</text:p>
          </table:table-cell>
          <table:table-cell table:style-name="ce11"/>
          <table:table-cell table:style-name="ce12" office:value-type="string" calcext:value-type="string">
            <text:p>attr_fief_tier_4</text:p>
          </table:table-cell>
          <table:table-cell table:style-name="ce12" office:value-type="string" calcext:value-type="string">
            <text:p>wp_tier_bow_5</text:p>
          </table:table-cell>
          <table:table-cell table:style-name="ce12" office:value-type="string" calcext:value-type="string">
            <text:p>knows_common|knows_athletics_6|knows_power_draw_5|knows_power_strike_5|knows_ironflesh_4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43]&lt;&gt;&quot;&quot;;[.C143]&lt;&gt;&quot;&quot;);CONCATENATE([Variables.$I$1];[Variables.$I$7];[.B143];[Variables.$I$7];[Variables.$I$6];[Variables.$I$7];[.C143];[Variables.$I$7];[Variables.$I$6];[Variables.$I$7];[.D143];[Variables.$I$7];[Variables.$I$6];[.E143];[Variables.$I$6];[.F143];[Variables.$I$6];[.G143];[Variables.$I$6];[.H143];[Variables.$I$6];[Variables.$I$1];[.I143];[.J143];[.K143];[.L143];[.M143];[.N143];[.O143];[Variables.$I$2];[Variables.$I$6];[.P143];[Variables.$I$6];[.Q143];[Variables.$I$6];[.R143];[Variables.$I$6];[.S143];[Variables.$I$6];[.T143];IF([.U143]&lt;&gt;&quot;&quot;;CONCATENATE([Variables.$I$6];[.U143]);&quot;&quot;);[Variables.$I$2];[Variables.$I$6]);IF([.B143]&lt;&gt;&quot;&quot;;CONCATENATE(&quot;#&quot;;[.B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attr_fief_tier_4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attr_fief_tier_4,wp_tier_bow_5,knows_common|knows_athletics_6|knows_power_draw_5|knows_power_strike_5|knows_ironflesh_4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44]&lt;&gt;&quot;&quot;;[.C144]&lt;&gt;&quot;&quot;);CONCATENATE([Variables.$I$1];[Variables.$I$7];[.B144];[Variables.$I$7];[Variables.$I$6];[Variables.$I$7];[.C144];[Variables.$I$7];[Variables.$I$6];[Variables.$I$7];[.D144];[Variables.$I$7];[Variables.$I$6];[.E144];[Variables.$I$6];[.F144];[Variables.$I$6];[.G144];[Variables.$I$6];[.H144];[Variables.$I$6];[Variables.$I$1];[.I144];[.J144];[.K144];[.L144];[.M144];[.N144];[.O144];[Variables.$I$2];[Variables.$I$6];[.P144];[Variables.$I$6];[.Q144];[Variables.$I$6];[.R144];[Variables.$I$6];[.S144];[Variables.$I$6];[.T144];IF([.U144]&lt;&gt;&quot;&quot;;CONCATENATE([Variables.$I$6];[.U144]);&quot;&quot;);[Variables.$I$2];[Variables.$I$6]);IF([.B144]&lt;&gt;&quot;&quot;;CONCATENATE(&quot;#&quot;;[.B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heavy_greaves,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heavy_greaves,itm_gondor_cav_sword,itm_gon_tab_shield_c,itm_gondor_hunter,],attr_tier_6,wp_tier_6,knows_common|knows_riding_8|knows_shield_9|knows_power_strike_8|knows_ironflesh_10,gondor_face1,gondor_face3],</text:p>
          </table:table-cell>
          <table:table-cell table:style-name="ce7" office:value-type="string" calcext:value-type="string">
            <text:p>c6_pinnath_leader</text:p>
          </table:table-cell>
          <table:table-cell table:style-name="ce7" office:value-type="string" calcext:value-type="string">
            <text:p>Captain_of_Pinnath_Gelin</text:p>
          </table:table-cell>
          <table:table-cell table:style-name="ce7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gondor_leader_helm,</text:p>
          </table:table-cell>
          <table:table-cell table:style-name="ce11" office:value-type="string" calcext:value-type="string">
            <text:p>itm_pinnath_leader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gondor_med_greaves,itm_gondor_heavy_greaves,</text:p>
          </table:table-cell>
          <table:table-cell table:style-name="ce11" office:value-type="string" calcext:value-type="string">
            <text:p>itm_gondor_cav_sword,</text:p>
          </table:table-cell>
          <table:table-cell table:style-name="ce11" office:value-type="string" calcext:value-type="string">
            <text:p>itm_gon_tab_shield_c,</text:p>
          </table:table-cell>
          <table:table-cell table:style-name="ce11" office:value-type="string" calcext:value-type="string">
            <text:p>itm_gondor_hunter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8|knows_shield_9|knows_power_strike_8|knows_ironflesh_10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B144]&lt;&gt;&quot;&quot;;[.C144]&lt;&gt;&quot;&quot;);CONCATENATE([Variables.$I$1];[Variables.$I$7];[.B144];[Variables.$I$7];[Variables.$I$6];[Variables.$I$7];[.C144];[Variables.$I$7];[Variables.$I$6];[Variables.$I$7];[.D144];[Variables.$I$7];[Variables.$I$6];[.E144];[Variables.$I$6];[.F144];[Variables.$I$6];[.G144];[Variables.$I$6];[.H144];[Variables.$I$6];[Variables.$I$1];[.I144];[.J144];[.K144];[.L144];[.M144];[.N144];[.O144];[Variables.$I$2];[Variables.$I$6];[.P144];[Variables.$I$6];[.Q144];[Variables.$I$6];[.R144];[Variables.$I$6];[.S144];[Variables.$I$6];[.T144];IF([.U144]&lt;&gt;&quot;&quot;;CONCATENATE([Variables.$I$6];[.U144]);&quot;&quot;);[Variables.$I$2];[Variables.$I$6]);IF([.B144]&lt;&gt;&quot;&quot;;CONCATENATE(&quot;#&quot;;[.B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heavy_greaves,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heavy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16362"/>
        </table:table-row>
        <table:table-row table:style-name="ro1">
          <table:table-cell table:style-name="ce6" table:formula="of:=IF(AND([.B145]&lt;&gt;&quot;&quot;;[.C145]&lt;&gt;&quot;&quot;);CONCATENATE([Variables.$I$1];[Variables.$I$7];[.B145];[Variables.$I$7];[Variables.$I$6];[Variables.$I$7];[.C145];[Variables.$I$7];[Variables.$I$6];[Variables.$I$7];[.D145];[Variables.$I$7];[Variables.$I$6];[.E145];[Variables.$I$6];[.F145];[Variables.$I$6];[.G145];[Variables.$I$6];[.H145];[Variables.$I$6];[Variables.$I$1];[.I145];[.J145];[.K145];[.L145];[.M145];[.N145];[.O145];[Variables.$I$2];[Variables.$I$6];[.P145];[Variables.$I$6];[.Q145];[Variables.$I$6];[.R145];[Variables.$I$6];[.S145];[Variables.$I$6];[.T145];IF([.U145]&lt;&gt;&quot;&quot;;CONCATENATE([Variables.$I$6];[.U145]);&quot;&quot;);[Variables.$I$2];[Variables.$I$6]);IF([.B145]&lt;&gt;&quot;&quot;;CONCATENATE(&quot;#&quot;;[.B145]);&quot;&quot;))" office:value-type="string" office:string-value="#Blackroot Vale" calcext:value-type="string">
            <text:p>#Blackroot Vale</text:p>
          </table:table-cell>
          <table:table-cell table:style-name="ce21" office:value-type="string" calcext:value-type="string">
            <text:p>Blackroot Vale</text:p>
          </table:table-cell>
          <table:table-cell table:style-name="ce21" table:number-columns-repeated="8"/>
          <table:table-cell table:style-name="ce25" table:number-columns-repeated="4"/>
          <table:table-cell table:style-name="ce21" table:number-columns-repeated="6"/>
          <table:table-cell table:style-name="ce23"/>
          <table:table-cell table:style-name="ce23" table:formula="of:=IF(AND([.B145]&lt;&gt;&quot;&quot;;[.C145]&lt;&gt;&quot;&quot;);CONCATENATE([Variables.$I$1];[Variables.$I$7];[.B145];[Variables.$I$7];[Variables.$I$6];[Variables.$I$7];[.C145];[Variables.$I$7];[Variables.$I$6];[Variables.$I$7];[.D145];[Variables.$I$7];[Variables.$I$6];[.E145];[Variables.$I$6];[.F145];[Variables.$I$6];[.G145];[Variables.$I$6];[.H145];[Variables.$I$6];[Variables.$I$1];[.I145];[.J145];[.K145];[.L145];[.M145];[.N145];[.O145];[Variables.$I$2];[Variables.$I$6];[.P145];[Variables.$I$6];[.Q145];[Variables.$I$6];[.R145];[Variables.$I$6];[.S145];[Variables.$I$6];[.T145];IF([.U145]&lt;&gt;&quot;&quot;;CONCATENATE([Variables.$I$6];[.U145]);&quot;&quot;);[Variables.$I$2];[Variables.$I$6]);IF([.B145]&lt;&gt;&quot;&quot;;CONCATENATE(&quot;#&quot;;[.B145]);&quot;&quot;))" office:value-type="string" office:string-value="#Blackroot Vale" calcext:value-type="string">
            <text:p>#Blackroot Vale</text:p>
          </table:table-cell>
          <table:table-cell table:number-columns-repeated="16362"/>
        </table:table-row>
        <table:table-row table:style-name="ro1">
          <table:table-cell table:style-name="ce6" table:formula="of:=IF(AND([.B146]&lt;&gt;&quot;&quot;;[.C146]&lt;&gt;&quot;&quot;);CONCATENATE([Variables.$I$1];[Variables.$I$7];[.B146];[Variables.$I$7];[Variables.$I$6];[Variables.$I$7];[.C146];[Variables.$I$7];[Variables.$I$6];[Variables.$I$7];[.D146];[Variables.$I$7];[Variables.$I$6];[.E146];[Variables.$I$6];[.F146];[Variables.$I$6];[.G146];[Variables.$I$6];[.H146];[Variables.$I$6];[Variables.$I$1];[.I146];[.J146];[.K146];[.L146];[.M146];[.N146];[.O146];[Variables.$I$2];[Variables.$I$6];[.P146];[Variables.$I$6];[.Q146];[Variables.$I$6];[.R146];[Variables.$I$6];[.S146];[Variables.$I$6];[.T146];IF([.U146]&lt;&gt;&quot;&quot;;CONCATENATE([Variables.$I$6];[.U146]);&quot;&quot;);[Variables.$I$2];[Variables.$I$6]);IF([.B146]&lt;&gt;&quot;&quot;;CONCATENATE(&quot;#&quot;;[.B146]);&quot;&quot;))" office:value-type="string" office:string-value="[&quot;a1_blackroot_hunter&quot;,&quot;Hunter_of_Blackroot_Vale&quot;,&quot;Hunters_of_Blackroot_Vale&quot;,tf_gondor|  tfg_armor|  tfg_boots,0,subfac_blackroot,fac_gondor,[itm_hood_black,itm_blackroot_footman,itm_gondor_light_greaves,itm_short_bow,itm_gondor_arrows,itm_shortened_spear,],attr_fief_tier_1,wp_tier_bow_2,knows_common|knows_ironflesh_1|knows_power_draw_2|knows_athletics_2|knows_looting_1|knows_tracking_2|knows_spotting_2|knows_surgery_1|knows_prisoner_management_1|knows_leadership_1,gondor_face1,gondor_face2]," calcext:value-type="string">
            <text:p>["a1_blackroot_hunter","Hunter_of_Blackroot_Vale","Hunters_of_Blackroot_Vale",tf_gondor| <text:s/>tfg_armor| <text:s/>tfg_boots,0,subfac_blackroot,fac_gondor,[itm_hood_black,itm_blackroot_footman,itm_gondor_light_greaves,itm_short_bow,itm_gondor_arrows,itm_shortened_spear,],attr_fief_tier_1,wp_tier_bow_2,knows_common|knows_ironflesh_1|knows_power_draw_2|knows_athletics_2|knows_looting_1|knows_tracking_2|knows_spotting_2|knows_surgery_1|knows_prisoner_management_1|knows_leadership_1,gondor_face1,gondor_face2],</text:p>
          </table:table-cell>
          <table:table-cell table:style-name="ce7" office:value-type="string" calcext:value-type="string">
            <text:p>a1_blackroot_hunter</text:p>
          </table:table-cell>
          <table:table-cell table:style-name="ce7" office:value-type="string" calcext:value-type="string">
            <text:p>Hunter_of_Blackroot_Vale</text:p>
          </table:table-cell>
          <table:table-cell table:style-name="ce7" office:value-type="string" calcext:value-type="string">
            <text:p>Hunters_of_Blackroot_Vale</text:p>
          </table:table-cell>
          <table:table-cell table:style-name="ce8" office:value-type="string" calcext:value-type="string">
            <text:p>tf_gondor| <text:s/>tfg_armor| <text:s/>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hood_black,</text:p>
          </table:table-cell>
          <table:table-cell table:style-name="ce19" office:value-type="string" calcext:value-type="string">
            <text:p>itm_blackroot_footman,</text:p>
          </table:table-cell>
          <table:table-cell table:style-name="ce11"/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short_bow,itm_gondor_arrows,</text:p>
          </table:table-cell>
          <table:table-cell table:style-name="ce11" office:value-type="string" calcext:value-type="string">
            <text:p>itm_shortened_spear,</text:p>
          </table:table-cell>
          <table:table-cell table:style-name="ce11"/>
          <table:table-cell table:style-name="ce12" office:value-type="string" calcext:value-type="string">
            <text:p>attr_fief_tier_1</text:p>
          </table:table-cell>
          <table:table-cell table:style-name="ce12" office:value-type="string" calcext:value-type="string">
            <text:p>wp_tier_bow_2</text:p>
          </table:table-cell>
          <table:table-cell table:style-name="ce13" office:value-type="string" calcext:value-type="string">
            <text:p>knows_common|knows_ironflesh_1|knows_power_draw_2|knows_athletics_2|knows_looting_1|knows_tracking_2|knows_spotting_2|knows_surgery_1|knows_prisoner_management_1|knows_leadership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46]&lt;&gt;&quot;&quot;;[.C146]&lt;&gt;&quot;&quot;);CONCATENATE([Variables.$I$1];[Variables.$I$7];[.B146];[Variables.$I$7];[Variables.$I$6];[Variables.$I$7];[.C146];[Variables.$I$7];[Variables.$I$6];[Variables.$I$7];[.D146];[Variables.$I$7];[Variables.$I$6];[.E146];[Variables.$I$6];[.F146];[Variables.$I$6];[.G146];[Variables.$I$6];[.H146];[Variables.$I$6];[Variables.$I$1];[.I146];[.J146];[.K146];[.L146];[.M146];[.N146];[.O146];[Variables.$I$2];[Variables.$I$6];[.P146];[Variables.$I$6];[.Q146];[Variables.$I$6];[.R146];[Variables.$I$6];[.S146];[Variables.$I$6];[.T146];IF([.U146]&lt;&gt;&quot;&quot;;CONCATENATE([Variables.$I$6];[.U146]);&quot;&quot;);[Variables.$I$2];[Variables.$I$6]);IF([.B146]&lt;&gt;&quot;&quot;;CONCATENATE(&quot;#&quot;;[.B146]);&quot;&quot;))" office:value-type="string" office:string-value="[&quot;a1_blackroot_hunter&quot;,&quot;Hunter_of_Blackroot_Vale&quot;,&quot;Hunters_of_Blackroot_Vale&quot;,tf_gondor|  tfg_armor|  tfg_boots,0,subfac_blackroot,fac_gondor,[itm_hood_black,itm_blackroot_footman,itm_gondor_light_greaves,itm_short_bow,itm_gondor_arrows,itm_shortened_spear,],attr_fief_tier_1,wp_tier_bow_2,knows_common|knows_ironflesh_1|knows_power_draw_2|knows_athletics_2|knows_looting_1|knows_tracking_2|knows_spotting_2|knows_surgery_1|knows_prisoner_management_1|knows_leadership_1,gondor_face1,gondor_face2]," calcext:value-type="string">
            <text:p>["a1_blackroot_hunter","Hunter_of_Blackroot_Vale","Hunters_of_Blackroot_Vale",tf_gondor| <text:s/>tfg_armor| <text:s/>tfg_boots,0,subfac_blackroot,fac_gondor,[itm_hood_black,itm_blackroot_footman,itm_gondor_light_greaves,itm_short_bow,itm_gondor_arrows,itm_shortened_spear,],attr_fief_tier_1,wp_tier_bow_2,knows_common|knows_ironflesh_1|knows_power_draw_2|knows_athletics_2|knows_looting_1|knows_tracking_2|knows_spotting_2|knows_surgery_1|knows_prisoner_management_1|knows_leadership_1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47]&lt;&gt;&quot;&quot;;[.C147]&lt;&gt;&quot;&quot;);CONCATENATE([Variables.$I$1];[Variables.$I$7];[.B147];[Variables.$I$7];[Variables.$I$6];[Variables.$I$7];[.C147];[Variables.$I$7];[Variables.$I$6];[Variables.$I$7];[.D147];[Variables.$I$7];[Variables.$I$6];[.E147];[Variables.$I$6];[.F147];[Variables.$I$6];[.G147];[Variables.$I$6];[.H147];[Variables.$I$6];[Variables.$I$1];[.I147];[.J147];[.K147];[.L147];[.M147];[.N147];[.O147];[Variables.$I$2];[Variables.$I$6];[.P147];[Variables.$I$6];[.Q147];[Variables.$I$6];[.R147];[Variables.$I$6];[.S147];[Variables.$I$6];[.T147];IF([.U147]&lt;&gt;&quot;&quot;;CONCATENATE([Variables.$I$6];[.U147]);&quot;&quot;);[Variables.$I$2];[Variables.$I$6]);IF([.B147]&lt;&gt;&quot;&quot;;CONCATENATE(&quot;#&quot;;[.B147]);&quot;&quot;))" office:value-type="string" office:string-value="[&quot;a2_blackroot_bowman&quot;,&quot;Bowman_of_Blackroot_Vale&quot;,&quot;Bowmen_of_Blackroot_Vale&quot;,tf_gondor| tfg_ranged| tfg_armor| tfg_helm| tfg_boots,0,subfac_blackroot,fac_gondor,[itm_hood_black,itm_blackroot_footman,itm_gondor_light_greaves,itm_gondor_arrows,itm_regular_bow,itm_gondor_short_sword,],attr_tier_2,wp_tier_bow_3,knows_common|knows_ironflesh_1|knows_power_draw_3|knows_athletics_3|knows_looting_1|knows_tracking_2|knows_spotting_2|knows_surgery_1|knows_prisoner_management_1|knows_leadership_1,gondor_face1,gondor_face2]," calcext:value-type="string">
            <text:p>["a2_blackroot_bowman","Bowman_of_Blackroot_Vale","Bowmen_of_Blackroot_Vale",tf_gondor| tfg_ranged| tfg_armor| tfg_helm| tfg_boots,0,subfac_blackroot,fac_gondor,[itm_hood_black,itm_blackroot_footman,itm_gondor_light_greaves,itm_gondor_arrows,itm_regular_bow,itm_gondor_short_sword,],attr_tier_2,wp_tier_bow_3,knows_common|knows_ironflesh_1|knows_power_draw_3|knows_athletics_3|knows_looting_1|knows_tracking_2|knows_spotting_2|knows_surgery_1|knows_prisoner_management_1|knows_leadership_1,gondor_face1,gondor_face2],</text:p>
          </table:table-cell>
          <table:table-cell table:style-name="ce7" office:value-type="string" calcext:value-type="string">
            <text:p>a2_blackroot_bowman</text:p>
          </table:table-cell>
          <table:table-cell table:style-name="ce7" office:value-type="string" calcext:value-type="string">
            <text:p>Bowman_of_Blackroot_Vale</text:p>
          </table:table-cell>
          <table:table-cell table:style-name="ce7" office:value-type="string" calcext:value-type="string">
            <text:p>Bowmen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hood_black,</text:p>
          </table:table-cell>
          <table:table-cell table:style-name="ce19" office:value-type="string" calcext:value-type="string">
            <text:p>itm_blackroot_footman,</text:p>
          </table:table-cell>
          <table:table-cell table:style-name="ce11"/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gondor_arrows,itm_regular_bow,</text:p>
          </table:table-cell>
          <table:table-cell table:style-name="ce11" office:value-type="string" calcext:value-type="string">
            <text:p>itm_gondor_short_sword,</text:p>
          </table:table-cell>
          <table:table-cell table:style-name="ce11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bow_3</text:p>
          </table:table-cell>
          <table:table-cell table:style-name="ce13" office:value-type="string" calcext:value-type="string">
            <text:p>knows_common|knows_ironflesh_1|knows_power_draw_3|knows_athletics_3|knows_looting_1|knows_tracking_2|knows_spotting_2|knows_surgery_1|knows_prisoner_management_1|knows_leadership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47]&lt;&gt;&quot;&quot;;[.C147]&lt;&gt;&quot;&quot;);CONCATENATE([Variables.$I$1];[Variables.$I$7];[.B147];[Variables.$I$7];[Variables.$I$6];[Variables.$I$7];[.C147];[Variables.$I$7];[Variables.$I$6];[Variables.$I$7];[.D147];[Variables.$I$7];[Variables.$I$6];[.E147];[Variables.$I$6];[.F147];[Variables.$I$6];[.G147];[Variables.$I$6];[.H147];[Variables.$I$6];[Variables.$I$1];[.I147];[.J147];[.K147];[.L147];[.M147];[.N147];[.O147];[Variables.$I$2];[Variables.$I$6];[.P147];[Variables.$I$6];[.Q147];[Variables.$I$6];[.R147];[Variables.$I$6];[.S147];[Variables.$I$6];[.T147];IF([.U147]&lt;&gt;&quot;&quot;;CONCATENATE([Variables.$I$6];[.U147]);&quot;&quot;);[Variables.$I$2];[Variables.$I$6]);IF([.B147]&lt;&gt;&quot;&quot;;CONCATENATE(&quot;#&quot;;[.B147]);&quot;&quot;))" office:value-type="string" office:string-value="[&quot;a2_blackroot_bowman&quot;,&quot;Bowman_of_Blackroot_Vale&quot;,&quot;Bowmen_of_Blackroot_Vale&quot;,tf_gondor| tfg_ranged| tfg_armor| tfg_helm| tfg_boots,0,subfac_blackroot,fac_gondor,[itm_hood_black,itm_blackroot_footman,itm_gondor_light_greaves,itm_gondor_arrows,itm_regular_bow,itm_gondor_short_sword,],attr_tier_2,wp_tier_bow_3,knows_common|knows_ironflesh_1|knows_power_draw_3|knows_athletics_3|knows_looting_1|knows_tracking_2|knows_spotting_2|knows_surgery_1|knows_prisoner_management_1|knows_leadership_1,gondor_face1,gondor_face2]," calcext:value-type="string">
            <text:p>["a2_blackroot_bowman","Bowman_of_Blackroot_Vale","Bowmen_of_Blackroot_Vale",tf_gondor| tfg_ranged| tfg_armor| tfg_helm| tfg_boots,0,subfac_blackroot,fac_gondor,[itm_hood_black,itm_blackroot_footman,itm_gondor_light_greaves,itm_gondor_arrows,itm_regular_bow,itm_gondor_short_sword,],attr_tier_2,wp_tier_bow_3,knows_common|knows_ironflesh_1|knows_power_draw_3|knows_athletics_3|knows_looting_1|knows_tracking_2|knows_spotting_2|knows_surgery_1|knows_prisoner_management_1|knows_leadership_1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48]&lt;&gt;&quot;&quot;;[.C148]&lt;&gt;&quot;&quot;);CONCATENATE([Variables.$I$1];[Variables.$I$7];[.B148];[Variables.$I$7];[Variables.$I$6];[Variables.$I$7];[.C148];[Variables.$I$7];[Variables.$I$6];[Variables.$I$7];[.D148];[Variables.$I$7];[Variables.$I$6];[.E148];[Variables.$I$6];[.F148];[Variables.$I$6];[.G148];[Variables.$I$6];[.H148];[Variables.$I$6];[Variables.$I$1];[.I148];[.J148];[.K148];[.L148];[.M148];[.N148];[.O148];[Variables.$I$2];[Variables.$I$6];[.P148];[Variables.$I$6];[.Q148];[Variables.$I$6];[.R148];[Variables.$I$6];[.S148];[Variables.$I$6];[.T148];IF([.U148]&lt;&gt;&quot;&quot;;CONCATENATE([Variables.$I$6];[.U148]);&quot;&quot;);[Variables.$I$2];[Variables.$I$6]);IF([.B148]&lt;&gt;&quot;&quot;;CONCATENATE(&quot;#&quot;;[.B148]);&quot;&quot;))" office:value-type="string" office:string-value="[&quot;a3_blackroot_archer&quot;,&quot;Archer_of_Blackroot_Vale&quot;,&quot;Archers_of_Blackroot_Vale&quot;,tf_gondor| tfg_ranged| tfg_armor| tfg_helm| tfg_boots,0,subfac_blackroot,fac_gondor,[itm_hood_black,itm_blackroot_bowman,itm_gondor_med_greaves,itm_gondor_arrows,itm_gondor_bow,itm_gondor_short_sword,],attr_fief_tier_4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hood_black,itm_blackroot_bowman,itm_gondor_med_greaves,itm_gondor_arrows,itm_gondor_bow,itm_gondor_short_sword,],attr_fief_tier_4,wp_tier_bow_4,knows_common|knows_athletics_5|knows_power_draw_3|knows_power_strike_2|knows_ironflesh_3,gondor_face1,gondor_face2],</text:p>
          </table:table-cell>
          <table:table-cell table:style-name="ce7" office:value-type="string" calcext:value-type="string">
            <text:p>a3_blackroot_archer</text:p>
          </table:table-cell>
          <table:table-cell table:style-name="ce7" office:value-type="string" calcext:value-type="string">
            <text:p>Archer_of_Blackroot_Vale</text:p>
          </table:table-cell>
          <table:table-cell table:style-name="ce7" office:value-type="string" calcext:value-type="string">
            <text:p>Archer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hood_black,</text:p>
          </table:table-cell>
          <table:table-cell table:style-name="ce19" office:value-type="string" calcext:value-type="string">
            <text:p>itm_blackroot_bowman,</text:p>
          </table:table-cell>
          <table:table-cell table:style-name="ce11"/>
          <table:table-cell table:style-name="ce11" office:value-type="string" calcext:value-type="string">
            <text:p>itm_gondor_med_greaves,</text:p>
          </table:table-cell>
          <table:table-cell table:style-name="ce11" office:value-type="string" calcext:value-type="string">
            <text:p>itm_gondor_arrows,itm_gondor_bow,</text:p>
          </table:table-cell>
          <table:table-cell table:style-name="ce11" office:value-type="string" calcext:value-type="string">
            <text:p>itm_gondor_short_sword,</text:p>
          </table:table-cell>
          <table:table-cell table:style-name="ce11"/>
          <table:table-cell table:style-name="ce12" office:value-type="string" calcext:value-type="string">
            <text:p>attr_fief_tier_4</text:p>
          </table:table-cell>
          <table:table-cell table:style-name="ce12" office:value-type="string" calcext:value-type="string">
            <text:p>wp_tier_bow_4</text:p>
          </table:table-cell>
          <table:table-cell table:style-name="ce12" office:value-type="string" calcext:value-type="string">
            <text:p>knows_common|knows_athletics_5|knows_power_draw_3|knows_power_strike_2|knows_ironflesh_3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48]&lt;&gt;&quot;&quot;;[.C148]&lt;&gt;&quot;&quot;);CONCATENATE([Variables.$I$1];[Variables.$I$7];[.B148];[Variables.$I$7];[Variables.$I$6];[Variables.$I$7];[.C148];[Variables.$I$7];[Variables.$I$6];[Variables.$I$7];[.D148];[Variables.$I$7];[Variables.$I$6];[.E148];[Variables.$I$6];[.F148];[Variables.$I$6];[.G148];[Variables.$I$6];[.H148];[Variables.$I$6];[Variables.$I$1];[.I148];[.J148];[.K148];[.L148];[.M148];[.N148];[.O148];[Variables.$I$2];[Variables.$I$6];[.P148];[Variables.$I$6];[.Q148];[Variables.$I$6];[.R148];[Variables.$I$6];[.S148];[Variables.$I$6];[.T148];IF([.U148]&lt;&gt;&quot;&quot;;CONCATENATE([Variables.$I$6];[.U148]);&quot;&quot;);[Variables.$I$2];[Variables.$I$6]);IF([.B148]&lt;&gt;&quot;&quot;;CONCATENATE(&quot;#&quot;;[.B148]);&quot;&quot;))" office:value-type="string" office:string-value="[&quot;a3_blackroot_archer&quot;,&quot;Archer_of_Blackroot_Vale&quot;,&quot;Archers_of_Blackroot_Vale&quot;,tf_gondor| tfg_ranged| tfg_armor| tfg_helm| tfg_boots,0,subfac_blackroot,fac_gondor,[itm_hood_black,itm_blackroot_bowman,itm_gondor_med_greaves,itm_gondor_arrows,itm_gondor_bow,itm_gondor_short_sword,],attr_fief_tier_4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hood_black,itm_blackroot_bowman,itm_gondor_med_greaves,itm_gondor_arrows,itm_gondor_bow,itm_gondor_short_sword,],attr_fief_tier_4,wp_tier_bow_4,knows_common|knows_athletics_5|knows_power_draw_3|knows_power_strike_2|knows_ironflesh_3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49]&lt;&gt;&quot;&quot;;[.C149]&lt;&gt;&quot;&quot;);CONCATENATE([Variables.$I$1];[Variables.$I$7];[.B149];[Variables.$I$7];[Variables.$I$6];[Variables.$I$7];[.C149];[Variables.$I$7];[Variables.$I$6];[Variables.$I$7];[.D149];[Variables.$I$7];[Variables.$I$6];[.E149];[Variables.$I$6];[.F149];[Variables.$I$6];[.G149];[Variables.$I$6];[.H149];[Variables.$I$6];[Variables.$I$1];[.I149];[.J149];[.K149];[.L149];[.M149];[.N149];[.O149];[Variables.$I$2];[Variables.$I$6];[.P149];[Variables.$I$6];[.Q149];[Variables.$I$6];[.R149];[Variables.$I$6];[.S149];[Variables.$I$6];[.T149];IF([.U149]&lt;&gt;&quot;&quot;;CONCATENATE([Variables.$I$6];[.U149]);&quot;&quot;);[Variables.$I$2];[Variables.$I$6]);IF([.B149]&lt;&gt;&quot;&quot;;CONCATENATE(&quot;#&quot;;[.B149]);&quot;&quot;))" office:value-type="string" office:string-value="[&quot;i2_blackroot_footman&quot;,&quot;Footman_of_Blackroot_Vale&quot;,&quot;Footmen_of_Blackroot_Vale&quot;,tf_gondor| tfg_armor| tfg_helm| tfg_boots,0,subfac_blackroot,fac_gondor,[itm_gondor_auxila_helm_bad,itm_blackroot_footman,itm_gondor_light_greaves,itm_gondor_spear,itm_gon_tab_shield_a,],attr_tier_2,wp_tier_3,knows_common|knows_ironflesh_2|knows_power_strike_2|knows_power_draw_2|knows_athletics_2|knows_looting_1|knows_tracking_2|knows_spotting_2|knows_surgery_1|knows_prisoner_management_1|knows_leadership_1,gondor_face1,gondor_face2]," calcext:value-type="string">
            <text:p>["i2_blackroot_footman","Footman_of_Blackroot_Vale","Footmen_of_Blackroot_Vale",tf_gondor| tfg_armor| tfg_helm| tfg_boots,0,subfac_blackroot,fac_gondor,[itm_gondor_auxila_helm_bad,itm_blackroot_footman,itm_gondor_light_greaves,itm_gondor_spear,itm_gon_tab_shield_a,],attr_tier_2,wp_tier_3,knows_common|knows_ironflesh_2|knows_power_strike_2|knows_power_draw_2|knows_athletics_2|knows_looting_1|knows_tracking_2|knows_spotting_2|knows_surgery_1|knows_prisoner_management_1|knows_leadership_1,gondor_face1,gondor_face2],</text:p>
          </table:table-cell>
          <table:table-cell table:style-name="ce7" office:value-type="string" calcext:value-type="string">
            <text:p>i2_blackroot_footman</text:p>
          </table:table-cell>
          <table:table-cell table:style-name="ce7" office:value-type="string" calcext:value-type="string">
            <text:p>Footman_of_Blackroot_Vale</text:p>
          </table:table-cell>
          <table:table-cell table:style-name="ce7" office:value-type="string" calcext:value-type="string">
            <text:p>Footmen_of_Blackroot_Vale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gondor_auxila_helm_bad,</text:p>
          </table:table-cell>
          <table:table-cell table:style-name="ce19" office:value-type="string" calcext:value-type="string">
            <text:p>itm_blackroot_footman,</text:p>
          </table:table-cell>
          <table:table-cell table:style-name="ce19"/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gondor_spear,</text:p>
          </table:table-cell>
          <table:table-cell table:style-name="ce11" office:value-type="string" calcext:value-type="string">
            <text:p>itm_gon_tab_shield_a,</text:p>
          </table:table-cell>
          <table:table-cell table:style-name="ce11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3</text:p>
          </table:table-cell>
          <table:table-cell table:style-name="ce13" office:value-type="string" calcext:value-type="string">
            <text:p>knows_common|knows_ironflesh_2|knows_power_strike_2|knows_power_draw_2|knows_athletics_2|knows_looting_1|knows_tracking_2|knows_spotting_2|knows_surgery_1|knows_prisoner_management_1|knows_leadership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49]&lt;&gt;&quot;&quot;;[.C149]&lt;&gt;&quot;&quot;);CONCATENATE([Variables.$I$1];[Variables.$I$7];[.B149];[Variables.$I$7];[Variables.$I$6];[Variables.$I$7];[.C149];[Variables.$I$7];[Variables.$I$6];[Variables.$I$7];[.D149];[Variables.$I$7];[Variables.$I$6];[.E149];[Variables.$I$6];[.F149];[Variables.$I$6];[.G149];[Variables.$I$6];[.H149];[Variables.$I$6];[Variables.$I$1];[.I149];[.J149];[.K149];[.L149];[.M149];[.N149];[.O149];[Variables.$I$2];[Variables.$I$6];[.P149];[Variables.$I$6];[.Q149];[Variables.$I$6];[.R149];[Variables.$I$6];[.S149];[Variables.$I$6];[.T149];IF([.U149]&lt;&gt;&quot;&quot;;CONCATENATE([Variables.$I$6];[.U149]);&quot;&quot;);[Variables.$I$2];[Variables.$I$6]);IF([.B149]&lt;&gt;&quot;&quot;;CONCATENATE(&quot;#&quot;;[.B149]);&quot;&quot;))" office:value-type="string" office:string-value="[&quot;i2_blackroot_footman&quot;,&quot;Footman_of_Blackroot_Vale&quot;,&quot;Footmen_of_Blackroot_Vale&quot;,tf_gondor| tfg_armor| tfg_helm| tfg_boots,0,subfac_blackroot,fac_gondor,[itm_gondor_auxila_helm_bad,itm_blackroot_footman,itm_gondor_light_greaves,itm_gondor_spear,itm_gon_tab_shield_a,],attr_tier_2,wp_tier_3,knows_common|knows_ironflesh_2|knows_power_strike_2|knows_power_draw_2|knows_athletics_2|knows_looting_1|knows_tracking_2|knows_spotting_2|knows_surgery_1|knows_prisoner_management_1|knows_leadership_1,gondor_face1,gondor_face2]," calcext:value-type="string">
            <text:p>["i2_blackroot_footman","Footman_of_Blackroot_Vale","Footmen_of_Blackroot_Vale",tf_gondor| tfg_armor| tfg_helm| tfg_boots,0,subfac_blackroot,fac_gondor,[itm_gondor_auxila_helm_bad,itm_blackroot_footman,itm_gondor_light_greaves,itm_gondor_spear,itm_gon_tab_shield_a,],attr_tier_2,wp_tier_3,knows_common|knows_ironflesh_2|knows_power_strike_2|knows_power_draw_2|knows_athletics_2|knows_looting_1|knows_tracking_2|knows_spotting_2|knows_surgery_1|knows_prisoner_management_1|knows_leadership_1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50]&lt;&gt;&quot;&quot;;[.C150]&lt;&gt;&quot;&quot;);CONCATENATE([Variables.$I$1];[Variables.$I$7];[.B150];[Variables.$I$7];[Variables.$I$6];[Variables.$I$7];[.C150];[Variables.$I$7];[Variables.$I$6];[Variables.$I$7];[.D150];[Variables.$I$7];[Variables.$I$6];[.E150];[Variables.$I$6];[.F150];[Variables.$I$6];[.G150];[Variables.$I$6];[.H150];[Variables.$I$6];[Variables.$I$1];[.I150];[.J150];[.K150];[.L150];[.M150];[.N150];[.O150];[Variables.$I$2];[Variables.$I$6];[.P150];[Variables.$I$6];[.Q150];[Variables.$I$6];[.R150];[Variables.$I$6];[.S150];[Variables.$I$6];[.T150];IF([.U150]&lt;&gt;&quot;&quot;;CONCATENATE([Variables.$I$6];[.U150]);&quot;&quot;);[Variables.$I$2];[Variables.$I$6]);IF([.B150]&lt;&gt;&quot;&quot;;CONCATENATE(&quot;#&quot;;[.B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mail_coif,itm_blackroot_warrior,itm_leather_gloves,itm_gondor_med_greaves,itm_gondor_spear,itm_gon_tab_shield_d,],attr_fief_tier_4,wp_tier_4,knows_common|knows_athletics_5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mail_coif,itm_blackroot_warrior,itm_leather_gloves,itm_gondor_med_greaves,itm_gondor_spear,itm_gon_tab_shield_d,],attr_fief_tier_4,wp_tier_4,knows_common|knows_athletics_5|knows_power_strike_5|knows_ironflesh_5,gondor_face1,gondor_face2],</text:p>
          </table:table-cell>
          <table:table-cell table:style-name="ce7" office:value-type="string" calcext:value-type="string">
            <text:p>i3_blackroot_spearman</text:p>
          </table:table-cell>
          <table:table-cell table:style-name="ce7" office:value-type="string" calcext:value-type="string">
            <text:p>Spearman_of_Blackroot_Vale</text:p>
          </table:table-cell>
          <table:table-cell table:style-name="ce7" office:value-type="string" calcext:value-type="string">
            <text:p>Spearmen_of_Blackroot_Vale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gondor_auxila_helm,itm_mail_coif,</text:p>
          </table:table-cell>
          <table:table-cell table:style-name="ce11" office:value-type="string" calcext:value-type="string">
            <text:p>itm_blackroot_warrior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gondor_med_greaves,</text:p>
          </table:table-cell>
          <table:table-cell table:style-name="ce19" office:value-type="string" calcext:value-type="string">
            <text:p>itm_gondor_spear,</text:p>
          </table:table-cell>
          <table:table-cell table:style-name="ce11" office:value-type="string" calcext:value-type="string">
            <text:p>itm_gon_tab_shield_d,</text:p>
          </table:table-cell>
          <table:table-cell table:style-name="ce11"/>
          <table:table-cell table:style-name="ce12" office:value-type="string" calcext:value-type="string">
            <text:p>attr_fief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5|knows_power_strike_5|knows_ironflesh_5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50]&lt;&gt;&quot;&quot;;[.C150]&lt;&gt;&quot;&quot;);CONCATENATE([Variables.$I$1];[Variables.$I$7];[.B150];[Variables.$I$7];[Variables.$I$6];[Variables.$I$7];[.C150];[Variables.$I$7];[Variables.$I$6];[Variables.$I$7];[.D150];[Variables.$I$7];[Variables.$I$6];[.E150];[Variables.$I$6];[.F150];[Variables.$I$6];[.G150];[Variables.$I$6];[.H150];[Variables.$I$6];[Variables.$I$1];[.I150];[.J150];[.K150];[.L150];[.M150];[.N150];[.O150];[Variables.$I$2];[Variables.$I$6];[.P150];[Variables.$I$6];[.Q150];[Variables.$I$6];[.R150];[Variables.$I$6];[.S150];[Variables.$I$6];[.T150];IF([.U150]&lt;&gt;&quot;&quot;;CONCATENATE([Variables.$I$6];[.U150]);&quot;&quot;);[Variables.$I$2];[Variables.$I$6]);IF([.B150]&lt;&gt;&quot;&quot;;CONCATENATE(&quot;#&quot;;[.B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mail_coif,itm_blackroot_warrior,itm_leather_gloves,itm_gondor_med_greaves,itm_gondor_spear,itm_gon_tab_shield_d,],attr_fief_tier_4,wp_tier_4,knows_common|knows_athletics_5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mail_coif,itm_blackroot_warrior,itm_leather_gloves,itm_gondor_med_greaves,itm_gondor_spear,itm_gon_tab_shield_d,],attr_fief_tier_4,wp_tier_4,knows_common|knows_athletics_5|knows_power_strike_5|knows_ironflesh_5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51]&lt;&gt;&quot;&quot;;[.C151]&lt;&gt;&quot;&quot;);CONCATENATE([Variables.$I$1];[Variables.$I$7];[.B151];[Variables.$I$7];[Variables.$I$6];[Variables.$I$7];[.C151];[Variables.$I$7];[Variables.$I$6];[Variables.$I$7];[.D151];[Variables.$I$7];[Variables.$I$6];[.E151];[Variables.$I$6];[.F151];[Variables.$I$6];[.G151];[Variables.$I$6];[.H151];[Variables.$I$6];[Variables.$I$1];[.I151];[.J151];[.K151];[.L151];[.M151];[.N151];[.O151];[Variables.$I$2];[Variables.$I$6];[.P151];[Variables.$I$6];[.Q151];[Variables.$I$6];[.R151];[Variables.$I$6];[.S151];[Variables.$I$6];[.T151];IF([.U151]&lt;&gt;&quot;&quot;;CONCATENATE([Variables.$I$6];[.U151]);&quot;&quot;);[Variables.$I$2];[Variables.$I$6]);IF([.B151]&lt;&gt;&quot;&quot;;CONCATENATE(&quot;#&quot;;[.B151]);&quot;&quot;))" office:value-type="string" office:string-value="[&quot;a5_blackroot_shadow_hunter&quot;,&quot;Morthond_Shadow_Hunter&quot;,&quot;Morthond_Shadow_Hunters&quot;,tf_gondor| tfg_ranged| tfg_armor| tfg_helm| tfg_boots,0,subfac_blackroot,fac_gondor,[itm_hood_black,itm_blackroot_leader,itm_leather_gloves_good,itm_gondor_med_greaves,itm_gondor_arrows,itm_gondor_bow,itm_gon_tab_shield_c,itm_gondor_spear,itm_marker_night_troop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hood_black,itm_blackroot_leader,itm_leather_gloves_good,itm_gondor_med_greaves,itm_gondor_arrows,itm_gondor_bow,itm_gon_tab_shield_c,itm_gondor_spear,itm_marker_night_troop,],attr_tier_5,wp_melee(200)|wp_archery(200),knows_common|knows_athletics_7|knows_power_draw_5|knows_power_strike_5|knows_ironflesh_5,gondor_face1,gondor_face3],</text:p>
          </table:table-cell>
          <table:table-cell table:style-name="ce7" office:value-type="string" calcext:value-type="string">
            <text:p>a5_blackroot_shadow_hunter</text:p>
          </table:table-cell>
          <table:table-cell table:style-name="ce7" office:value-type="string" calcext:value-type="string">
            <text:p>Morthond_Shadow_Hunter</text:p>
          </table:table-cell>
          <table:table-cell table:style-name="ce7" office:value-type="string" calcext:value-type="string">
            <text:p>Morthond_Shadow_Hunt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hood_black,</text:p>
          </table:table-cell>
          <table:table-cell table:style-name="ce11" office:value-type="string" calcext:value-type="string">
            <text:p>itm_blackroot_leader,</text:p>
          </table:table-cell>
          <table:table-cell table:style-name="ce11" office:value-type="string" calcext:value-type="string">
            <text:p>itm_leather_gloves_good,</text:p>
          </table:table-cell>
          <table:table-cell table:style-name="ce11" office:value-type="string" calcext:value-type="string">
            <text:p>itm_gondor_med_greaves,</text:p>
          </table:table-cell>
          <table:table-cell table:style-name="ce11" office:value-type="string" calcext:value-type="string">
            <text:p>itm_gondor_arrows,itm_gondor_bow,</text:p>
          </table:table-cell>
          <table:table-cell table:style-name="ce11" office:value-type="string" calcext:value-type="string">
            <text:p>itm_gon_tab_shield_c,itm_gondor_spear,</text:p>
          </table:table-cell>
          <table:table-cell table:style-name="ce11" office:value-type="string" calcext:value-type="string">
            <text:p>itm_marker_night_troop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melee(200)|wp_archery(200)</text:p>
          </table:table-cell>
          <table:table-cell table:style-name="ce12" office:value-type="string" calcext:value-type="string">
            <text:p>knows_common|knows_athletics_7|knows_power_draw_5|knows_power_strike_5|knows_ironflesh_5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B151]&lt;&gt;&quot;&quot;;[.C151]&lt;&gt;&quot;&quot;);CONCATENATE([Variables.$I$1];[Variables.$I$7];[.B151];[Variables.$I$7];[Variables.$I$6];[Variables.$I$7];[.C151];[Variables.$I$7];[Variables.$I$6];[Variables.$I$7];[.D151];[Variables.$I$7];[Variables.$I$6];[.E151];[Variables.$I$6];[.F151];[Variables.$I$6];[.G151];[Variables.$I$6];[.H151];[Variables.$I$6];[Variables.$I$1];[.I151];[.J151];[.K151];[.L151];[.M151];[.N151];[.O151];[Variables.$I$2];[Variables.$I$6];[.P151];[Variables.$I$6];[.Q151];[Variables.$I$6];[.R151];[Variables.$I$6];[.S151];[Variables.$I$6];[.T151];IF([.U151]&lt;&gt;&quot;&quot;;CONCATENATE([Variables.$I$6];[.U151]);&quot;&quot;);[Variables.$I$2];[Variables.$I$6]);IF([.B151]&lt;&gt;&quot;&quot;;CONCATENATE(&quot;#&quot;;[.B151]);&quot;&quot;))" office:value-type="string" office:string-value="[&quot;a5_blackroot_shadow_hunter&quot;,&quot;Morthond_Shadow_Hunter&quot;,&quot;Morthond_Shadow_Hunters&quot;,tf_gondor| tfg_ranged| tfg_armor| tfg_helm| tfg_boots,0,subfac_blackroot,fac_gondor,[itm_hood_black,itm_blackroot_leader,itm_leather_gloves_good,itm_gondor_med_greaves,itm_gondor_arrows,itm_gondor_bow,itm_gon_tab_shield_c,itm_gondor_spear,itm_marker_night_troop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hood_black,itm_blackroot_leader,itm_leather_gloves_good,itm_gondor_med_greaves,itm_gondor_arrows,itm_gondor_bow,itm_gon_tab_shield_c,itm_gondor_spear,itm_marker_night_troop,],attr_tier_5,wp_melee(200)|wp_archery(200),knows_common|knows_athletics_7|knows_power_draw_5|knows_power_strike_5|knows_ironflesh_5,gondor_face1,gondor_face3],</text:p>
          </table:table-cell>
          <table:table-cell table:number-columns-repeated="16362"/>
        </table:table-row>
        <table:table-row table:style-name="ro1">
          <table:table-cell table:style-name="ce6" table:formula="of:=IF(AND([.B152]&lt;&gt;&quot;&quot;;[.C152]&lt;&gt;&quot;&quot;);CONCATENATE([Variables.$I$1];[Variables.$I$7];[.B152];[Variables.$I$7];[Variables.$I$6];[Variables.$I$7];[.C152];[Variables.$I$7];[Variables.$I$6];[Variables.$I$7];[.D152];[Variables.$I$7];[Variables.$I$6];[.E152];[Variables.$I$6];[.F152];[Variables.$I$6];[.G152];[Variables.$I$6];[.H152];[Variables.$I$6];[Variables.$I$1];[.I152];[.J152];[.K152];[.L152];[.M152];[.N152];[.O152];[Variables.$I$2];[Variables.$I$6];[.P152];[Variables.$I$6];[.Q152];[Variables.$I$6];[.R152];[Variables.$I$6];[.S152];[Variables.$I$6];[.T152];IF([.U152]&lt;&gt;&quot;&quot;;CONCATENATE([Variables.$I$6];[.U152]);&quot;&quot;);[Variables.$I$2];[Variables.$I$6]);IF([.B152]&lt;&gt;&quot;&quot;;CONCATENATE(&quot;#&quot;;[.B152]);&quot;&quot;))" office:value-type="string" office:string-value="#Dol Amroth" calcext:value-type="string">
            <text:p>#Dol Amroth</text:p>
          </table:table-cell>
          <table:table-cell table:style-name="ce21" office:value-type="string" calcext:value-type="string">
            <text:p>Dol Amroth</text:p>
          </table:table-cell>
          <table:table-cell table:style-name="ce21" table:number-columns-repeated="8"/>
          <table:table-cell table:style-name="ce25" table:number-columns-repeated="4"/>
          <table:table-cell table:style-name="ce21" table:number-columns-repeated="6"/>
          <table:table-cell table:style-name="ce23"/>
          <table:table-cell table:style-name="ce23" table:formula="of:=IF(AND([.B152]&lt;&gt;&quot;&quot;;[.C152]&lt;&gt;&quot;&quot;);CONCATENATE([Variables.$I$1];[Variables.$I$7];[.B152];[Variables.$I$7];[Variables.$I$6];[Variables.$I$7];[.C152];[Variables.$I$7];[Variables.$I$6];[Variables.$I$7];[.D152];[Variables.$I$7];[Variables.$I$6];[.E152];[Variables.$I$6];[.F152];[Variables.$I$6];[.G152];[Variables.$I$6];[.H152];[Variables.$I$6];[Variables.$I$1];[.I152];[.J152];[.K152];[.L152];[.M152];[.N152];[.O152];[Variables.$I$2];[Variables.$I$6];[.P152];[Variables.$I$6];[.Q152];[Variables.$I$6];[.R152];[Variables.$I$6];[.S152];[Variables.$I$6];[.T152];IF([.U152]&lt;&gt;&quot;&quot;;CONCATENATE([Variables.$I$6];[.U152]);&quot;&quot;);[Variables.$I$2];[Variables.$I$6]);IF([.B152]&lt;&gt;&quot;&quot;;CONCATENATE(&quot;#&quot;;[.B152]);&quot;&quot;))" office:value-type="string" office:string-value="#Dol Amroth" calcext:value-type="string">
            <text:p>#Dol Amroth</text:p>
          </table:table-cell>
          <table:table-cell table:number-columns-repeated="16362"/>
        </table:table-row>
        <table:table-row table:style-name="ro1">
          <table:table-cell table:style-name="ce6" table:formula="of:=IF(AND([.B153]&lt;&gt;&quot;&quot;;[.C153]&lt;&gt;&quot;&quot;);CONCATENATE([Variables.$I$1];[Variables.$I$7];[.B153];[Variables.$I$7];[Variables.$I$6];[Variables.$I$7];[.C153];[Variables.$I$7];[Variables.$I$6];[Variables.$I$7];[.D153];[Variables.$I$7];[Variables.$I$6];[.E153];[Variables.$I$6];[.F153];[Variables.$I$6];[.G153];[Variables.$I$6];[.H153];[Variables.$I$6];[Variables.$I$1];[.I153];[.J153];[.K153];[.L153];[.M153];[.N153];[.O153];[Variables.$I$2];[Variables.$I$6];[.P153];[Variables.$I$6];[.Q153];[Variables.$I$6];[.R153];[Variables.$I$6];[.S153];[Variables.$I$6];[.T153];IF([.U153]&lt;&gt;&quot;&quot;;CONCATENATE([Variables.$I$6];[.U153]);&quot;&quot;);[Variables.$I$2];[Variables.$I$6]);IF([.B153]&lt;&gt;&quot;&quot;;CONCATENATE(&quot;#&quot;;[.B153]);&quot;&quot;))" office:value-type="string" office:string-value="[&quot;i1_amroth_recruit&quot;,&quot;Dol_Amroth_Recruit&quot;,&quot;Dol_Amroth_Recruits&quot;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" calcext:value-type="string">
            <text:p>["i1_amroth_recruit","Dol_Amroth_Recruit","Dol_Amroth_Recruits"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</text:p>
          </table:table-cell>
          <table:table-cell table:style-name="ce7" office:value-type="string" calcext:value-type="string">
            <text:p>i1_amroth_recruit</text:p>
          </table:table-cell>
          <table:table-cell table:style-name="ce7" office:value-type="string" calcext:value-type="string">
            <text:p>Dol_Amroth_Recruit</text:p>
          </table:table-cell>
          <table:table-cell table:style-name="ce7" office:value-type="string" calcext:value-type="string">
            <text:p>Dol_Amroth_Recruits</text:p>
          </table:table-cell>
          <table:table-cell table:style-name="ce8" office:value-type="string" calcext:value-type="string">
            <text:p>tf_gondor| tfg_armor| tfg_shield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gondor_auxila_helm,</text:p>
          </table:table-cell>
          <table:table-cell table:style-name="ce19" office:value-type="string" calcext:value-type="string">
            <text:p>itm_dol_shirt,</text:p>
          </table:table-cell>
          <table:table-cell table:style-name="ce11"/>
          <table:table-cell table:style-name="ce19" office:value-type="string" calcext:value-type="string">
            <text:p>itm_dol_shoes,</text:p>
          </table:table-cell>
          <table:table-cell table:style-name="ce19" office:value-type="string" calcext:value-type="string">
            <text:p>itm_gondor_spear,</text:p>
          </table:table-cell>
          <table:table-cell table:style-name="ce11" office:value-type="string" calcext:value-type="string">
            <text:p>itm_gon_tab_shield_a,</text:p>
          </table:table-cell>
          <table:table-cell table:style-name="ce11"/>
          <table:table-cell table:style-name="ce12" office:value-type="string" calcext:value-type="string">
            <text:p>attr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ironflesh_1|knows_power_strike_1|knows_power_draw_1|knows_riding_2|knows_trainer_1|knows_tactics_2|knows_inventory_management_1|knows_wound_treatment_1|knows_prisoner_management_1|knows_leadership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53]&lt;&gt;&quot;&quot;;[.C153]&lt;&gt;&quot;&quot;);CONCATENATE([Variables.$I$1];[Variables.$I$7];[.B153];[Variables.$I$7];[Variables.$I$6];[Variables.$I$7];[.C153];[Variables.$I$7];[Variables.$I$6];[Variables.$I$7];[.D153];[Variables.$I$7];[Variables.$I$6];[.E153];[Variables.$I$6];[.F153];[Variables.$I$6];[.G153];[Variables.$I$6];[.H153];[Variables.$I$6];[Variables.$I$1];[.I153];[.J153];[.K153];[.L153];[.M153];[.N153];[.O153];[Variables.$I$2];[Variables.$I$6];[.P153];[Variables.$I$6];[.Q153];[Variables.$I$6];[.R153];[Variables.$I$6];[.S153];[Variables.$I$6];[.T153];IF([.U153]&lt;&gt;&quot;&quot;;CONCATENATE([Variables.$I$6];[.U153]);&quot;&quot;);[Variables.$I$2];[Variables.$I$6]);IF([.B153]&lt;&gt;&quot;&quot;;CONCATENATE(&quot;#&quot;;[.B153]);&quot;&quot;))" office:value-type="string" office:string-value="[&quot;i1_amroth_recruit&quot;,&quot;Dol_Amroth_Recruit&quot;,&quot;Dol_Amroth_Recruits&quot;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" calcext:value-type="string">
            <text:p>["i1_amroth_recruit","Dol_Amroth_Recruit","Dol_Amroth_Recruits"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54]&lt;&gt;&quot;&quot;;[.C154]&lt;&gt;&quot;&quot;);CONCATENATE([Variables.$I$1];[Variables.$I$7];[.B154];[Variables.$I$7];[Variables.$I$6];[Variables.$I$7];[.C154];[Variables.$I$7];[Variables.$I$6];[Variables.$I$7];[.D154];[Variables.$I$7];[Variables.$I$6];[.E154];[Variables.$I$6];[.F154];[Variables.$I$6];[.G154];[Variables.$I$6];[.H154];[Variables.$I$6];[Variables.$I$1];[.I154];[.J154];[.K154];[.L154];[.M154];[.N154];[.O154];[Variables.$I$2];[Variables.$I$6];[.P154];[Variables.$I$6];[.Q154];[Variables.$I$6];[.R154];[Variables.$I$6];[.S154];[Variables.$I$6];[.T154];IF([.U154]&lt;&gt;&quot;&quot;;CONCATENATE([Variables.$I$6];[.U154]);&quot;&quot;);[Variables.$I$2];[Variables.$I$6]);IF([.B154]&lt;&gt;&quot;&quot;;CONCATENATE(&quot;#&quot;;[.B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</text:p>
          </table:table-cell>
          <table:table-cell table:style-name="ce7" office:value-type="string" calcext:value-type="string">
            <text:p>c2_amroth_squire</text:p>
          </table:table-cell>
          <table:table-cell table:style-name="ce7" office:value-type="string" calcext:value-type="string">
            <text:p>Squire_of_Dol_Amroth</text:p>
          </table:table-cell>
          <table:table-cell table:style-name="ce7" office:value-type="string" calcext:value-type="string">
            <text:p>Squires_of_Dol_Amroth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gondor_auxila_helm_good,</text:p>
          </table:table-cell>
          <table:table-cell table:style-name="ce11" office:value-type="string" calcext:value-type="string">
            <text:p>itm_dol_padded_coat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dol_shoes,</text:p>
          </table:table-cell>
          <table:table-cell table:style-name="ce11" office:value-type="string" calcext:value-type="string">
            <text:p>itm_gondor_lance,itm_amroth_sword_a,itm_gondor_lance,itm_gondor_lance,</text:p>
          </table:table-cell>
          <table:table-cell table:style-name="ce11" office:value-type="string" calcext:value-type="string">
            <text:p>itm_gon_tab_shield_c,</text:p>
          </table:table-cell>
          <table:table-cell table:style-name="ce11" office:value-type="string" calcext:value-type="string">
            <text:p>itm_gondor_hunter,</text:p>
          </table:table-cell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2|knows_power_strike_2|knows_power_draw_1|knows_riding_2|knows_trainer_1|knows_tactics_2|knows_inventory_management_1|knows_wound_treatment_1|knows_prisoner_management_1|knows_leadership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B154]&lt;&gt;&quot;&quot;;[.C154]&lt;&gt;&quot;&quot;);CONCATENATE([Variables.$I$1];[Variables.$I$7];[.B154];[Variables.$I$7];[Variables.$I$6];[Variables.$I$7];[.C154];[Variables.$I$7];[Variables.$I$6];[Variables.$I$7];[.D154];[Variables.$I$7];[Variables.$I$6];[.E154];[Variables.$I$6];[.F154];[Variables.$I$6];[.G154];[Variables.$I$6];[.H154];[Variables.$I$6];[Variables.$I$1];[.I154];[.J154];[.K154];[.L154];[.M154];[.N154];[.O154];[Variables.$I$2];[Variables.$I$6];[.P154];[Variables.$I$6];[.Q154];[Variables.$I$6];[.R154];[Variables.$I$6];[.S154];[Variables.$I$6];[.T154];IF([.U154]&lt;&gt;&quot;&quot;;CONCATENATE([Variables.$I$6];[.U154]);&quot;&quot;);[Variables.$I$2];[Variables.$I$6]);IF([.B154]&lt;&gt;&quot;&quot;;CONCATENATE(&quot;#&quot;;[.B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</text:p>
          </table:table-cell>
          <table:table-cell table:number-columns-repeated="16362"/>
        </table:table-row>
        <table:table-row table:style-name="ro1">
          <table:table-cell table:style-name="ce6" table:formula="of:=IF(AND([.B155]&lt;&gt;&quot;&quot;;[.C155]&lt;&gt;&quot;&quot;);CONCATENATE([Variables.$I$1];[Variables.$I$7];[.B155];[Variables.$I$7];[Variables.$I$6];[Variables.$I$7];[.C155];[Variables.$I$7];[Variables.$I$6];[Variables.$I$7];[.D155];[Variables.$I$7];[Variables.$I$6];[.E155];[Variables.$I$6];[.F155];[Variables.$I$6];[.G155];[Variables.$I$6];[.H155];[Variables.$I$6];[Variables.$I$1];[.I155];[.J155];[.K155];[.L155];[.M155];[.N155];[.O155];[Variables.$I$2];[Variables.$I$6];[.P155];[Variables.$I$6];[.Q155];[Variables.$I$6];[.R155];[Variables.$I$6];[.S155];[Variables.$I$6];[.T155];IF([.U155]&lt;&gt;&quot;&quot;;CONCATENATE([Variables.$I$6];[.U155]);&quot;&quot;);[Variables.$I$2];[Variables.$I$6]);IF([.B155]&lt;&gt;&quot;&quot;;CONCATENATE(&quot;#&quot;;[.B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style-name="ce7" office:value-type="string" calcext:value-type="string">
            <text:p>c3_amroth_vet_squire</text:p>
          </table:table-cell>
          <table:table-cell table:style-name="ce7" office:value-type="string" calcext:value-type="string">
            <text:p>Veteran_Squire_of_Dol_Amroth</text:p>
          </table:table-cell>
          <table:table-cell table:style-name="ce7" office:value-type="string" calcext:value-type="string">
            <text:p>Veteran_Squire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gondor_dolamroth_helm_bad,</text:p>
          </table:table-cell>
          <table:table-cell table:style-name="ce19" office:value-type="string" calcext:value-type="string">
            <text:p>itm_dol_padded_coat,</text:p>
          </table:table-cell>
          <table:table-cell table:style-name="ce19" office:value-type="string" calcext:value-type="string">
            <text:p>itm_leather_gloves,</text:p>
          </table:table-cell>
          <table:table-cell table:style-name="ce19" office:value-type="string" calcext:value-type="string">
            <text:p>itm_dol_shoes,</text:p>
          </table:table-cell>
          <table:table-cell table:style-name="ce19" office:value-type="string" calcext:value-type="string">
            <text:p>itm_gondor_lance,itm_amroth_sword_a,itm_gondor_lance,</text:p>
          </table:table-cell>
          <table:table-cell table:style-name="ce11" office:value-type="string" calcext:value-type="string">
            <text:p>itm_gon_tab_shield_c,</text:p>
          </table:table-cell>
          <table:table-cell table:style-name="ce11" office:value-type="string" calcext:value-type="string">
            <text:p>itm_gondor_hunter,</text:p>
          </table:table-cell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riding_3|knows_shield_3|knows_power_strike_3|knows_ironflesh_3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B155]&lt;&gt;&quot;&quot;;[.C155]&lt;&gt;&quot;&quot;);CONCATENATE([Variables.$I$1];[Variables.$I$7];[.B155];[Variables.$I$7];[Variables.$I$6];[Variables.$I$7];[.C155];[Variables.$I$7];[Variables.$I$6];[Variables.$I$7];[.D155];[Variables.$I$7];[Variables.$I$6];[.E155];[Variables.$I$6];[.F155];[Variables.$I$6];[.G155];[Variables.$I$6];[.H155];[Variables.$I$6];[Variables.$I$1];[.I155];[.J155];[.K155];[.L155];[.M155];[.N155];[.O155];[Variables.$I$2];[Variables.$I$6];[.P155];[Variables.$I$6];[.Q155];[Variables.$I$6];[.R155];[Variables.$I$6];[.S155];[Variables.$I$6];[.T155];IF([.U155]&lt;&gt;&quot;&quot;;CONCATENATE([Variables.$I$6];[.U155]);&quot;&quot;);[Variables.$I$2];[Variables.$I$6]);IF([.B155]&lt;&gt;&quot;&quot;;CONCATENATE(&quot;#&quot;;[.B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16362"/>
        </table:table-row>
        <table:table-row table:style-name="ro1">
          <table:table-cell table:style-name="ce6" table:formula="of:=IF(AND([.B156]&lt;&gt;&quot;&quot;;[.C156]&lt;&gt;&quot;&quot;);CONCATENATE([Variables.$I$1];[Variables.$I$7];[.B156];[Variables.$I$7];[Variables.$I$6];[Variables.$I$7];[.C156];[Variables.$I$7];[Variables.$I$6];[Variables.$I$7];[.D156];[Variables.$I$7];[Variables.$I$6];[.E156];[Variables.$I$6];[.F156];[Variables.$I$6];[.G156];[Variables.$I$6];[.H156];[Variables.$I$6];[Variables.$I$1];[.I156];[.J156];[.K156];[.L156];[.M156];[.N156];[.O156];[Variables.$I$2];[Variables.$I$6];[.P156];[Variables.$I$6];[.Q156];[Variables.$I$6];[.R156];[Variables.$I$6];[.S156];[Variables.$I$6];[.T156];IF([.U156]&lt;&gt;&quot;&quot;;CONCATENATE([Variables.$I$6];[.U156]);&quot;&quot;);[Variables.$I$2];[Variables.$I$6]);IF([.B156]&lt;&gt;&quot;&quot;;CONCATENATE(&quot;#&quot;;[.B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style-name="ce7" office:value-type="string" calcext:value-type="string">
            <text:p>c4_amroth_knight</text:p>
          </table:table-cell>
          <table:table-cell table:style-name="ce7" office:value-type="string" calcext:value-type="string">
            <text:p>Knight_of_Dol_Amroth</text:p>
          </table:table-cell>
          <table:table-cell table:style-name="ce7" office:value-type="string" calcext:value-type="string">
            <text:p>Knights_of_Dol_Amroth</text:p>
          </table:table-cell>
          <table:table-cell table:style-name="ce8" office:value-type="string" calcext:value-type="string">
            <text:p>tf_gondor| tf_mounted| tfg_gloves| tfg_shield| tfg_armor| tfg_helm| tfg_horse| tfg_boots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gondor_dolamroth_helm,</text:p>
          </table:table-cell>
          <table:table-cell table:style-name="ce11" office:value-type="string" calcext:value-type="string">
            <text:p>itm_dol_hauberk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dol_greaves,</text:p>
          </table:table-cell>
          <table:table-cell table:style-name="ce19" office:value-type="string" calcext:value-type="string">
            <text:p>itm_gondor_lance,itm_gondor_lance,itm_amroth_sword_b,itm_gondor_lance,itm_gondor_lance,</text:p>
          </table:table-cell>
          <table:table-cell table:style-name="ce11" office:value-type="string" calcext:value-type="string">
            <text:p>itm_gon_tab_shield_c,</text:p>
          </table:table-cell>
          <table:table-cell table:style-name="ce11" office:value-type="string" calcext:value-type="string">
            <text:p>itm_dol_amroth_warhorse,</text:p>
          </table:table-cell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riding_4|knows_shield_4|knows_power_strike_4|knows_ironflesh_4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B156]&lt;&gt;&quot;&quot;;[.C156]&lt;&gt;&quot;&quot;);CONCATENATE([Variables.$I$1];[Variables.$I$7];[.B156];[Variables.$I$7];[Variables.$I$6];[Variables.$I$7];[.C156];[Variables.$I$7];[Variables.$I$6];[Variables.$I$7];[.D156];[Variables.$I$7];[Variables.$I$6];[.E156];[Variables.$I$6];[.F156];[Variables.$I$6];[.G156];[Variables.$I$6];[.H156];[Variables.$I$6];[Variables.$I$1];[.I156];[.J156];[.K156];[.L156];[.M156];[.N156];[.O156];[Variables.$I$2];[Variables.$I$6];[.P156];[Variables.$I$6];[.Q156];[Variables.$I$6];[.R156];[Variables.$I$6];[.S156];[Variables.$I$6];[.T156];IF([.U156]&lt;&gt;&quot;&quot;;CONCATENATE([Variables.$I$6];[.U156]);&quot;&quot;);[Variables.$I$2];[Variables.$I$6]);IF([.B156]&lt;&gt;&quot;&quot;;CONCATENATE(&quot;#&quot;;[.B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16362"/>
        </table:table-row>
        <table:table-row table:style-name="ro1">
          <table:table-cell table:style-name="ce6" table:formula="of:=IF(AND([.B157]&lt;&gt;&quot;&quot;;[.C157]&lt;&gt;&quot;&quot;);CONCATENATE([Variables.$I$1];[Variables.$I$7];[.B157];[Variables.$I$7];[Variables.$I$6];[Variables.$I$7];[.C157];[Variables.$I$7];[Variables.$I$6];[Variables.$I$7];[.D157];[Variables.$I$7];[Variables.$I$6];[.E157];[Variables.$I$6];[.F157];[Variables.$I$6];[.G157];[Variables.$I$6];[.H157];[Variables.$I$6];[Variables.$I$1];[.I157];[.J157];[.K157];[.L157];[.M157];[.N157];[.O157];[Variables.$I$2];[Variables.$I$6];[.P157];[Variables.$I$6];[.Q157];[Variables.$I$6];[.R157];[Variables.$I$6];[.S157];[Variables.$I$6];[.T157];IF([.U157]&lt;&gt;&quot;&quot;;CONCATENATE([Variables.$I$6];[.U157]);&quot;&quot;);[Variables.$I$2];[Variables.$I$6]);IF([.B157]&lt;&gt;&quot;&quot;;CONCATENATE(&quot;#&quot;;[.B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style-name="ce7" office:value-type="string" calcext:value-type="string">
            <text:p>c5_amroth_vet_knight</text:p>
          </table:table-cell>
          <table:table-cell table:style-name="ce7" office:value-type="string" calcext:value-type="string">
            <text:p>Veteran_Knight_of_Dol_Amroth</text:p>
          </table:table-cell>
          <table:table-cell table:style-name="ce7" office:value-type="string" calcext:value-type="string">
            <text:p>Veter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gondor_dolamroth_helm_good,</text:p>
          </table:table-cell>
          <table:table-cell table:style-name="ce11" office:value-type="string" calcext:value-type="string">
            <text:p>itm_dol_heavy_mail,itm_dol_heavy_mail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dol_greaves,</text:p>
          </table:table-cell>
          <table:table-cell table:style-name="ce11" office:value-type="string" calcext:value-type="string">
            <text:p>itm_gondor_lance,itm_gondor_lance,itm_amroth_sword_b,itm_gondor_lance,itm_gondor_lance,</text:p>
          </table:table-cell>
          <table:table-cell table:style-name="ce11" office:value-type="string" calcext:value-type="string">
            <text:p>itm_gon_tab_shield_c,</text:p>
          </table:table-cell>
          <table:table-cell table:style-name="ce11" office:value-type="string" calcext:value-type="string">
            <text:p>itm_dol_amroth_warhorse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riding_5|knows_shield_4|knows_power_strike_5|knows_ironflesh_5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B157]&lt;&gt;&quot;&quot;;[.C157]&lt;&gt;&quot;&quot;);CONCATENATE([Variables.$I$1];[Variables.$I$7];[.B157];[Variables.$I$7];[Variables.$I$6];[Variables.$I$7];[.C157];[Variables.$I$7];[Variables.$I$6];[Variables.$I$7];[.D157];[Variables.$I$7];[Variables.$I$6];[.E157];[Variables.$I$6];[.F157];[Variables.$I$6];[.G157];[Variables.$I$6];[.H157];[Variables.$I$6];[Variables.$I$1];[.I157];[.J157];[.K157];[.L157];[.M157];[.N157];[.O157];[Variables.$I$2];[Variables.$I$6];[.P157];[Variables.$I$6];[.Q157];[Variables.$I$6];[.R157];[Variables.$I$6];[.S157];[Variables.$I$6];[.T157];IF([.U157]&lt;&gt;&quot;&quot;;CONCATENATE([Variables.$I$6];[.U157]);&quot;&quot;);[Variables.$I$2];[Variables.$I$6]);IF([.B157]&lt;&gt;&quot;&quot;;CONCATENATE(&quot;#&quot;;[.B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16362"/>
        </table:table-row>
        <table:table-row table:style-name="ro1">
          <table:table-cell table:style-name="ce6" table:formula="of:=IF(AND([.B158]&lt;&gt;&quot;&quot;;[.C158]&lt;&gt;&quot;&quot;);CONCATENATE([Variables.$I$1];[Variables.$I$7];[.B158];[Variables.$I$7];[Variables.$I$6];[Variables.$I$7];[.C158];[Variables.$I$7];[Variables.$I$6];[Variables.$I$7];[.D158];[Variables.$I$7];[Variables.$I$6];[.E158];[Variables.$I$6];[.F158];[Variables.$I$6];[.G158];[Variables.$I$6];[.H158];[Variables.$I$6];[Variables.$I$1];[.I158];[.J158];[.K158];[.L158];[.M158];[.N158];[.O158];[Variables.$I$2];[Variables.$I$6];[.P158];[Variables.$I$6];[.Q158];[Variables.$I$6];[.R158];[Variables.$I$6];[.S158];[Variables.$I$6];[.T158];IF([.U158]&lt;&gt;&quot;&quot;;CONCATENATE([Variables.$I$6];[.U158]);&quot;&quot;);[Variables.$I$2];[Variables.$I$6]);IF([.B158]&lt;&gt;&quot;&quot;;CONCATENATE(&quot;#&quot;;[.B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style-name="ce7" office:value-type="string" calcext:value-type="string">
            <text:p>c6_amroth_swan_knight</text:p>
          </table:table-cell>
          <table:table-cell table:style-name="ce7" office:value-type="string" calcext:value-type="string">
            <text:p>Swan_Knight_of_Dol_Amroth</text:p>
          </table:table-cell>
          <table:table-cell table:style-name="ce7" office:value-type="string" calcext:value-type="string">
            <text:p>Sw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swan_knight_helm,</text:p>
          </table:table-cell>
          <table:table-cell table:style-name="ce11" office:value-type="string" calcext:value-type="string">
            <text:p>itm_dol_very_heavy_mail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ol_greaves,</text:p>
          </table:table-cell>
          <table:table-cell table:style-name="ce19" office:value-type="string" calcext:value-type="string">
            <text:p>itm_amroth_lance_banner,itm_amroth_sword_b,</text:p>
          </table:table-cell>
          <table:table-cell table:style-name="ce19" office:value-type="string" calcext:value-type="string">
            <text:p>itm_gon_tab_shield_c,</text:p>
          </table:table-cell>
          <table:table-cell table:style-name="ce11" office:value-type="string" calcext:value-type="string">
            <text:p>itm_dol_amroth_warhorse2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(360)</text:p>
          </table:table-cell>
          <table:table-cell table:style-name="ce12" office:value-type="string" calcext:value-type="string">
            <text:p>knows_common|knows_riding_8|knows_shield_4|knows_power_strike_8|knows_ironflesh_6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B158]&lt;&gt;&quot;&quot;;[.C158]&lt;&gt;&quot;&quot;);CONCATENATE([Variables.$I$1];[Variables.$I$7];[.B158];[Variables.$I$7];[Variables.$I$6];[Variables.$I$7];[.C158];[Variables.$I$7];[Variables.$I$6];[Variables.$I$7];[.D158];[Variables.$I$7];[Variables.$I$6];[.E158];[Variables.$I$6];[.F158];[Variables.$I$6];[.G158];[Variables.$I$6];[.H158];[Variables.$I$6];[Variables.$I$1];[.I158];[.J158];[.K158];[.L158];[.M158];[.N158];[.O158];[Variables.$I$2];[Variables.$I$6];[.P158];[Variables.$I$6];[.Q158];[Variables.$I$6];[.R158];[Variables.$I$6];[.S158];[Variables.$I$6];[.T158];IF([.U158]&lt;&gt;&quot;&quot;;CONCATENATE([Variables.$I$6];[.U158]);&quot;&quot;);[Variables.$I$2];[Variables.$I$6]);IF([.B158]&lt;&gt;&quot;&quot;;CONCATENATE(&quot;#&quot;;[.B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16362"/>
        </table:table-row>
        <table:table-row table:style-name="ro1">
          <table:table-cell table:style-name="ce6" table:formula="of:=IF(AND([.B159]&lt;&gt;&quot;&quot;;[.C159]&lt;&gt;&quot;&quot;);CONCATENATE([Variables.$I$1];[Variables.$I$7];[.B159];[Variables.$I$7];[Variables.$I$6];[Variables.$I$7];[.C159];[Variables.$I$7];[Variables.$I$6];[Variables.$I$7];[.D159];[Variables.$I$7];[Variables.$I$6];[.E159];[Variables.$I$6];[.F159];[Variables.$I$6];[.G159];[Variables.$I$6];[.H159];[Variables.$I$6];[Variables.$I$1];[.I159];[.J159];[.K159];[.L159];[.M159];[.N159];[.O159];[Variables.$I$2];[Variables.$I$6];[.P159];[Variables.$I$6];[.Q159];[Variables.$I$6];[.R159];[Variables.$I$6];[.S159];[Variables.$I$6];[.T159];IF([.U159]&lt;&gt;&quot;&quot;;CONCATENATE([Variables.$I$6];[.U159]);&quot;&quot;);[Variables.$I$2];[Variables.$I$6]);IF([.B159]&lt;&gt;&quot;&quot;;CONCATENATE(&quot;#&quot;;[.B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style-name="ce7" office:value-type="string" calcext:value-type="string">
            <text:p>c6_amroth_leader</text:p>
          </table:table-cell>
          <table:table-cell table:style-name="ce7" office:value-type="string" calcext:value-type="string">
            <text:p>Captain_of_Dol_Amroth</text:p>
          </table:table-cell>
          <table:table-cell table:style-name="ce7" office:value-type="string" calcext:value-type="string">
            <text:p>Captain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gondor_leader_helm,</text:p>
          </table:table-cell>
          <table:table-cell table:style-name="ce19" office:value-type="string" calcext:value-type="string">
            <text:p>itm_dol_very_heavy_mail,</text:p>
          </table:table-cell>
          <table:table-cell table:style-name="ce11" office:value-type="string" calcext:value-type="string">
            <text:p>itm_mail_mittens,</text:p>
          </table:table-cell>
          <table:table-cell table:style-name="ce19" office:value-type="string" calcext:value-type="string">
            <text:p>itm_dol_greaves,</text:p>
          </table:table-cell>
          <table:table-cell table:style-name="ce19" office:value-type="string" calcext:value-type="string">
            <text:p>itm_amroth_bastard,itm_amroth_lance_banner,</text:p>
          </table:table-cell>
          <table:table-cell table:style-name="ce11" office:value-type="string" calcext:value-type="string">
            <text:p>itm_gon_tab_shield_c,</text:p>
          </table:table-cell>
          <table:table-cell table:style-name="ce11" office:value-type="string" calcext:value-type="string">
            <text:p>itm_dol_amroth_warhorse2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8|knows_shield_9|knows_power_strike_8|knows_ironflesh_10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B159]&lt;&gt;&quot;&quot;;[.C159]&lt;&gt;&quot;&quot;);CONCATENATE([Variables.$I$1];[Variables.$I$7];[.B159];[Variables.$I$7];[Variables.$I$6];[Variables.$I$7];[.C159];[Variables.$I$7];[Variables.$I$6];[Variables.$I$7];[.D159];[Variables.$I$7];[Variables.$I$6];[.E159];[Variables.$I$6];[.F159];[Variables.$I$6];[.G159];[Variables.$I$6];[.H159];[Variables.$I$6];[Variables.$I$1];[.I159];[.J159];[.K159];[.L159];[.M159];[.N159];[.O159];[Variables.$I$2];[Variables.$I$6];[.P159];[Variables.$I$6];[.Q159];[Variables.$I$6];[.R159];[Variables.$I$6];[.S159];[Variables.$I$6];[.T159];IF([.U159]&lt;&gt;&quot;&quot;;CONCATENATE([Variables.$I$6];[.U159]);&quot;&quot;);[Variables.$I$2];[Variables.$I$6]);IF([.B159]&lt;&gt;&quot;&quot;;CONCATENATE(&quot;#&quot;;[.B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16362"/>
        </table:table-row>
        <table:table-row table:style-name="ro1">
          <table:table-cell table:formula="of:=IF(AND([.B160]&lt;&gt;&quot;&quot;;[.C160]&lt;&gt;&quot;&quot;);CONCATENATE([Variables.$I$1];[Variables.$I$7];[.B160];[Variables.$I$7];[Variables.$I$6];[Variables.$I$7];[.C160];[Variables.$I$7];[Variables.$I$6];[Variables.$I$7];[.D160];[Variables.$I$7];[Variables.$I$6];[.E160];[Variables.$I$6];[.F160];[Variables.$I$6];[.G160];[Variables.$I$6];[.H160];[Variables.$I$6];[Variables.$I$1];[.I160];[.J160];[.K160];[.L160];[.M160];[.N160];[.O160];[Variables.$I$2];[Variables.$I$6];[.P160];[Variables.$I$6];[.Q160];[Variables.$I$6];[.R160];[Variables.$I$6];[.S160];[Variables.$I$6];[.T160];IF([.U160]&lt;&gt;&quot;&quot;;CONCATENATE([Variables.$I$6];[.U160]);&quot;&quot;);[Variables.$I$2];[Variables.$I$6]);IF([.B160]&lt;&gt;&quot;&quot;;CONCATENATE(&quot;#&quot;;[.B160]);&quot;&quot;))">
            <text:p/>
          </table:table-cell>
          <table:table-cell table:style-name="ce6" table:number-columns-repeated="20"/>
          <table:table-cell table:style-name="ce36" table:formula="of:=IF(AND([.B160]&lt;&gt;&quot;&quot;;[.C160]&lt;&gt;&quot;&quot;);CONCATENATE([Variables.$I$1];[Variables.$I$7];[.B160];[Variables.$I$7];[Variables.$I$6];[Variables.$I$7];[.C160];[Variables.$I$7];[Variables.$I$6];[Variables.$I$7];[.D160];[Variables.$I$7];[Variables.$I$6];[.E160];[Variables.$I$6];[.F160];[Variables.$I$6];[.G160];[Variables.$I$6];[.H160];[Variables.$I$6];[Variables.$I$1];[.I160];[.J160];[.K160];[.L160];[.M160];[.N160];[.O160];[Variables.$I$2];[Variables.$I$6];[.P160];[Variables.$I$6];[.Q160];[Variables.$I$6];[.R160];[Variables.$I$6];[.S160];[Variables.$I$6];[.T160];IF([.U160]&lt;&gt;&quot;&quot;;CONCATENATE([Variables.$I$6];[.U160]);&quot;&quot;);[Variables.$I$2];[Variables.$I$6]);IF([.B160]&lt;&gt;&quot;&quot;;CONCATENATE(&quot;#&quot;;[.B160]);&quot;&quot;))">
            <text:p/>
          </table:table-cell>
          <table:table-cell table:number-columns-repeated="16362"/>
        </table:table-row>
        <table:table-row table:style-name="ro1">
          <table:table-cell table:style-name="ce6" table:formula="of:=IF(AND([.B161]&lt;&gt;&quot;&quot;;[.C161]&lt;&gt;&quot;&quot;);CONCATENATE([Variables.$I$1];[Variables.$I$7];[.B161];[Variables.$I$7];[Variables.$I$6];[Variables.$I$7];[.C161];[Variables.$I$7];[Variables.$I$6];[Variables.$I$7];[.D161];[Variables.$I$7];[Variables.$I$6];[.E161];[Variables.$I$6];[.F161];[Variables.$I$6];[.G161];[Variables.$I$6];[.H161];[Variables.$I$6];[Variables.$I$1];[.I161];[.J161];[.K161];[.L161];[.M161];[.N161];[.O161];[Variables.$I$2];[Variables.$I$6];[.P161];[Variables.$I$6];[.Q161];[Variables.$I$6];[.R161];[Variables.$I$6];[.S161];[Variables.$I$6];[.T161];IF([.U161]&lt;&gt;&quot;&quot;;CONCATENATE([Variables.$I$6];[.U161]);&quot;&quot;);[Variables.$I$2];[Variables.$I$6]);IF([.B161]&lt;&gt;&quot;&quot;;CONCATENATE(&quot;#&quot;;[.B161]);&quot;&quot;))" office:value-type="string" office:string-value="#Lothlorien #Lorien" calcext:value-type="string">
            <text:p>#Lothlorien #Lorien</text:p>
          </table:table-cell>
          <table:table-cell table:style-name="ce5" office:value-type="string" calcext:value-type="string">
            <text:p>Lothlorien #Lorien</text:p>
          </table:table-cell>
          <table:table-cell table:style-name="ce6" table:number-columns-repeated="19"/>
          <table:table-cell table:style-name="ce6" table:formula="of:=IF(AND([.B161]&lt;&gt;&quot;&quot;;[.C161]&lt;&gt;&quot;&quot;);CONCATENATE([Variables.$I$1];[Variables.$I$7];[.B161];[Variables.$I$7];[Variables.$I$6];[Variables.$I$7];[.C161];[Variables.$I$7];[Variables.$I$6];[Variables.$I$7];[.D161];[Variables.$I$7];[Variables.$I$6];[.E161];[Variables.$I$6];[.F161];[Variables.$I$6];[.G161];[Variables.$I$6];[.H161];[Variables.$I$6];[Variables.$I$1];[.I161];[.J161];[.K161];[.L161];[.M161];[.N161];[.O161];[Variables.$I$2];[Variables.$I$6];[.P161];[Variables.$I$6];[.Q161];[Variables.$I$6];[.R161];[Variables.$I$6];[.S161];[Variables.$I$6];[.T161];IF([.U161]&lt;&gt;&quot;&quot;;CONCATENATE([Variables.$I$6];[.U161]);&quot;&quot;);[Variables.$I$2];[Variables.$I$6]);IF([.B161]&lt;&gt;&quot;&quot;;CONCATENATE(&quot;#&quot;;[.B161]);&quot;&quot;))" office:value-type="string" office:string-value="#Lothlorien #Lorien" calcext:value-type="string">
            <text:p>#Lothlorien #Lorien</text:p>
          </table:table-cell>
          <table:table-cell table:number-columns-repeated="16362"/>
        </table:table-row>
        <table:table-row table:style-name="ro1">
          <table:table-cell table:style-name="ce6" table:formula="of:=IF(AND([.B162]&lt;&gt;&quot;&quot;;[.C162]&lt;&gt;&quot;&quot;);CONCATENATE([Variables.$I$1];[Variables.$I$7];[.B162];[Variables.$I$7];[Variables.$I$6];[Variables.$I$7];[.C162];[Variables.$I$7];[Variables.$I$6];[Variables.$I$7];[.D162];[Variables.$I$7];[Variables.$I$6];[.E162];[Variables.$I$6];[.F162];[Variables.$I$6];[.G162];[Variables.$I$6];[.H162];[Variables.$I$6];[Variables.$I$1];[.I162];[.J162];[.K162];[.L162];[.M162];[.N162];[.O162];[Variables.$I$2];[Variables.$I$6];[.P162];[Variables.$I$6];[.Q162];[Variables.$I$6];[.R162];[Variables.$I$6];[.S162];[Variables.$I$6];[.T162];IF([.U162]&lt;&gt;&quot;&quot;;CONCATENATE([Variables.$I$6];[.U162]);&quot;&quot;);[Variables.$I$2];[Variables.$I$6]);IF([.B162]&lt;&gt;&quot;&quot;;CONCATENATE(&quot;#&quot;;[.B162]);&quot;&quot;))" office:value-type="string" office:string-value="[&quot;a1_lorien_scout&quot;,&quot;Lothlorien_Scout&quot;,&quot;Lothlorien_Scouts&quot;,tf_lorien| tfg_ranged| tfg_armor| tfg_boots| tf_no_capture_alive,0,0,fac_lorien,[itm_hood_grey,itm_lorien_archer,itm_woodelf_leather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" calcext:value-type="string">
            <text:p>["a1_lorien_scout","Lothlorien_Scout","Lothlorien_Scouts",tf_lorien| tfg_ranged| tfg_armor| tfg_boots| tf_no_capture_alive,0,0,fac_lorien,[itm_hood_grey,itm_lorien_archer,itm_woodelf_leather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</text:p>
          </table:table-cell>
          <table:table-cell table:style-name="ce7" office:value-type="string" calcext:value-type="string">
            <text:p>a1_lorien_scout</text:p>
          </table:table-cell>
          <table:table-cell table:style-name="ce7" office:value-type="string" calcext:value-type="string">
            <text:p>Lothlorien_Scout</text:p>
          </table:table-cell>
          <table:table-cell table:style-name="ce7" office:value-type="string" calcext:value-type="string">
            <text:p>Lothlorien_Scouts</text:p>
          </table:table-cell>
          <table:table-cell table:style-name="ce8" office:value-type="string" calcext:value-type="string">
            <text:p>tf_lorien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lorien</text:p>
          </table:table-cell>
          <table:table-cell table:style-name="ce19" office:value-type="string" calcext:value-type="string">
            <text:p>itm_hood_grey,</text:p>
          </table:table-cell>
          <table:table-cell table:style-name="ce11" office:value-type="string" calcext:value-type="string">
            <text:p>itm_lorien_archer,</text:p>
          </table:table-cell>
          <table:table-cell table:style-name="ce11"/>
          <table:table-cell table:style-name="ce11" office:value-type="string" calcext:value-type="string">
            <text:p>itm_woodelf_leather_boots,</text:p>
          </table:table-cell>
          <table:table-cell table:style-name="ce11" office:value-type="string" calcext:value-type="string">
            <text:p>itm_short_bow,itm_elven_arrows,</text:p>
          </table:table-cell>
          <table:table-cell table:style-name="ce11" office:value-type="string" calcext:value-type="string">
            <text:p>itm_lorien_sword_b,</text:p>
          </table:table-cell>
          <table:table-cell table:style-name="ce11"/>
          <table:table-cell table:style-name="ce12" office:value-type="string" calcext:value-type="string">
            <text:p>attr_elf_tier_1</text:p>
          </table:table-cell>
          <table:table-cell table:style-name="ce12" office:value-type="string" calcext:value-type="string">
            <text:p>wp_elf_tier_1</text:p>
          </table:table-cell>
          <table:table-cell table:style-name="ce13" office:value-type="string" calcext:value-type="string">
            <text:p>knows_common|knows_power_strike_1|knows_power_draw_2|knows_weapon_master_1|knows_athletics_2|knows_tactics_1|knows_pathfinding_1|knows_spotting_1|knows_wound_treatment_1|knows_surgery_1|knows_persuasion_2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B162]&lt;&gt;&quot;&quot;;[.C162]&lt;&gt;&quot;&quot;);CONCATENATE([Variables.$I$1];[Variables.$I$7];[.B162];[Variables.$I$7];[Variables.$I$6];[Variables.$I$7];[.C162];[Variables.$I$7];[Variables.$I$6];[Variables.$I$7];[.D162];[Variables.$I$7];[Variables.$I$6];[.E162];[Variables.$I$6];[.F162];[Variables.$I$6];[.G162];[Variables.$I$6];[.H162];[Variables.$I$6];[Variables.$I$1];[.I162];[.J162];[.K162];[.L162];[.M162];[.N162];[.O162];[Variables.$I$2];[Variables.$I$6];[.P162];[Variables.$I$6];[.Q162];[Variables.$I$6];[.R162];[Variables.$I$6];[.S162];[Variables.$I$6];[.T162];IF([.U162]&lt;&gt;&quot;&quot;;CONCATENATE([Variables.$I$6];[.U162]);&quot;&quot;);[Variables.$I$2];[Variables.$I$6]);IF([.B162]&lt;&gt;&quot;&quot;;CONCATENATE(&quot;#&quot;;[.B162]);&quot;&quot;))" office:value-type="string" office:string-value="[&quot;a1_lorien_scout&quot;,&quot;Lothlorien_Scout&quot;,&quot;Lothlorien_Scouts&quot;,tf_lorien| tfg_ranged| tfg_armor| tfg_boots| tf_no_capture_alive,0,0,fac_lorien,[itm_hood_grey,itm_lorien_archer,itm_woodelf_leather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" calcext:value-type="string">
            <text:p>["a1_lorien_scout","Lothlorien_Scout","Lothlorien_Scouts",tf_lorien| tfg_ranged| tfg_armor| tfg_boots| tf_no_capture_alive,0,0,fac_lorien,[itm_hood_grey,itm_lorien_archer,itm_woodelf_leather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</text:p>
          </table:table-cell>
          <table:table-cell table:number-columns-repeated="16362"/>
        </table:table-row>
        <table:table-row table:style-name="ro1">
          <table:table-cell table:style-name="ce6" table:formula="of:=IF(AND([.B163]&lt;&gt;&quot;&quot;;[.C163]&lt;&gt;&quot;&quot;);CONCATENATE([Variables.$I$1];[Variables.$I$7];[.B163];[Variables.$I$7];[Variables.$I$6];[Variables.$I$7];[.C163];[Variables.$I$7];[Variables.$I$6];[Variables.$I$7];[.D163];[Variables.$I$7];[Variables.$I$6];[.E163];[Variables.$I$6];[.F163];[Variables.$I$6];[.G163];[Variables.$I$6];[.H163];[Variables.$I$6];[Variables.$I$1];[.I163];[.J163];[.K163];[.L163];[.M163];[.N163];[.O163];[Variables.$I$2];[Variables.$I$6];[.P163];[Variables.$I$6];[.Q163];[Variables.$I$6];[.R163];[Variables.$I$6];[.S163];[Variables.$I$6];[.T163];IF([.U163]&lt;&gt;&quot;&quot;;CONCATENATE([Variables.$I$6];[.U163]);&quot;&quot;);[Variables.$I$2];[Variables.$I$6]);IF([.B163]&lt;&gt;&quot;&quot;;CONCATENATE(&quot;#&quot;;[.B163]);&quot;&quot;))" office:value-type="string" office:string-value="[&quot;a2_lorien_warden&quot;,&quot;Lothlorien_Warden&quot;,&quot;Lothlorien_Wardens&quot;,tf_lorien| tf_mounted| tfg_ranged| tfg_armor| tfg_boots| tf_no_capture_alive,0,0,fac_lorien,[itm_lorien_helm_a,itm_hood_grey,itm_lorien_archer_cloak,itm_woodelf_leather_boots,itm_lorien_boots,itm_regular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" calcext:value-type="string">
            <text:p>["a2_lorien_warden","Lothlorien_Warden","Lothlorien_Wardens",tf_lorien| tf_mounted| tfg_ranged| tfg_armor| tfg_boots| tf_no_capture_alive,0,0,fac_lorien,[itm_lorien_helm_a,itm_hood_grey,itm_lorien_archer_cloak,itm_woodelf_leather_boots,itm_lorien_boots,itm_regular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</text:p>
          </table:table-cell>
          <table:table-cell table:style-name="ce7" office:value-type="string" calcext:value-type="string">
            <text:p>a2_lorien_warden</text:p>
          </table:table-cell>
          <table:table-cell table:style-name="ce7" office:value-type="string" calcext:value-type="string">
            <text:p>Lothlorien_Warden</text:p>
          </table:table-cell>
          <table:table-cell table:style-name="ce7" office:value-type="string" calcext:value-type="string">
            <text:p>Lothlorien_Wardens</text:p>
          </table:table-cell>
          <table:table-cell table:style-name="ce8" office:value-type="string" calcext:value-type="string">
            <text:p>tf_lorien| tf_mounted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lorien</text:p>
          </table:table-cell>
          <table:table-cell table:style-name="ce19" office:value-type="string" calcext:value-type="string">
            <text:p>itm_lorien_helm_a,itm_hood_grey,</text:p>
          </table:table-cell>
          <table:table-cell table:style-name="ce11" office:value-type="string" calcext:value-type="string">
            <text:p>itm_lorien_archer_cloak,</text:p>
          </table:table-cell>
          <table:table-cell table:style-name="ce19"/>
          <table:table-cell table:style-name="ce26" office:value-type="string" calcext:value-type="string">
            <text:p>itm_woodelf_leather_boots,itm_lorien_boots,</text:p>
          </table:table-cell>
          <table:table-cell table:style-name="ce19" office:value-type="string" calcext:value-type="string">
            <text:p>itm_regular_bow,itm_elven_arrows,</text:p>
          </table:table-cell>
          <table:table-cell table:style-name="ce19" office:value-type="string" calcext:value-type="string">
            <text:p>itm_lorien_sword_b,itm_lorien_round_shield,</text:p>
          </table:table-cell>
          <table:table-cell table:style-name="ce11"/>
          <table:table-cell table:style-name="ce12" office:value-type="string" calcext:value-type="string">
            <text:p>attr_elf_tier_2</text:p>
          </table:table-cell>
          <table:table-cell table:style-name="ce12" office:value-type="string" calcext:value-type="string">
            <text:p>wp_elf_tier_2</text:p>
          </table:table-cell>
          <table:table-cell table:style-name="ce13" office:value-type="string" calcext:value-type="string">
            <text:p>knows_common|knows_ironflesh_1|knows_power_strike_2|knows_power_draw_2|knows_weapon_master_1|knows_shield_1|knows_athletics_3|knows_tactics_1|knows_pathfinding_1|knows_spotting_1|knows_wound_treatment_1|knows_surgery_1|knows_persuasion_2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B163]&lt;&gt;&quot;&quot;;[.C163]&lt;&gt;&quot;&quot;);CONCATENATE([Variables.$I$1];[Variables.$I$7];[.B163];[Variables.$I$7];[Variables.$I$6];[Variables.$I$7];[.C163];[Variables.$I$7];[Variables.$I$6];[Variables.$I$7];[.D163];[Variables.$I$7];[Variables.$I$6];[.E163];[Variables.$I$6];[.F163];[Variables.$I$6];[.G163];[Variables.$I$6];[.H163];[Variables.$I$6];[Variables.$I$1];[.I163];[.J163];[.K163];[.L163];[.M163];[.N163];[.O163];[Variables.$I$2];[Variables.$I$6];[.P163];[Variables.$I$6];[.Q163];[Variables.$I$6];[.R163];[Variables.$I$6];[.S163];[Variables.$I$6];[.T163];IF([.U163]&lt;&gt;&quot;&quot;;CONCATENATE([Variables.$I$6];[.U163]);&quot;&quot;);[Variables.$I$2];[Variables.$I$6]);IF([.B163]&lt;&gt;&quot;&quot;;CONCATENATE(&quot;#&quot;;[.B163]);&quot;&quot;))" office:value-type="string" office:string-value="[&quot;a2_lorien_warden&quot;,&quot;Lothlorien_Warden&quot;,&quot;Lothlorien_Wardens&quot;,tf_lorien| tf_mounted| tfg_ranged| tfg_armor| tfg_boots| tf_no_capture_alive,0,0,fac_lorien,[itm_lorien_helm_a,itm_hood_grey,itm_lorien_archer_cloak,itm_woodelf_leather_boots,itm_lorien_boots,itm_regular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" calcext:value-type="string">
            <text:p>["a2_lorien_warden","Lothlorien_Warden","Lothlorien_Wardens",tf_lorien| tf_mounted| tfg_ranged| tfg_armor| tfg_boots| tf_no_capture_alive,0,0,fac_lorien,[itm_lorien_helm_a,itm_hood_grey,itm_lorien_archer_cloak,itm_woodelf_leather_boots,itm_lorien_boots,itm_regular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</text:p>
          </table:table-cell>
          <table:table-cell table:number-columns-repeated="16362"/>
        </table:table-row>
        <table:table-row table:style-name="ro1">
          <table:table-cell table:style-name="ce6" table:formula="of:=IF(AND([.B164]&lt;&gt;&quot;&quot;;[.C164]&lt;&gt;&quot;&quot;);CONCATENATE([Variables.$I$1];[Variables.$I$7];[.B164];[Variables.$I$7];[Variables.$I$6];[Variables.$I$7];[.C164];[Variables.$I$7];[Variables.$I$6];[Variables.$I$7];[.D164];[Variables.$I$7];[Variables.$I$6];[.E164];[Variables.$I$6];[.F164];[Variables.$I$6];[.G164];[Variables.$I$6];[.H164];[Variables.$I$6];[Variables.$I$1];[.I164];[.J164];[.K164];[.L164];[.M164];[.N164];[.O164];[Variables.$I$2];[Variables.$I$6];[.P164];[Variables.$I$6];[.Q164];[Variables.$I$6];[.R164];[Variables.$I$6];[.S164];[Variables.$I$6];[.T164];IF([.U164]&lt;&gt;&quot;&quot;;CONCATENATE([Variables.$I$6];[.U164]);&quot;&quot;);[Variables.$I$2];[Variables.$I$6]);IF([.B164]&lt;&gt;&quot;&quot;;CONCATENATE(&quot;#&quot;;[.B164]);&quot;&quot;))" office:value-type="string" office:string-value="[&quot;a3_lorien_vet_warden&quot;,&quot;Lothlorien_Veteran_Warden&quot;,&quot;Lothlorien_Veteran_Wardens&quot;,tf_lorien| tf_mounted| tfg_ranged| tfg_shield| tfg_armor| tfg_helm| tfg_boots| tf_no_capture_alive,0,0,fac_lorien,[itm_lorien_helm_a,itm_lorien_archer_good_cloak,itm_woodelf_leather_boots,itm_lorien_boots,itm_elven_bow,itm_elven_arrows,itm_lorien_sword_b,itm_lorien_round_shield,],attr_elf_tier_3,wp_elf_tier_3,knows_common|knows_athletics_6|knows_shield_3|knows_power_draw_4|knows_power_strike_3|knows_ironflesh_2,lorien_elf_face_1,lorien_elf_face_2]," calcext:value-type="string">
            <text:p>["a3_lorien_vet_warden","Lothlorien_Veteran_Warden","Lothlorien_Veteran_Wardens",tf_lorien| tf_mounted| tfg_ranged| tfg_shield| tfg_armor| tfg_helm| tfg_boots| tf_no_capture_alive,0,0,fac_lorien,[itm_lorien_helm_a,itm_lorien_archer_good_cloak,itm_woodelf_leather_boots,itm_lorien_boots,itm_elven_bow,itm_elven_arrows,itm_lorien_sword_b,itm_lorien_round_shield,],attr_elf_tier_3,wp_elf_tier_3,knows_common|knows_athletics_6|knows_shield_3|knows_power_draw_4|knows_power_strike_3|knows_ironflesh_2,lorien_elf_face_1,lorien_elf_face_2],</text:p>
          </table:table-cell>
          <table:table-cell table:style-name="ce7" office:value-type="string" calcext:value-type="string">
            <text:p>a3_lorien_vet_warden</text:p>
          </table:table-cell>
          <table:table-cell table:style-name="ce7" office:value-type="string" calcext:value-type="string">
            <text:p>Lothlorien_Veteran_Warden</text:p>
          </table:table-cell>
          <table:table-cell table:style-name="ce7" office:value-type="string" calcext:value-type="string">
            <text:p>Lothlorien_Veteran_Wardens</text:p>
          </table:table-cell>
          <table:table-cell table:style-name="ce8" office:value-type="string" calcext:value-type="string">
            <text:p>tf_lorien| tf_mounted| tfg_rang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lorien</text:p>
          </table:table-cell>
          <table:table-cell table:style-name="ce19" office:value-type="string" calcext:value-type="string">
            <text:p>itm_lorien_helm_a,</text:p>
          </table:table-cell>
          <table:table-cell table:style-name="ce11" office:value-type="string" calcext:value-type="string">
            <text:p>itm_lorien_archer_good_cloak,</text:p>
          </table:table-cell>
          <table:table-cell table:style-name="ce11"/>
          <table:table-cell table:style-name="ce26" office:value-type="string" calcext:value-type="string">
            <text:p>itm_woodelf_leather_boots,itm_lorien_boots,</text:p>
          </table:table-cell>
          <table:table-cell table:style-name="ce19" office:value-type="string" calcext:value-type="string">
            <text:p>itm_elven_bow,itm_elven_arrows,</text:p>
          </table:table-cell>
          <table:table-cell table:style-name="ce19" office:value-type="string" calcext:value-type="string">
            <text:p>itm_lorien_sword_b,itm_lorien_round_shield,</text:p>
          </table:table-cell>
          <table:table-cell table:style-name="ce11"/>
          <table:table-cell table:style-name="ce12" office:value-type="string" calcext:value-type="string">
            <text:p>attr_elf_tier_3</text:p>
          </table:table-cell>
          <table:table-cell table:style-name="ce12" office:value-type="string" calcext:value-type="string">
            <text:p>wp_elf_tier_3</text:p>
          </table:table-cell>
          <table:table-cell table:style-name="ce12" office:value-type="string" calcext:value-type="string">
            <text:p>knows_common|knows_athletics_6|knows_shield_3|knows_power_draw_4|knows_power_strike_3|knows_ironflesh_2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B164]&lt;&gt;&quot;&quot;;[.C164]&lt;&gt;&quot;&quot;);CONCATENATE([Variables.$I$1];[Variables.$I$7];[.B164];[Variables.$I$7];[Variables.$I$6];[Variables.$I$7];[.C164];[Variables.$I$7];[Variables.$I$6];[Variables.$I$7];[.D164];[Variables.$I$7];[Variables.$I$6];[.E164];[Variables.$I$6];[.F164];[Variables.$I$6];[.G164];[Variables.$I$6];[.H164];[Variables.$I$6];[Variables.$I$1];[.I164];[.J164];[.K164];[.L164];[.M164];[.N164];[.O164];[Variables.$I$2];[Variables.$I$6];[.P164];[Variables.$I$6];[.Q164];[Variables.$I$6];[.R164];[Variables.$I$6];[.S164];[Variables.$I$6];[.T164];IF([.U164]&lt;&gt;&quot;&quot;;CONCATENATE([Variables.$I$6];[.U164]);&quot;&quot;);[Variables.$I$2];[Variables.$I$6]);IF([.B164]&lt;&gt;&quot;&quot;;CONCATENATE(&quot;#&quot;;[.B164]);&quot;&quot;))" office:value-type="string" office:string-value="[&quot;a3_lorien_vet_warden&quot;,&quot;Lothlorien_Veteran_Warden&quot;,&quot;Lothlorien_Veteran_Wardens&quot;,tf_lorien| tf_mounted| tfg_ranged| tfg_shield| tfg_armor| tfg_helm| tfg_boots| tf_no_capture_alive,0,0,fac_lorien,[itm_lorien_helm_a,itm_lorien_archer_good_cloak,itm_woodelf_leather_boots,itm_lorien_boots,itm_elven_bow,itm_elven_arrows,itm_lorien_sword_b,itm_lorien_round_shield,],attr_elf_tier_3,wp_elf_tier_3,knows_common|knows_athletics_6|knows_shield_3|knows_power_draw_4|knows_power_strike_3|knows_ironflesh_2,lorien_elf_face_1,lorien_elf_face_2]," calcext:value-type="string">
            <text:p>["a3_lorien_vet_warden","Lothlorien_Veteran_Warden","Lothlorien_Veteran_Wardens",tf_lorien| tf_mounted| tfg_ranged| tfg_shield| tfg_armor| tfg_helm| tfg_boots| tf_no_capture_alive,0,0,fac_lorien,[itm_lorien_helm_a,itm_lorien_archer_good_cloak,itm_woodelf_leather_boots,itm_lorien_boots,itm_elven_bow,itm_elven_arrows,itm_lorien_sword_b,itm_lorien_round_shield,],attr_elf_tier_3,wp_elf_tier_3,knows_common|knows_athletics_6|knows_shield_3|knows_power_draw_4|knows_power_strike_3|knows_ironflesh_2,lorien_elf_face_1,lorien_elf_face_2],</text:p>
          </table:table-cell>
          <table:table-cell table:number-columns-repeated="16362"/>
        </table:table-row>
        <table:table-row table:style-name="ro1">
          <table:table-cell table:style-name="ce6" table:formula="of:=IF(AND([.B165]&lt;&gt;&quot;&quot;;[.C165]&lt;&gt;&quot;&quot;);CONCATENATE([Variables.$I$1];[Variables.$I$7];[.B165];[Variables.$I$7];[Variables.$I$6];[Variables.$I$7];[.C165];[Variables.$I$7];[Variables.$I$6];[Variables.$I$7];[.D165];[Variables.$I$7];[Variables.$I$6];[.E165];[Variables.$I$6];[.F165];[Variables.$I$6];[.G165];[Variables.$I$6];[.H165];[Variables.$I$6];[Variables.$I$1];[.I165];[.J165];[.K165];[.L165];[.M165];[.N165];[.O165];[Variables.$I$2];[Variables.$I$6];[.P165];[Variables.$I$6];[.Q165];[Variables.$I$6];[.R165];[Variables.$I$6];[.S165];[Variables.$I$6];[.T165];IF([.U165]&lt;&gt;&quot;&quot;;CONCATENATE([Variables.$I$6];[.U165]);&quot;&quot;);[Variables.$I$2];[Variables.$I$6]);IF([.B165]&lt;&gt;&quot;&quot;;CONCATENATE(&quot;#&quot;;[.B165]);&quot;&quot;))" office:value-type="string" office:string-value="[&quot;a4_lorien_gal_warden&quot;,&quot;Galadhrim_Warden&quot;,&quot;Galadhrim_Wardens&quot;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" calcext:value-type="string">
            <text:p>["a4_lorien_gal_warden","Galadhrim_Warden","Galadhrim_Wardens"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</text:p>
          </table:table-cell>
          <table:table-cell table:style-name="ce7" office:value-type="string" calcext:value-type="string">
            <text:p>a4_lorien_gal_warden</text:p>
          </table:table-cell>
          <table:table-cell table:style-name="ce7" office:value-type="string" calcext:value-type="string">
            <text:p>Galadhrim_Warden</text:p>
          </table:table-cell>
          <table:table-cell table:style-name="ce7" office:value-type="string" calcext:value-type="string">
            <text:p>Galadhrim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lorien</text:p>
          </table:table-cell>
          <table:table-cell table:style-name="ce11" office:value-type="string" calcext:value-type="string">
            <text:p>itm_lorien_helm_a_good,</text:p>
          </table:table-cell>
          <table:table-cell table:style-name="ce11" office:value-type="string" calcext:value-type="string">
            <text:p>itm_lorien_light_cloak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lorien_boots,</text:p>
          </table:table-cell>
          <table:table-cell table:style-name="ce19" office:value-type="string" calcext:value-type="string">
            <text:p>itm_elven_bow,itm_elven_arrows,</text:p>
          </table:table-cell>
          <table:table-cell table:style-name="ce11" office:value-type="string" calcext:value-type="string">
            <text:p>itm_lorien_sword_a,itm_lorien_shield_c,</text:p>
          </table:table-cell>
          <table:table-cell table:style-name="ce11"/>
          <table:table-cell table:style-name="ce12" office:value-type="string" calcext:value-type="string">
            <text:p>attr_elf_tier_4</text:p>
          </table:table-cell>
          <table:table-cell table:style-name="ce12" office:value-type="string" calcext:value-type="string">
            <text:p>wp_elf_tier_4</text:p>
          </table:table-cell>
          <table:table-cell table:style-name="ce12" office:value-type="string" calcext:value-type="string">
            <text:p>knows_common|knows_athletics_7|knows_shield_4|knows_power_draw_4|knows_power_strike_3|knows_ironflesh_3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B165]&lt;&gt;&quot;&quot;;[.C165]&lt;&gt;&quot;&quot;);CONCATENATE([Variables.$I$1];[Variables.$I$7];[.B165];[Variables.$I$7];[Variables.$I$6];[Variables.$I$7];[.C165];[Variables.$I$7];[Variables.$I$6];[Variables.$I$7];[.D165];[Variables.$I$7];[Variables.$I$6];[.E165];[Variables.$I$6];[.F165];[Variables.$I$6];[.G165];[Variables.$I$6];[.H165];[Variables.$I$6];[Variables.$I$1];[.I165];[.J165];[.K165];[.L165];[.M165];[.N165];[.O165];[Variables.$I$2];[Variables.$I$6];[.P165];[Variables.$I$6];[.Q165];[Variables.$I$6];[.R165];[Variables.$I$6];[.S165];[Variables.$I$6];[.T165];IF([.U165]&lt;&gt;&quot;&quot;;CONCATENATE([Variables.$I$6];[.U165]);&quot;&quot;);[Variables.$I$2];[Variables.$I$6]);IF([.B165]&lt;&gt;&quot;&quot;;CONCATENATE(&quot;#&quot;;[.B165]);&quot;&quot;))" office:value-type="string" office:string-value="[&quot;a4_lorien_gal_warden&quot;,&quot;Galadhrim_Warden&quot;,&quot;Galadhrim_Wardens&quot;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" calcext:value-type="string">
            <text:p>["a4_lorien_gal_warden","Galadhrim_Warden","Galadhrim_Wardens"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</text:p>
          </table:table-cell>
          <table:table-cell table:number-columns-repeated="16362"/>
        </table:table-row>
        <table:table-row table:style-name="ro1">
          <table:table-cell table:style-name="ce6" table:formula="of:=IF(AND([.B166]&lt;&gt;&quot;&quot;;[.C166]&lt;&gt;&quot;&quot;);CONCATENATE([Variables.$I$1];[Variables.$I$7];[.B166];[Variables.$I$7];[Variables.$I$6];[Variables.$I$7];[.C166];[Variables.$I$7];[Variables.$I$6];[Variables.$I$7];[.D166];[Variables.$I$7];[Variables.$I$6];[.E166];[Variables.$I$6];[.F166];[Variables.$I$6];[.G166];[Variables.$I$6];[.H166];[Variables.$I$6];[Variables.$I$1];[.I166];[.J166];[.K166];[.L166];[.M166];[.N166];[.O166];[Variables.$I$2];[Variables.$I$6];[.P166];[Variables.$I$6];[.Q166];[Variables.$I$6];[.R166];[Variables.$I$6];[.S166];[Variables.$I$6];[.T166];IF([.U166]&lt;&gt;&quot;&quot;;CONCATENATE([Variables.$I$6];[.U166]);&quot;&quot;);[Variables.$I$2];[Variables.$I$6]);IF([.B166]&lt;&gt;&quot;&quot;;CONCATENATE(&quot;#&quot;;[.B166]);&quot;&quot;))" office:value-type="string" office:string-value="[&quot;a5_lorien_gal_royal_warden&quot;,&quot;Galadhrim_Royal_Warden&quot;,&quot;Galadhrim_Royal_Wardens&quot;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" calcext:value-type="string">
            <text:p>["a5_lorien_gal_royal_warden","Galadhrim_Royal_Warden","Galadhrim_Royal_Wardens"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</text:p>
          </table:table-cell>
          <table:table-cell table:style-name="ce7" office:value-type="string" calcext:value-type="string">
            <text:p>a5_lorien_gal_royal_warden</text:p>
          </table:table-cell>
          <table:table-cell table:style-name="ce7" office:value-type="string" calcext:value-type="string">
            <text:p>Galadhrim_Royal_Warden</text:p>
          </table:table-cell>
          <table:table-cell table:style-name="ce7" office:value-type="string" calcext:value-type="string">
            <text:p>Galadhrim_Royal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lorien</text:p>
          </table:table-cell>
          <table:table-cell table:style-name="ce11" office:value-type="string" calcext:value-type="string">
            <text:p>itm_lorien_helm_b,</text:p>
          </table:table-cell>
          <table:table-cell table:style-name="ce19" office:value-type="string" calcext:value-type="string">
            <text:p>itm_lorien_med_cloak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lorien_boots,</text:p>
          </table:table-cell>
          <table:table-cell table:style-name="ce19" office:value-type="string" calcext:value-type="string">
            <text:p>itm_lorien_bow_reward,itm_elven_arrows,</text:p>
          </table:table-cell>
          <table:table-cell table:style-name="ce11" office:value-type="string" calcext:value-type="string">
            <text:p>itm_lorien_sword_a,itm_lorien_shield_c,</text:p>
          </table:table-cell>
          <table:table-cell table:style-name="ce11"/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5</text:p>
          </table:table-cell>
          <table:table-cell table:style-name="ce12" office:value-type="string" calcext:value-type="string">
            <text:p>knows_common|knows_athletics_8|knows_shield_5|knows_power_draw_5|knows_power_strike_4|knows_ironflesh_4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B166]&lt;&gt;&quot;&quot;;[.C166]&lt;&gt;&quot;&quot;);CONCATENATE([Variables.$I$1];[Variables.$I$7];[.B166];[Variables.$I$7];[Variables.$I$6];[Variables.$I$7];[.C166];[Variables.$I$7];[Variables.$I$6];[Variables.$I$7];[.D166];[Variables.$I$7];[Variables.$I$6];[.E166];[Variables.$I$6];[.F166];[Variables.$I$6];[.G166];[Variables.$I$6];[.H166];[Variables.$I$6];[Variables.$I$1];[.I166];[.J166];[.K166];[.L166];[.M166];[.N166];[.O166];[Variables.$I$2];[Variables.$I$6];[.P166];[Variables.$I$6];[.Q166];[Variables.$I$6];[.R166];[Variables.$I$6];[.S166];[Variables.$I$6];[.T166];IF([.U166]&lt;&gt;&quot;&quot;;CONCATENATE([Variables.$I$6];[.U166]);&quot;&quot;);[Variables.$I$2];[Variables.$I$6]);IF([.B166]&lt;&gt;&quot;&quot;;CONCATENATE(&quot;#&quot;;[.B166]);&quot;&quot;))" office:value-type="string" office:string-value="[&quot;a5_lorien_gal_royal_warden&quot;,&quot;Galadhrim_Royal_Warden&quot;,&quot;Galadhrim_Royal_Wardens&quot;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" calcext:value-type="string">
            <text:p>["a5_lorien_gal_royal_warden","Galadhrim_Royal_Warden","Galadhrim_Royal_Wardens"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</text:p>
          </table:table-cell>
          <table:table-cell table:number-columns-repeated="16362"/>
        </table:table-row>
        <table:table-row table:style-name="ro1">
          <table:table-cell table:style-name="ce6" table:formula="of:=IF(AND([.B167]&lt;&gt;&quot;&quot;;[.C167]&lt;&gt;&quot;&quot;);CONCATENATE([Variables.$I$1];[Variables.$I$7];[.B167];[Variables.$I$7];[Variables.$I$6];[Variables.$I$7];[.C167];[Variables.$I$7];[Variables.$I$6];[Variables.$I$7];[.D167];[Variables.$I$7];[Variables.$I$6];[.E167];[Variables.$I$6];[.F167];[Variables.$I$6];[.G167];[Variables.$I$6];[.H167];[Variables.$I$6];[Variables.$I$1];[.I167];[.J167];[.K167];[.L167];[.M167];[.N167];[.O167];[Variables.$I$2];[Variables.$I$6];[.P167];[Variables.$I$6];[.Q167];[Variables.$I$6];[.R167];[Variables.$I$6];[.S167];[Variables.$I$6];[.T167];IF([.U167]&lt;&gt;&quot;&quot;;CONCATENATE([Variables.$I$6];[.U167]);&quot;&quot;);[Variables.$I$2];[Variables.$I$6]);IF([.B167]&lt;&gt;&quot;&quot;;CONCATENATE(&quot;#&quot;;[.B167]);&quot;&quot;))" office:value-type="string" office:string-value="[&quot;a6_lorien_grey_warden&quot;,&quot;Grey_Warden&quot;,&quot;Grey_Wardens&quot;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" calcext:value-type="string">
            <text:p>["a6_lorien_grey_warden","Grey_Warden","Grey_Wardens"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</text:p>
          </table:table-cell>
          <table:table-cell table:style-name="ce7" office:value-type="string" calcext:value-type="string">
            <text:p>a6_lorien_grey_warden</text:p>
          </table:table-cell>
          <table:table-cell table:style-name="ce7" office:value-type="string" calcext:value-type="string">
            <text:p>Grey_Warden</text:p>
          </table:table-cell>
          <table:table-cell table:style-name="ce7" office:value-type="string" calcext:value-type="string">
            <text:p>Grey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lorien</text:p>
          </table:table-cell>
          <table:table-cell table:style-name="ce19" office:value-type="string" calcext:value-type="string">
            <text:p>itm_lorien_helm_b_good,</text:p>
          </table:table-cell>
          <table:table-cell table:style-name="ce19" office:value-type="string" calcext:value-type="string">
            <text:p>itm_lorien_heavy_good_cloak,</text:p>
          </table:table-cell>
          <table:table-cell table:style-name="ce11" office:value-type="string" calcext:value-type="string">
            <text:p>itm_leather_gloves_good,</text:p>
          </table:table-cell>
          <table:table-cell table:style-name="ce19" office:value-type="string" calcext:value-type="string">
            <text:p>itm_lorien_boots,</text:p>
          </table:table-cell>
          <table:table-cell table:style-name="ce19" office:value-type="string" calcext:value-type="string">
            <text:p>(itm_lorien_bow_reward, imod_balanced), itm_elven_arrows,</text:p>
          </table:table-cell>
          <table:table-cell table:style-name="ce11" office:value-type="string" calcext:value-type="string">
            <text:p>itm_lorien_sword_a,itm_lorien_shield_c,</text:p>
          </table:table-cell>
          <table:table-cell table:style-name="ce11"/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melee(460)|wp_archery(320)</text:p>
          </table:table-cell>
          <table:table-cell table:style-name="ce12" office:value-type="string" calcext:value-type="string">
            <text:p>knows_common|knows_athletics_9|knows_shield_5|knows_power_draw_6|knows_power_strike_5|knows_ironflesh_5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B167]&lt;&gt;&quot;&quot;;[.C167]&lt;&gt;&quot;&quot;);CONCATENATE([Variables.$I$1];[Variables.$I$7];[.B167];[Variables.$I$7];[Variables.$I$6];[Variables.$I$7];[.C167];[Variables.$I$7];[Variables.$I$6];[Variables.$I$7];[.D167];[Variables.$I$7];[Variables.$I$6];[.E167];[Variables.$I$6];[.F167];[Variables.$I$6];[.G167];[Variables.$I$6];[.H167];[Variables.$I$6];[Variables.$I$1];[.I167];[.J167];[.K167];[.L167];[.M167];[.N167];[.O167];[Variables.$I$2];[Variables.$I$6];[.P167];[Variables.$I$6];[.Q167];[Variables.$I$6];[.R167];[Variables.$I$6];[.S167];[Variables.$I$6];[.T167];IF([.U167]&lt;&gt;&quot;&quot;;CONCATENATE([Variables.$I$6];[.U167]);&quot;&quot;);[Variables.$I$2];[Variables.$I$6]);IF([.B167]&lt;&gt;&quot;&quot;;CONCATENATE(&quot;#&quot;;[.B167]);&quot;&quot;))" office:value-type="string" office:string-value="[&quot;a6_lorien_grey_warden&quot;,&quot;Grey_Warden&quot;,&quot;Grey_Wardens&quot;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" calcext:value-type="string">
            <text:p>["a6_lorien_grey_warden","Grey_Warden","Grey_Wardens"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</text:p>
          </table:table-cell>
          <table:table-cell table:number-columns-repeated="16362"/>
        </table:table-row>
        <table:table-row table:style-name="ro1">
          <table:table-cell table:style-name="ce6" table:formula="of:=IF(AND([.B168]&lt;&gt;&quot;&quot;;[.C168]&lt;&gt;&quot;&quot;);CONCATENATE([Variables.$I$1];[Variables.$I$7];[.B168];[Variables.$I$7];[Variables.$I$6];[Variables.$I$7];[.C168];[Variables.$I$7];[Variables.$I$6];[Variables.$I$7];[.D168];[Variables.$I$7];[Variables.$I$6];[.E168];[Variables.$I$6];[.F168];[Variables.$I$6];[.G168];[Variables.$I$6];[.H168];[Variables.$I$6];[Variables.$I$1];[.I168];[.J168];[.K168];[.L168];[.M168];[.N168];[.O168];[Variables.$I$2];[Variables.$I$6];[.P168];[Variables.$I$6];[.Q168];[Variables.$I$6];[.R168];[Variables.$I$6];[.S168];[Variables.$I$6];[.T168];IF([.U168]&lt;&gt;&quot;&quot;;CONCATENATE([Variables.$I$6];[.U168]);&quot;&quot;);[Variables.$I$2];[Variables.$I$6]);IF([.B168]&lt;&gt;&quot;&quot;;CONCATENATE(&quot;#&quot;;[.B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</text:p>
          </table:table-cell>
          <table:table-cell table:style-name="ce7" office:value-type="string" calcext:value-type="string">
            <text:p>galadhrim_royal_marksman</text:p>
          </table:table-cell>
          <table:table-cell table:style-name="ce7" office:value-type="string" calcext:value-type="string">
            <text:p>Galadhrim_Royal_Marksman</text:p>
          </table:table-cell>
          <table:table-cell table:style-name="ce7" office:value-type="string" calcext:value-type="string">
            <text:p>Galadhrim_Royal_Marksmen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lorien</text:p>
          </table:table-cell>
          <table:table-cell table:style-name="ce19" office:value-type="string" calcext:value-type="string">
            <text:p>itm_lorien_helm_b,</text:p>
          </table:table-cell>
          <table:table-cell table:style-name="ce19" office:value-type="string" calcext:value-type="string">
            <text:p>itm_lorien_med_cloak,</text:p>
          </table:table-cell>
          <table:table-cell table:style-name="ce19"/>
          <table:table-cell table:style-name="ce19" office:value-type="string" calcext:value-type="string">
            <text:p>itm_lorien_boots,</text:p>
          </table:table-cell>
          <table:table-cell table:style-name="ce19" office:value-type="string" calcext:value-type="string">
            <text:p>itm_lorien_bow,itm_elven_arrows,</text:p>
          </table:table-cell>
          <table:table-cell table:style-name="ce11" office:value-type="string" calcext:value-type="string">
            <text:p>itm_lorien_sword_b,itm_lorien_shield_c,</text:p>
          </table:table-cell>
          <table:table-cell table:style-name="ce11"/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elf_tier_bow_5</text:p>
          </table:table-cell>
          <table:table-cell table:style-name="ce12" office:value-type="string" calcext:value-type="string">
            <text:p>knows_common|knows_athletics_7|knows_shield_1|knows_power_draw_6|knows_power_strike_5|knows_ironflesh_6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B168]&lt;&gt;&quot;&quot;;[.C168]&lt;&gt;&quot;&quot;);CONCATENATE([Variables.$I$1];[Variables.$I$7];[.B168];[Variables.$I$7];[Variables.$I$6];[Variables.$I$7];[.C168];[Variables.$I$7];[Variables.$I$6];[Variables.$I$7];[.D168];[Variables.$I$7];[Variables.$I$6];[.E168];[Variables.$I$6];[.F168];[Variables.$I$6];[.G168];[Variables.$I$6];[.H168];[Variables.$I$6];[Variables.$I$1];[.I168];[.J168];[.K168];[.L168];[.M168];[.N168];[.O168];[Variables.$I$2];[Variables.$I$6];[.P168];[Variables.$I$6];[.Q168];[Variables.$I$6];[.R168];[Variables.$I$6];[.S168];[Variables.$I$6];[.T168];IF([.U168]&lt;&gt;&quot;&quot;;CONCATENATE([Variables.$I$6];[.U168]);&quot;&quot;);[Variables.$I$2];[Variables.$I$6]);IF([.B168]&lt;&gt;&quot;&quot;;CONCATENATE(&quot;#&quot;;[.B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</text:p>
          </table:table-cell>
          <table:table-cell table:number-columns-repeated="16362"/>
        </table:table-row>
        <table:table-row table:style-name="ro1">
          <table:table-cell table:style-name="ce6" table:formula="of:=IF(AND([.B169]&lt;&gt;&quot;&quot;;[.C169]&lt;&gt;&quot;&quot;);CONCATENATE([Variables.$I$1];[Variables.$I$7];[.B169];[Variables.$I$7];[Variables.$I$6];[Variables.$I$7];[.C169];[Variables.$I$7];[Variables.$I$6];[Variables.$I$7];[.D169];[Variables.$I$7];[Variables.$I$6];[.E169];[Variables.$I$6];[.F169];[Variables.$I$6];[.G169];[Variables.$I$6];[.H169];[Variables.$I$6];[Variables.$I$1];[.I169];[.J169];[.K169];[.L169];[.M169];[.N169];[.O169];[Variables.$I$2];[Variables.$I$6];[.P169];[Variables.$I$6];[.Q169];[Variables.$I$6];[.R169];[Variables.$I$6];[.S169];[Variables.$I$6];[.T169];IF([.U169]&lt;&gt;&quot;&quot;;CONCATENATE([Variables.$I$6];[.U169]);&quot;&quot;);[Variables.$I$2];[Variables.$I$6]);IF([.B169]&lt;&gt;&quot;&quot;;CONCATENATE(&quot;#&quot;;[.B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style-name="ce7" office:value-type="string" calcext:value-type="string">
            <text:p>noldorin_mounted_archer</text:p>
          </table:table-cell>
          <table:table-cell table:style-name="ce7" office:value-type="string" calcext:value-type="string">
            <text:p>Noldorin_Mounted_Archer</text:p>
          </table:table-cell>
          <table:table-cell table:style-name="ce7" office:value-type="string" calcext:value-type="string">
            <text:p>Noldorin_Mounted_Archers</text:p>
          </table:table-cell>
          <table:table-cell table:style-name="ce8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lorien</text:p>
          </table:table-cell>
          <table:table-cell table:style-name="ce19" office:value-type="string" calcext:value-type="string">
            <text:p>itm_lorien_helm_b,</text:p>
          </table:table-cell>
          <table:table-cell table:style-name="ce11" office:value-type="string" calcext:value-type="string">
            <text:p>itm_lorien_med_good_cloak,</text:p>
          </table:table-cell>
          <table:table-cell table:style-name="ce11"/>
          <table:table-cell table:style-name="ce11" office:value-type="string" calcext:value-type="string">
            <text:p>itm_lorien_boots,</text:p>
          </table:table-cell>
          <table:table-cell table:style-name="ce19" office:value-type="string" calcext:value-type="string">
            <text:p>itm_lorien_bow_reward,itm_elven_arrows,</text:p>
          </table:table-cell>
          <table:table-cell table:style-name="ce11" office:value-type="string" calcext:value-type="string">
            <text:p>itm_lorien_sword_a,itm_lorien_round_shield,</text:p>
          </table:table-cell>
          <table:table-cell table:style-name="ce11" office:value-type="string" calcext:value-type="string">
            <text:p>itm_lorien_warhorse,</text:p>
          </table:table-cell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elf_tier_bow_6</text:p>
          </table:table-cell>
          <table:table-cell table:style-name="ce12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B169]&lt;&gt;&quot;&quot;;[.C169]&lt;&gt;&quot;&quot;);CONCATENATE([Variables.$I$1];[Variables.$I$7];[.B169];[Variables.$I$7];[Variables.$I$6];[Variables.$I$7];[.C169];[Variables.$I$7];[Variables.$I$6];[Variables.$I$7];[.D169];[Variables.$I$7];[Variables.$I$6];[.E169];[Variables.$I$6];[.F169];[Variables.$I$6];[.G169];[Variables.$I$6];[.H169];[Variables.$I$6];[Variables.$I$1];[.I169];[.J169];[.K169];[.L169];[.M169];[.N169];[.O169];[Variables.$I$2];[Variables.$I$6];[.P169];[Variables.$I$6];[.Q169];[Variables.$I$6];[.R169];[Variables.$I$6];[.S169];[Variables.$I$6];[.T169];IF([.U169]&lt;&gt;&quot;&quot;;CONCATENATE([Variables.$I$6];[.U169]);&quot;&quot;);[Variables.$I$2];[Variables.$I$6]);IF([.B169]&lt;&gt;&quot;&quot;;CONCATENATE(&quot;#&quot;;[.B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16362"/>
        </table:table-row>
        <table:table-row table:style-name="ro1">
          <table:table-cell table:style-name="ce6" table:formula="of:=IF(AND([.B170]&lt;&gt;&quot;&quot;;[.C170]&lt;&gt;&quot;&quot;);CONCATENATE([Variables.$I$1];[Variables.$I$7];[.B170];[Variables.$I$7];[Variables.$I$6];[Variables.$I$7];[.C170];[Variables.$I$7];[Variables.$I$6];[Variables.$I$7];[.D170];[Variables.$I$7];[Variables.$I$6];[.E170];[Variables.$I$6];[.F170];[Variables.$I$6];[.G170];[Variables.$I$6];[.H170];[Variables.$I$6];[Variables.$I$1];[.I170];[.J170];[.K170];[.L170];[.M170];[.N170];[.O170];[Variables.$I$2];[Variables.$I$6];[.P170];[Variables.$I$6];[.Q170];[Variables.$I$6];[.R170];[Variables.$I$6];[.S170];[Variables.$I$6];[.T170];IF([.U170]&lt;&gt;&quot;&quot;;CONCATENATE([Variables.$I$6];[.U170]);&quot;&quot;);[Variables.$I$2];[Variables.$I$6]);IF([.B170]&lt;&gt;&quot;&quot;;CONCATENATE(&quot;#&quot;;[.B170]);&quot;&quot;))" office:value-type="string" office:string-value="[&quot;a2_lorien_archer&quot;,&quot;Lothlorien_Archer&quot;,&quot;Lothlorien_Archers&quot;,tf_lorien| tfg_ranged| tfg_armor| tfg_helm| tfg_boots| tf_no_capture_alive,0,0,fac_lorien,[itm_lorien_helm_a,itm_lorien_light,itm_leather_gloves,itm_lorien_boots,itm_woodelf_boots_good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" calcext:value-type="string">
            <text:p>["a2_lorien_archer","Lothlorien_Archer","Lothlorien_Archers",tf_lorien| tfg_ranged| tfg_armor| tfg_helm| tfg_boots| tf_no_capture_alive,0,0,fac_lorien,[itm_lorien_helm_a,itm_lorien_light,itm_leather_gloves,itm_lorien_boots,itm_woodelf_boots_good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</text:p>
          </table:table-cell>
          <table:table-cell table:style-name="ce7" office:value-type="string" calcext:value-type="string">
            <text:p>a2_lorien_archer</text:p>
          </table:table-cell>
          <table:table-cell table:style-name="ce7" office:value-type="string" calcext:value-type="string">
            <text:p>Lothlorien_Archer</text:p>
          </table:table-cell>
          <table:table-cell table:style-name="ce7" office:value-type="string" calcext:value-type="string">
            <text:p>Lothlorien_Archers</text:p>
          </table:table-cell>
          <table:table-cell table:style-name="ce8" office:value-type="string" calcext:value-type="string">
            <text:p>tf_lorien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lorien</text:p>
          </table:table-cell>
          <table:table-cell table:style-name="ce19" office:value-type="string" calcext:value-type="string">
            <text:p>itm_lorien_helm_a,</text:p>
          </table:table-cell>
          <table:table-cell table:style-name="ce11" office:value-type="string" calcext:value-type="string">
            <text:p>itm_lorien_light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lorien_boots,itm_woodelf_boots_good,</text:p>
          </table:table-cell>
          <table:table-cell table:style-name="ce19" office:value-type="string" calcext:value-type="string">
            <text:p>itm_elven_bow,itm_elven_arrows,</text:p>
          </table:table-cell>
          <table:table-cell table:style-name="ce11" office:value-type="string" calcext:value-type="string">
            <text:p>itm_lorien_sword_b,</text:p>
          </table:table-cell>
          <table:table-cell table:style-name="ce11"/>
          <table:table-cell table:style-name="ce12" office:value-type="string" calcext:value-type="string">
            <text:p>attr_elf_tier_2</text:p>
          </table:table-cell>
          <table:table-cell table:style-name="ce12" office:value-type="string" calcext:value-type="string">
            <text:p>wp_elf_tier_bow_2</text:p>
          </table:table-cell>
          <table:table-cell table:style-name="ce13" office:value-type="string" calcext:value-type="string">
            <text:p>knows_common|knows_ironflesh_1|knows_power_strike_2|knows_power_draw_3|knows_weapon_master_1|knows_athletics_3|knows_tactics_1|knows_pathfinding_1|knows_spotting_1|knows_wound_treatment_1|knows_surgery_1|knows_persuasion_2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B170]&lt;&gt;&quot;&quot;;[.C170]&lt;&gt;&quot;&quot;);CONCATENATE([Variables.$I$1];[Variables.$I$7];[.B170];[Variables.$I$7];[Variables.$I$6];[Variables.$I$7];[.C170];[Variables.$I$7];[Variables.$I$6];[Variables.$I$7];[.D170];[Variables.$I$7];[Variables.$I$6];[.E170];[Variables.$I$6];[.F170];[Variables.$I$6];[.G170];[Variables.$I$6];[.H170];[Variables.$I$6];[Variables.$I$1];[.I170];[.J170];[.K170];[.L170];[.M170];[.N170];[.O170];[Variables.$I$2];[Variables.$I$6];[.P170];[Variables.$I$6];[.Q170];[Variables.$I$6];[.R170];[Variables.$I$6];[.S170];[Variables.$I$6];[.T170];IF([.U170]&lt;&gt;&quot;&quot;;CONCATENATE([Variables.$I$6];[.U170]);&quot;&quot;);[Variables.$I$2];[Variables.$I$6]);IF([.B170]&lt;&gt;&quot;&quot;;CONCATENATE(&quot;#&quot;;[.B170]);&quot;&quot;))" office:value-type="string" office:string-value="[&quot;a2_lorien_archer&quot;,&quot;Lothlorien_Archer&quot;,&quot;Lothlorien_Archers&quot;,tf_lorien| tfg_ranged| tfg_armor| tfg_helm| tfg_boots| tf_no_capture_alive,0,0,fac_lorien,[itm_lorien_helm_a,itm_lorien_light,itm_leather_gloves,itm_lorien_boots,itm_woodelf_boots_good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" calcext:value-type="string">
            <text:p>["a2_lorien_archer","Lothlorien_Archer","Lothlorien_Archers",tf_lorien| tfg_ranged| tfg_armor| tfg_helm| tfg_boots| tf_no_capture_alive,0,0,fac_lorien,[itm_lorien_helm_a,itm_lorien_light,itm_leather_gloves,itm_lorien_boots,itm_woodelf_boots_good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</text:p>
          </table:table-cell>
          <table:table-cell table:number-columns-repeated="16362"/>
        </table:table-row>
        <table:table-row table:style-name="ro1">
          <table:table-cell table:style-name="ce6" table:formula="of:=IF(AND([.B171]&lt;&gt;&quot;&quot;;[.C171]&lt;&gt;&quot;&quot;);CONCATENATE([Variables.$I$1];[Variables.$I$7];[.B171];[Variables.$I$7];[Variables.$I$6];[Variables.$I$7];[.C171];[Variables.$I$7];[Variables.$I$6];[Variables.$I$7];[.D171];[Variables.$I$7];[Variables.$I$6];[.E171];[Variables.$I$6];[.F171];[Variables.$I$6];[.G171];[Variables.$I$6];[.H171];[Variables.$I$6];[Variables.$I$1];[.I171];[.J171];[.K171];[.L171];[.M171];[.N171];[.O171];[Variables.$I$2];[Variables.$I$6];[.P171];[Variables.$I$6];[.Q171];[Variables.$I$6];[.R171];[Variables.$I$6];[.S171];[Variables.$I$6];[.T171];IF([.U171]&lt;&gt;&quot;&quot;;CONCATENATE([Variables.$I$6];[.U171]);&quot;&quot;);[Variables.$I$2];[Variables.$I$6]);IF([.B171]&lt;&gt;&quot;&quot;;CONCATENATE(&quot;#&quot;;[.B171]);&quot;&quot;))" office:value-type="string" office:string-value="[&quot;a3_lorien_vet_archer&quot;,&quot;Lothlorien_Veteran_Archer&quot;,&quot;Lothlorien_Veteran_Archers&quot;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" calcext:value-type="string">
            <text:p>["a3_lorien_vet_archer","Lothlorien_Veteran_Archer","Lothlorien_Veteran_Archers"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</text:p>
          </table:table-cell>
          <table:table-cell table:style-name="ce7" office:value-type="string" calcext:value-type="string">
            <text:p>a3_lorien_vet_archer</text:p>
          </table:table-cell>
          <table:table-cell table:style-name="ce7" office:value-type="string" calcext:value-type="string">
            <text:p>Lothlorien_Veteran_Archer</text:p>
          </table:table-cell>
          <table:table-cell table:style-name="ce7" office:value-type="string" calcext:value-type="string">
            <text:p>Lothlorien_Veteran_Archers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lorien</text:p>
          </table:table-cell>
          <table:table-cell table:style-name="ce19" office:value-type="string" calcext:value-type="string">
            <text:p>itm_lorien_helm_a,</text:p>
          </table:table-cell>
          <table:table-cell table:style-name="ce19" office:value-type="string" calcext:value-type="string">
            <text:p>itm_lorien_med_bad,</text:p>
          </table:table-cell>
          <table:table-cell table:style-name="ce19"/>
          <table:table-cell table:style-name="ce19" office:value-type="string" calcext:value-type="string">
            <text:p>itm_lorien_boots,</text:p>
          </table:table-cell>
          <table:table-cell table:style-name="ce19" office:value-type="string" calcext:value-type="string">
            <text:p>itm_elven_bow,itm_elven_arrows,</text:p>
          </table:table-cell>
          <table:table-cell table:style-name="ce11" office:value-type="string" calcext:value-type="string">
            <text:p>itm_lorien_sword_a,</text:p>
          </table:table-cell>
          <table:table-cell table:style-name="ce11"/>
          <table:table-cell table:style-name="ce12" office:value-type="string" calcext:value-type="string">
            <text:p>attr_elf_tier_3</text:p>
          </table:table-cell>
          <table:table-cell table:style-name="ce12" office:value-type="string" calcext:value-type="string">
            <text:p>wp_elf_tier_bow_3</text:p>
          </table:table-cell>
          <table:table-cell table:style-name="ce12" office:value-type="string" calcext:value-type="string">
            <text:p>knows_common|knows_athletics_5|knows_power_draw_3|knows_power_strike_4|knows_ironflesh_2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B171]&lt;&gt;&quot;&quot;;[.C171]&lt;&gt;&quot;&quot;);CONCATENATE([Variables.$I$1];[Variables.$I$7];[.B171];[Variables.$I$7];[Variables.$I$6];[Variables.$I$7];[.C171];[Variables.$I$7];[Variables.$I$6];[Variables.$I$7];[.D171];[Variables.$I$7];[Variables.$I$6];[.E171];[Variables.$I$6];[.F171];[Variables.$I$6];[.G171];[Variables.$I$6];[.H171];[Variables.$I$6];[Variables.$I$1];[.I171];[.J171];[.K171];[.L171];[.M171];[.N171];[.O171];[Variables.$I$2];[Variables.$I$6];[.P171];[Variables.$I$6];[.Q171];[Variables.$I$6];[.R171];[Variables.$I$6];[.S171];[Variables.$I$6];[.T171];IF([.U171]&lt;&gt;&quot;&quot;;CONCATENATE([Variables.$I$6];[.U171]);&quot;&quot;);[Variables.$I$2];[Variables.$I$6]);IF([.B171]&lt;&gt;&quot;&quot;;CONCATENATE(&quot;#&quot;;[.B171]);&quot;&quot;))" office:value-type="string" office:string-value="[&quot;a3_lorien_vet_archer&quot;,&quot;Lothlorien_Veteran_Archer&quot;,&quot;Lothlorien_Veteran_Archers&quot;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" calcext:value-type="string">
            <text:p>["a3_lorien_vet_archer","Lothlorien_Veteran_Archer","Lothlorien_Veteran_Archers"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</text:p>
          </table:table-cell>
          <table:table-cell table:number-columns-repeated="16362"/>
        </table:table-row>
        <table:table-row table:style-name="ro1">
          <table:table-cell table:style-name="ce6" table:formula="of:=IF(AND([.B172]&lt;&gt;&quot;&quot;;[.C172]&lt;&gt;&quot;&quot;);CONCATENATE([Variables.$I$1];[Variables.$I$7];[.B172];[Variables.$I$7];[Variables.$I$6];[Variables.$I$7];[.C172];[Variables.$I$7];[Variables.$I$6];[Variables.$I$7];[.D172];[Variables.$I$7];[Variables.$I$6];[.E172];[Variables.$I$6];[.F172];[Variables.$I$6];[.G172];[Variables.$I$6];[.H172];[Variables.$I$6];[Variables.$I$1];[.I172];[.J172];[.K172];[.L172];[.M172];[.N172];[.O172];[Variables.$I$2];[Variables.$I$6];[.P172];[Variables.$I$6];[.Q172];[Variables.$I$6];[.R172];[Variables.$I$6];[.S172];[Variables.$I$6];[.T172];IF([.U172]&lt;&gt;&quot;&quot;;CONCATENATE([Variables.$I$6];[.U172]);&quot;&quot;);[Variables.$I$2];[Variables.$I$6]);IF([.B172]&lt;&gt;&quot;&quot;;CONCATENATE(&quot;#&quot;;[.B172]);&quot;&quot;))" office:value-type="string" office:string-value="[&quot;a4_lorien_gal_archer&quot;,&quot;Galadhrim_Archer&quot;,&quot;Galadhrim_Archers&quot;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" calcext:value-type="string">
            <text:p>["a4_lorien_gal_archer","Galadhrim_Archer","Galadhrim_Archers"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</text:p>
          </table:table-cell>
          <table:table-cell table:style-name="ce7" office:value-type="string" calcext:value-type="string">
            <text:p>a4_lorien_gal_archer</text:p>
          </table:table-cell>
          <table:table-cell table:style-name="ce7" office:value-type="string" calcext:value-type="string">
            <text:p>Galadhrim_Archer</text:p>
          </table:table-cell>
          <table:table-cell table:style-name="ce7" office:value-type="string" calcext:value-type="string">
            <text:p>Galadhrim_Archers</text:p>
          </table:table-cell>
          <table:table-cell table:style-name="ce8" office:value-type="string" calcext:value-type="string">
            <text:p>tf_lorien| tfg_ranged|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lorien</text:p>
          </table:table-cell>
          <table:table-cell table:style-name="ce19" office:value-type="string" calcext:value-type="string">
            <text:p>itm_lorien_helm_a_good,</text:p>
          </table:table-cell>
          <table:table-cell table:style-name="ce19" office:value-type="string" calcext:value-type="string">
            <text:p>itm_lorien_med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lorien_boots,</text:p>
          </table:table-cell>
          <table:table-cell table:style-name="ce19" office:value-type="string" calcext:value-type="string">
            <text:p>itm_lorien_bow,itm_elven_arrows,</text:p>
          </table:table-cell>
          <table:table-cell table:style-name="ce11" office:value-type="string" calcext:value-type="string">
            <text:p>itm_lorien_sword_c,</text:p>
          </table:table-cell>
          <table:table-cell table:style-name="ce11"/>
          <table:table-cell table:style-name="ce12" office:value-type="string" calcext:value-type="string">
            <text:p>attr_elf_tier_4</text:p>
          </table:table-cell>
          <table:table-cell table:style-name="ce12" office:value-type="string" calcext:value-type="string">
            <text:p>wp_elf_tier_bow_4</text:p>
          </table:table-cell>
          <table:table-cell table:style-name="ce12" office:value-type="string" calcext:value-type="string">
            <text:p>knows_common|knows_athletics_5|knows_power_draw_3|knows_power_strike_5|knows_ironflesh_3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B172]&lt;&gt;&quot;&quot;;[.C172]&lt;&gt;&quot;&quot;);CONCATENATE([Variables.$I$1];[Variables.$I$7];[.B172];[Variables.$I$7];[Variables.$I$6];[Variables.$I$7];[.C172];[Variables.$I$7];[Variables.$I$6];[Variables.$I$7];[.D172];[Variables.$I$7];[Variables.$I$6];[.E172];[Variables.$I$6];[.F172];[Variables.$I$6];[.G172];[Variables.$I$6];[.H172];[Variables.$I$6];[Variables.$I$1];[.I172];[.J172];[.K172];[.L172];[.M172];[.N172];[.O172];[Variables.$I$2];[Variables.$I$6];[.P172];[Variables.$I$6];[.Q172];[Variables.$I$6];[.R172];[Variables.$I$6];[.S172];[Variables.$I$6];[.T172];IF([.U172]&lt;&gt;&quot;&quot;;CONCATENATE([Variables.$I$6];[.U172]);&quot;&quot;);[Variables.$I$2];[Variables.$I$6]);IF([.B172]&lt;&gt;&quot;&quot;;CONCATENATE(&quot;#&quot;;[.B172]);&quot;&quot;))" office:value-type="string" office:string-value="[&quot;a4_lorien_gal_archer&quot;,&quot;Galadhrim_Archer&quot;,&quot;Galadhrim_Archers&quot;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" calcext:value-type="string">
            <text:p>["a4_lorien_gal_archer","Galadhrim_Archer","Galadhrim_Archers"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</text:p>
          </table:table-cell>
          <table:table-cell table:number-columns-repeated="16362"/>
        </table:table-row>
        <table:table-row table:style-name="ro1">
          <table:table-cell table:style-name="ce6" table:formula="of:=IF(AND([.B173]&lt;&gt;&quot;&quot;;[.C173]&lt;&gt;&quot;&quot;);CONCATENATE([Variables.$I$1];[Variables.$I$7];[.B173];[Variables.$I$7];[Variables.$I$6];[Variables.$I$7];[.C173];[Variables.$I$7];[Variables.$I$6];[Variables.$I$7];[.D173];[Variables.$I$7];[Variables.$I$6];[.E173];[Variables.$I$6];[.F173];[Variables.$I$6];[.G173];[Variables.$I$6];[.H173];[Variables.$I$6];[Variables.$I$1];[.I173];[.J173];[.K173];[.L173];[.M173];[.N173];[.O173];[Variables.$I$2];[Variables.$I$6];[.P173];[Variables.$I$6];[.Q173];[Variables.$I$6];[.R173];[Variables.$I$6];[.S173];[Variables.$I$6];[.T173];IF([.U173]&lt;&gt;&quot;&quot;;CONCATENATE([Variables.$I$6];[.U173]);&quot;&quot;);[Variables.$I$2];[Variables.$I$6]);IF([.B173]&lt;&gt;&quot;&quot;;CONCATENATE(&quot;#&quot;;[.B173]);&quot;&quot;))" office:value-type="string" office:string-value="[&quot;a5_lorien_gal_royal_archer&quot;,&quot;Galadhrim_Royal_Marksman&quot;,&quot;Galadhrim_Royal_Marksmen&quot;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" calcext:value-type="string">
            <text:p>["a5_lorien_gal_royal_archer","Galadhrim_Royal_Marksman","Galadhrim_Royal_Marksmen"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</text:p>
          </table:table-cell>
          <table:table-cell table:style-name="ce7" office:value-type="string" calcext:value-type="string">
            <text:p>a5_lorien_gal_royal_archer</text:p>
          </table:table-cell>
          <table:table-cell table:style-name="ce7" office:value-type="string" calcext:value-type="string">
            <text:p>Galadhrim_Royal_Marksman</text:p>
          </table:table-cell>
          <table:table-cell table:style-name="ce7" office:value-type="string" calcext:value-type="string">
            <text:p>Galadhrim_Royal_Marksmen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lorien</text:p>
          </table:table-cell>
          <table:table-cell table:style-name="ce19" office:value-type="string" calcext:value-type="string">
            <text:p>itm_lorien_helm_a_good,</text:p>
          </table:table-cell>
          <table:table-cell table:style-name="ce19" office:value-type="string" calcext:value-type="string">
            <text:p>itm_lorien_med_good,</text:p>
          </table:table-cell>
          <table:table-cell table:style-name="ce11" office:value-type="string" calcext:value-type="string">
            <text:p>itm_leather_gloves_good,</text:p>
          </table:table-cell>
          <table:table-cell table:style-name="ce11" office:value-type="string" calcext:value-type="string">
            <text:p>itm_lorien_boots,</text:p>
          </table:table-cell>
          <table:table-cell table:style-name="ce19" office:value-type="string" calcext:value-type="string">
            <text:p>itm_lorien_bow,itm_elven_arrows,itm_elven_arrows,</text:p>
          </table:table-cell>
          <table:table-cell table:style-name="ce11" office:value-type="string" calcext:value-type="string">
            <text:p>itm_lorien_sword_c,</text:p>
          </table:table-cell>
          <table:table-cell table:style-name="ce11"/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bow_5</text:p>
          </table:table-cell>
          <table:table-cell table:style-name="ce12" office:value-type="string" calcext:value-type="string">
            <text:p>knows_common|knows_athletics_5|knows_power_draw_6|knows_power_strike_5|knows_ironflesh_4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B173]&lt;&gt;&quot;&quot;;[.C173]&lt;&gt;&quot;&quot;);CONCATENATE([Variables.$I$1];[Variables.$I$7];[.B173];[Variables.$I$7];[Variables.$I$6];[Variables.$I$7];[.C173];[Variables.$I$7];[Variables.$I$6];[Variables.$I$7];[.D173];[Variables.$I$7];[Variables.$I$6];[.E173];[Variables.$I$6];[.F173];[Variables.$I$6];[.G173];[Variables.$I$6];[.H173];[Variables.$I$6];[Variables.$I$1];[.I173];[.J173];[.K173];[.L173];[.M173];[.N173];[.O173];[Variables.$I$2];[Variables.$I$6];[.P173];[Variables.$I$6];[.Q173];[Variables.$I$6];[.R173];[Variables.$I$6];[.S173];[Variables.$I$6];[.T173];IF([.U173]&lt;&gt;&quot;&quot;;CONCATENATE([Variables.$I$6];[.U173]);&quot;&quot;);[Variables.$I$2];[Variables.$I$6]);IF([.B173]&lt;&gt;&quot;&quot;;CONCATENATE(&quot;#&quot;;[.B173]);&quot;&quot;))" office:value-type="string" office:string-value="[&quot;a5_lorien_gal_royal_archer&quot;,&quot;Galadhrim_Royal_Marksman&quot;,&quot;Galadhrim_Royal_Marksmen&quot;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" calcext:value-type="string">
            <text:p>["a5_lorien_gal_royal_archer","Galadhrim_Royal_Marksman","Galadhrim_Royal_Marksmen"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</text:p>
          </table:table-cell>
          <table:table-cell table:number-columns-repeated="16362"/>
        </table:table-row>
        <table:table-row table:style-name="ro1">
          <table:table-cell table:style-name="ce6" table:formula="of:=IF(AND([.B174]&lt;&gt;&quot;&quot;;[.C174]&lt;&gt;&quot;&quot;);CONCATENATE([Variables.$I$1];[Variables.$I$7];[.B174];[Variables.$I$7];[Variables.$I$6];[Variables.$I$7];[.C174];[Variables.$I$7];[Variables.$I$6];[Variables.$I$7];[.D174];[Variables.$I$7];[Variables.$I$6];[.E174];[Variables.$I$6];[.F174];[Variables.$I$6];[.G174];[Variables.$I$6];[.H174];[Variables.$I$6];[Variables.$I$1];[.I174];[.J174];[.K174];[.L174];[.M174];[.N174];[.O174];[Variables.$I$2];[Variables.$I$6];[.P174];[Variables.$I$6];[.Q174];[Variables.$I$6];[.R174];[Variables.$I$6];[.S174];[Variables.$I$6];[.T174];IF([.U174]&lt;&gt;&quot;&quot;;CONCATENATE([Variables.$I$6];[.U174]);&quot;&quot;);[Variables.$I$2];[Variables.$I$6]);IF([.B174]&lt;&gt;&quot;&quot;;CONCATENATE(&quot;#&quot;;[.B174]);&quot;&quot;))" office:value-type="string" office:string-value="[&quot;i3_lorien_inf&quot;,&quot;Lothlorien_Infantry&quot;,&quot;Lothlorien_Infantry&quot;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" calcext:value-type="string">
            <text:p>["i3_lorien_inf","Lothlorien_Infantry","Lothlorien_Infantry"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</text:p>
          </table:table-cell>
          <table:table-cell table:style-name="ce7" office:value-type="string" calcext:value-type="string">
            <text:p>i3_lorien_inf</text:p>
          </table:table-cell>
          <table:table-cell table:number-columns-repeated="2" table:style-name="ce7" office:value-type="string" calcext:value-type="string">
            <text:p>Lothlorien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lorien</text:p>
          </table:table-cell>
          <table:table-cell table:style-name="ce11" office:value-type="string" calcext:value-type="string">
            <text:p>itm_lorien_helm_b,</text:p>
          </table:table-cell>
          <table:table-cell table:style-name="ce19" office:value-type="string" calcext:value-type="string">
            <text:p>itm_lorien_med_good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lorien_boots,</text:p>
          </table:table-cell>
          <table:table-cell table:style-name="ce11" office:value-type="string" calcext:value-type="string">
            <text:p>itm_lorien_sword_b,</text:p>
          </table:table-cell>
          <table:table-cell table:style-name="ce11" office:value-type="string" calcext:value-type="string">
            <text:p>itm_lorien_shield_c,</text:p>
          </table:table-cell>
          <table:table-cell table:style-name="ce11"/>
          <table:table-cell table:style-name="ce12" office:value-type="string" calcext:value-type="string">
            <text:p>attr_elf_tier_3</text:p>
          </table:table-cell>
          <table:table-cell table:style-name="ce12" office:value-type="string" calcext:value-type="string">
            <text:p>wp_elf_tier_3</text:p>
          </table:table-cell>
          <table:table-cell table:style-name="ce12" office:value-type="string" calcext:value-type="string">
            <text:p>knows_common|knows_athletics_3|knows_shield_3|knows_power_draw_5|knows_power_strike_4|knows_ironflesh_4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B174]&lt;&gt;&quot;&quot;;[.C174]&lt;&gt;&quot;&quot;);CONCATENATE([Variables.$I$1];[Variables.$I$7];[.B174];[Variables.$I$7];[Variables.$I$6];[Variables.$I$7];[.C174];[Variables.$I$7];[Variables.$I$6];[Variables.$I$7];[.D174];[Variables.$I$7];[Variables.$I$6];[.E174];[Variables.$I$6];[.F174];[Variables.$I$6];[.G174];[Variables.$I$6];[.H174];[Variables.$I$6];[Variables.$I$1];[.I174];[.J174];[.K174];[.L174];[.M174];[.N174];[.O174];[Variables.$I$2];[Variables.$I$6];[.P174];[Variables.$I$6];[.Q174];[Variables.$I$6];[.R174];[Variables.$I$6];[.S174];[Variables.$I$6];[.T174];IF([.U174]&lt;&gt;&quot;&quot;;CONCATENATE([Variables.$I$6];[.U174]);&quot;&quot;);[Variables.$I$2];[Variables.$I$6]);IF([.B174]&lt;&gt;&quot;&quot;;CONCATENATE(&quot;#&quot;;[.B174]);&quot;&quot;))" office:value-type="string" office:string-value="[&quot;i3_lorien_inf&quot;,&quot;Lothlorien_Infantry&quot;,&quot;Lothlorien_Infantry&quot;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" calcext:value-type="string">
            <text:p>["i3_lorien_inf","Lothlorien_Infantry","Lothlorien_Infantry"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</text:p>
          </table:table-cell>
          <table:table-cell table:number-columns-repeated="16362"/>
        </table:table-row>
        <table:table-row table:style-name="ro1">
          <table:table-cell table:style-name="ce6" table:formula="of:=IF(AND([.B175]&lt;&gt;&quot;&quot;;[.C175]&lt;&gt;&quot;&quot;);CONCATENATE([Variables.$I$1];[Variables.$I$7];[.B175];[Variables.$I$7];[Variables.$I$6];[Variables.$I$7];[.C175];[Variables.$I$7];[Variables.$I$6];[Variables.$I$7];[.D175];[Variables.$I$7];[Variables.$I$6];[.E175];[Variables.$I$6];[.F175];[Variables.$I$6];[.G175];[Variables.$I$6];[.H175];[Variables.$I$6];[Variables.$I$1];[.I175];[.J175];[.K175];[.L175];[.M175];[.N175];[.O175];[Variables.$I$2];[Variables.$I$6];[.P175];[Variables.$I$6];[.Q175];[Variables.$I$6];[.R175];[Variables.$I$6];[.S175];[Variables.$I$6];[.T175];IF([.U175]&lt;&gt;&quot;&quot;;CONCATENATE([Variables.$I$6];[.U175]);&quot;&quot;);[Variables.$I$2];[Variables.$I$6]);IF([.B175]&lt;&gt;&quot;&quot;;CONCATENATE(&quot;#&quot;;[.B175]);&quot;&quot;))" office:value-type="string" office:string-value="[&quot;i4_lorien_gal_inf&quot;,&quot;Galadhrim_Infantry&quot;,&quot;Galadhrim_Infantry&quot;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" calcext:value-type="string">
            <text:p>["i4_lorien_gal_inf","Galadhrim_Infantry","Galadhrim_Infantry"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</text:p>
          </table:table-cell>
          <table:table-cell table:style-name="ce7" office:value-type="string" calcext:value-type="string">
            <text:p>i4_lorien_gal_inf</text:p>
          </table:table-cell>
          <table:table-cell table:number-columns-repeated="2" table:style-name="ce7" office:value-type="string" calcext:value-type="string">
            <text:p>Galadhrim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lorien</text:p>
          </table:table-cell>
          <table:table-cell table:style-name="ce19" office:value-type="string" calcext:value-type="string">
            <text:p>itm_lorien_helm_b,</text:p>
          </table:table-cell>
          <table:table-cell table:style-name="ce11" office:value-type="string" calcext:value-type="string">
            <text:p>itm_lorien_armor_c,</text:p>
          </table:table-cell>
          <table:table-cell table:style-name="ce11" office:value-type="string" calcext:value-type="string">
            <text:p>itm_mail_mittens,</text:p>
          </table:table-cell>
          <table:table-cell table:style-name="ce19" office:value-type="string" calcext:value-type="string">
            <text:p>itm_lorien_boots,</text:p>
          </table:table-cell>
          <table:table-cell table:style-name="ce11" office:value-type="string" calcext:value-type="string">
            <text:p>itm_lorien_sword_a,</text:p>
          </table:table-cell>
          <table:table-cell table:style-name="ce11" office:value-type="string" calcext:value-type="string">
            <text:p>itm_lorien_shield_b,</text:p>
          </table:table-cell>
          <table:table-cell table:style-name="ce11"/>
          <table:table-cell table:style-name="ce12" office:value-type="string" calcext:value-type="string">
            <text:p>attr_elf_tier_4</text:p>
          </table:table-cell>
          <table:table-cell table:style-name="ce12" office:value-type="string" calcext:value-type="string">
            <text:p>wp_elf_tier_4</text:p>
          </table:table-cell>
          <table:table-cell table:style-name="ce12" office:value-type="string" calcext:value-type="string">
            <text:p>knows_common|knows_athletics_4|knows_shield_4|knows_power_draw_5|knows_power_strike_5|knows_ironflesh_5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B175]&lt;&gt;&quot;&quot;;[.C175]&lt;&gt;&quot;&quot;);CONCATENATE([Variables.$I$1];[Variables.$I$7];[.B175];[Variables.$I$7];[Variables.$I$6];[Variables.$I$7];[.C175];[Variables.$I$7];[Variables.$I$6];[Variables.$I$7];[.D175];[Variables.$I$7];[Variables.$I$6];[.E175];[Variables.$I$6];[.F175];[Variables.$I$6];[.G175];[Variables.$I$6];[.H175];[Variables.$I$6];[Variables.$I$1];[.I175];[.J175];[.K175];[.L175];[.M175];[.N175];[.O175];[Variables.$I$2];[Variables.$I$6];[.P175];[Variables.$I$6];[.Q175];[Variables.$I$6];[.R175];[Variables.$I$6];[.S175];[Variables.$I$6];[.T175];IF([.U175]&lt;&gt;&quot;&quot;;CONCATENATE([Variables.$I$6];[.U175]);&quot;&quot;);[Variables.$I$2];[Variables.$I$6]);IF([.B175]&lt;&gt;&quot;&quot;;CONCATENATE(&quot;#&quot;;[.B175]);&quot;&quot;))" office:value-type="string" office:string-value="[&quot;i4_lorien_gal_inf&quot;,&quot;Galadhrim_Infantry&quot;,&quot;Galadhrim_Infantry&quot;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" calcext:value-type="string">
            <text:p>["i4_lorien_gal_inf","Galadhrim_Infantry","Galadhrim_Infantry"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</text:p>
          </table:table-cell>
          <table:table-cell table:number-columns-repeated="16362"/>
        </table:table-row>
        <table:table-row table:style-name="ro1">
          <table:table-cell table:style-name="ce6" table:formula="of:=IF(AND([.B176]&lt;&gt;&quot;&quot;;[.C176]&lt;&gt;&quot;&quot;);CONCATENATE([Variables.$I$1];[Variables.$I$7];[.B176];[Variables.$I$7];[Variables.$I$6];[Variables.$I$7];[.C176];[Variables.$I$7];[Variables.$I$6];[Variables.$I$7];[.D176];[Variables.$I$7];[Variables.$I$6];[.E176];[Variables.$I$6];[.F176];[Variables.$I$6];[.G176];[Variables.$I$6];[.H176];[Variables.$I$6];[Variables.$I$1];[.I176];[.J176];[.K176];[.L176];[.M176];[.N176];[.O176];[Variables.$I$2];[Variables.$I$6];[.P176];[Variables.$I$6];[.Q176];[Variables.$I$6];[.R176];[Variables.$I$6];[.S176];[Variables.$I$6];[.T176];IF([.U176]&lt;&gt;&quot;&quot;;CONCATENATE([Variables.$I$6];[.U176]);&quot;&quot;);[Variables.$I$2];[Variables.$I$6]);IF([.B176]&lt;&gt;&quot;&quot;;CONCATENATE(&quot;#&quot;;[.B176]);&quot;&quot;))" office:value-type="string" office:string-value="[&quot;i5_lorien_gal_royal_inf&quot;,&quot;Galadhrim_Royal_Guard&quot;,&quot;Galadhrim_Royal_Guards&quot;,tf_lorien|  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" calcext:value-type="string">
            <text:p>["i5_lorien_gal_royal_inf","Galadhrim_Royal_Guard","Galadhrim_Royal_Guards",tf_lorien| <text:s/>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</text:p>
          </table:table-cell>
          <table:table-cell table:style-name="ce7" office:value-type="string" calcext:value-type="string">
            <text:p>i5_lorien_gal_royal_inf</text:p>
          </table:table-cell>
          <table:table-cell table:style-name="ce7" office:value-type="string" calcext:value-type="string">
            <text:p>Galadhrim_Royal_Guard</text:p>
          </table:table-cell>
          <table:table-cell table:style-name="ce7" office:value-type="string" calcext:value-type="string">
            <text:p>Galadhrim_Royal_Guards</text:p>
          </table:table-cell>
          <table:table-cell table:style-name="ce8" office:value-type="string" calcext:value-type="string">
            <text:p>tf_lorien| <text:s/>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lorien</text:p>
          </table:table-cell>
          <table:table-cell table:style-name="ce11" office:value-type="string" calcext:value-type="string">
            <text:p>itm_lorien_helm_b_good,</text:p>
          </table:table-cell>
          <table:table-cell table:style-name="ce11" office:value-type="string" calcext:value-type="string">
            <text:p>itm_lorien_heavy_good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lorien_boots,</text:p>
          </table:table-cell>
          <table:table-cell table:style-name="ce11" office:value-type="string" calcext:value-type="string">
            <text:p>itm_lorien_sword_a,</text:p>
          </table:table-cell>
          <table:table-cell table:style-name="ce11" office:value-type="string" calcext:value-type="string">
            <text:p>itm_lorien_shield_b,</text:p>
          </table:table-cell>
          <table:table-cell table:style-name="ce11"/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5</text:p>
          </table:table-cell>
          <table:table-cell table:style-name="ce12" office:value-type="string" calcext:value-type="string">
            <text:p>knows_common|knows_athletics_4|knows_shield_5|knows_power_draw_6|knows_power_strike_6|knows_ironflesh_6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B176]&lt;&gt;&quot;&quot;;[.C176]&lt;&gt;&quot;&quot;);CONCATENATE([Variables.$I$1];[Variables.$I$7];[.B176];[Variables.$I$7];[Variables.$I$6];[Variables.$I$7];[.C176];[Variables.$I$7];[Variables.$I$6];[Variables.$I$7];[.D176];[Variables.$I$7];[Variables.$I$6];[.E176];[Variables.$I$6];[.F176];[Variables.$I$6];[.G176];[Variables.$I$6];[.H176];[Variables.$I$6];[Variables.$I$1];[.I176];[.J176];[.K176];[.L176];[.M176];[.N176];[.O176];[Variables.$I$2];[Variables.$I$6];[.P176];[Variables.$I$6];[.Q176];[Variables.$I$6];[.R176];[Variables.$I$6];[.S176];[Variables.$I$6];[.T176];IF([.U176]&lt;&gt;&quot;&quot;;CONCATENATE([Variables.$I$6];[.U176]);&quot;&quot;);[Variables.$I$2];[Variables.$I$6]);IF([.B176]&lt;&gt;&quot;&quot;;CONCATENATE(&quot;#&quot;;[.B176]);&quot;&quot;))" office:value-type="string" office:string-value="[&quot;i5_lorien_gal_royal_inf&quot;,&quot;Galadhrim_Royal_Guard&quot;,&quot;Galadhrim_Royal_Guards&quot;,tf_lorien|  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" calcext:value-type="string">
            <text:p>["i5_lorien_gal_royal_inf","Galadhrim_Royal_Guard","Galadhrim_Royal_Guards",tf_lorien| <text:s/>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</text:p>
          </table:table-cell>
          <table:table-cell table:number-columns-repeated="16362"/>
        </table:table-row>
        <table:table-row table:style-name="ro1">
          <table:table-cell table:style-name="ce6" table:formula="of:=IF(AND([.B177]&lt;&gt;&quot;&quot;;[.C177]&lt;&gt;&quot;&quot;);CONCATENATE([Variables.$I$1];[Variables.$I$7];[.B177];[Variables.$I$7];[Variables.$I$6];[Variables.$I$7];[.C177];[Variables.$I$7];[Variables.$I$6];[Variables.$I$7];[.D177];[Variables.$I$7];[Variables.$I$6];[.E177];[Variables.$I$6];[.F177];[Variables.$I$6];[.G177];[Variables.$I$6];[.H177];[Variables.$I$6];[Variables.$I$1];[.I177];[.J177];[.K177];[.L177];[.M177];[.N177];[.O177];[Variables.$I$2];[Variables.$I$6];[.P177];[Variables.$I$6];[.Q177];[Variables.$I$6];[.R177];[Variables.$I$6];[.S177];[Variables.$I$6];[.T177];IF([.U177]&lt;&gt;&quot;&quot;;CONCATENATE([Variables.$I$6];[.U177]);&quot;&quot;);[Variables.$I$2];[Variables.$I$6]);IF([.B177]&lt;&gt;&quot;&quot;;CONCATENATE(&quot;#&quot;;[.B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</text:p>
          </table:table-cell>
          <table:table-cell table:style-name="ce7" office:value-type="string" calcext:value-type="string">
            <text:p>lothlorien_standard_bearer</text:p>
          </table:table-cell>
          <table:table-cell table:style-name="ce7" office:value-type="string" calcext:value-type="string">
            <text:p>Lothlorien_Standard_Bearer</text:p>
          </table:table-cell>
          <table:table-cell table:style-name="ce7" office:value-type="string" calcext:value-type="string">
            <text:p>Lothlorien_Standard_Bearers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lorien</text:p>
          </table:table-cell>
          <table:table-cell table:style-name="ce11" office:value-type="string" calcext:value-type="string">
            <text:p>itm_lorien_helm_b_good,</text:p>
          </table:table-cell>
          <table:table-cell table:style-name="ce11" office:value-type="string" calcext:value-type="string">
            <text:p>itm_lorien_heavy_good_cloak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lorien_boots,</text:p>
          </table:table-cell>
          <table:table-cell table:style-name="ce19" office:value-type="string" calcext:value-type="string">
            <text:p>itm_lorien_banner,</text:p>
          </table:table-cell>
          <table:table-cell table:style-name="ce19"/>
          <table:table-cell table:style-name="ce11"/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elf_tier_6</text:p>
          </table:table-cell>
          <table:table-cell table:style-name="ce12" office:value-type="string" calcext:value-type="string">
            <text:p>knows_common|knows_athletics_3|knows_power_draw_3|knows_power_strike_7|knows_ironflesh_10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B177]&lt;&gt;&quot;&quot;;[.C177]&lt;&gt;&quot;&quot;);CONCATENATE([Variables.$I$1];[Variables.$I$7];[.B177];[Variables.$I$7];[Variables.$I$6];[Variables.$I$7];[.C177];[Variables.$I$7];[Variables.$I$6];[Variables.$I$7];[.D177];[Variables.$I$7];[Variables.$I$6];[.E177];[Variables.$I$6];[.F177];[Variables.$I$6];[.G177];[Variables.$I$6];[.H177];[Variables.$I$6];[Variables.$I$1];[.I177];[.J177];[.K177];[.L177];[.M177];[.N177];[.O177];[Variables.$I$2];[Variables.$I$6];[.P177];[Variables.$I$6];[.Q177];[Variables.$I$6];[.R177];[Variables.$I$6];[.S177];[Variables.$I$6];[.T177];IF([.U177]&lt;&gt;&quot;&quot;;CONCATENATE([Variables.$I$6];[.U177]);&quot;&quot;);[Variables.$I$2];[Variables.$I$6]);IF([.B177]&lt;&gt;&quot;&quot;;CONCATENATE(&quot;#&quot;;[.B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</text:p>
          </table:table-cell>
          <table:table-cell table:number-columns-repeated="16362"/>
        </table:table-row>
        <table:table-row table:style-name="ro1">
          <table:table-cell table:formula="of:=IF(AND([.B178]&lt;&gt;&quot;&quot;;[.C178]&lt;&gt;&quot;&quot;);CONCATENATE([Variables.$I$1];[Variables.$I$7];[.B178];[Variables.$I$7];[Variables.$I$6];[Variables.$I$7];[.C178];[Variables.$I$7];[Variables.$I$6];[Variables.$I$7];[.D178];[Variables.$I$7];[Variables.$I$6];[.E178];[Variables.$I$6];[.F178];[Variables.$I$6];[.G178];[Variables.$I$6];[.H178];[Variables.$I$6];[Variables.$I$1];[.I178];[.J178];[.K178];[.L178];[.M178];[.N178];[.O178];[Variables.$I$2];[Variables.$I$6];[.P178];[Variables.$I$6];[.Q178];[Variables.$I$6];[.R178];[Variables.$I$6];[.S178];[Variables.$I$6];[.T178];IF([.U178]&lt;&gt;&quot;&quot;;CONCATENATE([Variables.$I$6];[.U178]);&quot;&quot;);[Variables.$I$2];[Variables.$I$6]);IF([.B178]&lt;&gt;&quot;&quot;;CONCATENATE(&quot;#&quot;;[.B178]);&quot;&quot;))">
            <text:p/>
          </table:table-cell>
          <table:table-cell table:number-columns-repeated="5"/>
          <table:table-cell table:style-name="ce6"/>
          <table:table-cell table:number-columns-repeated="16377"/>
        </table:table-row>
        <table:table-row table:style-name="ro1">
          <table:table-cell table:style-name="ce6" table:formula="of:=IF(AND([.B179]&lt;&gt;&quot;&quot;;[.C179]&lt;&gt;&quot;&quot;);CONCATENATE([Variables.$I$1];[Variables.$I$7];[.B179];[Variables.$I$7];[Variables.$I$6];[Variables.$I$7];[.C179];[Variables.$I$7];[Variables.$I$6];[Variables.$I$7];[.D179];[Variables.$I$7];[Variables.$I$6];[.E179];[Variables.$I$6];[.F179];[Variables.$I$6];[.G179];[Variables.$I$6];[.H179];[Variables.$I$6];[Variables.$I$1];[.I179];[.J179];[.K179];[.L179];[.M179];[.N179];[.O179];[Variables.$I$2];[Variables.$I$6];[.P179];[Variables.$I$6];[.Q179];[Variables.$I$6];[.R179];[Variables.$I$6];[.S179];[Variables.$I$6];[.T179];IF([.U179]&lt;&gt;&quot;&quot;;CONCATENATE([Variables.$I$6];[.U179]);&quot;&quot;);[Variables.$I$2];[Variables.$I$6]);IF([.B179]&lt;&gt;&quot;&quot;;CONCATENATE(&quot;#&quot;;[.B179]);&quot;&quot;))" office:value-type="string" office:string-value="#Mirkwood" calcext:value-type="string">
            <text:p>#Mirkwood</text:p>
          </table:table-cell>
          <table:table-cell table:style-name="ce5" office:value-type="string" calcext:value-type="string">
            <text:p>Mirkwood</text:p>
          </table:table-cell>
          <table:table-cell table:style-name="ce6"/>
          <table:table-cell/>
          <table:table-cell table:style-name="ce6" table:number-columns-repeated="17"/>
          <table:table-cell table:style-name="ce6" table:formula="of:=IF(AND([.B179]&lt;&gt;&quot;&quot;;[.C179]&lt;&gt;&quot;&quot;);CONCATENATE([Variables.$I$1];[Variables.$I$7];[.B179];[Variables.$I$7];[Variables.$I$6];[Variables.$I$7];[.C179];[Variables.$I$7];[Variables.$I$6];[Variables.$I$7];[.D179];[Variables.$I$7];[Variables.$I$6];[.E179];[Variables.$I$6];[.F179];[Variables.$I$6];[.G179];[Variables.$I$6];[.H179];[Variables.$I$6];[Variables.$I$1];[.I179];[.J179];[.K179];[.L179];[.M179];[.N179];[.O179];[Variables.$I$2];[Variables.$I$6];[.P179];[Variables.$I$6];[.Q179];[Variables.$I$6];[.R179];[Variables.$I$6];[.S179];[Variables.$I$6];[.T179];IF([.U179]&lt;&gt;&quot;&quot;;CONCATENATE([Variables.$I$6];[.U179]);&quot;&quot;);[Variables.$I$2];[Variables.$I$6]);IF([.B179]&lt;&gt;&quot;&quot;;CONCATENATE(&quot;#&quot;;[.B179]);&quot;&quot;))" office:value-type="string" office:string-value="#Mirkwood" calcext:value-type="string">
            <text:p>#Mirkwood</text:p>
          </table:table-cell>
          <table:table-cell table:number-columns-repeated="16362"/>
        </table:table-row>
        <table:table-row table:style-name="ro1">
          <table:table-cell table:style-name="ce6" table:formula="of:=IF(AND([.B180]&lt;&gt;&quot;&quot;;[.C180]&lt;&gt;&quot;&quot;);CONCATENATE([Variables.$I$1];[Variables.$I$7];[.B180];[Variables.$I$7];[Variables.$I$6];[Variables.$I$7];[.C180];[Variables.$I$7];[Variables.$I$6];[Variables.$I$7];[.D180];[Variables.$I$7];[Variables.$I$6];[.E180];[Variables.$I$6];[.F180];[Variables.$I$6];[.G180];[Variables.$I$6];[.H180];[Variables.$I$6];[Variables.$I$1];[.I180];[.J180];[.K180];[.L180];[.M180];[.N180];[.O180];[Variables.$I$2];[Variables.$I$6];[.P180];[Variables.$I$6];[.Q180];[Variables.$I$6];[.R180];[Variables.$I$6];[.S180];[Variables.$I$6];[.T180];IF([.U180]&lt;&gt;&quot;&quot;;CONCATENATE([Variables.$I$6];[.U180]);&quot;&quot;);[Variables.$I$2];[Variables.$I$6]);IF([.B180]&lt;&gt;&quot;&quot;;CONCATENATE(&quot;#&quot;;[.B180]);&quot;&quot;))" office:value-type="string" office:string-value="[&quot;a1_greenwood_scout&quot;,&quot;Greenwood_Scout&quot;,&quot;Greenwood_Scouts&quot;,tf_woodelf| tfg_ranged| tfg_armor| tfg_boots| tf_no_capture_alive,0,0,fac_woodelf,[itm_hood_green_bad,itm_mirkwood_leather_bad,itm_rohan_shoes,itm_leather_boots_dark_bad,itm_woodelf_leather_boots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" calcext:value-type="string">
            <text:p>["a1_greenwood_scout","Greenwood_Scout","Greenwood_Scouts",tf_woodelf| tfg_ranged| tfg_armor| tfg_boots| tf_no_capture_alive,0,0,fac_woodelf,[itm_hood_green_bad,itm_mirkwood_leather_bad,itm_rohan_shoes,itm_leather_boots_dark_bad,itm_woodelf_leather_boots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</text:p>
          </table:table-cell>
          <table:table-cell table:style-name="ce7" office:value-type="string" calcext:value-type="string">
            <text:p>a1_greenwood_scout</text:p>
          </table:table-cell>
          <table:table-cell table:style-name="ce7" office:value-type="string" calcext:value-type="string">
            <text:p>Greenwood_Scout</text:p>
          </table:table-cell>
          <table:table-cell table:style-name="ce7" office:value-type="string" calcext:value-type="string">
            <text:p>Greenwood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woodelf</text:p>
          </table:table-cell>
          <table:table-cell table:style-name="ce11" office:value-type="string" calcext:value-type="string">
            <text:p>itm_hood_green_bad,</text:p>
          </table:table-cell>
          <table:table-cell table:style-name="ce11" office:value-type="string" calcext:value-type="string">
            <text:p>itm_mirkwood_leather_bad,</text:p>
          </table:table-cell>
          <table:table-cell table:style-name="ce11"/>
          <table:table-cell table:style-name="ce19" office:value-type="string" calcext:value-type="string">
            <text:p>itm_rohan_shoes,itm_leather_boots_dark_bad,itm_woodelf_leather_boots,</text:p>
          </table:table-cell>
          <table:table-cell table:style-name="ce19" office:value-type="string" calcext:value-type="string">
            <text:p>itm_short_bow,itm_woodelf_arrows,</text:p>
          </table:table-cell>
          <table:table-cell table:style-name="ce11" office:value-type="string" calcext:value-type="string">
            <text:p>itm_mirkwood_knife,itm_mirkwood_short_spear,</text:p>
          </table:table-cell>
          <table:table-cell table:style-name="ce11"/>
          <table:table-cell table:style-name="ce12" office:value-type="string" calcext:value-type="string">
            <text:p>attr_elf_tier_1</text:p>
          </table:table-cell>
          <table:table-cell table:style-name="ce12" office:value-type="string" calcext:value-type="string">
            <text:p>wp_elf_tier_bow_1</text:p>
          </table:table-cell>
          <table:table-cell table:style-name="ce13" office:value-type="string" calcext:value-type="string">
            <text:p>knows_common|knows_ironflesh_1|knows_power_strike_1|knows_power_draw_2|knows_athletics_4|knows_looting_1|knows_tracking_1|knows_tactics_1|knows_pathfinding_1|knows_spotting_1|knows_persuasion_1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B180]&lt;&gt;&quot;&quot;;[.C180]&lt;&gt;&quot;&quot;);CONCATENATE([Variables.$I$1];[Variables.$I$7];[.B180];[Variables.$I$7];[Variables.$I$6];[Variables.$I$7];[.C180];[Variables.$I$7];[Variables.$I$6];[Variables.$I$7];[.D180];[Variables.$I$7];[Variables.$I$6];[.E180];[Variables.$I$6];[.F180];[Variables.$I$6];[.G180];[Variables.$I$6];[.H180];[Variables.$I$6];[Variables.$I$1];[.I180];[.J180];[.K180];[.L180];[.M180];[.N180];[.O180];[Variables.$I$2];[Variables.$I$6];[.P180];[Variables.$I$6];[.Q180];[Variables.$I$6];[.R180];[Variables.$I$6];[.S180];[Variables.$I$6];[.T180];IF([.U180]&lt;&gt;&quot;&quot;;CONCATENATE([Variables.$I$6];[.U180]);&quot;&quot;);[Variables.$I$2];[Variables.$I$6]);IF([.B180]&lt;&gt;&quot;&quot;;CONCATENATE(&quot;#&quot;;[.B180]);&quot;&quot;))" office:value-type="string" office:string-value="[&quot;a1_greenwood_scout&quot;,&quot;Greenwood_Scout&quot;,&quot;Greenwood_Scouts&quot;,tf_woodelf| tfg_ranged| tfg_armor| tfg_boots| tf_no_capture_alive,0,0,fac_woodelf,[itm_hood_green_bad,itm_mirkwood_leather_bad,itm_rohan_shoes,itm_leather_boots_dark_bad,itm_woodelf_leather_boots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" calcext:value-type="string">
            <text:p>["a1_greenwood_scout","Greenwood_Scout","Greenwood_Scouts",tf_woodelf| tfg_ranged| tfg_armor| tfg_boots| tf_no_capture_alive,0,0,fac_woodelf,[itm_hood_green_bad,itm_mirkwood_leather_bad,itm_rohan_shoes,itm_leather_boots_dark_bad,itm_woodelf_leather_boots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</text:p>
          </table:table-cell>
          <table:table-cell table:number-columns-repeated="16362"/>
        </table:table-row>
        <table:table-row table:style-name="ro1">
          <table:table-cell table:style-name="ce6" table:formula="of:=IF(AND([.B181]&lt;&gt;&quot;&quot;;[.C181]&lt;&gt;&quot;&quot;);CONCATENATE([Variables.$I$1];[Variables.$I$7];[.B181];[Variables.$I$7];[Variables.$I$6];[Variables.$I$7];[.C181];[Variables.$I$7];[Variables.$I$6];[Variables.$I$7];[.D181];[Variables.$I$7];[Variables.$I$6];[.E181];[Variables.$I$6];[.F181];[Variables.$I$6];[.G181];[Variables.$I$6];[.H181];[Variables.$I$6];[Variables.$I$1];[.I181];[.J181];[.K181];[.L181];[.M181];[.N181];[.O181];[Variables.$I$2];[Variables.$I$6];[.P181];[Variables.$I$6];[.Q181];[Variables.$I$6];[.R181];[Variables.$I$6];[.S181];[Variables.$I$6];[.T181];IF([.U181]&lt;&gt;&quot;&quot;;CONCATENATE([Variables.$I$6];[.U181]);&quot;&quot;);[Variables.$I$2];[Variables.$I$6]);IF([.B181]&lt;&gt;&quot;&quot;;CONCATENATE(&quot;#&quot;;[.B181]);&quot;&quot;))" office:value-type="string" office:string-value="[&quot;a2_greenwood_veteran_scout&quot;,&quot;Greenwood_Veteran_Scout&quot;,&quot;Greenwood_Veteran_Scouts&quot;,tf_woodelf| tfg_ranged| tfg_armor| tfg_boots| tf_no_capture_alive,0,0,fac_woodelf,[itm_mirkwood_helm_a_bad,itm_hood_green,itm_mirkwood_leather,itm_mirkwood_pad_bad,itm_leather_boots_bad,itm_leather_boots_dark_bad,itm_rohan_shoes,itm_woodelf_leather_boot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" calcext:value-type="string">
            <text:p>["a2_greenwood_veteran_scout","Greenwood_Veteran_Scout","Greenwood_Veteran_Scouts",tf_woodelf| tfg_ranged| tfg_armor| tfg_boots| tf_no_capture_alive,0,0,fac_woodelf,[itm_mirkwood_helm_a_bad,itm_hood_green,itm_mirkwood_leather,itm_mirkwood_pad_bad,itm_leather_boots_bad,itm_leather_boots_dark_bad,itm_rohan_shoes,itm_woodelf_leather_boot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</text:p>
          </table:table-cell>
          <table:table-cell table:style-name="ce7" office:value-type="string" calcext:value-type="string">
            <text:p>a2_greenwood_veteran_scout</text:p>
          </table:table-cell>
          <table:table-cell table:style-name="ce7" office:value-type="string" calcext:value-type="string">
            <text:p>Greenwood_Veteran_Scout</text:p>
          </table:table-cell>
          <table:table-cell table:style-name="ce7" office:value-type="string" calcext:value-type="string">
            <text:p>Greenwood_Veteran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woodelf</text:p>
          </table:table-cell>
          <table:table-cell table:style-name="ce11" office:value-type="string" calcext:value-type="string">
            <text:p>itm_mirkwood_helm_a_bad,itm_hood_green,</text:p>
          </table:table-cell>
          <table:table-cell table:style-name="ce11" office:value-type="string" calcext:value-type="string">
            <text:p>itm_mirkwood_leather,itm_mirkwood_pad_bad,</text:p>
          </table:table-cell>
          <table:table-cell table:style-name="ce11"/>
          <table:table-cell table:style-name="ce19" office:value-type="string" calcext:value-type="string">
            <text:p>itm_leather_boots_bad,itm_leather_boots_dark_bad,itm_rohan_shoes,itm_woodelf_leather_boots,</text:p>
          </table:table-cell>
          <table:table-cell table:style-name="ce11" office:value-type="string" calcext:value-type="string">
            <text:p>itm_regular_bow,itm_woodelf_arrows,</text:p>
          </table:table-cell>
          <table:table-cell table:style-name="ce11" office:value-type="string" calcext:value-type="string">
            <text:p>itm_mirkwood_knife,itm_mirkwood_short_spear,itm_mirkwood_axe,</text:p>
          </table:table-cell>
          <table:table-cell table:style-name="ce11"/>
          <table:table-cell table:style-name="ce12" office:value-type="string" calcext:value-type="string">
            <text:p>attr_elf_tier_2</text:p>
          </table:table-cell>
          <table:table-cell table:style-name="ce12" office:value-type="string" calcext:value-type="string">
            <text:p>wp_elf_tier_bow_2</text:p>
          </table:table-cell>
          <table:table-cell table:style-name="ce13" office:value-type="string" calcext:value-type="string">
            <text:p>knows_common|knows_ironflesh_1|knows_power_strike_2|knows_power_draw_4|knows_athletics_4|knows_looting_1|knows_tracking_1|knows_tactics_1|knows_pathfinding_1|knows_spotting_1|knows_persuasion_1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B181]&lt;&gt;&quot;&quot;;[.C181]&lt;&gt;&quot;&quot;);CONCATENATE([Variables.$I$1];[Variables.$I$7];[.B181];[Variables.$I$7];[Variables.$I$6];[Variables.$I$7];[.C181];[Variables.$I$7];[Variables.$I$6];[Variables.$I$7];[.D181];[Variables.$I$7];[Variables.$I$6];[.E181];[Variables.$I$6];[.F181];[Variables.$I$6];[.G181];[Variables.$I$6];[.H181];[Variables.$I$6];[Variables.$I$1];[.I181];[.J181];[.K181];[.L181];[.M181];[.N181];[.O181];[Variables.$I$2];[Variables.$I$6];[.P181];[Variables.$I$6];[.Q181];[Variables.$I$6];[.R181];[Variables.$I$6];[.S181];[Variables.$I$6];[.T181];IF([.U181]&lt;&gt;&quot;&quot;;CONCATENATE([Variables.$I$6];[.U181]);&quot;&quot;);[Variables.$I$2];[Variables.$I$6]);IF([.B181]&lt;&gt;&quot;&quot;;CONCATENATE(&quot;#&quot;;[.B181]);&quot;&quot;))" office:value-type="string" office:string-value="[&quot;a2_greenwood_veteran_scout&quot;,&quot;Greenwood_Veteran_Scout&quot;,&quot;Greenwood_Veteran_Scouts&quot;,tf_woodelf| tfg_ranged| tfg_armor| tfg_boots| tf_no_capture_alive,0,0,fac_woodelf,[itm_mirkwood_helm_a_bad,itm_hood_green,itm_mirkwood_leather,itm_mirkwood_pad_bad,itm_leather_boots_bad,itm_leather_boots_dark_bad,itm_rohan_shoes,itm_woodelf_leather_boot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" calcext:value-type="string">
            <text:p>["a2_greenwood_veteran_scout","Greenwood_Veteran_Scout","Greenwood_Veteran_Scouts",tf_woodelf| tfg_ranged| tfg_armor| tfg_boots| tf_no_capture_alive,0,0,fac_woodelf,[itm_mirkwood_helm_a_bad,itm_hood_green,itm_mirkwood_leather,itm_mirkwood_pad_bad,itm_leather_boots_bad,itm_leather_boots_dark_bad,itm_rohan_shoes,itm_woodelf_leather_boot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</text:p>
          </table:table-cell>
          <table:table-cell table:number-columns-repeated="16362"/>
        </table:table-row>
        <table:table-row table:style-name="ro1">
          <table:table-cell table:style-name="ce6" table:formula="of:=IF(AND([.B182]&lt;&gt;&quot;&quot;;[.C182]&lt;&gt;&quot;&quot;);CONCATENATE([Variables.$I$1];[Variables.$I$7];[.B182];[Variables.$I$7];[Variables.$I$6];[Variables.$I$7];[.C182];[Variables.$I$7];[Variables.$I$6];[Variables.$I$7];[.D182];[Variables.$I$7];[Variables.$I$6];[.E182];[Variables.$I$6];[.F182];[Variables.$I$6];[.G182];[Variables.$I$6];[.H182];[Variables.$I$6];[Variables.$I$1];[.I182];[.J182];[.K182];[.L182];[.M182];[.N182];[.O182];[Variables.$I$2];[Variables.$I$6];[.P182];[Variables.$I$6];[.Q182];[Variables.$I$6];[.R182];[Variables.$I$6];[.S182];[Variables.$I$6];[.T182];IF([.U182]&lt;&gt;&quot;&quot;;CONCATENATE([Variables.$I$6];[.U182]);&quot;&quot;);[Variables.$I$2];[Variables.$I$6]);IF([.B182]&lt;&gt;&quot;&quot;;CONCATENATE(&quot;#&quot;;[.B182]);&quot;&quot;))" office:value-type="string" office:string-value="[&quot;a3_greenwood_archer&quot;,&quot;Greenwood_Archer&quot;,&quot;Greenwood_Archers&quot;,tf_woodelf| tfg_ranged| tfg_armor| tfg_helm| tfg_boots| tf_no_capture_alive,0,0,fac_woodelf,[itm_mirkwood_helm_a_bad,itm_mirkwood_pad,itm_leather_boots, itm_leather_boots_dark,itm_woodelf_leather_boots,itm_elven_bow,itm_woodelf_arrows,itm_mirkwood_short_spear,],attr_elf_tier_3,wp_elf_tier_bow_3,knows_common|knows_athletics_5|knows_power_draw_5|knows_power_strike_3|knows_ironflesh_3,mirkwood_elf_face_1,mirkwood_elf_face_2]," calcext:value-type="string">
            <text:p>["a3_greenwood_archer","Greenwood_Archer","Greenwood_Archers",tf_woodelf| tfg_ranged| tfg_armor| tfg_helm| tfg_boots| tf_no_capture_alive,0,0,fac_woodelf,[itm_mirkwood_helm_a_bad,itm_mirkwood_pad,itm_leather_boots, itm_leather_boots_dark,itm_woodelf_leather_boots,itm_elven_bow,itm_woodelf_arrows,itm_mirkwood_short_spear,],attr_elf_tier_3,wp_elf_tier_bow_3,knows_common|knows_athletics_5|knows_power_draw_5|knows_power_strike_3|knows_ironflesh_3,mirkwood_elf_face_1,mirkwood_elf_face_2],</text:p>
          </table:table-cell>
          <table:table-cell table:style-name="ce7" office:value-type="string" calcext:value-type="string">
            <text:p>a3_greenwood_archer</text:p>
          </table:table-cell>
          <table:table-cell table:style-name="ce7" office:value-type="string" calcext:value-type="string">
            <text:p>Greenwood_Archer</text:p>
          </table:table-cell>
          <table:table-cell table:style-name="ce7" office:value-type="string" calcext:value-type="string">
            <text:p>Greenwood_Archers</text:p>
          </table:table-cell>
          <table:table-cell table:style-name="ce8" office:value-type="string" calcext:value-type="string">
            <text:p>tf_woodelf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woodelf</text:p>
          </table:table-cell>
          <table:table-cell table:style-name="ce11" office:value-type="string" calcext:value-type="string">
            <text:p>itm_mirkwood_helm_a_bad,</text:p>
          </table:table-cell>
          <table:table-cell table:style-name="ce11" office:value-type="string" calcext:value-type="string">
            <text:p>itm_mirkwood_pad,</text:p>
          </table:table-cell>
          <table:table-cell table:style-name="ce11"/>
          <table:table-cell table:style-name="ce19" office:value-type="string" calcext:value-type="string">
            <text:p>itm_leather_boots, itm_leather_boots_dark,itm_woodelf_leather_boots,</text:p>
          </table:table-cell>
          <table:table-cell table:style-name="ce19" office:value-type="string" calcext:value-type="string">
            <text:p>itm_elven_bow,itm_woodelf_arrows,</text:p>
          </table:table-cell>
          <table:table-cell table:style-name="ce11" office:value-type="string" calcext:value-type="string">
            <text:p>itm_mirkwood_short_spear,</text:p>
          </table:table-cell>
          <table:table-cell table:style-name="ce11"/>
          <table:table-cell table:style-name="ce12" office:value-type="string" calcext:value-type="string">
            <text:p>attr_elf_tier_3</text:p>
          </table:table-cell>
          <table:table-cell table:style-name="ce12" office:value-type="string" calcext:value-type="string">
            <text:p>wp_elf_tier_bow_3</text:p>
          </table:table-cell>
          <table:table-cell table:style-name="ce12" office:value-type="string" calcext:value-type="string">
            <text:p>knows_common|knows_athletics_5|knows_power_draw_5|knows_power_strike_3|knows_ironflesh_3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B182]&lt;&gt;&quot;&quot;;[.C182]&lt;&gt;&quot;&quot;);CONCATENATE([Variables.$I$1];[Variables.$I$7];[.B182];[Variables.$I$7];[Variables.$I$6];[Variables.$I$7];[.C182];[Variables.$I$7];[Variables.$I$6];[Variables.$I$7];[.D182];[Variables.$I$7];[Variables.$I$6];[.E182];[Variables.$I$6];[.F182];[Variables.$I$6];[.G182];[Variables.$I$6];[.H182];[Variables.$I$6];[Variables.$I$1];[.I182];[.J182];[.K182];[.L182];[.M182];[.N182];[.O182];[Variables.$I$2];[Variables.$I$6];[.P182];[Variables.$I$6];[.Q182];[Variables.$I$6];[.R182];[Variables.$I$6];[.S182];[Variables.$I$6];[.T182];IF([.U182]&lt;&gt;&quot;&quot;;CONCATENATE([Variables.$I$6];[.U182]);&quot;&quot;);[Variables.$I$2];[Variables.$I$6]);IF([.B182]&lt;&gt;&quot;&quot;;CONCATENATE(&quot;#&quot;;[.B182]);&quot;&quot;))" office:value-type="string" office:string-value="[&quot;a3_greenwood_archer&quot;,&quot;Greenwood_Archer&quot;,&quot;Greenwood_Archers&quot;,tf_woodelf| tfg_ranged| tfg_armor| tfg_helm| tfg_boots| tf_no_capture_alive,0,0,fac_woodelf,[itm_mirkwood_helm_a_bad,itm_mirkwood_pad,itm_leather_boots, itm_leather_boots_dark,itm_woodelf_leather_boots,itm_elven_bow,itm_woodelf_arrows,itm_mirkwood_short_spear,],attr_elf_tier_3,wp_elf_tier_bow_3,knows_common|knows_athletics_5|knows_power_draw_5|knows_power_strike_3|knows_ironflesh_3,mirkwood_elf_face_1,mirkwood_elf_face_2]," calcext:value-type="string">
            <text:p>["a3_greenwood_archer","Greenwood_Archer","Greenwood_Archers",tf_woodelf| tfg_ranged| tfg_armor| tfg_helm| tfg_boots| tf_no_capture_alive,0,0,fac_woodelf,[itm_mirkwood_helm_a_bad,itm_mirkwood_pad,itm_leather_boots, itm_leather_boots_dark,itm_woodelf_leather_boots,itm_elven_bow,itm_woodelf_arrows,itm_mirkwood_short_spear,],attr_elf_tier_3,wp_elf_tier_bow_3,knows_common|knows_athletics_5|knows_power_draw_5|knows_power_strike_3|knows_ironflesh_3,mirkwood_elf_face_1,mirkwood_elf_face_2],</text:p>
          </table:table-cell>
          <table:table-cell table:number-columns-repeated="16362"/>
        </table:table-row>
        <table:table-row table:style-name="ro1">
          <table:table-cell table:style-name="ce6" table:formula="of:=IF(AND([.B183]&lt;&gt;&quot;&quot;;[.C183]&lt;&gt;&quot;&quot;);CONCATENATE([Variables.$I$1];[Variables.$I$7];[.B183];[Variables.$I$7];[Variables.$I$6];[Variables.$I$7];[.C183];[Variables.$I$7];[Variables.$I$6];[Variables.$I$7];[.D183];[Variables.$I$7];[Variables.$I$6];[.E183];[Variables.$I$6];[.F183];[Variables.$I$6];[.G183];[Variables.$I$6];[.H183];[Variables.$I$6];[Variables.$I$1];[.I183];[.J183];[.K183];[.L183];[.M183];[.N183];[.O183];[Variables.$I$2];[Variables.$I$6];[.P183];[Variables.$I$6];[.Q183];[Variables.$I$6];[.R183];[Variables.$I$6];[.S183];[Variables.$I$6];[.T183];IF([.U183]&lt;&gt;&quot;&quot;;CONCATENATE([Variables.$I$6];[.U183]);&quot;&quot;);[Variables.$I$2];[Variables.$I$6]);IF([.B183]&lt;&gt;&quot;&quot;;CONCATENATE(&quot;#&quot;;[.B183]);&quot;&quot;))" office:value-type="string" office:string-value="[&quot;a4_greenwood_veteran_archer&quot;,&quot;Greenwood_Veteran_Archer&quot;,&quot;Greenwood_Veteran_Archers&quot;,tf_woodelf| tfg_ranged| tfg_gloves| tfg_armor| tfg_helm| tfg_boots| tf_no_capture_alive,0,0,fac_woodelf,[itm_mirkwood_helm_a,itm_mirkwood_pad_good,itm_mirkwood_mail_bad,itm_mirkwood_boots,itm_woodelf_leather_boots_good,itm_mirkwood_bow,itm_woodelf_arrows,itm_mirkwood_short_spear,],attr_elf_tier_4,wp_elf_tier_bow_4,knows_common|knows_athletics_6|knows_power_draw_6|knows_power_strike_3|knows_ironflesh_4,mirkwood_elf_face_1,mirkwood_elf_face_2]," calcext:value-type="string">
            <text:p>["a4_greenwood_veteran_archer","Greenwood_Veteran_Archer","Greenwood_Veteran_Archers",tf_woodelf| tfg_ranged| tfg_gloves| tfg_armor| tfg_helm| tfg_boots| tf_no_capture_alive,0,0,fac_woodelf,[itm_mirkwood_helm_a,itm_mirkwood_pad_good,itm_mirkwood_mail_bad,itm_mirkwood_boots,itm_woodelf_leather_boots_good,itm_mirkwood_bow,itm_woodelf_arrows,itm_mirkwood_short_spear,],attr_elf_tier_4,wp_elf_tier_bow_4,knows_common|knows_athletics_6|knows_power_draw_6|knows_power_strike_3|knows_ironflesh_4,mirkwood_elf_face_1,mirkwood_elf_face_2],</text:p>
          </table:table-cell>
          <table:table-cell table:style-name="ce7" office:value-type="string" calcext:value-type="string">
            <text:p>a4_greenwood_veteran_archer</text:p>
          </table:table-cell>
          <table:table-cell table:style-name="ce7" office:value-type="string" calcext:value-type="string">
            <text:p>Greenwood_Veteran_Archer</text:p>
          </table:table-cell>
          <table:table-cell table:style-name="ce7" office:value-type="string" calcext:value-type="string">
            <text:p>Greenwood_Veteran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woodelf</text:p>
          </table:table-cell>
          <table:table-cell table:style-name="ce11" office:value-type="string" calcext:value-type="string">
            <text:p>itm_mirkwood_helm_a,</text:p>
          </table:table-cell>
          <table:table-cell table:style-name="ce11" office:value-type="string" calcext:value-type="string">
            <text:p>itm_mirkwood_pad_good,itm_mirkwood_mail_bad,</text:p>
          </table:table-cell>
          <table:table-cell table:style-name="ce11"/>
          <table:table-cell table:style-name="ce19" office:value-type="string" calcext:value-type="string">
            <text:p>itm_mirkwood_boots,itm_woodelf_leather_boots_good,</text:p>
          </table:table-cell>
          <table:table-cell table:style-name="ce11" office:value-type="string" calcext:value-type="string">
            <text:p>itm_mirkwood_bow,itm_woodelf_arrows,</text:p>
          </table:table-cell>
          <table:table-cell table:style-name="ce11" office:value-type="string" calcext:value-type="string">
            <text:p>itm_mirkwood_short_spear,</text:p>
          </table:table-cell>
          <table:table-cell table:style-name="ce11"/>
          <table:table-cell table:style-name="ce12" office:value-type="string" calcext:value-type="string">
            <text:p>attr_elf_tier_4</text:p>
          </table:table-cell>
          <table:table-cell table:style-name="ce12" office:value-type="string" calcext:value-type="string">
            <text:p>wp_elf_tier_bow_4</text:p>
          </table:table-cell>
          <table:table-cell table:style-name="ce12" office:value-type="string" calcext:value-type="string">
            <text:p>knows_common|knows_athletics_6|knows_power_draw_6|knows_power_strike_3|knows_ironflesh_4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B183]&lt;&gt;&quot;&quot;;[.C183]&lt;&gt;&quot;&quot;);CONCATENATE([Variables.$I$1];[Variables.$I$7];[.B183];[Variables.$I$7];[Variables.$I$6];[Variables.$I$7];[.C183];[Variables.$I$7];[Variables.$I$6];[Variables.$I$7];[.D183];[Variables.$I$7];[Variables.$I$6];[.E183];[Variables.$I$6];[.F183];[Variables.$I$6];[.G183];[Variables.$I$6];[.H183];[Variables.$I$6];[Variables.$I$1];[.I183];[.J183];[.K183];[.L183];[.M183];[.N183];[.O183];[Variables.$I$2];[Variables.$I$6];[.P183];[Variables.$I$6];[.Q183];[Variables.$I$6];[.R183];[Variables.$I$6];[.S183];[Variables.$I$6];[.T183];IF([.U183]&lt;&gt;&quot;&quot;;CONCATENATE([Variables.$I$6];[.U183]);&quot;&quot;);[Variables.$I$2];[Variables.$I$6]);IF([.B183]&lt;&gt;&quot;&quot;;CONCATENATE(&quot;#&quot;;[.B183]);&quot;&quot;))" office:value-type="string" office:string-value="[&quot;a4_greenwood_veteran_archer&quot;,&quot;Greenwood_Veteran_Archer&quot;,&quot;Greenwood_Veteran_Archers&quot;,tf_woodelf| tfg_ranged| tfg_gloves| tfg_armor| tfg_helm| tfg_boots| tf_no_capture_alive,0,0,fac_woodelf,[itm_mirkwood_helm_a,itm_mirkwood_pad_good,itm_mirkwood_mail_bad,itm_mirkwood_boots,itm_woodelf_leather_boots_good,itm_mirkwood_bow,itm_woodelf_arrows,itm_mirkwood_short_spear,],attr_elf_tier_4,wp_elf_tier_bow_4,knows_common|knows_athletics_6|knows_power_draw_6|knows_power_strike_3|knows_ironflesh_4,mirkwood_elf_face_1,mirkwood_elf_face_2]," calcext:value-type="string">
            <text:p>["a4_greenwood_veteran_archer","Greenwood_Veteran_Archer","Greenwood_Veteran_Archers",tf_woodelf| tfg_ranged| tfg_gloves| tfg_armor| tfg_helm| tfg_boots| tf_no_capture_alive,0,0,fac_woodelf,[itm_mirkwood_helm_a,itm_mirkwood_pad_good,itm_mirkwood_mail_bad,itm_mirkwood_boots,itm_woodelf_leather_boots_good,itm_mirkwood_bow,itm_woodelf_arrows,itm_mirkwood_short_spear,],attr_elf_tier_4,wp_elf_tier_bow_4,knows_common|knows_athletics_6|knows_power_draw_6|knows_power_strike_3|knows_ironflesh_4,mirkwood_elf_face_1,mirkwood_elf_face_2],</text:p>
          </table:table-cell>
          <table:table-cell table:number-columns-repeated="16362"/>
        </table:table-row>
        <table:table-row table:style-name="ro1">
          <table:table-cell table:style-name="ce6" table:formula="of:=IF(AND([.B184]&lt;&gt;&quot;&quot;;[.C184]&lt;&gt;&quot;&quot;);CONCATENATE([Variables.$I$1];[Variables.$I$7];[.B184];[Variables.$I$7];[Variables.$I$6];[Variables.$I$7];[.C184];[Variables.$I$7];[Variables.$I$6];[Variables.$I$7];[.D184];[Variables.$I$7];[Variables.$I$6];[.E184];[Variables.$I$6];[.F184];[Variables.$I$6];[.G184];[Variables.$I$6];[.H184];[Variables.$I$6];[Variables.$I$1];[.I184];[.J184];[.K184];[.L184];[.M184];[.N184];[.O184];[Variables.$I$2];[Variables.$I$6];[.P184];[Variables.$I$6];[.Q184];[Variables.$I$6];[.R184];[Variables.$I$6];[.S184];[Variables.$I$6];[.T184];IF([.U184]&lt;&gt;&quot;&quot;;CONCATENATE([Variables.$I$6];[.U184]);&quot;&quot;);[Variables.$I$2];[Variables.$I$6]);IF([.B184]&lt;&gt;&quot;&quot;;CONCATENATE(&quot;#&quot;;[.B184]);&quot;&quot;))" office:value-type="string" office:string-value="[&quot;a5_greenwood_master_archer&quot;,&quot;Greenwood_Master_Archer&quot;,&quot;Greenwood_Master_Archers&quot;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" calcext:value-type="string">
            <text:p>["a5_greenwood_master_archer","Greenwood_Master_Archer","Greenwood_Master_Archers"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</text:p>
          </table:table-cell>
          <table:table-cell table:style-name="ce7" office:value-type="string" calcext:value-type="string">
            <text:p>a5_greenwood_master_archer</text:p>
          </table:table-cell>
          <table:table-cell table:style-name="ce7" office:value-type="string" calcext:value-type="string">
            <text:p>Greenwood_Master_Archer</text:p>
          </table:table-cell>
          <table:table-cell table:style-name="ce7" office:value-type="string" calcext:value-type="string">
            <text:p>Greenwood_Master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woodelf</text:p>
          </table:table-cell>
          <table:table-cell table:style-name="ce19" office:value-type="string" calcext:value-type="string">
            <text:p>itm_mirkwood_helm_a_good,</text:p>
          </table:table-cell>
          <table:table-cell table:style-name="ce11" office:value-type="string" calcext:value-type="string">
            <text:p>itm_mirkwood_mail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mirkwood_boots,</text:p>
          </table:table-cell>
          <table:table-cell table:style-name="ce19" office:value-type="string" calcext:value-type="string">
            <text:p>itm_mirkwood_bow,itm_woodelf_arrows,</text:p>
          </table:table-cell>
          <table:table-cell table:style-name="ce11" office:value-type="string" calcext:value-type="string">
            <text:p>itm_mirkwood_war_spear,</text:p>
          </table:table-cell>
          <table:table-cell table:style-name="ce19"/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bow_5</text:p>
          </table:table-cell>
          <table:table-cell table:style-name="ce12" office:value-type="string" calcext:value-type="string">
            <text:p>knows_common|knows_athletics_7|knows_power_draw_6|knows_power_strike_4|knows_ironflesh_4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B184]&lt;&gt;&quot;&quot;;[.C184]&lt;&gt;&quot;&quot;);CONCATENATE([Variables.$I$1];[Variables.$I$7];[.B184];[Variables.$I$7];[Variables.$I$6];[Variables.$I$7];[.C184];[Variables.$I$7];[Variables.$I$6];[Variables.$I$7];[.D184];[Variables.$I$7];[Variables.$I$6];[.E184];[Variables.$I$6];[.F184];[Variables.$I$6];[.G184];[Variables.$I$6];[.H184];[Variables.$I$6];[Variables.$I$1];[.I184];[.J184];[.K184];[.L184];[.M184];[.N184];[.O184];[Variables.$I$2];[Variables.$I$6];[.P184];[Variables.$I$6];[.Q184];[Variables.$I$6];[.R184];[Variables.$I$6];[.S184];[Variables.$I$6];[.T184];IF([.U184]&lt;&gt;&quot;&quot;;CONCATENATE([Variables.$I$6];[.U184]);&quot;&quot;);[Variables.$I$2];[Variables.$I$6]);IF([.B184]&lt;&gt;&quot;&quot;;CONCATENATE(&quot;#&quot;;[.B184]);&quot;&quot;))" office:value-type="string" office:string-value="[&quot;a5_greenwood_master_archer&quot;,&quot;Greenwood_Master_Archer&quot;,&quot;Greenwood_Master_Archers&quot;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" calcext:value-type="string">
            <text:p>["a5_greenwood_master_archer","Greenwood_Master_Archer","Greenwood_Master_Archers"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</text:p>
          </table:table-cell>
          <table:table-cell table:number-columns-repeated="16362"/>
        </table:table-row>
        <table:table-row table:style-name="ro1">
          <table:table-cell table:style-name="ce6" table:formula="of:=IF(AND([.B185]&lt;&gt;&quot;&quot;;[.C185]&lt;&gt;&quot;&quot;);CONCATENATE([Variables.$I$1];[Variables.$I$7];[.B185];[Variables.$I$7];[Variables.$I$6];[Variables.$I$7];[.C185];[Variables.$I$7];[Variables.$I$6];[Variables.$I$7];[.D185];[Variables.$I$7];[Variables.$I$6];[.E185];[Variables.$I$6];[.F185];[Variables.$I$6];[.G185];[Variables.$I$6];[.H185];[Variables.$I$6];[Variables.$I$1];[.I185];[.J185];[.K185];[.L185];[.M185];[.N185];[.O185];[Variables.$I$2];[Variables.$I$6];[.P185];[Variables.$I$6];[.Q185];[Variables.$I$6];[.R185];[Variables.$I$6];[.S185];[Variables.$I$6];[.T185];IF([.U185]&lt;&gt;&quot;&quot;;CONCATENATE([Variables.$I$6];[.U185]);&quot;&quot;);[Variables.$I$2];[Variables.$I$6]);IF([.B185]&lt;&gt;&quot;&quot;;CONCATENATE(&quot;#&quot;;[.B185]);&quot;&quot;))" office:value-type="string" office:string-value="[&quot;a6_greenwood_chosen_marksman&quot;,&quot;Thranduil's_Chosen_Marksman&quot;,&quot;Thranduil's_Chosen_Marksmen&quot;,tf_woodelf| tfg_ranged| tfg_gloves|  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" calcext:value-type="string">
            <text:p>["a6_greenwood_chosen_marksman","Thranduil's_Chosen_Marksman","Thranduil's_Chosen_Marksmen",tf_woodelf| tfg_ranged| tfg_gloves| <text:s/>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</text:p>
          </table:table-cell>
          <table:table-cell table:style-name="ce7" office:value-type="string" calcext:value-type="string">
            <text:p>a6_greenwood_chosen_marksman</text:p>
          </table:table-cell>
          <table:table-cell table:style-name="ce7" office:value-type="string" calcext:value-type="string">
            <text:p>Thranduil's_Chosen_Marksman</text:p>
          </table:table-cell>
          <table:table-cell table:style-name="ce7" office:value-type="string" calcext:value-type="string">
            <text:p>Thranduil's_Chosen_Marksmen</text:p>
          </table:table-cell>
          <table:table-cell table:style-name="ce8" office:value-type="string" calcext:value-type="string">
            <text:p>tf_woodelf| tfg_ranged| tfg_gloves| <text:s/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woodelf</text:p>
          </table:table-cell>
          <table:table-cell table:style-name="ce19" office:value-type="string" calcext:value-type="string">
            <text:p>itm_mirkwood_helm_d,</text:p>
          </table:table-cell>
          <table:table-cell table:style-name="ce19" office:value-type="string" calcext:value-type="string">
            <text:p>itm_mirkwood_mail_good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mirkwood_boots,</text:p>
          </table:table-cell>
          <table:table-cell table:style-name="ce19" office:value-type="string" calcext:value-type="string">
            <text:p>itm_mirkwood_bow,itm_woodelf_arrows,itm_woodelf_arrows,</text:p>
          </table:table-cell>
          <table:table-cell table:style-name="ce11" office:value-type="string" calcext:value-type="string">
            <text:p>itm_mirkwood_great_spear,</text:p>
          </table:table-cell>
          <table:table-cell table:style-name="ce19"/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elf_tier_bow_6</text:p>
          </table:table-cell>
          <table:table-cell table:style-name="ce12" office:value-type="string" calcext:value-type="string">
            <text:p>knows_common|knows_athletics_8|knows_power_draw_7|knows_power_strike_5|knows_ironflesh_5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B185]&lt;&gt;&quot;&quot;;[.C185]&lt;&gt;&quot;&quot;);CONCATENATE([Variables.$I$1];[Variables.$I$7];[.B185];[Variables.$I$7];[Variables.$I$6];[Variables.$I$7];[.C185];[Variables.$I$7];[Variables.$I$6];[Variables.$I$7];[.D185];[Variables.$I$7];[Variables.$I$6];[.E185];[Variables.$I$6];[.F185];[Variables.$I$6];[.G185];[Variables.$I$6];[.H185];[Variables.$I$6];[Variables.$I$1];[.I185];[.J185];[.K185];[.L185];[.M185];[.N185];[.O185];[Variables.$I$2];[Variables.$I$6];[.P185];[Variables.$I$6];[.Q185];[Variables.$I$6];[.R185];[Variables.$I$6];[.S185];[Variables.$I$6];[.T185];IF([.U185]&lt;&gt;&quot;&quot;;CONCATENATE([Variables.$I$6];[.U185]);&quot;&quot;);[Variables.$I$2];[Variables.$I$6]);IF([.B185]&lt;&gt;&quot;&quot;;CONCATENATE(&quot;#&quot;;[.B185]);&quot;&quot;))" office:value-type="string" office:string-value="[&quot;a6_greenwood_chosen_marksman&quot;,&quot;Thranduil's_Chosen_Marksman&quot;,&quot;Thranduil's_Chosen_Marksmen&quot;,tf_woodelf| tfg_ranged| tfg_gloves|  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" calcext:value-type="string">
            <text:p>["a6_greenwood_chosen_marksman","Thranduil's_Chosen_Marksman","Thranduil's_Chosen_Marksmen",tf_woodelf| tfg_ranged| tfg_gloves| <text:s/>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</text:p>
          </table:table-cell>
          <table:table-cell table:number-columns-repeated="16362"/>
        </table:table-row>
        <table:table-row table:style-name="ro1">
          <table:table-cell table:style-name="ce6" table:formula="of:=IF(AND([.B186]&lt;&gt;&quot;&quot;;[.C186]&lt;&gt;&quot;&quot;);CONCATENATE([Variables.$I$1];[Variables.$I$7];[.B186];[Variables.$I$7];[Variables.$I$6];[Variables.$I$7];[.C186];[Variables.$I$7];[Variables.$I$6];[Variables.$I$7];[.D186];[Variables.$I$7];[Variables.$I$6];[.E186];[Variables.$I$6];[.F186];[Variables.$I$6];[.G186];[Variables.$I$6];[.H186];[Variables.$I$6];[Variables.$I$1];[.I186];[.J186];[.K186];[.L186];[.M186];[.N186];[.O186];[Variables.$I$2];[Variables.$I$6];[.P186];[Variables.$I$6];[.Q186];[Variables.$I$6];[.R186];[Variables.$I$6];[.S186];[Variables.$I$6];[.T186];IF([.U186]&lt;&gt;&quot;&quot;;CONCATENATE([Variables.$I$6];[.U186]);&quot;&quot;);[Variables.$I$2];[Variables.$I$6]);IF([.B186]&lt;&gt;&quot;&quot;;CONCATENATE(&quot;#&quot;;[.B186]);&quot;&quot;))" office:value-type="string" office:string-value="[&quot;a3_greenwood_sentinel&quot;,&quot;Greenwood_Sentinel&quot;,&quot;Greenwood_Sentinels&quot;,tf_woodelf| tfg_ranged| tfg_gloves| tfg_shield| tfg_armor| tfg_boots| tf_no_capture_alive,0,0,fac_woodelf,[itm_mirkwood_helm_a_bad,itm_hood_green,itm_mirkwood_leather_good,itm_mirkwood_boots,itm_woodelf_leather_boots_good,itm_elven_bow,itm_woodelf_arrows,itm_mirkwood_axe,itm_mirkwood_spear_shield_c,],attr_elf_tier_3,wp_elf_tier_3,knows_common|knows_athletics_6|knows_shield_2|knows_power_draw_5|knows_power_strike_4|knows_ironflesh_4,mirkwood_elf_face_1,mirkwood_elf_face_2]," calcext:value-type="string">
            <text:p>["a3_greenwood_sentinel","Greenwood_Sentinel","Greenwood_Sentinels",tf_woodelf| tfg_ranged| tfg_gloves| tfg_shield| tfg_armor| tfg_boots| tf_no_capture_alive,0,0,fac_woodelf,[itm_mirkwood_helm_a_bad,itm_hood_green,itm_mirkwood_leather_good,itm_mirkwood_boots,itm_woodelf_leather_boots_good,itm_elven_bow,itm_woodelf_arrows,itm_mirkwood_axe,itm_mirkwood_spear_shield_c,],attr_elf_tier_3,wp_elf_tier_3,knows_common|knows_athletics_6|knows_shield_2|knows_power_draw_5|knows_power_strike_4|knows_ironflesh_4,mirkwood_elf_face_1,mirkwood_elf_face_2],</text:p>
          </table:table-cell>
          <table:table-cell table:style-name="ce7" office:value-type="string" calcext:value-type="string">
            <text:p>a3_greenwood_sentinel</text:p>
          </table:table-cell>
          <table:table-cell table:style-name="ce7" office:value-type="string" calcext:value-type="string">
            <text:p>Greenwood_Sentinel</text:p>
          </table:table-cell>
          <table:table-cell table:style-name="ce7" office:value-type="string" calcext:value-type="string">
            <text:p>Greenwood_Sentinel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woodelf</text:p>
          </table:table-cell>
          <table:table-cell table:style-name="ce11" office:value-type="string" calcext:value-type="string">
            <text:p>itm_mirkwood_helm_a_bad,itm_hood_green,</text:p>
          </table:table-cell>
          <table:table-cell table:style-name="ce11" office:value-type="string" calcext:value-type="string">
            <text:p>itm_mirkwood_leather_good,</text:p>
          </table:table-cell>
          <table:table-cell table:style-name="ce11"/>
          <table:table-cell table:style-name="ce19" office:value-type="string" calcext:value-type="string">
            <text:p>itm_mirkwood_boots,itm_woodelf_leather_boots_good,</text:p>
          </table:table-cell>
          <table:table-cell table:style-name="ce19" office:value-type="string" calcext:value-type="string">
            <text:p>itm_elven_bow,itm_woodelf_arrows,</text:p>
          </table:table-cell>
          <table:table-cell table:style-name="ce11" office:value-type="string" calcext:value-type="string">
            <text:p>itm_mirkwood_axe,itm_mirkwood_spear_shield_c,</text:p>
          </table:table-cell>
          <table:table-cell table:style-name="ce11"/>
          <table:table-cell table:style-name="ce12" office:value-type="string" calcext:value-type="string">
            <text:p>attr_elf_tier_3</text:p>
          </table:table-cell>
          <table:table-cell table:style-name="ce12" office:value-type="string" calcext:value-type="string">
            <text:p>wp_elf_tier_3</text:p>
          </table:table-cell>
          <table:table-cell table:style-name="ce12" office:value-type="string" calcext:value-type="string">
            <text:p>knows_common|knows_athletics_6|knows_shield_2|knows_power_draw_5|knows_power_strike_4|knows_ironflesh_4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B186]&lt;&gt;&quot;&quot;;[.C186]&lt;&gt;&quot;&quot;);CONCATENATE([Variables.$I$1];[Variables.$I$7];[.B186];[Variables.$I$7];[Variables.$I$6];[Variables.$I$7];[.C186];[Variables.$I$7];[Variables.$I$6];[Variables.$I$7];[.D186];[Variables.$I$7];[Variables.$I$6];[.E186];[Variables.$I$6];[.F186];[Variables.$I$6];[.G186];[Variables.$I$6];[.H186];[Variables.$I$6];[Variables.$I$1];[.I186];[.J186];[.K186];[.L186];[.M186];[.N186];[.O186];[Variables.$I$2];[Variables.$I$6];[.P186];[Variables.$I$6];[.Q186];[Variables.$I$6];[.R186];[Variables.$I$6];[.S186];[Variables.$I$6];[.T186];IF([.U186]&lt;&gt;&quot;&quot;;CONCATENATE([Variables.$I$6];[.U186]);&quot;&quot;);[Variables.$I$2];[Variables.$I$6]);IF([.B186]&lt;&gt;&quot;&quot;;CONCATENATE(&quot;#&quot;;[.B186]);&quot;&quot;))" office:value-type="string" office:string-value="[&quot;a3_greenwood_sentinel&quot;,&quot;Greenwood_Sentinel&quot;,&quot;Greenwood_Sentinels&quot;,tf_woodelf| tfg_ranged| tfg_gloves| tfg_shield| tfg_armor| tfg_boots| tf_no_capture_alive,0,0,fac_woodelf,[itm_mirkwood_helm_a_bad,itm_hood_green,itm_mirkwood_leather_good,itm_mirkwood_boots,itm_woodelf_leather_boots_good,itm_elven_bow,itm_woodelf_arrows,itm_mirkwood_axe,itm_mirkwood_spear_shield_c,],attr_elf_tier_3,wp_elf_tier_3,knows_common|knows_athletics_6|knows_shield_2|knows_power_draw_5|knows_power_strike_4|knows_ironflesh_4,mirkwood_elf_face_1,mirkwood_elf_face_2]," calcext:value-type="string">
            <text:p>["a3_greenwood_sentinel","Greenwood_Sentinel","Greenwood_Sentinels",tf_woodelf| tfg_ranged| tfg_gloves| tfg_shield| tfg_armor| tfg_boots| tf_no_capture_alive,0,0,fac_woodelf,[itm_mirkwood_helm_a_bad,itm_hood_green,itm_mirkwood_leather_good,itm_mirkwood_boots,itm_woodelf_leather_boots_good,itm_elven_bow,itm_woodelf_arrows,itm_mirkwood_axe,itm_mirkwood_spear_shield_c,],attr_elf_tier_3,wp_elf_tier_3,knows_common|knows_athletics_6|knows_shield_2|knows_power_draw_5|knows_power_strike_4|knows_ironflesh_4,mirkwood_elf_face_1,mirkwood_elf_face_2],</text:p>
          </table:table-cell>
          <table:table-cell table:number-columns-repeated="16362"/>
        </table:table-row>
        <table:table-row table:style-name="ro1">
          <table:table-cell table:style-name="ce6" table:formula="of:=IF(AND([.B187]&lt;&gt;&quot;&quot;;[.C187]&lt;&gt;&quot;&quot;);CONCATENATE([Variables.$I$1];[Variables.$I$7];[.B187];[Variables.$I$7];[Variables.$I$6];[Variables.$I$7];[.C187];[Variables.$I$7];[Variables.$I$6];[Variables.$I$7];[.D187];[Variables.$I$7];[Variables.$I$6];[.E187];[Variables.$I$6];[.F187];[Variables.$I$6];[.G187];[Variables.$I$6];[.H187];[Variables.$I$6];[Variables.$I$1];[.I187];[.J187];[.K187];[.L187];[.M187];[.N187];[.O187];[Variables.$I$2];[Variables.$I$6];[.P187];[Variables.$I$6];[.Q187];[Variables.$I$6];[.R187];[Variables.$I$6];[.S187];[Variables.$I$6];[.T187];IF([.U187]&lt;&gt;&quot;&quot;;CONCATENATE([Variables.$I$6];[.U187]);&quot;&quot;);[Variables.$I$2];[Variables.$I$6]);IF([.B187]&lt;&gt;&quot;&quot;;CONCATENATE(&quot;#&quot;;[.B187]);&quot;&quot;))" office:value-type="string" office:string-value="[&quot;a4_greenwood_vet_sentinel&quot;,&quot;Greenwood_Veteran_Sentinel&quot;,&quot;Greenwood_Veteran_Sentinels&quot;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" calcext:value-type="string">
            <text:p>["a4_greenwood_vet_sentinel","Greenwood_Veteran_Sentinel","Greenwood_Veteran_Sentinels"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</text:p>
          </table:table-cell>
          <table:table-cell table:style-name="ce7" office:value-type="string" calcext:value-type="string">
            <text:p>a4_greenwood_vet_sentinel</text:p>
          </table:table-cell>
          <table:table-cell table:style-name="ce7" office:value-type="string" calcext:value-type="string">
            <text:p>Greenwood_Veteran_Sentinel</text:p>
          </table:table-cell>
          <table:table-cell table:style-name="ce7" office:value-type="string" calcext:value-type="string">
            <text:p>Greenwood_Veteran_Sentinels</text:p>
          </table:table-cell>
          <table:table-cell table:style-name="ce8" office:value-type="string" calcext:value-type="string">
            <text:p>tf_woodelf| tfg_ranged| tfg_gloves| tfg_shield| tfg_armor|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woodelf</text:p>
          </table:table-cell>
          <table:table-cell table:style-name="ce11" office:value-type="string" calcext:value-type="string">
            <text:p>itm_mirkwood_helm_a,</text:p>
          </table:table-cell>
          <table:table-cell table:style-name="ce11" office:value-type="string" calcext:value-type="string">
            <text:p>itm_mirkwood_pad_bad,itm_mirkwood_leather_good,</text:p>
          </table:table-cell>
          <table:table-cell table:style-name="ce11"/>
          <table:table-cell table:style-name="ce19" office:value-type="string" calcext:value-type="string">
            <text:p>itm_mirkwood_boots,</text:p>
          </table:table-cell>
          <table:table-cell table:style-name="ce11" office:value-type="string" calcext:value-type="string">
            <text:p>itm_mirkwood_bow,itm_woodelf_arrows,</text:p>
          </table:table-cell>
          <table:table-cell table:style-name="ce11" office:value-type="string" calcext:value-type="string">
            <text:p>itm_mirkwood_axe,itm_mirkwood_sword,itm_mirkwood_spear_shield_c,</text:p>
          </table:table-cell>
          <table:table-cell table:style-name="ce11"/>
          <table:table-cell table:style-name="ce12" office:value-type="string" calcext:value-type="string">
            <text:p>attr_elf_tier_4</text:p>
          </table:table-cell>
          <table:table-cell table:style-name="ce12" office:value-type="string" calcext:value-type="string">
            <text:p>wp_elf_tier_4</text:p>
          </table:table-cell>
          <table:table-cell table:style-name="ce12" office:value-type="string" calcext:value-type="string">
            <text:p>knows_common|knows_athletics_8|knows_shield_3|knows_power_draw_6|knows_power_strike_4|knows_ironflesh_4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B187]&lt;&gt;&quot;&quot;;[.C187]&lt;&gt;&quot;&quot;);CONCATENATE([Variables.$I$1];[Variables.$I$7];[.B187];[Variables.$I$7];[Variables.$I$6];[Variables.$I$7];[.C187];[Variables.$I$7];[Variables.$I$6];[Variables.$I$7];[.D187];[Variables.$I$7];[Variables.$I$6];[.E187];[Variables.$I$6];[.F187];[Variables.$I$6];[.G187];[Variables.$I$6];[.H187];[Variables.$I$6];[Variables.$I$1];[.I187];[.J187];[.K187];[.L187];[.M187];[.N187];[.O187];[Variables.$I$2];[Variables.$I$6];[.P187];[Variables.$I$6];[.Q187];[Variables.$I$6];[.R187];[Variables.$I$6];[.S187];[Variables.$I$6];[.T187];IF([.U187]&lt;&gt;&quot;&quot;;CONCATENATE([Variables.$I$6];[.U187]);&quot;&quot;);[Variables.$I$2];[Variables.$I$6]);IF([.B187]&lt;&gt;&quot;&quot;;CONCATENATE(&quot;#&quot;;[.B187]);&quot;&quot;))" office:value-type="string" office:string-value="[&quot;a4_greenwood_vet_sentinel&quot;,&quot;Greenwood_Veteran_Sentinel&quot;,&quot;Greenwood_Veteran_Sentinels&quot;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" calcext:value-type="string">
            <text:p>["a4_greenwood_vet_sentinel","Greenwood_Veteran_Sentinel","Greenwood_Veteran_Sentinels"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</text:p>
          </table:table-cell>
          <table:table-cell table:number-columns-repeated="16362"/>
        </table:table-row>
        <table:table-row table:style-name="ro1">
          <table:table-cell table:style-name="ce6" table:formula="of:=IF(AND([.B188]&lt;&gt;&quot;&quot;;[.C188]&lt;&gt;&quot;&quot;);CONCATENATE([Variables.$I$1];[Variables.$I$7];[.B188];[Variables.$I$7];[Variables.$I$6];[Variables.$I$7];[.C188];[Variables.$I$7];[Variables.$I$6];[Variables.$I$7];[.D188];[Variables.$I$7];[Variables.$I$6];[.E188];[Variables.$I$6];[.F188];[Variables.$I$6];[.G188];[Variables.$I$6];[.H188];[Variables.$I$6];[Variables.$I$1];[.I188];[.J188];[.K188];[.L188];[.M188];[.N188];[.O188];[Variables.$I$2];[Variables.$I$6];[.P188];[Variables.$I$6];[.Q188];[Variables.$I$6];[.R188];[Variables.$I$6];[.S188];[Variables.$I$6];[.T188];IF([.U188]&lt;&gt;&quot;&quot;;CONCATENATE([Variables.$I$6];[.U188]);&quot;&quot;);[Variables.$I$2];[Variables.$I$6]);IF([.B188]&lt;&gt;&quot;&quot;;CONCATENATE(&quot;#&quot;;[.B188]);&quot;&quot;))" office:value-type="string" office:string-value="[&quot;a5_greenwood_vigilant&quot;,&quot;Greenwood_Guardian&quot;,&quot;Greenwood_Guardians&quot;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" calcext:value-type="string">
            <text:p>["a5_greenwood_vigilant","Greenwood_Guardian","Greenwood_Guardians"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</text:p>
          </table:table-cell>
          <table:table-cell table:style-name="ce7" office:value-type="string" calcext:value-type="string">
            <text:p>a5_greenwood_vigilant</text:p>
          </table:table-cell>
          <table:table-cell table:style-name="ce7" office:value-type="string" calcext:value-type="string">
            <text:p>Greenwood_Guardian</text:p>
          </table:table-cell>
          <table:table-cell table:style-name="ce7" office:value-type="string" calcext:value-type="string">
            <text:p>Greenwood_Guardians</text:p>
          </table:table-cell>
          <table:table-cell table:style-name="ce8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woodelf</text:p>
          </table:table-cell>
          <table:table-cell table:style-name="ce19" office:value-type="string" calcext:value-type="string">
            <text:p>itm_mirkwood_helm_a_good,</text:p>
          </table:table-cell>
          <table:table-cell table:style-name="ce11" office:value-type="string" calcext:value-type="string">
            <text:p>itm_mirkwood_mail_bad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mirkwood_boots,</text:p>
          </table:table-cell>
          <table:table-cell table:style-name="ce19" office:value-type="string" calcext:value-type="string">
            <text:p>itm_mirkwood_bow,itm_woodelf_arrows,</text:p>
          </table:table-cell>
          <table:table-cell table:style-name="ce11" office:value-type="string" calcext:value-type="string">
            <text:p>itm_mirkwood_axe,itm_mirkwood_sword,itm_mirkwood_spear_shield_c,</text:p>
          </table:table-cell>
          <table:table-cell table:style-name="ce19"/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5</text:p>
          </table:table-cell>
          <table:table-cell table:style-name="ce12" office:value-type="string" calcext:value-type="string">
            <text:p>knows_common|knows_athletics_9|knows_shield_5|knows_power_draw_6|knows_power_strike_5|knows_ironflesh_4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B188]&lt;&gt;&quot;&quot;;[.C188]&lt;&gt;&quot;&quot;);CONCATENATE([Variables.$I$1];[Variables.$I$7];[.B188];[Variables.$I$7];[Variables.$I$6];[Variables.$I$7];[.C188];[Variables.$I$7];[Variables.$I$6];[Variables.$I$7];[.D188];[Variables.$I$7];[Variables.$I$6];[.E188];[Variables.$I$6];[.F188];[Variables.$I$6];[.G188];[Variables.$I$6];[.H188];[Variables.$I$6];[Variables.$I$1];[.I188];[.J188];[.K188];[.L188];[.M188];[.N188];[.O188];[Variables.$I$2];[Variables.$I$6];[.P188];[Variables.$I$6];[.Q188];[Variables.$I$6];[.R188];[Variables.$I$6];[.S188];[Variables.$I$6];[.T188];IF([.U188]&lt;&gt;&quot;&quot;;CONCATENATE([Variables.$I$6];[.U188]);&quot;&quot;);[Variables.$I$2];[Variables.$I$6]);IF([.B188]&lt;&gt;&quot;&quot;;CONCATENATE(&quot;#&quot;;[.B188]);&quot;&quot;))" office:value-type="string" office:string-value="[&quot;a5_greenwood_vigilant&quot;,&quot;Greenwood_Guardian&quot;,&quot;Greenwood_Guardians&quot;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" calcext:value-type="string">
            <text:p>["a5_greenwood_vigilant","Greenwood_Guardian","Greenwood_Guardians"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</text:p>
          </table:table-cell>
          <table:table-cell table:number-columns-repeated="16362"/>
        </table:table-row>
        <table:table-row table:style-name="ro1">
          <table:table-cell table:style-name="ce6" table:formula="of:=IF(AND([.B189]&lt;&gt;&quot;&quot;;[.C189]&lt;&gt;&quot;&quot;);CONCATENATE([Variables.$I$1];[Variables.$I$7];[.B189];[Variables.$I$7];[Variables.$I$6];[Variables.$I$7];[.C189];[Variables.$I$7];[Variables.$I$6];[Variables.$I$7];[.D189];[Variables.$I$7];[Variables.$I$6];[.E189];[Variables.$I$6];[.F189];[Variables.$I$6];[.G189];[Variables.$I$6];[.H189];[Variables.$I$6];[Variables.$I$1];[.I189];[.J189];[.K189];[.L189];[.M189];[.N189];[.O189];[Variables.$I$2];[Variables.$I$6];[.P189];[Variables.$I$6];[.Q189];[Variables.$I$6];[.R189];[Variables.$I$6];[.S189];[Variables.$I$6];[.T189];IF([.U189]&lt;&gt;&quot;&quot;;CONCATENATE([Variables.$I$6];[.U189]);&quot;&quot;);[Variables.$I$2];[Variables.$I$6]);IF([.B189]&lt;&gt;&quot;&quot;;CONCATENATE(&quot;#&quot;;[.B189]);&quot;&quot;))" office:value-type="string" office:string-value="[&quot;i2_greenwood_infantry&quot;,&quot;Greenwood_Infantry&quot;,&quot;Greenwood_Infantry&quot;,tf_woodelf| tfg_shield| tfg_armor| tfg_helm| tfg_boots| tf_no_capture_alive,0,0,fac_woodelf,[itm_mirkwood_helm_a_good,itm_mirkwood_helm_b,itm_hood_green,itm_mirkwood_scale_bad,itm_mirkwood_boots,itm_woodelf_leather_boots,itm_mirkwood_war_spear,itm_mirkwood_short_spear,itm_mirkwood_axe,itm_mirkwood_knife,itm_mirkwood_spear_shield_a,],attr_elf_tier_2,wp_elf_tier_2,knows_common|knows_ironflesh_2|knows_power_strike_3|knows_weapon_master_1|knows_shield_1|knows_athletics_4|knows_looting_1|knows_tracking_1|knows_tactics_1|knows_pathfinding_1|knows_spotting_1|knows_persuasion_1,mirkwood_elf_face_1,mirkwood_elf_face_2]," calcext:value-type="string">
            <text:p>["i2_greenwood_infantry","Greenwood_Infantry","Greenwood_Infantry",tf_woodelf| tfg_shield| tfg_armor| tfg_helm| tfg_boots| tf_no_capture_alive,0,0,fac_woodelf,[itm_mirkwood_helm_a_good,itm_mirkwood_helm_b,itm_hood_green,itm_mirkwood_scale_bad,itm_mirkwood_boots,itm_woodelf_leather_boots,itm_mirkwood_war_spear,itm_mirkwood_short_spear,itm_mirkwood_axe,itm_mirkwood_knife,itm_mirkwood_spear_shield_a,],attr_elf_tier_2,wp_elf_tier_2,knows_common|knows_ironflesh_2|knows_power_strike_3|knows_weapon_master_1|knows_shield_1|knows_athletics_4|knows_looting_1|knows_tracking_1|knows_tactics_1|knows_pathfinding_1|knows_spotting_1|knows_persuasion_1,mirkwood_elf_face_1,mirkwood_elf_face_2],</text:p>
          </table:table-cell>
          <table:table-cell table:style-name="ce7" office:value-type="string" calcext:value-type="string">
            <text:p>i2_greenwood_infantry</text:p>
          </table:table-cell>
          <table:table-cell table:number-columns-repeated="2" table:style-name="ce7" office:value-type="string" calcext:value-type="string">
            <text:p>Greenwood_Infantry</text:p>
          </table:table-cell>
          <table:table-cell table:style-name="ce8" office:value-type="string" calcext:value-type="string">
            <text:p>tf_woodelf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woodelf</text:p>
          </table:table-cell>
          <table:table-cell table:style-name="ce19" office:value-type="string" calcext:value-type="string">
            <text:p>itm_mirkwood_helm_a_good,itm_mirkwood_helm_b,<text:span text:style-name="T1">itm_hood_green,</text:span></text:p>
          </table:table-cell>
          <table:table-cell table:style-name="ce19" office:value-type="string" calcext:value-type="string">
            <text:p>itm_mirkwood_scale_bad,</text:p>
          </table:table-cell>
          <table:table-cell table:style-name="ce11"/>
          <table:table-cell table:style-name="ce19" office:value-type="string" calcext:value-type="string">
            <text:p>itm_mirkwood_boots,itm_woodelf_leather_boots,</text:p>
          </table:table-cell>
          <table:table-cell table:style-name="ce19" office:value-type="string" calcext:value-type="string">
            <text:p>itm_mirkwood_war_spear,itm_mirkwood_short_spear,itm_mirkwood_axe,itm_mirkwood_knife,</text:p>
          </table:table-cell>
          <table:table-cell table:style-name="ce19" office:value-type="string" calcext:value-type="string">
            <text:p>itm_mirkwood_spear_shield_a,</text:p>
          </table:table-cell>
          <table:table-cell table:style-name="ce19"/>
          <table:table-cell table:style-name="ce12" office:value-type="string" calcext:value-type="string">
            <text:p>attr_elf_tier_2</text:p>
          </table:table-cell>
          <table:table-cell table:style-name="ce12" office:value-type="string" calcext:value-type="string">
            <text:p>wp_elf_tier_2</text:p>
          </table:table-cell>
          <table:table-cell table:style-name="ce13" office:value-type="string" calcext:value-type="string">
            <text:p>knows_common|knows_ironflesh_2|knows_power_strike_3|knows_weapon_master_1|knows_shield_1|knows_athletics_4|knows_looting_1|knows_tracking_1|knows_tactics_1|knows_pathfinding_1|knows_spotting_1|knows_persuasion_1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B189]&lt;&gt;&quot;&quot;;[.C189]&lt;&gt;&quot;&quot;);CONCATENATE([Variables.$I$1];[Variables.$I$7];[.B189];[Variables.$I$7];[Variables.$I$6];[Variables.$I$7];[.C189];[Variables.$I$7];[Variables.$I$6];[Variables.$I$7];[.D189];[Variables.$I$7];[Variables.$I$6];[.E189];[Variables.$I$6];[.F189];[Variables.$I$6];[.G189];[Variables.$I$6];[.H189];[Variables.$I$6];[Variables.$I$1];[.I189];[.J189];[.K189];[.L189];[.M189];[.N189];[.O189];[Variables.$I$2];[Variables.$I$6];[.P189];[Variables.$I$6];[.Q189];[Variables.$I$6];[.R189];[Variables.$I$6];[.S189];[Variables.$I$6];[.T189];IF([.U189]&lt;&gt;&quot;&quot;;CONCATENATE([Variables.$I$6];[.U189]);&quot;&quot;);[Variables.$I$2];[Variables.$I$6]);IF([.B189]&lt;&gt;&quot;&quot;;CONCATENATE(&quot;#&quot;;[.B189]);&quot;&quot;))" office:value-type="string" office:string-value="[&quot;i2_greenwood_infantry&quot;,&quot;Greenwood_Infantry&quot;,&quot;Greenwood_Infantry&quot;,tf_woodelf| tfg_shield| tfg_armor| tfg_helm| tfg_boots| tf_no_capture_alive,0,0,fac_woodelf,[itm_mirkwood_helm_a_good,itm_mirkwood_helm_b,itm_hood_green,itm_mirkwood_scale_bad,itm_mirkwood_boots,itm_woodelf_leather_boots,itm_mirkwood_war_spear,itm_mirkwood_short_spear,itm_mirkwood_axe,itm_mirkwood_knife,itm_mirkwood_spear_shield_a,],attr_elf_tier_2,wp_elf_tier_2,knows_common|knows_ironflesh_2|knows_power_strike_3|knows_weapon_master_1|knows_shield_1|knows_athletics_4|knows_looting_1|knows_tracking_1|knows_tactics_1|knows_pathfinding_1|knows_spotting_1|knows_persuasion_1,mirkwood_elf_face_1,mirkwood_elf_face_2]," calcext:value-type="string">
            <text:p>["i2_greenwood_infantry","Greenwood_Infantry","Greenwood_Infantry",tf_woodelf| tfg_shield| tfg_armor| tfg_helm| tfg_boots| tf_no_capture_alive,0,0,fac_woodelf,[itm_mirkwood_helm_a_good,itm_mirkwood_helm_b,itm_hood_green,itm_mirkwood_scale_bad,itm_mirkwood_boots,itm_woodelf_leather_boots,itm_mirkwood_war_spear,itm_mirkwood_short_spear,itm_mirkwood_axe,itm_mirkwood_knife,itm_mirkwood_spear_shield_a,],attr_elf_tier_2,wp_elf_tier_2,knows_common|knows_ironflesh_2|knows_power_strike_3|knows_weapon_master_1|knows_shield_1|knows_athletics_4|knows_looting_1|knows_tracking_1|knows_tactics_1|knows_pathfinding_1|knows_spotting_1|knows_persuasion_1,mirkwood_elf_face_1,mirkwood_elf_face_2],</text:p>
          </table:table-cell>
          <table:table-cell table:number-columns-repeated="16362"/>
        </table:table-row>
        <table:table-row table:style-name="ro1">
          <table:table-cell table:style-name="ce6" table:formula="of:=IF(AND([.B190]&lt;&gt;&quot;&quot;;[.C190]&lt;&gt;&quot;&quot;);CONCATENATE([Variables.$I$1];[Variables.$I$7];[.B190];[Variables.$I$7];[Variables.$I$6];[Variables.$I$7];[.C190];[Variables.$I$7];[Variables.$I$6];[Variables.$I$7];[.D190];[Variables.$I$7];[Variables.$I$6];[.E190];[Variables.$I$6];[.F190];[Variables.$I$6];[.G190];[Variables.$I$6];[.H190];[Variables.$I$6];[Variables.$I$1];[.I190];[.J190];[.K190];[.L190];[.M190];[.N190];[.O190];[Variables.$I$2];[Variables.$I$6];[.P190];[Variables.$I$6];[.Q190];[Variables.$I$6];[.R190];[Variables.$I$6];[.S190];[Variables.$I$6];[.T190];IF([.U190]&lt;&gt;&quot;&quot;;CONCATENATE([Variables.$I$6];[.U190]);&quot;&quot;);[Variables.$I$2];[Variables.$I$6]);IF([.B190]&lt;&gt;&quot;&quot;;CONCATENATE(&quot;#&quot;;[.B190]);&quot;&quot;))" office:value-type="string" office:string-value="[&quot;i3_greenwood_vet_infantry&quot;,&quot;Greenwood_Veteran_Infantry&quot;,&quot;Greenwood_Veteran_Infantry&quot;,tf_woodelf| tfg_gloves| tfg_shield| tfg_armor| tfg_helm| tfg_boots |tfg_polearm| tf_no_capture_alive,0,0,fac_woodelf,[itm_mirkwood_helm_b_good,itm_mirkwood_helm_c,itm_mirkwood_scale,itm_leather_gloves,itm_mirkwood_boots,itm_woodelf_leather_boots_good,itm_mirkwood_war_spear,itm_mirkwood_axe,itm_mirkwood_sword,itm_mirkwood_spear_shield_a,],attr_elf_tier_3,wp_elf_tier_3,knows_common|knows_athletics_6|knows_shield_3|knows_power_strike_4|knows_ironflesh_4,mirkwood_elf_face_1,mirkwood_elf_face_2]," calcext:value-type="string">
            <text:p>["i3_greenwood_vet_infantry","Greenwood_Veteran_Infantry","Greenwood_Veteran_Infantry",tf_woodelf| tfg_gloves| tfg_shield| tfg_armor| tfg_helm| tfg_boots |tfg_polearm| tf_no_capture_alive,0,0,fac_woodelf,[itm_mirkwood_helm_b_good,itm_mirkwood_helm_c,itm_mirkwood_scale,itm_leather_gloves,itm_mirkwood_boots,itm_woodelf_leather_boots_good,itm_mirkwood_war_spear,itm_mirkwood_axe,itm_mirkwood_sword,itm_mirkwood_spear_shield_a,],attr_elf_tier_3,wp_elf_tier_3,knows_common|knows_athletics_6|knows_shield_3|knows_power_strike_4|knows_ironflesh_4,mirkwood_elf_face_1,mirkwood_elf_face_2],</text:p>
          </table:table-cell>
          <table:table-cell table:style-name="ce7" office:value-type="string" calcext:value-type="string">
            <text:p>i3_greenwood_vet_infantry</text:p>
          </table:table-cell>
          <table:table-cell table:number-columns-repeated="2" table:style-name="ce7" office:value-type="string" calcext:value-type="string">
            <text:p>Greenwood_Veteran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woodelf</text:p>
          </table:table-cell>
          <table:table-cell table:style-name="ce11" office:value-type="string" calcext:value-type="string">
            <text:p>itm_mirkwood_helm_b_good,itm_mirkwood_helm_c,</text:p>
          </table:table-cell>
          <table:table-cell table:style-name="ce11" office:value-type="string" calcext:value-type="string">
            <text:p>itm_mirkwood_scale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mirkwood_boots,itm_woodelf_leather_boots_good,</text:p>
          </table:table-cell>
          <table:table-cell table:style-name="ce19" office:value-type="string" calcext:value-type="string">
            <text:p>itm_mirkwood_war_spear,itm_mirkwood_axe,itm_mirkwood_sword,</text:p>
          </table:table-cell>
          <table:table-cell table:style-name="ce11" office:value-type="string" calcext:value-type="string">
            <text:p>itm_mirkwood_spear_shield_a,</text:p>
          </table:table-cell>
          <table:table-cell table:style-name="ce11"/>
          <table:table-cell table:style-name="ce12" office:value-type="string" calcext:value-type="string">
            <text:p>attr_elf_tier_3</text:p>
          </table:table-cell>
          <table:table-cell table:style-name="ce12" office:value-type="string" calcext:value-type="string">
            <text:p>wp_elf_tier_3</text:p>
          </table:table-cell>
          <table:table-cell table:style-name="ce12" office:value-type="string" calcext:value-type="string">
            <text:p>knows_common|knows_athletics_6|knows_shield_3|knows_power_strike_4|knows_ironflesh_4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B190]&lt;&gt;&quot;&quot;;[.C190]&lt;&gt;&quot;&quot;);CONCATENATE([Variables.$I$1];[Variables.$I$7];[.B190];[Variables.$I$7];[Variables.$I$6];[Variables.$I$7];[.C190];[Variables.$I$7];[Variables.$I$6];[Variables.$I$7];[.D190];[Variables.$I$7];[Variables.$I$6];[.E190];[Variables.$I$6];[.F190];[Variables.$I$6];[.G190];[Variables.$I$6];[.H190];[Variables.$I$6];[Variables.$I$1];[.I190];[.J190];[.K190];[.L190];[.M190];[.N190];[.O190];[Variables.$I$2];[Variables.$I$6];[.P190];[Variables.$I$6];[.Q190];[Variables.$I$6];[.R190];[Variables.$I$6];[.S190];[Variables.$I$6];[.T190];IF([.U190]&lt;&gt;&quot;&quot;;CONCATENATE([Variables.$I$6];[.U190]);&quot;&quot;);[Variables.$I$2];[Variables.$I$6]);IF([.B190]&lt;&gt;&quot;&quot;;CONCATENATE(&quot;#&quot;;[.B190]);&quot;&quot;))" office:value-type="string" office:string-value="[&quot;i3_greenwood_vet_infantry&quot;,&quot;Greenwood_Veteran_Infantry&quot;,&quot;Greenwood_Veteran_Infantry&quot;,tf_woodelf| tfg_gloves| tfg_shield| tfg_armor| tfg_helm| tfg_boots |tfg_polearm| tf_no_capture_alive,0,0,fac_woodelf,[itm_mirkwood_helm_b_good,itm_mirkwood_helm_c,itm_mirkwood_scale,itm_leather_gloves,itm_mirkwood_boots,itm_woodelf_leather_boots_good,itm_mirkwood_war_spear,itm_mirkwood_axe,itm_mirkwood_sword,itm_mirkwood_spear_shield_a,],attr_elf_tier_3,wp_elf_tier_3,knows_common|knows_athletics_6|knows_shield_3|knows_power_strike_4|knows_ironflesh_4,mirkwood_elf_face_1,mirkwood_elf_face_2]," calcext:value-type="string">
            <text:p>["i3_greenwood_vet_infantry","Greenwood_Veteran_Infantry","Greenwood_Veteran_Infantry",tf_woodelf| tfg_gloves| tfg_shield| tfg_armor| tfg_helm| tfg_boots |tfg_polearm| tf_no_capture_alive,0,0,fac_woodelf,[itm_mirkwood_helm_b_good,itm_mirkwood_helm_c,itm_mirkwood_scale,itm_leather_gloves,itm_mirkwood_boots,itm_woodelf_leather_boots_good,itm_mirkwood_war_spear,itm_mirkwood_axe,itm_mirkwood_sword,itm_mirkwood_spear_shield_a,],attr_elf_tier_3,wp_elf_tier_3,knows_common|knows_athletics_6|knows_shield_3|knows_power_strike_4|knows_ironflesh_4,mirkwood_elf_face_1,mirkwood_elf_face_2],</text:p>
          </table:table-cell>
          <table:table-cell table:number-columns-repeated="16362"/>
        </table:table-row>
        <table:table-row table:style-name="ro1">
          <table:table-cell table:style-name="ce6" table:formula="of:=IF(AND([.B191]&lt;&gt;&quot;&quot;;[.C191]&lt;&gt;&quot;&quot;);CONCATENATE([Variables.$I$1];[Variables.$I$7];[.B191];[Variables.$I$7];[Variables.$I$6];[Variables.$I$7];[.C191];[Variables.$I$7];[Variables.$I$6];[Variables.$I$7];[.D191];[Variables.$I$7];[Variables.$I$6];[.E191];[Variables.$I$6];[.F191];[Variables.$I$6];[.G191];[Variables.$I$6];[.H191];[Variables.$I$6];[Variables.$I$1];[.I191];[.J191];[.K191];[.L191];[.M191];[.N191];[.O191];[Variables.$I$2];[Variables.$I$6];[.P191];[Variables.$I$6];[.Q191];[Variables.$I$6];[.R191];[Variables.$I$6];[.S191];[Variables.$I$6];[.T191];IF([.U191]&lt;&gt;&quot;&quot;;CONCATENATE([Variables.$I$6];[.U191]);&quot;&quot;);[Variables.$I$2];[Variables.$I$6]);IF([.B191]&lt;&gt;&quot;&quot;;CONCATENATE(&quot;#&quot;;[.B191]);&quot;&quot;))" office:value-type="string" office:string-value="[&quot;i4_greenwood_elite_infantry&quot;,&quot;Greenwood_Elite_Infantry&quot;,&quot;Greenwood_Elite_Infantry&quot;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" calcext:value-type="string">
            <text:p>["i4_greenwood_elite_infantry","Greenwood_Elite_Infantry","Greenwood_Elite_Infantry"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</text:p>
          </table:table-cell>
          <table:table-cell table:style-name="ce7" office:value-type="string" calcext:value-type="string">
            <text:p>i4_greenwood_elite_infantry</text:p>
          </table:table-cell>
          <table:table-cell table:number-columns-repeated="2" table:style-name="ce7" office:value-type="string" calcext:value-type="string">
            <text:p>Greenwood_Elite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woodelf</text:p>
          </table:table-cell>
          <table:table-cell table:style-name="ce11" office:value-type="string" calcext:value-type="string">
            <text:p>itm_mirkwood_helm_c_good,</text:p>
          </table:table-cell>
          <table:table-cell table:style-name="ce11" office:value-type="string" calcext:value-type="string">
            <text:p>itm_mirkwood_scale_good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mirkwood_boots,</text:p>
          </table:table-cell>
          <table:table-cell table:style-name="ce11" office:value-type="string" calcext:value-type="string">
            <text:p>itm_mirkwood_war_spear,itm_mirkwood_axe,itm_mirkwood_sword,</text:p>
          </table:table-cell>
          <table:table-cell table:style-name="ce11" office:value-type="string" calcext:value-type="string">
            <text:p>itm_mirkwood_spear_shield_b,</text:p>
          </table:table-cell>
          <table:table-cell table:style-name="ce11"/>
          <table:table-cell table:style-name="ce12" office:value-type="string" calcext:value-type="string">
            <text:p>attr_elf_tier_4</text:p>
          </table:table-cell>
          <table:table-cell table:style-name="ce12" office:value-type="string" calcext:value-type="string">
            <text:p>wp_elf_tier_4</text:p>
          </table:table-cell>
          <table:table-cell table:style-name="ce12" office:value-type="string" calcext:value-type="string">
            <text:p>knows_common|knows_athletics_7|knows_shield_4|knows_power_strike_5|knows_ironflesh_5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B191]&lt;&gt;&quot;&quot;;[.C191]&lt;&gt;&quot;&quot;);CONCATENATE([Variables.$I$1];[Variables.$I$7];[.B191];[Variables.$I$7];[Variables.$I$6];[Variables.$I$7];[.C191];[Variables.$I$7];[Variables.$I$6];[Variables.$I$7];[.D191];[Variables.$I$7];[Variables.$I$6];[.E191];[Variables.$I$6];[.F191];[Variables.$I$6];[.G191];[Variables.$I$6];[.H191];[Variables.$I$6];[Variables.$I$1];[.I191];[.J191];[.K191];[.L191];[.M191];[.N191];[.O191];[Variables.$I$2];[Variables.$I$6];[.P191];[Variables.$I$6];[.Q191];[Variables.$I$6];[.R191];[Variables.$I$6];[.S191];[Variables.$I$6];[.T191];IF([.U191]&lt;&gt;&quot;&quot;;CONCATENATE([Variables.$I$6];[.U191]);&quot;&quot;);[Variables.$I$2];[Variables.$I$6]);IF([.B191]&lt;&gt;&quot;&quot;;CONCATENATE(&quot;#&quot;;[.B191]);&quot;&quot;))" office:value-type="string" office:string-value="[&quot;i4_greenwood_elite_infantry&quot;,&quot;Greenwood_Elite_Infantry&quot;,&quot;Greenwood_Elite_Infantry&quot;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" calcext:value-type="string">
            <text:p>["i4_greenwood_elite_infantry","Greenwood_Elite_Infantry","Greenwood_Elite_Infantry"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</text:p>
          </table:table-cell>
          <table:table-cell table:number-columns-repeated="16362"/>
        </table:table-row>
        <table:table-row table:style-name="ro1">
          <table:table-cell table:style-name="ce6" table:formula="of:=IF(AND([.B192]&lt;&gt;&quot;&quot;;[.C192]&lt;&gt;&quot;&quot;);CONCATENATE([Variables.$I$1];[Variables.$I$7];[.B192];[Variables.$I$7];[Variables.$I$6];[Variables.$I$7];[.C192];[Variables.$I$7];[Variables.$I$6];[Variables.$I$7];[.D192];[Variables.$I$7];[Variables.$I$6];[.E192];[Variables.$I$6];[.F192];[Variables.$I$6];[.G192];[Variables.$I$6];[.H192];[Variables.$I$6];[Variables.$I$1];[.I192];[.J192];[.K192];[.L192];[.M192];[.N192];[.O192];[Variables.$I$2];[Variables.$I$6];[.P192];[Variables.$I$6];[.Q192];[Variables.$I$6];[.R192];[Variables.$I$6];[.S192];[Variables.$I$6];[.T192];IF([.U192]&lt;&gt;&quot;&quot;;CONCATENATE([Variables.$I$6];[.U192]);&quot;&quot;);[Variables.$I$2];[Variables.$I$6]);IF([.B192]&lt;&gt;&quot;&quot;;CONCATENATE(&quot;#&quot;;[.B192]);&quot;&quot;))" office:value-type="string" office:string-value="[&quot;i5_greenwood_chosen_shieldmaster&quot;,&quot;Thranduil's_Chosen_Shield_Master&quot;,&quot;Thranduil's_Chosen_Shield_Masters&quot;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" calcext:value-type="string">
            <text:p>["i5_greenwood_chosen_shieldmaster","Thranduil's_Chosen_Shield_Master","Thranduil's_Chosen_Shield_Masters"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</text:p>
          </table:table-cell>
          <table:table-cell table:style-name="ce7" office:value-type="string" calcext:value-type="string">
            <text:p>i5_greenwood_chosen_shieldmaster</text:p>
          </table:table-cell>
          <table:table-cell table:style-name="ce7" office:value-type="string" calcext:value-type="string">
            <text:p>Thranduil's_Chosen_Shield_Master</text:p>
          </table:table-cell>
          <table:table-cell table:style-name="ce7" office:value-type="string" calcext:value-type="string">
            <text:p>Thranduil's_Chosen_Shield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woodelf</text:p>
          </table:table-cell>
          <table:table-cell table:style-name="ce19" office:value-type="string" calcext:value-type="string">
            <text:p>itm_mirkwood_helm_d_good,</text:p>
          </table:table-cell>
          <table:table-cell table:style-name="ce11" office:value-type="string" calcext:value-type="string">
            <text:p>itm_mirkwood_scale_good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mirkwood_boots,</text:p>
          </table:table-cell>
          <table:table-cell table:style-name="ce11" office:value-type="string" calcext:value-type="string">
            <text:p>itm_mirkwood_war_spear,itm_mirkwood_axe,itm_mirkwood_sword,</text:p>
          </table:table-cell>
          <table:table-cell table:style-name="ce11" office:value-type="string" calcext:value-type="string">
            <text:p>itm_mirkwood_spear_shield_b,</text:p>
          </table:table-cell>
          <table:table-cell table:style-name="ce19"/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5</text:p>
          </table:table-cell>
          <table:table-cell table:style-name="ce12" office:value-type="string" calcext:value-type="string">
            <text:p>knows_common|knows_athletics_8|knows_shield_6|knows_power_strike_6|knows_ironflesh_6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B192]&lt;&gt;&quot;&quot;;[.C192]&lt;&gt;&quot;&quot;);CONCATENATE([Variables.$I$1];[Variables.$I$7];[.B192];[Variables.$I$7];[Variables.$I$6];[Variables.$I$7];[.C192];[Variables.$I$7];[Variables.$I$6];[Variables.$I$7];[.D192];[Variables.$I$7];[Variables.$I$6];[.E192];[Variables.$I$6];[.F192];[Variables.$I$6];[.G192];[Variables.$I$6];[.H192];[Variables.$I$6];[Variables.$I$1];[.I192];[.J192];[.K192];[.L192];[.M192];[.N192];[.O192];[Variables.$I$2];[Variables.$I$6];[.P192];[Variables.$I$6];[.Q192];[Variables.$I$6];[.R192];[Variables.$I$6];[.S192];[Variables.$I$6];[.T192];IF([.U192]&lt;&gt;&quot;&quot;;CONCATENATE([Variables.$I$6];[.U192]);&quot;&quot;);[Variables.$I$2];[Variables.$I$6]);IF([.B192]&lt;&gt;&quot;&quot;;CONCATENATE(&quot;#&quot;;[.B192]);&quot;&quot;))" office:value-type="string" office:string-value="[&quot;i5_greenwood_chosen_shieldmaster&quot;,&quot;Thranduil's_Chosen_Shield_Master&quot;,&quot;Thranduil's_Chosen_Shield_Masters&quot;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" calcext:value-type="string">
            <text:p>["i5_greenwood_chosen_shieldmaster","Thranduil's_Chosen_Shield_Master","Thranduil's_Chosen_Shield_Masters"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</text:p>
          </table:table-cell>
          <table:table-cell table:number-columns-repeated="16362"/>
        </table:table-row>
        <table:table-row table:style-name="ro1">
          <table:table-cell table:style-name="ce6" table:formula="of:=IF(AND([.B193]&lt;&gt;&quot;&quot;;[.C193]&lt;&gt;&quot;&quot;);CONCATENATE([Variables.$I$1];[Variables.$I$7];[.B193];[Variables.$I$7];[Variables.$I$6];[Variables.$I$7];[.C193];[Variables.$I$7];[Variables.$I$6];[Variables.$I$7];[.D193];[Variables.$I$7];[Variables.$I$6];[.E193];[Variables.$I$6];[.F193];[Variables.$I$6];[.G193];[Variables.$I$6];[.H193];[Variables.$I$6];[Variables.$I$1];[.I193];[.J193];[.K193];[.L193];[.M193];[.N193];[.O193];[Variables.$I$2];[Variables.$I$6];[.P193];[Variables.$I$6];[.Q193];[Variables.$I$6];[.R193];[Variables.$I$6];[.S193];[Variables.$I$6];[.T193];IF([.U193]&lt;&gt;&quot;&quot;;CONCATENATE([Variables.$I$6];[.U193]);&quot;&quot;);[Variables.$I$2];[Variables.$I$6]);IF([.B193]&lt;&gt;&quot;&quot;;CONCATENATE(&quot;#&quot;;[.B193]);&quot;&quot;))" office:value-type="string" office:string-value="[&quot;i5_greenwood_chosen_spearmaster&quot;,&quot;Thranduil's_Chosen_Spear_Master&quot;,&quot;Thranduil's_Chosen_Spear_Masters&quot;,tf_woodelf| tfg_gloves| tfg_shield| tfg_armor| tfg_helm| tfg_boots |tfg_polearm| tf_no_capture_alive,0,0,fac_woodelf,[itm_mirkwood_helm_d_good,itm_mirkwood_heavy_scale,itm_mail_mittens,itm_mirkwood_boots,itm_splinted_greaves,itm_mirkwood_great_spear,],attr_elf_tier_5,wp_elf_tier_6,knows_common|knows_athletics_8|knows_power_strike_7|knows_ironflesh_7,mirkwood_elf_face_1,mirkwood_elf_face_2]," calcext:value-type="string">
            <text:p>["i5_greenwood_chosen_spearmaster","Thranduil's_Chosen_Spear_Master","Thranduil's_Chosen_Spear_Masters",tf_woodelf| tfg_gloves| tfg_shield| tfg_armor| tfg_helm| tfg_boots |tfg_polearm| tf_no_capture_alive,0,0,fac_woodelf,[itm_mirkwood_helm_d_good,itm_mirkwood_heavy_scale,itm_mail_mittens,itm_mirkwood_boots,itm_splinted_greaves,itm_mirkwood_great_spear,],attr_elf_tier_5,wp_elf_tier_6,knows_common|knows_athletics_8|knows_power_strike_7|knows_ironflesh_7,mirkwood_elf_face_1,mirkwood_elf_face_2],</text:p>
          </table:table-cell>
          <table:table-cell table:style-name="ce7" office:value-type="string" calcext:value-type="string">
            <text:p>i5_greenwood_chosen_spearmaster</text:p>
          </table:table-cell>
          <table:table-cell table:style-name="ce7" office:value-type="string" calcext:value-type="string">
            <text:p>Thranduil's_Chosen_Spear_Master</text:p>
          </table:table-cell>
          <table:table-cell table:style-name="ce7" office:value-type="string" calcext:value-type="string">
            <text:p>Thranduil's_Chosen_Spear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woodelf</text:p>
          </table:table-cell>
          <table:table-cell table:style-name="ce19" office:value-type="string" calcext:value-type="string">
            <text:p>itm_mirkwood_helm_d_good,</text:p>
          </table:table-cell>
          <table:table-cell table:style-name="ce19" office:value-type="string" calcext:value-type="string">
            <text:p>itm_mirkwood_heavy_scale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mirkwood_boots,itm_splinted_greaves,</text:p>
          </table:table-cell>
          <table:table-cell table:style-name="ce19" office:value-type="string" calcext:value-type="string">
            <text:p>itm_mirkwood_great_spear,</text:p>
          </table:table-cell>
          <table:table-cell table:style-name="ce19" table:number-columns-repeated="2"/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6</text:p>
          </table:table-cell>
          <table:table-cell table:style-name="ce12" office:value-type="string" calcext:value-type="string">
            <text:p>knows_common|knows_athletics_8|knows_power_strike_7|knows_ironflesh_7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B193]&lt;&gt;&quot;&quot;;[.C193]&lt;&gt;&quot;&quot;);CONCATENATE([Variables.$I$1];[Variables.$I$7];[.B193];[Variables.$I$7];[Variables.$I$6];[Variables.$I$7];[.C193];[Variables.$I$7];[Variables.$I$6];[Variables.$I$7];[.D193];[Variables.$I$7];[Variables.$I$6];[.E193];[Variables.$I$6];[.F193];[Variables.$I$6];[.G193];[Variables.$I$6];[.H193];[Variables.$I$6];[Variables.$I$1];[.I193];[.J193];[.K193];[.L193];[.M193];[.N193];[.O193];[Variables.$I$2];[Variables.$I$6];[.P193];[Variables.$I$6];[.Q193];[Variables.$I$6];[.R193];[Variables.$I$6];[.S193];[Variables.$I$6];[.T193];IF([.U193]&lt;&gt;&quot;&quot;;CONCATENATE([Variables.$I$6];[.U193]);&quot;&quot;);[Variables.$I$2];[Variables.$I$6]);IF([.B193]&lt;&gt;&quot;&quot;;CONCATENATE(&quot;#&quot;;[.B193]);&quot;&quot;))" office:value-type="string" office:string-value="[&quot;i5_greenwood_chosen_spearmaster&quot;,&quot;Thranduil's_Chosen_Spear_Master&quot;,&quot;Thranduil's_Chosen_Spear_Masters&quot;,tf_woodelf| tfg_gloves| tfg_shield| tfg_armor| tfg_helm| tfg_boots |tfg_polearm| tf_no_capture_alive,0,0,fac_woodelf,[itm_mirkwood_helm_d_good,itm_mirkwood_heavy_scale,itm_mail_mittens,itm_mirkwood_boots,itm_splinted_greaves,itm_mirkwood_great_spear,],attr_elf_tier_5,wp_elf_tier_6,knows_common|knows_athletics_8|knows_power_strike_7|knows_ironflesh_7,mirkwood_elf_face_1,mirkwood_elf_face_2]," calcext:value-type="string">
            <text:p>["i5_greenwood_chosen_spearmaster","Thranduil's_Chosen_Spear_Master","Thranduil's_Chosen_Spear_Masters",tf_woodelf| tfg_gloves| tfg_shield| tfg_armor| tfg_helm| tfg_boots |tfg_polearm| tf_no_capture_alive,0,0,fac_woodelf,[itm_mirkwood_helm_d_good,itm_mirkwood_heavy_scale,itm_mail_mittens,itm_mirkwood_boots,itm_splinted_greaves,itm_mirkwood_great_spear,],attr_elf_tier_5,wp_elf_tier_6,knows_common|knows_athletics_8|knows_power_strike_7|knows_ironflesh_7,mirkwood_elf_face_1,mirkwood_elf_face_2],</text:p>
          </table:table-cell>
          <table:table-cell table:number-columns-repeated="16362"/>
        </table:table-row>
        <table:table-row table:style-name="ro1">
          <table:table-cell table:style-name="ce6" table:formula="of:=IF(AND([.B194]&lt;&gt;&quot;&quot;;[.C194]&lt;&gt;&quot;&quot;);CONCATENATE([Variables.$I$1];[Variables.$I$7];[.B194];[Variables.$I$7];[Variables.$I$6];[Variables.$I$7];[.C194];[Variables.$I$7];[Variables.$I$6];[Variables.$I$7];[.D194];[Variables.$I$7];[Variables.$I$6];[.E194];[Variables.$I$6];[.F194];[Variables.$I$6];[.G194];[Variables.$I$6];[.H194];[Variables.$I$6];[Variables.$I$1];[.I194];[.J194];[.K194];[.L194];[.M194];[.N194];[.O194];[Variables.$I$2];[Variables.$I$6];[.P194];[Variables.$I$6];[.Q194];[Variables.$I$6];[.R194];[Variables.$I$6];[.S194];[Variables.$I$6];[.T194];IF([.U194]&lt;&gt;&quot;&quot;;CONCATENATE([Variables.$I$6];[.U194]);&quot;&quot;);[Variables.$I$2];[Variables.$I$6]);IF([.B194]&lt;&gt;&quot;&quot;;CONCATENATE(&quot;#&quot;;[.B194]);&quot;&quot;))" office:value-type="string" office:string-value="[&quot;i5_greenwood_standard_bearer&quot;,&quot;Greenwood_Standard_Bearer&quot;,&quot;Greenwood_Standard_Bearers&quot;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" calcext:value-type="string">
            <text:p>["i5_greenwood_standard_bearer","Greenwood_Standard_Bearer","Greenwood_Standard_Bearers"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</text:p>
          </table:table-cell>
          <table:table-cell table:style-name="ce7" office:value-type="string" calcext:value-type="string">
            <text:p>i5_greenwood_standard_bearer</text:p>
          </table:table-cell>
          <table:table-cell table:style-name="ce7" office:value-type="string" calcext:value-type="string">
            <text:p>Greenwood_Standard_Bearer</text:p>
          </table:table-cell>
          <table:table-cell table:style-name="ce7" office:value-type="string" calcext:value-type="string">
            <text:p>Greenwood_Standard_Bearers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woodelf</text:p>
          </table:table-cell>
          <table:table-cell table:style-name="ce19" office:value-type="string" calcext:value-type="string">
            <text:p>itm_mirkwood_helm_d_good,</text:p>
          </table:table-cell>
          <table:table-cell table:style-name="ce19" office:value-type="string" calcext:value-type="string">
            <text:p>itm_mirkwood_mail_good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mirkwood_boots,</text:p>
          </table:table-cell>
          <table:table-cell table:style-name="ce19" office:value-type="string" calcext:value-type="string">
            <text:p>itm_woodelf_banner,</text:p>
          </table:table-cell>
          <table:table-cell table:style-name="ce19" table:number-columns-repeated="2"/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5</text:p>
          </table:table-cell>
          <table:table-cell table:style-name="ce12" office:value-type="string" calcext:value-type="string">
            <text:p>knows_common|knows_athletics_4|knows_power_draw_6|knows_power_strike_4|knows_ironflesh_10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B194]&lt;&gt;&quot;&quot;;[.C194]&lt;&gt;&quot;&quot;);CONCATENATE([Variables.$I$1];[Variables.$I$7];[.B194];[Variables.$I$7];[Variables.$I$6];[Variables.$I$7];[.C194];[Variables.$I$7];[Variables.$I$6];[Variables.$I$7];[.D194];[Variables.$I$7];[Variables.$I$6];[.E194];[Variables.$I$6];[.F194];[Variables.$I$6];[.G194];[Variables.$I$6];[.H194];[Variables.$I$6];[Variables.$I$1];[.I194];[.J194];[.K194];[.L194];[.M194];[.N194];[.O194];[Variables.$I$2];[Variables.$I$6];[.P194];[Variables.$I$6];[.Q194];[Variables.$I$6];[.R194];[Variables.$I$6];[.S194];[Variables.$I$6];[.T194];IF([.U194]&lt;&gt;&quot;&quot;;CONCATENATE([Variables.$I$6];[.U194]);&quot;&quot;);[Variables.$I$2];[Variables.$I$6]);IF([.B194]&lt;&gt;&quot;&quot;;CONCATENATE(&quot;#&quot;;[.B194]);&quot;&quot;))" office:value-type="string" office:string-value="[&quot;i5_greenwood_standard_bearer&quot;,&quot;Greenwood_Standard_Bearer&quot;,&quot;Greenwood_Standard_Bearers&quot;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" calcext:value-type="string">
            <text:p>["i5_greenwood_standard_bearer","Greenwood_Standard_Bearer","Greenwood_Standard_Bearers"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16362"/>
        </table:table-row>
        <table:table-row table:style-name="ro1">
          <table:table-cell table:style-name="ce6" table:formula="of:=IF(AND([.B195]&lt;&gt;&quot;&quot;;[.C195]&lt;&gt;&quot;&quot;);CONCATENATE([Variables.$I$1];[Variables.$I$7];[.B195];[Variables.$I$7];[Variables.$I$6];[Variables.$I$7];[.C195];[Variables.$I$7];[Variables.$I$6];[Variables.$I$7];[.D195];[Variables.$I$7];[Variables.$I$6];[.E195];[Variables.$I$6];[.F195];[Variables.$I$6];[.G195];[Variables.$I$6];[.H195];[Variables.$I$6];[Variables.$I$1];[.I195];[.J195];[.K195];[.L195];[.M195];[.N195];[.O195];[Variables.$I$2];[Variables.$I$6];[.P195];[Variables.$I$6];[.Q195];[Variables.$I$6];[.R195];[Variables.$I$6];[.S195];[Variables.$I$6];[.T195];IF([.U195]&lt;&gt;&quot;&quot;;CONCATENATE([Variables.$I$6];[.U195]);&quot;&quot;);[Variables.$I$2];[Variables.$I$6]);IF([.B195]&lt;&gt;&quot;&quot;;CONCATENATE(&quot;#&quot;;[.B195]);&quot;&quot;))" office:value-type="string" office:string-value="[&quot;i6_greenwood_2h_axeman&quot;,&quot;Greenwood_Axemaster&quot;,&quot;Greenwood_Axemaster&quot;,tf_woodelf| tfg_gloves| tfg_shield| tfg_armor| tfg_helm| tfg_boots| tf_no_capture_alive,0,0,fac_woodelf,[itm_mirkwood_helm_d_good,itm_mirkwood_helm_c_good,itm_mirkwood_heavy_scale_cloak,itm_leather_gloves_good,itm_evil_gauntlets_a_good,itm_splinted_greaves,itm_mirkwood_axe,itm_mirkwood_axe_2h,itm_mirkwood_spear_shield_c,itm_marker_hp_shield,itm_marker_scares_horses,itm_marker_scares_wargs,],attr_elf_tier_6,wp_elf_tier_6,knows_common|knows_athletics_8|knows_shield_6|knows_power_strike_7|knows_ironflesh_8,mirkwood_elf_face_1,mirkwood_elf_face_2]," calcext:value-type="string">
            <text:p>["i6_greenwood_2h_axeman","Greenwood_Axemaster","Greenwood_Axemaster",tf_woodelf| tfg_gloves| tfg_shield| tfg_armor| tfg_helm| tfg_boots| tf_no_capture_alive,0,0,fac_woodelf,[itm_mirkwood_helm_d_good,itm_mirkwood_helm_c_good,itm_mirkwood_heavy_scale_cloak,itm_leather_gloves_good,itm_evil_gauntlets_a_good,itm_splinted_greaves,itm_mirkwood_axe,itm_mirkwood_axe_2h,itm_mirkwood_spear_shield_c,itm_marker_hp_shield,itm_marker_scares_horses,itm_marker_scares_wargs,],attr_elf_tier_6,wp_elf_tier_6,knows_common|knows_athletics_8|knows_shield_6|knows_power_strike_7|knows_ironflesh_8,mirkwood_elf_face_1,mirkwood_elf_face_2],</text:p>
          </table:table-cell>
          <table:table-cell table:style-name="ce7" office:value-type="string" calcext:value-type="string">
            <text:p>i6_greenwood_2h_axeman</text:p>
          </table:table-cell>
          <table:table-cell table:number-columns-repeated="2" table:style-name="ce7" office:value-type="string" calcext:value-type="string">
            <text:p>Greenwood_Axemaster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woodelf</text:p>
          </table:table-cell>
          <table:table-cell table:style-name="ce19" office:value-type="string" calcext:value-type="string">
            <text:p>itm_mirkwood_helm_d_good,itm_mirkwood_helm_c_good,</text:p>
          </table:table-cell>
          <table:table-cell table:style-name="ce11" office:value-type="string" calcext:value-type="string">
            <text:p>itm_mirkwood_heavy_scale_cloak,</text:p>
          </table:table-cell>
          <table:table-cell table:style-name="ce11" office:value-type="string" calcext:value-type="string">
            <text:p>itm_leather_gloves_good,itm_evil_gauntlets_a_good,</text:p>
          </table:table-cell>
          <table:table-cell table:style-name="ce19" office:value-type="string" calcext:value-type="string">
            <text:p>itm_splinted_greaves,</text:p>
          </table:table-cell>
          <table:table-cell table:style-name="ce11" office:value-type="string" calcext:value-type="string">
            <text:p>itm_mirkwood_axe,itm_mirkwood_axe_2h,</text:p>
          </table:table-cell>
          <table:table-cell table:style-name="ce11" office:value-type="string" calcext:value-type="string">
            <text:p>itm_mirkwood_spear_shield_c,</text:p>
          </table:table-cell>
          <table:table-cell table:style-name="ce11" office:value-type="string" calcext:value-type="string">
            <text:p>itm_marker_hp_shield,itm_marker_scares_horses,itm_marker_scares_wargs,</text:p>
          </table:table-cell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elf_tier_6</text:p>
          </table:table-cell>
          <table:table-cell table:style-name="ce12" office:value-type="string" calcext:value-type="string">
            <text:p>knows_common|knows_athletics_8|knows_shield_6|knows_power_strike_7|knows_ironflesh_8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B195]&lt;&gt;&quot;&quot;;[.C195]&lt;&gt;&quot;&quot;);CONCATENATE([Variables.$I$1];[Variables.$I$7];[.B195];[Variables.$I$7];[Variables.$I$6];[Variables.$I$7];[.C195];[Variables.$I$7];[Variables.$I$6];[Variables.$I$7];[.D195];[Variables.$I$7];[Variables.$I$6];[.E195];[Variables.$I$6];[.F195];[Variables.$I$6];[.G195];[Variables.$I$6];[.H195];[Variables.$I$6];[Variables.$I$1];[.I195];[.J195];[.K195];[.L195];[.M195];[.N195];[.O195];[Variables.$I$2];[Variables.$I$6];[.P195];[Variables.$I$6];[.Q195];[Variables.$I$6];[.R195];[Variables.$I$6];[.S195];[Variables.$I$6];[.T195];IF([.U195]&lt;&gt;&quot;&quot;;CONCATENATE([Variables.$I$6];[.U195]);&quot;&quot;);[Variables.$I$2];[Variables.$I$6]);IF([.B195]&lt;&gt;&quot;&quot;;CONCATENATE(&quot;#&quot;;[.B195]);&quot;&quot;))" office:value-type="string" office:string-value="[&quot;i6_greenwood_2h_axeman&quot;,&quot;Greenwood_Axemaster&quot;,&quot;Greenwood_Axemaster&quot;,tf_woodelf| tfg_gloves| tfg_shield| tfg_armor| tfg_helm| tfg_boots| tf_no_capture_alive,0,0,fac_woodelf,[itm_mirkwood_helm_d_good,itm_mirkwood_helm_c_good,itm_mirkwood_heavy_scale_cloak,itm_leather_gloves_good,itm_evil_gauntlets_a_good,itm_splinted_greaves,itm_mirkwood_axe,itm_mirkwood_axe_2h,itm_mirkwood_spear_shield_c,itm_marker_hp_shield,itm_marker_scares_horses,itm_marker_scares_wargs,],attr_elf_tier_6,wp_elf_tier_6,knows_common|knows_athletics_8|knows_shield_6|knows_power_strike_7|knows_ironflesh_8,mirkwood_elf_face_1,mirkwood_elf_face_2]," calcext:value-type="string">
            <text:p>["i6_greenwood_2h_axeman","Greenwood_Axemaster","Greenwood_Axemaster",tf_woodelf| tfg_gloves| tfg_shield| tfg_armor| tfg_helm| tfg_boots| tf_no_capture_alive,0,0,fac_woodelf,[itm_mirkwood_helm_d_good,itm_mirkwood_helm_c_good,itm_mirkwood_heavy_scale_cloak,itm_leather_gloves_good,itm_evil_gauntlets_a_good,itm_splinted_greaves,itm_mirkwood_axe,itm_mirkwood_axe_2h,itm_mirkwood_spear_shield_c,itm_marker_hp_shield,itm_marker_scares_horses,itm_marker_scares_wargs,],attr_elf_tier_6,wp_elf_tier_6,knows_common|knows_athletics_8|knows_shield_6|knows_power_strike_7|knows_ironflesh_8,mirkwood_elf_face_1,mirkwood_elf_face_2],</text:p>
          </table:table-cell>
          <table:table-cell table:number-columns-repeated="16362"/>
        </table:table-row>
        <table:table-row table:style-name="ro1">
          <table:table-cell table:formula="of:=IF(AND([.B196]&lt;&gt;&quot;&quot;;[.C196]&lt;&gt;&quot;&quot;);CONCATENATE([Variables.$I$1];[Variables.$I$7];[.B196];[Variables.$I$7];[Variables.$I$6];[Variables.$I$7];[.C196];[Variables.$I$7];[Variables.$I$6];[Variables.$I$7];[.D196];[Variables.$I$7];[Variables.$I$6];[.E196];[Variables.$I$6];[.F196];[Variables.$I$6];[.G196];[Variables.$I$6];[.H196];[Variables.$I$6];[Variables.$I$1];[.I196];[.J196];[.K196];[.L196];[.M196];[.N196];[.O196];[Variables.$I$2];[Variables.$I$6];[.P196];[Variables.$I$6];[.Q196];[Variables.$I$6];[.R196];[Variables.$I$6];[.S196];[Variables.$I$6];[.T196];IF([.U196]&lt;&gt;&quot;&quot;;CONCATENATE([Variables.$I$6];[.U196]);&quot;&quot;);[Variables.$I$2];[Variables.$I$6]);IF([.B196]&lt;&gt;&quot;&quot;;CONCATENATE(&quot;#&quot;;[.B196]);&quot;&quot;))">
            <text:p/>
          </table:table-cell>
          <table:table-cell table:style-name="ce5"/>
          <table:table-cell table:style-name="ce6" table:number-columns-repeated="19"/>
          <table:table-cell table:style-name="ce36" table:formula="of:=IF(AND([.B196]&lt;&gt;&quot;&quot;;[.C196]&lt;&gt;&quot;&quot;);CONCATENATE([Variables.$I$1];[Variables.$I$7];[.B196];[Variables.$I$7];[Variables.$I$6];[Variables.$I$7];[.C196];[Variables.$I$7];[Variables.$I$6];[Variables.$I$7];[.D196];[Variables.$I$7];[Variables.$I$6];[.E196];[Variables.$I$6];[.F196];[Variables.$I$6];[.G196];[Variables.$I$6];[.H196];[Variables.$I$6];[Variables.$I$1];[.I196];[.J196];[.K196];[.L196];[.M196];[.N196];[.O196];[Variables.$I$2];[Variables.$I$6];[.P196];[Variables.$I$6];[.Q196];[Variables.$I$6];[.R196];[Variables.$I$6];[.S196];[Variables.$I$6];[.T196];IF([.U196]&lt;&gt;&quot;&quot;;CONCATENATE([Variables.$I$6];[.U196]);&quot;&quot;);[Variables.$I$2];[Variables.$I$6]);IF([.B196]&lt;&gt;&quot;&quot;;CONCATENATE(&quot;#&quot;;[.B196]);&quot;&quot;))">
            <text:p/>
          </table:table-cell>
          <table:table-cell table:number-columns-repeated="16362"/>
        </table:table-row>
        <table:table-row table:style-name="ro1">
          <table:table-cell table:style-name="ce6" table:formula="of:=IF(AND([.B197]&lt;&gt;&quot;&quot;;[.C197]&lt;&gt;&quot;&quot;);CONCATENATE([Variables.$I$1];[Variables.$I$7];[.B197];[Variables.$I$7];[Variables.$I$6];[Variables.$I$7];[.C197];[Variables.$I$7];[Variables.$I$6];[Variables.$I$7];[.D197];[Variables.$I$7];[Variables.$I$6];[.E197];[Variables.$I$6];[.F197];[Variables.$I$6];[.G197];[Variables.$I$6];[.H197];[Variables.$I$6];[Variables.$I$1];[.I197];[.J197];[.K197];[.L197];[.M197];[.N197];[.O197];[Variables.$I$2];[Variables.$I$6];[.P197];[Variables.$I$6];[.Q197];[Variables.$I$6];[.R197];[Variables.$I$6];[.S197];[Variables.$I$6];[.T197];IF([.U197]&lt;&gt;&quot;&quot;;CONCATENATE([Variables.$I$6];[.U197]);&quot;&quot;);[Variables.$I$2];[Variables.$I$6]);IF([.B197]&lt;&gt;&quot;&quot;;CONCATENATE(&quot;#&quot;;[.B197]);&quot;&quot;))" office:value-type="string" office:string-value="#Rivendell" calcext:value-type="string">
            <text:p>#Rivendell</text:p>
          </table:table-cell>
          <table:table-cell table:style-name="ce5" office:value-type="string" calcext:value-type="string">
            <text:p>Rivendell</text:p>
          </table:table-cell>
          <table:table-cell table:style-name="ce6" table:number-columns-repeated="19"/>
          <table:table-cell table:style-name="ce6" table:formula="of:=IF(AND([.B197]&lt;&gt;&quot;&quot;;[.C197]&lt;&gt;&quot;&quot;);CONCATENATE([Variables.$I$1];[Variables.$I$7];[.B197];[Variables.$I$7];[Variables.$I$6];[Variables.$I$7];[.C197];[Variables.$I$7];[Variables.$I$6];[Variables.$I$7];[.D197];[Variables.$I$7];[Variables.$I$6];[.E197];[Variables.$I$6];[.F197];[Variables.$I$6];[.G197];[Variables.$I$6];[.H197];[Variables.$I$6];[Variables.$I$1];[.I197];[.J197];[.K197];[.L197];[.M197];[.N197];[.O197];[Variables.$I$2];[Variables.$I$6];[.P197];[Variables.$I$6];[.Q197];[Variables.$I$6];[.R197];[Variables.$I$6];[.S197];[Variables.$I$6];[.T197];IF([.U197]&lt;&gt;&quot;&quot;;CONCATENATE([Variables.$I$6];[.U197]);&quot;&quot;);[Variables.$I$2];[Variables.$I$6]);IF([.B197]&lt;&gt;&quot;&quot;;CONCATENATE(&quot;#&quot;;[.B197]);&quot;&quot;))" office:value-type="string" office:string-value="#Rivendell" calcext:value-type="string">
            <text:p>#Rivendell</text:p>
          </table:table-cell>
          <table:table-cell table:number-columns-repeated="16362"/>
        </table:table-row>
        <table:table-row table:style-name="ro1">
          <table:table-cell table:style-name="ce6" table:formula="of:=IF(AND([.B198]&lt;&gt;&quot;&quot;;[.C198]&lt;&gt;&quot;&quot;);CONCATENATE([Variables.$I$1];[Variables.$I$7];[.B198];[Variables.$I$7];[Variables.$I$6];[Variables.$I$7];[.C198];[Variables.$I$7];[Variables.$I$6];[Variables.$I$7];[.D198];[Variables.$I$7];[Variables.$I$6];[.E198];[Variables.$I$6];[.F198];[Variables.$I$6];[.G198];[Variables.$I$6];[.H198];[Variables.$I$6];[Variables.$I$1];[.I198];[.J198];[.K198];[.L198];[.M198];[.N198];[.O198];[Variables.$I$2];[Variables.$I$6];[.P198];[Variables.$I$6];[.Q198];[Variables.$I$6];[.R198];[Variables.$I$6];[.S198];[Variables.$I$6];[.T198];IF([.U198]&lt;&gt;&quot;&quot;;CONCATENATE([Variables.$I$6];[.U198]);&quot;&quot;);[Variables.$I$2];[Variables.$I$6]);IF([.B198]&lt;&gt;&quot;&quot;;CONCATENATE(&quot;#&quot;;[.B198]);&quot;&quot;))" office:value-type="string" office:string-value="[&quot;a1_riv_scout&quot;,&quot;Rivendell_Scout&quot;,&quot;Rivendell_Scouts&quot;,tf_imladris| tfg_ranged| tfg_armor| tfg_boots| tf_no_capture_alive,0,0,fac_imladris,[itm_hood_grey_bad,itm_riv_light_cloak,itm_rohan_shoes,itm_leather_boots_dark_bad,itm_woodelf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" calcext:value-type="string">
            <text:p>["a1_riv_scout","Rivendell_Scout","Rivendell_Scouts",tf_imladris| tfg_ranged| tfg_armor| tfg_boots| tf_no_capture_alive,0,0,fac_imladris,[itm_hood_grey_bad,itm_riv_light_cloak,itm_rohan_shoes,itm_leather_boots_dark_bad,itm_woodelf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style-name="ce7" office:value-type="string" calcext:value-type="string">
            <text:p>a1_riv_scout</text:p>
          </table:table-cell>
          <table:table-cell table:style-name="ce7" office:value-type="string" calcext:value-type="string">
            <text:p>Rivendell_Scout</text:p>
          </table:table-cell>
          <table:table-cell table:style-name="ce7" office:value-type="string" calcext:value-type="string">
            <text:p>Rivendell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mladris</text:p>
          </table:table-cell>
          <table:table-cell table:style-name="ce19" office:value-type="string" calcext:value-type="string">
            <text:p>itm_hood_grey_bad,</text:p>
          </table:table-cell>
          <table:table-cell table:style-name="ce19" office:value-type="string" calcext:value-type="string">
            <text:p>itm_riv_light_cloak,</text:p>
          </table:table-cell>
          <table:table-cell table:style-name="ce11"/>
          <table:table-cell table:style-name="ce19" office:value-type="string" calcext:value-type="string">
            <text:p>itm_rohan_shoes,itm_leather_boots_dark_bad,itm_woodelf_leather_boots,</text:p>
          </table:table-cell>
          <table:table-cell table:style-name="ce19" office:value-type="string" calcext:value-type="string">
            <text:p>itm_short_bow,itm_elven_arrows,</text:p>
          </table:table-cell>
          <table:table-cell table:style-name="ce11" office:value-type="string" calcext:value-type="string">
            <text:p>itm_riv_archer_sword,</text:p>
          </table:table-cell>
          <table:table-cell table:style-name="ce11"/>
          <table:table-cell table:style-name="ce12" office:value-type="string" calcext:value-type="string">
            <text:p>attr_elf_tier_1</text:p>
          </table:table-cell>
          <table:table-cell table:style-name="ce12" office:value-type="string" calcext:value-type="string">
            <text:p>wp_elf_tier_1</text:p>
          </table:table-cell>
          <table:table-cell table:style-name="ce13" office:value-type="string" calcext:value-type="string">
            <text:p>knows_common|knows_power_strike_1|knows_power_draw_1|knows_weapon_master_2|knows_athletics_1|knows_riding_1|knows_horse_archery_1|knows_trainer_1|knows_tactics_1|knows_spotting_1|knows_wound_treatment_1|knows_first_aid_1|knows_leadership_1|knows_trade_1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B198]&lt;&gt;&quot;&quot;;[.C198]&lt;&gt;&quot;&quot;);CONCATENATE([Variables.$I$1];[Variables.$I$7];[.B198];[Variables.$I$7];[Variables.$I$6];[Variables.$I$7];[.C198];[Variables.$I$7];[Variables.$I$6];[Variables.$I$7];[.D198];[Variables.$I$7];[Variables.$I$6];[.E198];[Variables.$I$6];[.F198];[Variables.$I$6];[.G198];[Variables.$I$6];[.H198];[Variables.$I$6];[Variables.$I$1];[.I198];[.J198];[.K198];[.L198];[.M198];[.N198];[.O198];[Variables.$I$2];[Variables.$I$6];[.P198];[Variables.$I$6];[.Q198];[Variables.$I$6];[.R198];[Variables.$I$6];[.S198];[Variables.$I$6];[.T198];IF([.U198]&lt;&gt;&quot;&quot;;CONCATENATE([Variables.$I$6];[.U198]);&quot;&quot;);[Variables.$I$2];[Variables.$I$6]);IF([.B198]&lt;&gt;&quot;&quot;;CONCATENATE(&quot;#&quot;;[.B198]);&quot;&quot;))" office:value-type="string" office:string-value="[&quot;a1_riv_scout&quot;,&quot;Rivendell_Scout&quot;,&quot;Rivendell_Scouts&quot;,tf_imladris| tfg_ranged| tfg_armor| tfg_boots| tf_no_capture_alive,0,0,fac_imladris,[itm_hood_grey_bad,itm_riv_light_cloak,itm_rohan_shoes,itm_leather_boots_dark_bad,itm_woodelf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" calcext:value-type="string">
            <text:p>["a1_riv_scout","Rivendell_Scout","Rivendell_Scouts",tf_imladris| tfg_ranged| tfg_armor| tfg_boots| tf_no_capture_alive,0,0,fac_imladris,[itm_hood_grey_bad,itm_riv_light_cloak,itm_rohan_shoes,itm_leather_boots_dark_bad,itm_woodelf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16362"/>
        </table:table-row>
        <table:table-row table:style-name="ro1">
          <table:table-cell table:style-name="ce6" table:formula="of:=IF(AND([.B199]&lt;&gt;&quot;&quot;;[.C199]&lt;&gt;&quot;&quot;);CONCATENATE([Variables.$I$1];[Variables.$I$7];[.B199];[Variables.$I$7];[Variables.$I$6];[Variables.$I$7];[.C199];[Variables.$I$7];[Variables.$I$6];[Variables.$I$7];[.D199];[Variables.$I$7];[Variables.$I$6];[.E199];[Variables.$I$6];[.F199];[Variables.$I$6];[.G199];[Variables.$I$6];[.H199];[Variables.$I$6];[Variables.$I$1];[.I199];[.J199];[.K199];[.L199];[.M199];[.N199];[.O199];[Variables.$I$2];[Variables.$I$6];[.P199];[Variables.$I$6];[.Q199];[Variables.$I$6];[.R199];[Variables.$I$6];[.S199];[Variables.$I$6];[.T199];IF([.U199]&lt;&gt;&quot;&quot;;CONCATENATE([Variables.$I$6];[.U199]);&quot;&quot;);[Variables.$I$2];[Variables.$I$6]);IF([.B199]&lt;&gt;&quot;&quot;;CONCATENATE(&quot;#&quot;;[.B199]);&quot;&quot;))" office:value-type="string" office:string-value="[&quot;a2_riv_vet_scout&quot;,&quot;Rivendell_Veteran_Scout&quot;,&quot;Rivendell_Veteran_Scouts&quot;,tf_imladris| tfg_ranged| tfg_armor| tfg_boots| tf_no_capture_alive,0,0,fac_imladris,[itm_hood_grey,itm_riv_leather_cloak,itm_riv_boots,itm_leather_boots,itm_woodelf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" calcext:value-type="string">
            <text:p>["a2_riv_vet_scout","Rivendell_Veteran_Scout","Rivendell_Veteran_Scouts",tf_imladris| tfg_ranged| tfg_armor| tfg_boots| tf_no_capture_alive,0,0,fac_imladris,[itm_hood_grey,itm_riv_leather_cloak,itm_riv_boots,itm_leather_boots,itm_woodelf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style-name="ce7" office:value-type="string" calcext:value-type="string">
            <text:p>a2_riv_vet_scout</text:p>
          </table:table-cell>
          <table:table-cell table:style-name="ce7" office:value-type="string" calcext:value-type="string">
            <text:p>Rivendell_Veteran_Scout</text:p>
          </table:table-cell>
          <table:table-cell table:style-name="ce7" office:value-type="string" calcext:value-type="string">
            <text:p>Rivendell_Veteran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mladris</text:p>
          </table:table-cell>
          <table:table-cell table:style-name="ce19" office:value-type="string" calcext:value-type="string">
            <text:p>itm_hood_grey,</text:p>
          </table:table-cell>
          <table:table-cell table:style-name="ce11" office:value-type="string" calcext:value-type="string">
            <text:p>itm_riv_leather_cloak,</text:p>
          </table:table-cell>
          <table:table-cell table:style-name="ce11"/>
          <table:table-cell table:style-name="ce11" office:value-type="string" calcext:value-type="string">
            <text:p>itm_riv_boots,itm_leather_boots,itm_woodelf_leather_boots,</text:p>
          </table:table-cell>
          <table:table-cell table:style-name="ce11" office:value-type="string" calcext:value-type="string">
            <text:p>itm_regular_bow,itm_elven_arrows,</text:p>
          </table:table-cell>
          <table:table-cell table:style-name="ce11" office:value-type="string" calcext:value-type="string">
            <text:p>itm_riv_archer_sword,</text:p>
          </table:table-cell>
          <table:table-cell table:style-name="ce11"/>
          <table:table-cell table:style-name="ce12" office:value-type="string" calcext:value-type="string">
            <text:p>attr_elf_tier_2</text:p>
          </table:table-cell>
          <table:table-cell table:style-name="ce12" office:value-type="string" calcext:value-type="string">
            <text:p>wp_elf_tier_2</text:p>
          </table:table-cell>
          <table:table-cell table:style-name="ce13" office:value-type="string" calcext:value-type="string">
            <text:p>knows_common|knows_ironflesh_1|knows_power_strike_2|knows_power_draw_1|knows_weapon_master_3|knows_athletics_1|knows_riding_1|knows_horse_archery_1|knows_trainer_1|knows_tactics_1|knows_spotting_1|knows_wound_treatment_1|knows_first_aid_1|knows_leadership_1|knows_trade_1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B199]&lt;&gt;&quot;&quot;;[.C199]&lt;&gt;&quot;&quot;);CONCATENATE([Variables.$I$1];[Variables.$I$7];[.B199];[Variables.$I$7];[Variables.$I$6];[Variables.$I$7];[.C199];[Variables.$I$7];[Variables.$I$6];[Variables.$I$7];[.D199];[Variables.$I$7];[Variables.$I$6];[.E199];[Variables.$I$6];[.F199];[Variables.$I$6];[.G199];[Variables.$I$6];[.H199];[Variables.$I$6];[Variables.$I$1];[.I199];[.J199];[.K199];[.L199];[.M199];[.N199];[.O199];[Variables.$I$2];[Variables.$I$6];[.P199];[Variables.$I$6];[.Q199];[Variables.$I$6];[.R199];[Variables.$I$6];[.S199];[Variables.$I$6];[.T199];IF([.U199]&lt;&gt;&quot;&quot;;CONCATENATE([Variables.$I$6];[.U199]);&quot;&quot;);[Variables.$I$2];[Variables.$I$6]);IF([.B199]&lt;&gt;&quot;&quot;;CONCATENATE(&quot;#&quot;;[.B199]);&quot;&quot;))" office:value-type="string" office:string-value="[&quot;a2_riv_vet_scout&quot;,&quot;Rivendell_Veteran_Scout&quot;,&quot;Rivendell_Veteran_Scouts&quot;,tf_imladris| tfg_ranged| tfg_armor| tfg_boots| tf_no_capture_alive,0,0,fac_imladris,[itm_hood_grey,itm_riv_leather_cloak,itm_riv_boots,itm_leather_boots,itm_woodelf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" calcext:value-type="string">
            <text:p>["a2_riv_vet_scout","Rivendell_Veteran_Scout","Rivendell_Veteran_Scouts",tf_imladris| tfg_ranged| tfg_armor| tfg_boots| tf_no_capture_alive,0,0,fac_imladris,[itm_hood_grey,itm_riv_leather_cloak,itm_riv_boots,itm_leather_boots,itm_woodelf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16362"/>
        </table:table-row>
        <table:table-row table:style-name="ro1">
          <table:table-cell table:style-name="ce6" table:formula="of:=IF(AND([.B200]&lt;&gt;&quot;&quot;;[.C200]&lt;&gt;&quot;&quot;);CONCATENATE([Variables.$I$1];[Variables.$I$7];[.B200];[Variables.$I$7];[Variables.$I$6];[Variables.$I$7];[.C200];[Variables.$I$7];[Variables.$I$6];[Variables.$I$7];[.D200];[Variables.$I$7];[Variables.$I$6];[.E200];[Variables.$I$6];[.F200];[Variables.$I$6];[.G200];[Variables.$I$6];[.H200];[Variables.$I$6];[Variables.$I$1];[.I200];[.J200];[.K200];[.L200];[.M200];[.N200];[.O200];[Variables.$I$2];[Variables.$I$6];[.P200];[Variables.$I$6];[.Q200];[Variables.$I$6];[.R200];[Variables.$I$6];[.S200];[Variables.$I$6];[.T200];IF([.U200]&lt;&gt;&quot;&quot;;CONCATENATE([Variables.$I$6];[.U200]);&quot;&quot;);[Variables.$I$2];[Variables.$I$6]);IF([.B200]&lt;&gt;&quot;&quot;;CONCATENATE(&quot;#&quot;;[.B200]);&quot;&quot;))" office:value-type="string" office:string-value="[&quot;a3_riv_archer&quot;,&quot;Rivendell_Archer&quot;,&quot;Rivendell_Archers&quot;,tf_imladris| tfg_ranged| tfg_armor| tfg_helm| tfg_boots| tf_no_capture_alive,0,0,fac_imladris,[itm_riv_helm_b,itm_hood_grey,itm_riv_leather_cloak,itm_leather_gloves,itm_riv_boots,itm_leather_boots,itm_woodelf_leather_boots,itm_elven_bow,itm_elven_arrows,itm_riv_1h_sword,],attr_elf_tier_3,wp_elf_tier_3,knows_common|knows_athletics_4|knows_power_draw_4|knows_power_strike_3|knows_ironflesh_3,rivendell_elf_face_1,rivendell_elf_face_2]," calcext:value-type="string">
            <text:p>["a3_riv_archer","Rivendell_Archer","Rivendell_Archers",tf_imladris| tfg_ranged| tfg_armor| tfg_helm| tfg_boots| tf_no_capture_alive,0,0,fac_imladris,[itm_riv_helm_b,itm_hood_grey,itm_riv_leather_cloak,itm_leather_gloves,itm_riv_boots,itm_leather_boots,itm_woodelf_leather_boots,itm_elven_bow,itm_elven_arrows,itm_riv_1h_sword,],attr_elf_tier_3,wp_elf_tier_3,knows_common|knows_athletics_4|knows_power_draw_4|knows_power_strike_3|knows_ironflesh_3,rivendell_elf_face_1,rivendell_elf_face_2],</text:p>
          </table:table-cell>
          <table:table-cell table:style-name="ce7" office:value-type="string" calcext:value-type="string">
            <text:p>a3_riv_archer</text:p>
          </table:table-cell>
          <table:table-cell table:style-name="ce7" office:value-type="string" calcext:value-type="string">
            <text:p>Rivendell_Archer</text:p>
          </table:table-cell>
          <table:table-cell table:style-name="ce7" office:value-type="string" calcext:value-type="string">
            <text:p>Rivendell_Archers</text:p>
          </table:table-cell>
          <table:table-cell table:style-name="ce8" office:value-type="string" calcext:value-type="string">
            <text:p>tf_imladris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mladris</text:p>
          </table:table-cell>
          <table:table-cell table:style-name="ce19" office:value-type="string" calcext:value-type="string">
            <text:p><text:span text:style-name="T1">itm_riv_helm_b</text:span>,itm_hood_grey,</text:p>
          </table:table-cell>
          <table:table-cell table:style-name="ce11" office:value-type="string" calcext:value-type="string">
            <text:p>itm_riv_leather_cloak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riv_boots,itm_leather_boots,itm_woodelf_leather_boots,</text:p>
          </table:table-cell>
          <table:table-cell table:style-name="ce11" office:value-type="string" calcext:value-type="string">
            <text:p>itm_elven_bow,itm_elven_arrows,</text:p>
          </table:table-cell>
          <table:table-cell table:style-name="ce19" office:value-type="string" calcext:value-type="string">
            <text:p>itm_riv_1h_sword,</text:p>
          </table:table-cell>
          <table:table-cell table:style-name="ce11"/>
          <table:table-cell table:style-name="ce12" office:value-type="string" calcext:value-type="string">
            <text:p>attr_elf_tier_3</text:p>
          </table:table-cell>
          <table:table-cell table:style-name="ce12" office:value-type="string" calcext:value-type="string">
            <text:p>wp_elf_tier_3</text:p>
          </table:table-cell>
          <table:table-cell table:style-name="ce12" office:value-type="string" calcext:value-type="string">
            <text:p>knows_common|knows_athletics_4|knows_power_draw_4|knows_power_strike_3|knows_ironflesh_3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B200]&lt;&gt;&quot;&quot;;[.C200]&lt;&gt;&quot;&quot;);CONCATENATE([Variables.$I$1];[Variables.$I$7];[.B200];[Variables.$I$7];[Variables.$I$6];[Variables.$I$7];[.C200];[Variables.$I$7];[Variables.$I$6];[Variables.$I$7];[.D200];[Variables.$I$7];[Variables.$I$6];[.E200];[Variables.$I$6];[.F200];[Variables.$I$6];[.G200];[Variables.$I$6];[.H200];[Variables.$I$6];[Variables.$I$1];[.I200];[.J200];[.K200];[.L200];[.M200];[.N200];[.O200];[Variables.$I$2];[Variables.$I$6];[.P200];[Variables.$I$6];[.Q200];[Variables.$I$6];[.R200];[Variables.$I$6];[.S200];[Variables.$I$6];[.T200];IF([.U200]&lt;&gt;&quot;&quot;;CONCATENATE([Variables.$I$6];[.U200]);&quot;&quot;);[Variables.$I$2];[Variables.$I$6]);IF([.B200]&lt;&gt;&quot;&quot;;CONCATENATE(&quot;#&quot;;[.B200]);&quot;&quot;))" office:value-type="string" office:string-value="[&quot;a3_riv_archer&quot;,&quot;Rivendell_Archer&quot;,&quot;Rivendell_Archers&quot;,tf_imladris| tfg_ranged| tfg_armor| tfg_helm| tfg_boots| tf_no_capture_alive,0,0,fac_imladris,[itm_riv_helm_b,itm_hood_grey,itm_riv_leather_cloak,itm_leather_gloves,itm_riv_boots,itm_leather_boots,itm_woodelf_leather_boots,itm_elven_bow,itm_elven_arrows,itm_riv_1h_sword,],attr_elf_tier_3,wp_elf_tier_3,knows_common|knows_athletics_4|knows_power_draw_4|knows_power_strike_3|knows_ironflesh_3,rivendell_elf_face_1,rivendell_elf_face_2]," calcext:value-type="string">
            <text:p>["a3_riv_archer","Rivendell_Archer","Rivendell_Archers",tf_imladris| tfg_ranged| tfg_armor| tfg_helm| tfg_boots| tf_no_capture_alive,0,0,fac_imladris,[itm_riv_helm_b,itm_hood_grey,itm_riv_leather_cloak,itm_leather_gloves,itm_riv_boots,itm_leather_boots,itm_woodelf_leather_boots,itm_elven_bow,itm_elven_arrows,itm_riv_1h_sword,],attr_elf_tier_3,wp_elf_tier_3,knows_common|knows_athletics_4|knows_power_draw_4|knows_power_strike_3|knows_ironflesh_3,rivendell_elf_face_1,rivendell_elf_face_2],</text:p>
          </table:table-cell>
          <table:table-cell table:number-columns-repeated="16362"/>
        </table:table-row>
        <table:table-row table:style-name="ro1">
          <table:table-cell table:style-name="ce6" table:formula="of:=IF(AND([.B201]&lt;&gt;&quot;&quot;;[.C201]&lt;&gt;&quot;&quot;);CONCATENATE([Variables.$I$1];[Variables.$I$7];[.B201];[Variables.$I$7];[Variables.$I$6];[Variables.$I$7];[.C201];[Variables.$I$7];[Variables.$I$6];[Variables.$I$7];[.D201];[Variables.$I$7];[Variables.$I$6];[.E201];[Variables.$I$6];[.F201];[Variables.$I$6];[.G201];[Variables.$I$6];[.H201];[Variables.$I$6];[Variables.$I$1];[.I201];[.J201];[.K201];[.L201];[.M201];[.N201];[.O201];[Variables.$I$2];[Variables.$I$6];[.P201];[Variables.$I$6];[.Q201];[Variables.$I$6];[.R201];[Variables.$I$6];[.S201];[Variables.$I$6];[.T201];IF([.U201]&lt;&gt;&quot;&quot;;CONCATENATE([Variables.$I$6];[.U201]);&quot;&quot;);[Variables.$I$2];[Variables.$I$6]);IF([.B201]&lt;&gt;&quot;&quot;;CONCATENATE(&quot;#&quot;;[.B201]);&quot;&quot;))" office:value-type="string" office:string-value="[&quot;a4_riv_vet_archer&quot;,&quot;Rivendell_Veteran_Archer&quot;,&quot;Rivendell_Veteran_Archers&quot;,tf_imladris| tfg_ranged| tfg_gloves| tfg_armor| tfg_helm| tfg_boots| tf_no_capture_alive,0,0,fac_imladris,[itm_riv_helm_b,itm_riv_foot_mail_cloak,itm_leather_gloves,itm_riv_boots,itm_woodelf_leather_boots_good,itm_riv_bow,itm_elven_arrows,itm_riv_1h_sword,],attr_elf_tier_4,wp_elf_tier_4,knows_common|knows_athletics_5|knows_power_draw_4|knows_power_strike_3|knows_ironflesh_4,rivendell_elf_face_1,rivendell_elf_face_2]," calcext:value-type="string">
            <text:p>["a4_riv_vet_archer","Rivendell_Veteran_Archer","Rivendell_Veteran_Archers",tf_imladris| tfg_ranged| tfg_gloves| tfg_armor| tfg_helm| tfg_boots| tf_no_capture_alive,0,0,fac_imladris,[itm_riv_helm_b,itm_riv_foot_mail_cloak,itm_leather_gloves,itm_riv_boots,itm_woodelf_leather_boots_good,itm_riv_bow,itm_elven_arrows,itm_riv_1h_sword,],attr_elf_tier_4,wp_elf_tier_4,knows_common|knows_athletics_5|knows_power_draw_4|knows_power_strike_3|knows_ironflesh_4,rivendell_elf_face_1,rivendell_elf_face_2],</text:p>
          </table:table-cell>
          <table:table-cell table:style-name="ce7" office:value-type="string" calcext:value-type="string">
            <text:p>a4_riv_vet_archer</text:p>
          </table:table-cell>
          <table:table-cell table:style-name="ce7" office:value-type="string" calcext:value-type="string">
            <text:p>Rivendell_Veteran_Archer</text:p>
          </table:table-cell>
          <table:table-cell table:style-name="ce7" office:value-type="string" calcext:value-type="string">
            <text:p>Rivendell_Veteran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mladris</text:p>
          </table:table-cell>
          <table:table-cell table:style-name="ce11" office:value-type="string" calcext:value-type="string">
            <text:p>itm_riv_helm_b,</text:p>
          </table:table-cell>
          <table:table-cell table:style-name="ce11" office:value-type="string" calcext:value-type="string">
            <text:p>itm_riv_foot_mail_cloak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riv_boots,itm_woodelf_leather_boots_good,</text:p>
          </table:table-cell>
          <table:table-cell table:style-name="ce11" office:value-type="string" calcext:value-type="string">
            <text:p>itm_riv_bow,itm_elven_arrows,</text:p>
          </table:table-cell>
          <table:table-cell table:style-name="ce11" office:value-type="string" calcext:value-type="string">
            <text:p>itm_riv_1h_sword,</text:p>
          </table:table-cell>
          <table:table-cell table:style-name="ce11"/>
          <table:table-cell table:style-name="ce12" office:value-type="string" calcext:value-type="string">
            <text:p>attr_elf_tier_4</text:p>
          </table:table-cell>
          <table:table-cell table:style-name="ce12" office:value-type="string" calcext:value-type="string">
            <text:p>wp_elf_tier_4</text:p>
          </table:table-cell>
          <table:table-cell table:style-name="ce12" office:value-type="string" calcext:value-type="string">
            <text:p>knows_common|knows_athletics_5|knows_power_draw_4|knows_power_strike_3|knows_ironflesh_4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B201]&lt;&gt;&quot;&quot;;[.C201]&lt;&gt;&quot;&quot;);CONCATENATE([Variables.$I$1];[Variables.$I$7];[.B201];[Variables.$I$7];[Variables.$I$6];[Variables.$I$7];[.C201];[Variables.$I$7];[Variables.$I$6];[Variables.$I$7];[.D201];[Variables.$I$7];[Variables.$I$6];[.E201];[Variables.$I$6];[.F201];[Variables.$I$6];[.G201];[Variables.$I$6];[.H201];[Variables.$I$6];[Variables.$I$1];[.I201];[.J201];[.K201];[.L201];[.M201];[.N201];[.O201];[Variables.$I$2];[Variables.$I$6];[.P201];[Variables.$I$6];[.Q201];[Variables.$I$6];[.R201];[Variables.$I$6];[.S201];[Variables.$I$6];[.T201];IF([.U201]&lt;&gt;&quot;&quot;;CONCATENATE([Variables.$I$6];[.U201]);&quot;&quot;);[Variables.$I$2];[Variables.$I$6]);IF([.B201]&lt;&gt;&quot;&quot;;CONCATENATE(&quot;#&quot;;[.B201]);&quot;&quot;))" office:value-type="string" office:string-value="[&quot;a4_riv_vet_archer&quot;,&quot;Rivendell_Veteran_Archer&quot;,&quot;Rivendell_Veteran_Archers&quot;,tf_imladris| tfg_ranged| tfg_gloves| tfg_armor| tfg_helm| tfg_boots| tf_no_capture_alive,0,0,fac_imladris,[itm_riv_helm_b,itm_riv_foot_mail_cloak,itm_leather_gloves,itm_riv_boots,itm_woodelf_leather_boots_good,itm_riv_bow,itm_elven_arrows,itm_riv_1h_sword,],attr_elf_tier_4,wp_elf_tier_4,knows_common|knows_athletics_5|knows_power_draw_4|knows_power_strike_3|knows_ironflesh_4,rivendell_elf_face_1,rivendell_elf_face_2]," calcext:value-type="string">
            <text:p>["a4_riv_vet_archer","Rivendell_Veteran_Archer","Rivendell_Veteran_Archers",tf_imladris| tfg_ranged| tfg_gloves| tfg_armor| tfg_helm| tfg_boots| tf_no_capture_alive,0,0,fac_imladris,[itm_riv_helm_b,itm_riv_foot_mail_cloak,itm_leather_gloves,itm_riv_boots,itm_woodelf_leather_boots_good,itm_riv_bow,itm_elven_arrows,itm_riv_1h_sword,],attr_elf_tier_4,wp_elf_tier_4,knows_common|knows_athletics_5|knows_power_draw_4|knows_power_strike_3|knows_ironflesh_4,rivendell_elf_face_1,rivendell_elf_face_2],</text:p>
          </table:table-cell>
          <table:table-cell table:number-columns-repeated="16362"/>
        </table:table-row>
        <table:table-row table:style-name="ro1">
          <table:table-cell table:style-name="ce6" table:formula="of:=IF(AND([.B202]&lt;&gt;&quot;&quot;;[.C202]&lt;&gt;&quot;&quot;);CONCATENATE([Variables.$I$1];[Variables.$I$7];[.B202];[Variables.$I$7];[Variables.$I$6];[Variables.$I$7];[.C202];[Variables.$I$7];[Variables.$I$6];[Variables.$I$7];[.D202];[Variables.$I$7];[Variables.$I$6];[.E202];[Variables.$I$6];[.F202];[Variables.$I$6];[.G202];[Variables.$I$6];[.H202];[Variables.$I$6];[Variables.$I$1];[.I202];[.J202];[.K202];[.L202];[.M202];[.N202];[.O202];[Variables.$I$2];[Variables.$I$6];[.P202];[Variables.$I$6];[.Q202];[Variables.$I$6];[.R202];[Variables.$I$6];[.S202];[Variables.$I$6];[.T202];IF([.U202]&lt;&gt;&quot;&quot;;CONCATENATE([Variables.$I$6];[.U202]);&quot;&quot;);[Variables.$I$2];[Variables.$I$6]);IF([.B202]&lt;&gt;&quot;&quot;;CONCATENATE(&quot;#&quot;;[.B202]);&quot;&quot;))" office:value-type="string" office:string-value="[&quot;a5_riv_master_archer&quot;,&quot;Rivendell_Master_Archer&quot;,&quot;Rivendell_Master_Archers&quot;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" calcext:value-type="string">
            <text:p>["a5_riv_master_archer","Rivendell_Master_Archer","Rivendell_Master_Archers"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</text:p>
          </table:table-cell>
          <table:table-cell table:style-name="ce7" office:value-type="string" calcext:value-type="string">
            <text:p>a5_riv_master_archer</text:p>
          </table:table-cell>
          <table:table-cell table:style-name="ce7" office:value-type="string" calcext:value-type="string">
            <text:p>Rivendell_Master_Archer</text:p>
          </table:table-cell>
          <table:table-cell table:style-name="ce7" office:value-type="string" calcext:value-type="string">
            <text:p>Rivendell_Master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mladris</text:p>
          </table:table-cell>
          <table:table-cell table:style-name="ce11" office:value-type="string" calcext:value-type="string">
            <text:p>itm_riv_helm_b,</text:p>
          </table:table-cell>
          <table:table-cell table:style-name="ce11" office:value-type="string" calcext:value-type="string">
            <text:p>itm_riv_foot_mail_cloak,</text:p>
          </table:table-cell>
          <table:table-cell table:style-name="ce11" office:value-type="string" calcext:value-type="string">
            <text:p>itm_leather_gloves_good,</text:p>
          </table:table-cell>
          <table:table-cell table:style-name="ce11" office:value-type="string" calcext:value-type="string">
            <text:p>itm_riv_boots,</text:p>
          </table:table-cell>
          <table:table-cell table:style-name="ce11" office:value-type="string" calcext:value-type="string">
            <text:p>itm_riv_bow,itm_elven_arrows,</text:p>
          </table:table-cell>
          <table:table-cell table:style-name="ce11" office:value-type="string" calcext:value-type="string">
            <text:p>itm_riv_bas_sword,</text:p>
          </table:table-cell>
          <table:table-cell table:style-name="ce11"/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5</text:p>
          </table:table-cell>
          <table:table-cell table:style-name="ce12" office:value-type="string" calcext:value-type="string">
            <text:p>knows_common|knows_athletics_5|knows_power_draw_5|knows_power_strike_4|knows_ironflesh_4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B202]&lt;&gt;&quot;&quot;;[.C202]&lt;&gt;&quot;&quot;);CONCATENATE([Variables.$I$1];[Variables.$I$7];[.B202];[Variables.$I$7];[Variables.$I$6];[Variables.$I$7];[.C202];[Variables.$I$7];[Variables.$I$6];[Variables.$I$7];[.D202];[Variables.$I$7];[Variables.$I$6];[.E202];[Variables.$I$6];[.F202];[Variables.$I$6];[.G202];[Variables.$I$6];[.H202];[Variables.$I$6];[Variables.$I$1];[.I202];[.J202];[.K202];[.L202];[.M202];[.N202];[.O202];[Variables.$I$2];[Variables.$I$6];[.P202];[Variables.$I$6];[.Q202];[Variables.$I$6];[.R202];[Variables.$I$6];[.S202];[Variables.$I$6];[.T202];IF([.U202]&lt;&gt;&quot;&quot;;CONCATENATE([Variables.$I$6];[.U202]);&quot;&quot;);[Variables.$I$2];[Variables.$I$6]);IF([.B202]&lt;&gt;&quot;&quot;;CONCATENATE(&quot;#&quot;;[.B202]);&quot;&quot;))" office:value-type="string" office:string-value="[&quot;a5_riv_master_archer&quot;,&quot;Rivendell_Master_Archer&quot;,&quot;Rivendell_Master_Archers&quot;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" calcext:value-type="string">
            <text:p>["a5_riv_master_archer","Rivendell_Master_Archer","Rivendell_Master_Archers"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</text:p>
          </table:table-cell>
          <table:table-cell table:number-columns-repeated="16362"/>
        </table:table-row>
        <table:table-row table:style-name="ro1">
          <table:table-cell table:style-name="ce6" table:formula="of:=IF(AND([.B203]&lt;&gt;&quot;&quot;;[.C203]&lt;&gt;&quot;&quot;);CONCATENATE([Variables.$I$1];[Variables.$I$7];[.B203];[Variables.$I$7];[Variables.$I$6];[Variables.$I$7];[.C203];[Variables.$I$7];[Variables.$I$6];[Variables.$I$7];[.D203];[Variables.$I$7];[Variables.$I$6];[.E203];[Variables.$I$6];[.F203];[Variables.$I$6];[.G203];[Variables.$I$6];[.H203];[Variables.$I$6];[Variables.$I$1];[.I203];[.J203];[.K203];[.L203];[.M203];[.N203];[.O203];[Variables.$I$2];[Variables.$I$6];[.P203];[Variables.$I$6];[.Q203];[Variables.$I$6];[.R203];[Variables.$I$6];[.S203];[Variables.$I$6];[.T203];IF([.U203]&lt;&gt;&quot;&quot;;CONCATENATE([Variables.$I$6];[.U203]);&quot;&quot;);[Variables.$I$2];[Variables.$I$6]);IF([.B203]&lt;&gt;&quot;&quot;;CONCATENATE(&quot;#&quot;;[.B203]);&quot;&quot;))" office:value-type="string" office:string-value="[&quot;a6_riv_guardian&quot;,&quot;Guardian_of_Imladris&quot;,&quot;Guardians_of_Imladris&quot;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" calcext:value-type="string">
            <text:p>["a6_riv_guardian","Guardian_of_Imladris","Guardians_of_Imladris"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</text:p>
          </table:table-cell>
          <table:table-cell table:style-name="ce7" office:value-type="string" calcext:value-type="string">
            <text:p>a6_riv_guardian</text:p>
          </table:table-cell>
          <table:table-cell table:style-name="ce7" office:value-type="string" calcext:value-type="string">
            <text:p>Guardian_of_Imladris</text:p>
          </table:table-cell>
          <table:table-cell table:style-name="ce7" office:value-type="string" calcext:value-type="string">
            <text:p>Guardians_of_Imladri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mladris</text:p>
          </table:table-cell>
          <table:table-cell table:style-name="ce11" office:value-type="string" calcext:value-type="string">
            <text:p>itm_riv_helm_b,</text:p>
          </table:table-cell>
          <table:table-cell table:style-name="ce11" office:value-type="string" calcext:value-type="string">
            <text:p>itm_riv_foot_scale_cloak,</text:p>
          </table:table-cell>
          <table:table-cell table:style-name="ce11" office:value-type="string" calcext:value-type="string">
            <text:p>itm_leather_gloves_good,</text:p>
          </table:table-cell>
          <table:table-cell table:style-name="ce11" office:value-type="string" calcext:value-type="string">
            <text:p>itm_riv_boots,</text:p>
          </table:table-cell>
          <table:table-cell table:style-name="ce11" office:value-type="string" calcext:value-type="string">
            <text:p>itm_riv_bow,itm_elven_arrows,</text:p>
          </table:table-cell>
          <table:table-cell table:style-name="ce11" office:value-type="string" calcext:value-type="string">
            <text:p>itm_riv_bas_sword,</text:p>
          </table:table-cell>
          <table:table-cell table:style-name="ce11"/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elf_tier_6</text:p>
          </table:table-cell>
          <table:table-cell table:style-name="ce12" office:value-type="string" calcext:value-type="string">
            <text:p>knows_common|knows_athletics_5|knows_power_draw_6|knows_power_strike_5|knows_ironflesh_4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B203]&lt;&gt;&quot;&quot;;[.C203]&lt;&gt;&quot;&quot;);CONCATENATE([Variables.$I$1];[Variables.$I$7];[.B203];[Variables.$I$7];[Variables.$I$6];[Variables.$I$7];[.C203];[Variables.$I$7];[Variables.$I$6];[Variables.$I$7];[.D203];[Variables.$I$7];[Variables.$I$6];[.E203];[Variables.$I$6];[.F203];[Variables.$I$6];[.G203];[Variables.$I$6];[.H203];[Variables.$I$6];[Variables.$I$1];[.I203];[.J203];[.K203];[.L203];[.M203];[.N203];[.O203];[Variables.$I$2];[Variables.$I$6];[.P203];[Variables.$I$6];[.Q203];[Variables.$I$6];[.R203];[Variables.$I$6];[.S203];[Variables.$I$6];[.T203];IF([.U203]&lt;&gt;&quot;&quot;;CONCATENATE([Variables.$I$6];[.U203]);&quot;&quot;);[Variables.$I$2];[Variables.$I$6]);IF([.B203]&lt;&gt;&quot;&quot;;CONCATENATE(&quot;#&quot;;[.B203]);&quot;&quot;))" office:value-type="string" office:string-value="[&quot;a6_riv_guardian&quot;,&quot;Guardian_of_Imladris&quot;,&quot;Guardians_of_Imladris&quot;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" calcext:value-type="string">
            <text:p>["a6_riv_guardian","Guardian_of_Imladris","Guardians_of_Imladris"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</text:p>
          </table:table-cell>
          <table:table-cell table:number-columns-repeated="16362"/>
        </table:table-row>
        <table:table-row table:style-name="ro1">
          <table:table-cell table:style-name="ce6" table:formula="of:=IF(AND([.B204]&lt;&gt;&quot;&quot;;[.C204]&lt;&gt;&quot;&quot;);CONCATENATE([Variables.$I$1];[Variables.$I$7];[.B204];[Variables.$I$7];[Variables.$I$6];[Variables.$I$7];[.C204];[Variables.$I$7];[Variables.$I$6];[Variables.$I$7];[.D204];[Variables.$I$7];[Variables.$I$6];[.E204];[Variables.$I$6];[.F204];[Variables.$I$6];[.G204];[Variables.$I$6];[.H204];[Variables.$I$6];[Variables.$I$1];[.I204];[.J204];[.K204];[.L204];[.M204];[.N204];[.O204];[Variables.$I$2];[Variables.$I$6];[.P204];[Variables.$I$6];[.Q204];[Variables.$I$6];[.R204];[Variables.$I$6];[.S204];[Variables.$I$6];[.T204];IF([.U204]&lt;&gt;&quot;&quot;;CONCATENATE([Variables.$I$6];[.U204]);&quot;&quot;);[Variables.$I$2];[Variables.$I$6]);IF([.B204]&lt;&gt;&quot;&quot;;CONCATENATE(&quot;#&quot;;[.B204]);&quot;&quot;))" office:value-type="string" office:string-value="[&quot;i3_riv_swordbearer&quot;,&quot;Rivendell_Swordbearer&quot;,&quot;Rivendell_Swordbearers&quot;,tf_imladris| tfg_shield| tfg_armor| tfg_helm| tfg_boots| tf_no_capture_alive,0,0,fac_imladris,[itm_riv_helm_b,itm_riv_foot_mail,itm_leather_gloves,itm_riv_boots,itm_woodelf_leather_boots_good,itm_riv_1h_sword,itm_riv_archer_sword,itm_riv_shield_a,],attr_elf_tier_3,wp_elf_tier_3,knows_common|knows_athletics_4|knows_shield_3|knows_power_strike_3|knows_ironflesh_3,rivendell_elf_face_1,rivendell_elf_face_2]," calcext:value-type="string">
            <text:p>["i3_riv_swordbearer","Rivendell_Swordbearer","Rivendell_Swordbearers",tf_imladris| tfg_shield| tfg_armor| tfg_helm| tfg_boots| tf_no_capture_alive,0,0,fac_imladris,[itm_riv_helm_b,itm_riv_foot_mail,itm_leather_gloves,itm_riv_boots,itm_woodelf_leather_boots_good,itm_riv_1h_sword,itm_riv_archer_sword,itm_riv_shield_a,],attr_elf_tier_3,wp_elf_tier_3,knows_common|knows_athletics_4|knows_shield_3|knows_power_strike_3|knows_ironflesh_3,rivendell_elf_face_1,rivendell_elf_face_2],</text:p>
          </table:table-cell>
          <table:table-cell table:style-name="ce7" office:value-type="string" calcext:value-type="string">
            <text:p>i3_riv_swordbearer</text:p>
          </table:table-cell>
          <table:table-cell table:style-name="ce7" office:value-type="string" calcext:value-type="string">
            <text:p>Rivendell_Swordbearer</text:p>
          </table:table-cell>
          <table:table-cell table:style-name="ce7" office:value-type="string" calcext:value-type="string">
            <text:p>Rivendell_Swordbearers</text:p>
          </table:table-cell>
          <table:table-cell table:style-name="ce8" office:value-type="string" calcext:value-type="string">
            <text:p>tf_imladri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mladris</text:p>
          </table:table-cell>
          <table:table-cell table:style-name="ce11" office:value-type="string" calcext:value-type="string">
            <text:p>itm_riv_helm_b,</text:p>
          </table:table-cell>
          <table:table-cell table:style-name="ce19" office:value-type="string" calcext:value-type="string">
            <text:p>itm_riv_foot_mail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riv_boots,itm_woodelf_leather_boots_good,</text:p>
          </table:table-cell>
          <table:table-cell table:style-name="ce19" office:value-type="string" calcext:value-type="string">
            <text:p>itm_riv_1h_sword,itm_riv_archer_sword,</text:p>
          </table:table-cell>
          <table:table-cell table:style-name="ce11" office:value-type="string" calcext:value-type="string">
            <text:p>itm_riv_shield_a,</text:p>
          </table:table-cell>
          <table:table-cell table:style-name="ce11"/>
          <table:table-cell table:style-name="ce12" office:value-type="string" calcext:value-type="string">
            <text:p>attr_elf_tier_3</text:p>
          </table:table-cell>
          <table:table-cell table:style-name="ce12" office:value-type="string" calcext:value-type="string">
            <text:p>wp_elf_tier_3</text:p>
          </table:table-cell>
          <table:table-cell table:style-name="ce12" office:value-type="string" calcext:value-type="string">
            <text:p>knows_common|knows_athletics_4|knows_shield_3|knows_power_strike_3|knows_ironflesh_3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B204]&lt;&gt;&quot;&quot;;[.C204]&lt;&gt;&quot;&quot;);CONCATENATE([Variables.$I$1];[Variables.$I$7];[.B204];[Variables.$I$7];[Variables.$I$6];[Variables.$I$7];[.C204];[Variables.$I$7];[Variables.$I$6];[Variables.$I$7];[.D204];[Variables.$I$7];[Variables.$I$6];[.E204];[Variables.$I$6];[.F204];[Variables.$I$6];[.G204];[Variables.$I$6];[.H204];[Variables.$I$6];[Variables.$I$1];[.I204];[.J204];[.K204];[.L204];[.M204];[.N204];[.O204];[Variables.$I$2];[Variables.$I$6];[.P204];[Variables.$I$6];[.Q204];[Variables.$I$6];[.R204];[Variables.$I$6];[.S204];[Variables.$I$6];[.T204];IF([.U204]&lt;&gt;&quot;&quot;;CONCATENATE([Variables.$I$6];[.U204]);&quot;&quot;);[Variables.$I$2];[Variables.$I$6]);IF([.B204]&lt;&gt;&quot;&quot;;CONCATENATE(&quot;#&quot;;[.B204]);&quot;&quot;))" office:value-type="string" office:string-value="[&quot;i3_riv_swordbearer&quot;,&quot;Rivendell_Swordbearer&quot;,&quot;Rivendell_Swordbearers&quot;,tf_imladris| tfg_shield| tfg_armor| tfg_helm| tfg_boots| tf_no_capture_alive,0,0,fac_imladris,[itm_riv_helm_b,itm_riv_foot_mail,itm_leather_gloves,itm_riv_boots,itm_woodelf_leather_boots_good,itm_riv_1h_sword,itm_riv_archer_sword,itm_riv_shield_a,],attr_elf_tier_3,wp_elf_tier_3,knows_common|knows_athletics_4|knows_shield_3|knows_power_strike_3|knows_ironflesh_3,rivendell_elf_face_1,rivendell_elf_face_2]," calcext:value-type="string">
            <text:p>["i3_riv_swordbearer","Rivendell_Swordbearer","Rivendell_Swordbearers",tf_imladris| tfg_shield| tfg_armor| tfg_helm| tfg_boots| tf_no_capture_alive,0,0,fac_imladris,[itm_riv_helm_b,itm_riv_foot_mail,itm_leather_gloves,itm_riv_boots,itm_woodelf_leather_boots_good,itm_riv_1h_sword,itm_riv_archer_sword,itm_riv_shield_a,],attr_elf_tier_3,wp_elf_tier_3,knows_common|knows_athletics_4|knows_shield_3|knows_power_strike_3|knows_ironflesh_3,rivendell_elf_face_1,rivendell_elf_face_2],</text:p>
          </table:table-cell>
          <table:table-cell table:number-columns-repeated="16362"/>
        </table:table-row>
        <table:table-row table:style-name="ro1">
          <table:table-cell table:style-name="ce6" table:formula="of:=IF(AND([.B205]&lt;&gt;&quot;&quot;;[.C205]&lt;&gt;&quot;&quot;);CONCATENATE([Variables.$I$1];[Variables.$I$7];[.B205];[Variables.$I$7];[Variables.$I$6];[Variables.$I$7];[.C205];[Variables.$I$7];[Variables.$I$6];[Variables.$I$7];[.D205];[Variables.$I$7];[Variables.$I$6];[.E205];[Variables.$I$6];[.F205];[Variables.$I$6];[.G205];[Variables.$I$6];[.H205];[Variables.$I$6];[Variables.$I$1];[.I205];[.J205];[.K205];[.L205];[.M205];[.N205];[.O205];[Variables.$I$2];[Variables.$I$6];[.P205];[Variables.$I$6];[.Q205];[Variables.$I$6];[.R205];[Variables.$I$6];[.S205];[Variables.$I$6];[.T205];IF([.U205]&lt;&gt;&quot;&quot;;CONCATENATE([Variables.$I$6];[.U205]);&quot;&quot;);[Variables.$I$2];[Variables.$I$6]);IF([.B205]&lt;&gt;&quot;&quot;;CONCATENATE(&quot;#&quot;;[.B205]);&quot;&quot;))" office:value-type="string" office:string-value="[&quot;i4_riv_vet_swordbearer&quot;,&quot;Rivendell_Veteran_Swordbearer&quot;,&quot;Rivendell_Veteran_Swordbearers&quot;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strike_5|knows_ironflesh_4,rivendell_elf_face_1,rivendell_elf_face_2]," calcext:value-type="string">
            <text:p>["i4_riv_vet_swordbearer","Rivendell_Veteran_Swordbearer","Rivendell_Veteran_Swordbearers"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strike_5|knows_ironflesh_4,rivendell_elf_face_1,rivendell_elf_face_2],</text:p>
          </table:table-cell>
          <table:table-cell table:style-name="ce7" office:value-type="string" calcext:value-type="string">
            <text:p>i4_riv_vet_swordbearer</text:p>
          </table:table-cell>
          <table:table-cell table:style-name="ce7" office:value-type="string" calcext:value-type="string">
            <text:p>Rivendell_Veteran_Swordbearer</text:p>
          </table:table-cell>
          <table:table-cell table:style-name="ce7" office:value-type="string" calcext:value-type="string">
            <text:p>Rivendell_Veteran_Sword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mladris</text:p>
          </table:table-cell>
          <table:table-cell table:style-name="ce11" office:value-type="string" calcext:value-type="string">
            <text:p>itm_riv_helm_b,</text:p>
          </table:table-cell>
          <table:table-cell table:style-name="ce11" office:value-type="string" calcext:value-type="string">
            <text:p>itm_riv_foot_mail_good, itm_riv_surcoat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riv_boots,</text:p>
          </table:table-cell>
          <table:table-cell table:style-name="ce19" office:value-type="string" calcext:value-type="string">
            <text:p>itm_riv_1h_sword,</text:p>
          </table:table-cell>
          <table:table-cell table:style-name="ce11" office:value-type="string" calcext:value-type="string">
            <text:p>itm_riv_shield_a,</text:p>
          </table:table-cell>
          <table:table-cell table:style-name="ce11"/>
          <table:table-cell table:style-name="ce12" office:value-type="string" calcext:value-type="string">
            <text:p>attr_elf_tier_4</text:p>
          </table:table-cell>
          <table:table-cell table:style-name="ce12" office:value-type="string" calcext:value-type="string">
            <text:p>wp_elf_tier_4</text:p>
          </table:table-cell>
          <table:table-cell table:style-name="ce12" office:value-type="string" calcext:value-type="string">
            <text:p>knows_common|knows_athletics_5|knows_shield_4|knows_power_strike_5|knows_ironflesh_4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B205]&lt;&gt;&quot;&quot;;[.C205]&lt;&gt;&quot;&quot;);CONCATENATE([Variables.$I$1];[Variables.$I$7];[.B205];[Variables.$I$7];[Variables.$I$6];[Variables.$I$7];[.C205];[Variables.$I$7];[Variables.$I$6];[Variables.$I$7];[.D205];[Variables.$I$7];[Variables.$I$6];[.E205];[Variables.$I$6];[.F205];[Variables.$I$6];[.G205];[Variables.$I$6];[.H205];[Variables.$I$6];[Variables.$I$1];[.I205];[.J205];[.K205];[.L205];[.M205];[.N205];[.O205];[Variables.$I$2];[Variables.$I$6];[.P205];[Variables.$I$6];[.Q205];[Variables.$I$6];[.R205];[Variables.$I$6];[.S205];[Variables.$I$6];[.T205];IF([.U205]&lt;&gt;&quot;&quot;;CONCATENATE([Variables.$I$6];[.U205]);&quot;&quot;);[Variables.$I$2];[Variables.$I$6]);IF([.B205]&lt;&gt;&quot;&quot;;CONCATENATE(&quot;#&quot;;[.B205]);&quot;&quot;))" office:value-type="string" office:string-value="[&quot;i4_riv_vet_swordbearer&quot;,&quot;Rivendell_Veteran_Swordbearer&quot;,&quot;Rivendell_Veteran_Swordbearers&quot;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strike_5|knows_ironflesh_4,rivendell_elf_face_1,rivendell_elf_face_2]," calcext:value-type="string">
            <text:p>["i4_riv_vet_swordbearer","Rivendell_Veteran_Swordbearer","Rivendell_Veteran_Swordbearers"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strike_5|knows_ironflesh_4,rivendell_elf_face_1,rivendell_elf_face_2],</text:p>
          </table:table-cell>
          <table:table-cell table:number-columns-repeated="16362"/>
        </table:table-row>
        <table:table-row table:style-name="ro1">
          <table:table-cell table:style-name="ce6" table:formula="of:=IF(AND([.B206]&lt;&gt;&quot;&quot;;[.C206]&lt;&gt;&quot;&quot;);CONCATENATE([Variables.$I$1];[Variables.$I$7];[.B206];[Variables.$I$7];[Variables.$I$6];[Variables.$I$7];[.C206];[Variables.$I$7];[Variables.$I$6];[Variables.$I$7];[.D206];[Variables.$I$7];[Variables.$I$6];[.E206];[Variables.$I$6];[.F206];[Variables.$I$6];[.G206];[Variables.$I$6];[.H206];[Variables.$I$6];[Variables.$I$1];[.I206];[.J206];[.K206];[.L206];[.M206];[.N206];[.O206];[Variables.$I$2];[Variables.$I$6];[.P206];[Variables.$I$6];[.Q206];[Variables.$I$6];[.R206];[Variables.$I$6];[.S206];[Variables.$I$6];[.T206];IF([.U206]&lt;&gt;&quot;&quot;;CONCATENATE([Variables.$I$6];[.U206]);&quot;&quot;);[Variables.$I$2];[Variables.$I$6]);IF([.B206]&lt;&gt;&quot;&quot;;CONCATENATE(&quot;#&quot;;[.B206]);&quot;&quot;))" office:value-type="string" office:string-value="[&quot;i5_riv_swordmaster&quot;,&quot;Rivendell_Swordmaster&quot;,&quot;Rivendell_Swordmasters&quot;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strike_6|knows_ironflesh_4,rivendell_elf_face_1,rivendell_elf_face_2]," calcext:value-type="string">
            <text:p>["i5_riv_swordmaster","Rivendell_Swordmaster","Rivendell_Swordmasters"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strike_6|knows_ironflesh_4,rivendell_elf_face_1,rivendell_elf_face_2],</text:p>
          </table:table-cell>
          <table:table-cell table:style-name="ce7" office:value-type="string" calcext:value-type="string">
            <text:p>i5_riv_swordmaster</text:p>
          </table:table-cell>
          <table:table-cell table:style-name="ce7" office:value-type="string" calcext:value-type="string">
            <text:p>Rivendell_Swordmaster</text:p>
          </table:table-cell>
          <table:table-cell table:style-name="ce7" office:value-type="string" calcext:value-type="string">
            <text:p>Rivendell_Swordmast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mladris</text:p>
          </table:table-cell>
          <table:table-cell table:style-name="ce19" office:value-type="string" calcext:value-type="string">
            <text:p>itm_riv_helm_c,</text:p>
          </table:table-cell>
          <table:table-cell table:style-name="ce11" office:value-type="string" calcext:value-type="string">
            <text:p>itm_riv_surcoat_good,itm_riv_foot_scale,</text:p>
          </table:table-cell>
          <table:table-cell table:style-name="ce11" office:value-type="string" calcext:value-type="string">
            <text:p>itm_leather_gloves_good,</text:p>
          </table:table-cell>
          <table:table-cell table:style-name="ce11" office:value-type="string" calcext:value-type="string">
            <text:p>itm_riv_boots,</text:p>
          </table:table-cell>
          <table:table-cell table:style-name="ce28" office:value-type="string" calcext:value-type="string">
            <text:p>itm_riv_1h_sword,</text:p>
          </table:table-cell>
          <table:table-cell table:style-name="ce11" office:value-type="string" calcext:value-type="string">
            <text:p>itm_riv_shield_a_good,</text:p>
          </table:table-cell>
          <table:table-cell table:style-name="ce11"/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5</text:p>
          </table:table-cell>
          <table:table-cell table:style-name="ce12" office:value-type="string" calcext:value-type="string">
            <text:p>knows_common|knows_athletics_5|knows_shield_5|knows_power_strike_6|knows_ironflesh_4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B206]&lt;&gt;&quot;&quot;;[.C206]&lt;&gt;&quot;&quot;);CONCATENATE([Variables.$I$1];[Variables.$I$7];[.B206];[Variables.$I$7];[Variables.$I$6];[Variables.$I$7];[.C206];[Variables.$I$7];[Variables.$I$6];[Variables.$I$7];[.D206];[Variables.$I$7];[Variables.$I$6];[.E206];[Variables.$I$6];[.F206];[Variables.$I$6];[.G206];[Variables.$I$6];[.H206];[Variables.$I$6];[Variables.$I$1];[.I206];[.J206];[.K206];[.L206];[.M206];[.N206];[.O206];[Variables.$I$2];[Variables.$I$6];[.P206];[Variables.$I$6];[.Q206];[Variables.$I$6];[.R206];[Variables.$I$6];[.S206];[Variables.$I$6];[.T206];IF([.U206]&lt;&gt;&quot;&quot;;CONCATENATE([Variables.$I$6];[.U206]);&quot;&quot;);[Variables.$I$2];[Variables.$I$6]);IF([.B206]&lt;&gt;&quot;&quot;;CONCATENATE(&quot;#&quot;;[.B206]);&quot;&quot;))" office:value-type="string" office:string-value="[&quot;i5_riv_swordmaster&quot;,&quot;Rivendell_Swordmaster&quot;,&quot;Rivendell_Swordmasters&quot;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strike_6|knows_ironflesh_4,rivendell_elf_face_1,rivendell_elf_face_2]," calcext:value-type="string">
            <text:p>["i5_riv_swordmaster","Rivendell_Swordmaster","Rivendell_Swordmasters"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strike_6|knows_ironflesh_4,rivendell_elf_face_1,rivendell_elf_face_2],</text:p>
          </table:table-cell>
          <table:table-cell table:number-columns-repeated="16362"/>
        </table:table-row>
        <table:table-row table:style-name="ro1">
          <table:table-cell table:style-name="ce6" table:formula="of:=IF(AND([.B207]&lt;&gt;&quot;&quot;;[.C207]&lt;&gt;&quot;&quot;);CONCATENATE([Variables.$I$1];[Variables.$I$7];[.B207];[Variables.$I$7];[Variables.$I$6];[Variables.$I$7];[.C207];[Variables.$I$7];[Variables.$I$6];[Variables.$I$7];[.D207];[Variables.$I$7];[Variables.$I$6];[.E207];[Variables.$I$6];[.F207];[Variables.$I$6];[.G207];[Variables.$I$6];[.H207];[Variables.$I$6];[Variables.$I$1];[.I207];[.J207];[.K207];[.L207];[.M207];[.N207];[.O207];[Variables.$I$2];[Variables.$I$6];[.P207];[Variables.$I$6];[.Q207];[Variables.$I$6];[.R207];[Variables.$I$6];[.S207];[Variables.$I$6];[.T207];IF([.U207]&lt;&gt;&quot;&quot;;CONCATENATE([Variables.$I$6];[.U207]);&quot;&quot;);[Variables.$I$2];[Variables.$I$6]);IF([.B207]&lt;&gt;&quot;&quot;;CONCATENATE(&quot;#&quot;;[.B207]);&quot;&quot;))" office:value-type="string" office:string-value="[&quot;i6_riv_champion&quot;,&quot;Champion_of_Imladris&quot;,&quot;Champions_of_Imladris&quot;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" calcext:value-type="string">
            <text:p>["i6_riv_champion","Champion_of_Imladris","Champions_of_Imladris"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</text:p>
          </table:table-cell>
          <table:table-cell table:style-name="ce7" office:value-type="string" calcext:value-type="string">
            <text:p>i6_riv_champion</text:p>
          </table:table-cell>
          <table:table-cell table:style-name="ce7" office:value-type="string" calcext:value-type="string">
            <text:p>Champion_of_Imladris</text:p>
          </table:table-cell>
          <table:table-cell table:style-name="ce7" office:value-type="string" calcext:value-type="string">
            <text:p>Champions_of_Imladri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mladris</text:p>
          </table:table-cell>
          <table:table-cell table:style-name="ce11" office:value-type="string" calcext:value-type="string">
            <text:p>itm_riv_helm_c,</text:p>
          </table:table-cell>
          <table:table-cell table:style-name="ce11" office:value-type="string" calcext:value-type="string">
            <text:p>itm_riv_foot_scale_lordly,itm_riv_knight_good,itm_riv_surcoat_lordly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riv_boots,</text:p>
          </table:table-cell>
          <table:table-cell table:style-name="ce11" office:value-type="string" calcext:value-type="string">
            <text:p>itm_riv_1h_sword,itm_riv_bas_sword,</text:p>
          </table:table-cell>
          <table:table-cell table:style-name="ce11" office:value-type="string" calcext:value-type="string">
            <text:p>itm_riv_shield_a_good,</text:p>
          </table:table-cell>
          <table:table-cell table:style-name="ce11"/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elf_tier_6</text:p>
          </table:table-cell>
          <table:table-cell table:style-name="ce12" office:value-type="string" calcext:value-type="string">
            <text:p>knows_common|knows_athletics_5|knows_shield_6|knows_power_strike_7|knows_ironflesh_4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B207]&lt;&gt;&quot;&quot;;[.C207]&lt;&gt;&quot;&quot;);CONCATENATE([Variables.$I$1];[Variables.$I$7];[.B207];[Variables.$I$7];[Variables.$I$6];[Variables.$I$7];[.C207];[Variables.$I$7];[Variables.$I$6];[Variables.$I$7];[.D207];[Variables.$I$7];[Variables.$I$6];[.E207];[Variables.$I$6];[.F207];[Variables.$I$6];[.G207];[Variables.$I$6];[.H207];[Variables.$I$6];[Variables.$I$1];[.I207];[.J207];[.K207];[.L207];[.M207];[.N207];[.O207];[Variables.$I$2];[Variables.$I$6];[.P207];[Variables.$I$6];[.Q207];[Variables.$I$6];[.R207];[Variables.$I$6];[.S207];[Variables.$I$6];[.T207];IF([.U207]&lt;&gt;&quot;&quot;;CONCATENATE([Variables.$I$6];[.U207]);&quot;&quot;);[Variables.$I$2];[Variables.$I$6]);IF([.B207]&lt;&gt;&quot;&quot;;CONCATENATE(&quot;#&quot;;[.B207]);&quot;&quot;))" office:value-type="string" office:string-value="[&quot;i6_riv_champion&quot;,&quot;Champion_of_Imladris&quot;,&quot;Champions_of_Imladris&quot;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" calcext:value-type="string">
            <text:p>["i6_riv_champion","Champion_of_Imladris","Champions_of_Imladris"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</text:p>
          </table:table-cell>
          <table:table-cell table:number-columns-repeated="16362"/>
        </table:table-row>
        <table:table-row table:style-name="ro1">
          <table:table-cell table:style-name="ce6" table:formula="of:=IF(AND([.B208]&lt;&gt;&quot;&quot;;[.C208]&lt;&gt;&quot;&quot;);CONCATENATE([Variables.$I$1];[Variables.$I$7];[.B208];[Variables.$I$7];[Variables.$I$6];[Variables.$I$7];[.C208];[Variables.$I$7];[Variables.$I$6];[Variables.$I$7];[.D208];[Variables.$I$7];[Variables.$I$6];[.E208];[Variables.$I$6];[.F208];[Variables.$I$6];[.G208];[Variables.$I$6];[.H208];[Variables.$I$6];[Variables.$I$1];[.I208];[.J208];[.K208];[.L208];[.M208];[.N208];[.O208];[Variables.$I$2];[Variables.$I$6];[.P208];[Variables.$I$6];[.Q208];[Variables.$I$6];[.R208];[Variables.$I$6];[.S208];[Variables.$I$6];[.T208];IF([.U208]&lt;&gt;&quot;&quot;;CONCATENATE([Variables.$I$6];[.U208]);&quot;&quot;);[Variables.$I$2];[Variables.$I$6]);IF([.B208]&lt;&gt;&quot;&quot;;CONCATENATE(&quot;#&quot;;[.B208]);&quot;&quot;))" office:value-type="string" office:string-value="[&quot;ac5_riv_rider&quot;,&quot;Rivendell_Rider&quot;,&quot;Rivendell_Riders&quot;,tf_imladris| tfg_ranged| tf_mounted| tfg_gloves| tfg_armor| tfg_helm| tfg_horse| tfg_boots| tf_no_capture_alive,0,0,fac_imladris,[itm_riv_helm_b,itm_riv_foot_scale, itm_riv_surcoat_good,itm_leather_gloves,itm_riv_boots,itm_lorien_bow_reward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" calcext:value-type="string">
            <text:p>["ac5_riv_rider","Rivendell_Rider","Rivendell_Riders",tf_imladris| tfg_ranged| tf_mounted| tfg_gloves| tfg_armor| tfg_helm| tfg_horse| tfg_boots| tf_no_capture_alive,0,0,fac_imladris,[itm_riv_helm_b,itm_riv_foot_scale, itm_riv_surcoat_good,itm_leather_gloves,itm_riv_boots,itm_lorien_bow_reward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</text:p>
          </table:table-cell>
          <table:table-cell table:style-name="ce7" office:value-type="string" calcext:value-type="string">
            <text:p>ac5_riv_rider</text:p>
          </table:table-cell>
          <table:table-cell table:style-name="ce7" office:value-type="string" calcext:value-type="string">
            <text:p>Rivendell_Rider</text:p>
          </table:table-cell>
          <table:table-cell table:style-name="ce7" office:value-type="string" calcext:value-type="string">
            <text:p>Rivendell_Rider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mladris</text:p>
          </table:table-cell>
          <table:table-cell table:style-name="ce11" office:value-type="string" calcext:value-type="string">
            <text:p>itm_riv_helm_b,</text:p>
          </table:table-cell>
          <table:table-cell table:style-name="ce11" office:value-type="string" calcext:value-type="string">
            <text:p>itm_riv_foot_scale, itm_riv_surcoat_good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riv_boots,</text:p>
          </table:table-cell>
          <table:table-cell table:style-name="ce11" office:value-type="string" calcext:value-type="string">
            <text:p>itm_lorien_bow_reward, itm_elven_arrows,</text:p>
          </table:table-cell>
          <table:table-cell table:style-name="ce11" office:value-type="string" calcext:value-type="string">
            <text:p>itm_riv_shield_b,itm_riv_spear,itm_riv_riding_sword,</text:p>
          </table:table-cell>
          <table:table-cell table:style-name="ce11" office:value-type="string" calcext:value-type="string">
            <text:p>itm_riv_warhorse,</text:p>
          </table:table-cell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5</text:p>
          </table:table-cell>
          <table:table-cell table:style-name="ce12" office:value-type="string" calcext:value-type="string">
            <text:p>knows_common|knows_riding_5|knows_shield_3|knows_athletics_5|knows_horse_archery_6|knows_power_draw_4|knows_power_strike_4|knows_ironflesh_4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B208]&lt;&gt;&quot;&quot;;[.C208]&lt;&gt;&quot;&quot;);CONCATENATE([Variables.$I$1];[Variables.$I$7];[.B208];[Variables.$I$7];[Variables.$I$6];[Variables.$I$7];[.C208];[Variables.$I$7];[Variables.$I$6];[Variables.$I$7];[.D208];[Variables.$I$7];[Variables.$I$6];[.E208];[Variables.$I$6];[.F208];[Variables.$I$6];[.G208];[Variables.$I$6];[.H208];[Variables.$I$6];[Variables.$I$1];[.I208];[.J208];[.K208];[.L208];[.M208];[.N208];[.O208];[Variables.$I$2];[Variables.$I$6];[.P208];[Variables.$I$6];[.Q208];[Variables.$I$6];[.R208];[Variables.$I$6];[.S208];[Variables.$I$6];[.T208];IF([.U208]&lt;&gt;&quot;&quot;;CONCATENATE([Variables.$I$6];[.U208]);&quot;&quot;);[Variables.$I$2];[Variables.$I$6]);IF([.B208]&lt;&gt;&quot;&quot;;CONCATENATE(&quot;#&quot;;[.B208]);&quot;&quot;))" office:value-type="string" office:string-value="[&quot;ac5_riv_rider&quot;,&quot;Rivendell_Rider&quot;,&quot;Rivendell_Riders&quot;,tf_imladris| tfg_ranged| tf_mounted| tfg_gloves| tfg_armor| tfg_helm| tfg_horse| tfg_boots| tf_no_capture_alive,0,0,fac_imladris,[itm_riv_helm_b,itm_riv_foot_scale, itm_riv_surcoat_good,itm_leather_gloves,itm_riv_boots,itm_lorien_bow_reward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" calcext:value-type="string">
            <text:p>["ac5_riv_rider","Rivendell_Rider","Rivendell_Riders",tf_imladris| tfg_ranged| tf_mounted| tfg_gloves| tfg_armor| tfg_helm| tfg_horse| tfg_boots| tf_no_capture_alive,0,0,fac_imladris,[itm_riv_helm_b,itm_riv_foot_scale, itm_riv_surcoat_good,itm_leather_gloves,itm_riv_boots,itm_lorien_bow_reward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</text:p>
          </table:table-cell>
          <table:table-cell table:number-columns-repeated="16362"/>
        </table:table-row>
        <table:table-row table:style-name="ro1">
          <table:table-cell table:style-name="ce6" table:formula="of:=IF(AND([.B209]&lt;&gt;&quot;&quot;;[.C209]&lt;&gt;&quot;&quot;);CONCATENATE([Variables.$I$1];[Variables.$I$7];[.B209];[Variables.$I$7];[Variables.$I$6];[Variables.$I$7];[.C209];[Variables.$I$7];[Variables.$I$6];[Variables.$I$7];[.D209];[Variables.$I$7];[Variables.$I$6];[.E209];[Variables.$I$6];[.F209];[Variables.$I$6];[.G209];[Variables.$I$6];[.H209];[Variables.$I$6];[Variables.$I$1];[.I209];[.J209];[.K209];[.L209];[.M209];[.N209];[.O209];[Variables.$I$2];[Variables.$I$6];[.P209];[Variables.$I$6];[.Q209];[Variables.$I$6];[.R209];[Variables.$I$6];[.S209];[Variables.$I$6];[.T209];IF([.U209]&lt;&gt;&quot;&quot;;CONCATENATE([Variables.$I$6];[.U209]);&quot;&quot;);[Variables.$I$2];[Variables.$I$6]);IF([.B209]&lt;&gt;&quot;&quot;;CONCATENATE(&quot;#&quot;;[.B209]);&quot;&quot;))" office:value-type="string" office:string-value="[&quot;ac6_riv_knight&quot;,&quot;Knight_of_Imladris&quot;,&quot;Knights_of_Imladris&quot;,tf_imladris| tfg_ranged| tf_mounted| tfg_gloves| tfg_armor| tfg_helm| tfg_horse| tfg_boots| tf_no_capture_alive,0,0,fac_imladris,[itm_riv_helm_c,itm_riv_foot_scale_cloak, itm_riv_knight_cloak,itm_leather_gloves_good,itm_riv_boots,(itm_lorien_bow_reward, imod_balanced)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" calcext:value-type="string">
            <text:p>["ac6_riv_knight","Knight_of_Imladris","Knights_of_Imladris",tf_imladris| tfg_ranged| tf_mounted| tfg_gloves| tfg_armor| tfg_helm| tfg_horse| tfg_boots| tf_no_capture_alive,0,0,fac_imladris,[itm_riv_helm_c,itm_riv_foot_scale_cloak, itm_riv_knight_cloak,itm_leather_gloves_good,itm_riv_boots,(itm_lorien_bow_reward, imod_balanced)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</text:p>
          </table:table-cell>
          <table:table-cell table:style-name="ce7" office:value-type="string" calcext:value-type="string">
            <text:p>ac6_riv_knight</text:p>
          </table:table-cell>
          <table:table-cell table:style-name="ce7" office:value-type="string" calcext:value-type="string">
            <text:p>Knight_of_Imladris</text:p>
          </table:table-cell>
          <table:table-cell table:style-name="ce7" office:value-type="string" calcext:value-type="string">
            <text:p>Knights_of_Imladri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mladris</text:p>
          </table:table-cell>
          <table:table-cell table:style-name="ce11" office:value-type="string" calcext:value-type="string">
            <text:p>itm_riv_helm_c,</text:p>
          </table:table-cell>
          <table:table-cell table:style-name="ce11" office:value-type="string" calcext:value-type="string">
            <text:p>itm_riv_foot_scale_cloak, itm_riv_knight_cloak,</text:p>
          </table:table-cell>
          <table:table-cell table:style-name="ce11" office:value-type="string" calcext:value-type="string">
            <text:p>itm_leather_gloves_good,</text:p>
          </table:table-cell>
          <table:table-cell table:style-name="ce11" office:value-type="string" calcext:value-type="string">
            <text:p>itm_riv_boots,</text:p>
          </table:table-cell>
          <table:table-cell table:style-name="ce11" office:value-type="string" calcext:value-type="string">
            <text:p>(itm_lorien_bow_reward, imod_balanced), itm_elven_arrows,</text:p>
          </table:table-cell>
          <table:table-cell table:style-name="ce11" office:value-type="string" calcext:value-type="string">
            <text:p>itm_riv_bas_sword,itm_riv_shield_b_good,itm_riv_spear,itm_riv_riding_sword,</text:p>
          </table:table-cell>
          <table:table-cell table:style-name="ce11" office:value-type="string" calcext:value-type="string">
            <text:p>itm_riv_warhorse2,</text:p>
          </table:table-cell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elf_tier_6</text:p>
          </table:table-cell>
          <table:table-cell table:style-name="ce12" office:value-type="string" calcext:value-type="string">
            <text:p>knows_common|knows_riding_6|knows_shield_4|knows_horse_archery_9|knows_athletics_5|knows_power_draw_5|knows_power_strike_5|knows_ironflesh_4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B209]&lt;&gt;&quot;&quot;;[.C209]&lt;&gt;&quot;&quot;);CONCATENATE([Variables.$I$1];[Variables.$I$7];[.B209];[Variables.$I$7];[Variables.$I$6];[Variables.$I$7];[.C209];[Variables.$I$7];[Variables.$I$6];[Variables.$I$7];[.D209];[Variables.$I$7];[Variables.$I$6];[.E209];[Variables.$I$6];[.F209];[Variables.$I$6];[.G209];[Variables.$I$6];[.H209];[Variables.$I$6];[Variables.$I$1];[.I209];[.J209];[.K209];[.L209];[.M209];[.N209];[.O209];[Variables.$I$2];[Variables.$I$6];[.P209];[Variables.$I$6];[.Q209];[Variables.$I$6];[.R209];[Variables.$I$6];[.S209];[Variables.$I$6];[.T209];IF([.U209]&lt;&gt;&quot;&quot;;CONCATENATE([Variables.$I$6];[.U209]);&quot;&quot;);[Variables.$I$2];[Variables.$I$6]);IF([.B209]&lt;&gt;&quot;&quot;;CONCATENATE(&quot;#&quot;;[.B209]);&quot;&quot;))" office:value-type="string" office:string-value="[&quot;ac6_riv_knight&quot;,&quot;Knight_of_Imladris&quot;,&quot;Knights_of_Imladris&quot;,tf_imladris| tfg_ranged| tf_mounted| tfg_gloves| tfg_armor| tfg_helm| tfg_horse| tfg_boots| tf_no_capture_alive,0,0,fac_imladris,[itm_riv_helm_c,itm_riv_foot_scale_cloak, itm_riv_knight_cloak,itm_leather_gloves_good,itm_riv_boots,(itm_lorien_bow_reward, imod_balanced)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" calcext:value-type="string">
            <text:p>["ac6_riv_knight","Knight_of_Imladris","Knights_of_Imladris",tf_imladris| tfg_ranged| tf_mounted| tfg_gloves| tfg_armor| tfg_helm| tfg_horse| tfg_boots| tf_no_capture_alive,0,0,fac_imladris,[itm_riv_helm_c,itm_riv_foot_scale_cloak, itm_riv_knight_cloak,itm_leather_gloves_good,itm_riv_boots,(itm_lorien_bow_reward, imod_balanced)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</text:p>
          </table:table-cell>
          <table:table-cell table:number-columns-repeated="16362"/>
        </table:table-row>
        <table:table-row table:style-name="ro1">
          <table:table-cell table:style-name="ce6" table:formula="of:=IF(AND([.B210]&lt;&gt;&quot;&quot;;[.C210]&lt;&gt;&quot;&quot;);CONCATENATE([Variables.$I$1];[Variables.$I$7];[.B210];[Variables.$I$7];[Variables.$I$6];[Variables.$I$7];[.C210];[Variables.$I$7];[Variables.$I$6];[Variables.$I$7];[.D210];[Variables.$I$7];[Variables.$I$6];[.E210];[Variables.$I$6];[.F210];[Variables.$I$6];[.G210];[Variables.$I$6];[.H210];[Variables.$I$6];[Variables.$I$1];[.I210];[.J210];[.K210];[.L210];[.M210];[.N210];[.O210];[Variables.$I$2];[Variables.$I$6];[.P210];[Variables.$I$6];[.Q210];[Variables.$I$6];[.R210];[Variables.$I$6];[.S210];[Variables.$I$6];[.T210];IF([.U210]&lt;&gt;&quot;&quot;;CONCATENATE([Variables.$I$6];[.U210]);&quot;&quot;);[Variables.$I$2];[Variables.$I$6]);IF([.B210]&lt;&gt;&quot;&quot;;CONCATENATE(&quot;#&quot;;[.B210]);&quot;&quot;))" office:value-type="string" office:string-value="[&quot;i6_rivendell_standard_bearer&quot;,&quot;Rivendell_Standard_Bearer&quot;,&quot;Rivendell_Standard_Bearers&quot;,tf_imladris| tfg_gloves| tfg_shield| tfg_armor| tfg_helm| tfg_boots| tf_no_capture_alive,0,0,fac_imladris,[itm_riv_helm_c,itm_riv_foot_scale_good, itm_riv_knight_good,itm_mail_mittens,itm_riv_boots,itm_imladris_banner,],attr_elf_tier_6,wp_elf_tier_6,knows_common|knows_athletics_3|knows_power_draw_6|knows_power_strike_6|knows_ironflesh_10,rivendell_elf_face_1,rivendell_elf_face_2]," calcext:value-type="string">
            <text:p>["i6_rivendell_standard_bearer","Rivendell_Standard_Bearer","Rivendell_Standard_Bearers",tf_imladris| tfg_gloves| tfg_shield| tfg_armor| tfg_helm| tfg_boots| tf_no_capture_alive,0,0,fac_imladris,[itm_riv_helm_c,itm_riv_foot_scale_good, itm_riv_knight_good,itm_mail_mittens,itm_riv_boots,itm_imladris_banner,],attr_elf_tier_6,wp_elf_tier_6,knows_common|knows_athletics_3|knows_power_draw_6|knows_power_strike_6|knows_ironflesh_10,rivendell_elf_face_1,rivendell_elf_face_2],</text:p>
          </table:table-cell>
          <table:table-cell table:style-name="ce7" office:value-type="string" calcext:value-type="string">
            <text:p>i6_rivendell_standard_bearer</text:p>
          </table:table-cell>
          <table:table-cell table:style-name="ce7" office:value-type="string" calcext:value-type="string">
            <text:p>Rivendell_Standard_Bearer</text:p>
          </table:table-cell>
          <table:table-cell table:style-name="ce7" office:value-type="string" calcext:value-type="string">
            <text:p>Rivendell_Standard_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mladris</text:p>
          </table:table-cell>
          <table:table-cell table:style-name="ce11" office:value-type="string" calcext:value-type="string">
            <text:p>itm_riv_helm_c,</text:p>
          </table:table-cell>
          <table:table-cell table:style-name="ce11" office:value-type="string" calcext:value-type="string">
            <text:p>itm_riv_foot_scale_good, itm_riv_knight_good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riv_boots,</text:p>
          </table:table-cell>
          <table:table-cell table:style-name="ce11" office:value-type="string" calcext:value-type="string">
            <text:p>itm_imladris_banner,</text:p>
          </table:table-cell>
          <table:table-cell table:style-name="ce11" table:number-columns-repeated="2"/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elf_tier_6</text:p>
          </table:table-cell>
          <table:table-cell table:style-name="ce12" office:value-type="string" calcext:value-type="string">
            <text:p>knows_common|knows_athletics_3|knows_power_draw_6|knows_power_strike_6|knows_ironflesh_10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B210]&lt;&gt;&quot;&quot;;[.C210]&lt;&gt;&quot;&quot;);CONCATENATE([Variables.$I$1];[Variables.$I$7];[.B210];[Variables.$I$7];[Variables.$I$6];[Variables.$I$7];[.C210];[Variables.$I$7];[Variables.$I$6];[Variables.$I$7];[.D210];[Variables.$I$7];[Variables.$I$6];[.E210];[Variables.$I$6];[.F210];[Variables.$I$6];[.G210];[Variables.$I$6];[.H210];[Variables.$I$6];[Variables.$I$1];[.I210];[.J210];[.K210];[.L210];[.M210];[.N210];[.O210];[Variables.$I$2];[Variables.$I$6];[.P210];[Variables.$I$6];[.Q210];[Variables.$I$6];[.R210];[Variables.$I$6];[.S210];[Variables.$I$6];[.T210];IF([.U210]&lt;&gt;&quot;&quot;;CONCATENATE([Variables.$I$6];[.U210]);&quot;&quot;);[Variables.$I$2];[Variables.$I$6]);IF([.B210]&lt;&gt;&quot;&quot;;CONCATENATE(&quot;#&quot;;[.B210]);&quot;&quot;))" office:value-type="string" office:string-value="[&quot;i6_rivendell_standard_bearer&quot;,&quot;Rivendell_Standard_Bearer&quot;,&quot;Rivendell_Standard_Bearers&quot;,tf_imladris| tfg_gloves| tfg_shield| tfg_armor| tfg_helm| tfg_boots| tf_no_capture_alive,0,0,fac_imladris,[itm_riv_helm_c,itm_riv_foot_scale_good, itm_riv_knight_good,itm_mail_mittens,itm_riv_boots,itm_imladris_banner,],attr_elf_tier_6,wp_elf_tier_6,knows_common|knows_athletics_3|knows_power_draw_6|knows_power_strike_6|knows_ironflesh_10,rivendell_elf_face_1,rivendell_elf_face_2]," calcext:value-type="string">
            <text:p>["i6_rivendell_standard_bearer","Rivendell_Standard_Bearer","Rivendell_Standard_Bearers",tf_imladris| tfg_gloves| tfg_shield| tfg_armor| tfg_helm| tfg_boots| tf_no_capture_alive,0,0,fac_imladris,[itm_riv_helm_c,itm_riv_foot_scale_good, itm_riv_knight_good,itm_mail_mittens,itm_riv_boots,itm_imladris_banner,],attr_elf_tier_6,wp_elf_tier_6,knows_common|knows_athletics_3|knows_power_draw_6|knows_power_strike_6|knows_ironflesh_10,rivendell_elf_face_1,rivendell_elf_face_2],</text:p>
          </table:table-cell>
          <table:table-cell table:number-columns-repeated="16362"/>
        </table:table-row>
        <table:table-row table:style-name="ro1">
          <table:table-cell table:formula="of:=IF(AND([.B211]&lt;&gt;&quot;&quot;;[.C211]&lt;&gt;&quot;&quot;);CONCATENATE([Variables.$I$1];[Variables.$I$7];[.B211];[Variables.$I$7];[Variables.$I$6];[Variables.$I$7];[.C211];[Variables.$I$7];[Variables.$I$6];[Variables.$I$7];[.D211];[Variables.$I$7];[Variables.$I$6];[.E211];[Variables.$I$6];[.F211];[Variables.$I$6];[.G211];[Variables.$I$6];[.H211];[Variables.$I$6];[Variables.$I$1];[.I211];[.J211];[.K211];[.L211];[.M211];[.N211];[.O211];[Variables.$I$2];[Variables.$I$6];[.P211];[Variables.$I$6];[.Q211];[Variables.$I$6];[.R211];[Variables.$I$6];[.S211];[Variables.$I$6];[.T211];IF([.U211]&lt;&gt;&quot;&quot;;CONCATENATE([Variables.$I$6];[.U211]);&quot;&quot;);[Variables.$I$2];[Variables.$I$6]);IF([.B211]&lt;&gt;&quot;&quot;;CONCATENATE(&quot;#&quot;;[.B211]);&quot;&quot;))">
            <text:p/>
          </table:table-cell>
          <table:table-cell table:style-name="ce6" table:number-columns-repeated="20"/>
          <table:table-cell table:style-name="ce36" table:formula="of:=IF(AND([.B211]&lt;&gt;&quot;&quot;;[.C211]&lt;&gt;&quot;&quot;);CONCATENATE([Variables.$I$1];[Variables.$I$7];[.B211];[Variables.$I$7];[Variables.$I$6];[Variables.$I$7];[.C211];[Variables.$I$7];[Variables.$I$6];[Variables.$I$7];[.D211];[Variables.$I$7];[Variables.$I$6];[.E211];[Variables.$I$6];[.F211];[Variables.$I$6];[.G211];[Variables.$I$6];[.H211];[Variables.$I$6];[Variables.$I$1];[.I211];[.J211];[.K211];[.L211];[.M211];[.N211];[.O211];[Variables.$I$2];[Variables.$I$6];[.P211];[Variables.$I$6];[.Q211];[Variables.$I$6];[.R211];[Variables.$I$6];[.S211];[Variables.$I$6];[.T211];IF([.U211]&lt;&gt;&quot;&quot;;CONCATENATE([Variables.$I$6];[.U211]);&quot;&quot;);[Variables.$I$2];[Variables.$I$6]);IF([.B211]&lt;&gt;&quot;&quot;;CONCATENATE(&quot;#&quot;;[.B211]);&quot;&quot;))">
            <text:p/>
          </table:table-cell>
          <table:table-cell table:number-columns-repeated="16362"/>
        </table:table-row>
        <table:table-row table:style-name="ro1">
          <table:table-cell table:style-name="ce6" table:formula="of:=IF(AND([.B212]&lt;&gt;&quot;&quot;;[.C212]&lt;&gt;&quot;&quot;);CONCATENATE([Variables.$I$1];[Variables.$I$7];[.B212];[Variables.$I$7];[Variables.$I$6];[Variables.$I$7];[.C212];[Variables.$I$7];[Variables.$I$6];[Variables.$I$7];[.D212];[Variables.$I$7];[Variables.$I$6];[.E212];[Variables.$I$6];[.F212];[Variables.$I$6];[.G212];[Variables.$I$6];[.H212];[Variables.$I$6];[Variables.$I$1];[.I212];[.J212];[.K212];[.L212];[.M212];[.N212];[.O212];[Variables.$I$2];[Variables.$I$6];[.P212];[Variables.$I$6];[.Q212];[Variables.$I$6];[.R212];[Variables.$I$6];[.S212];[Variables.$I$6];[.T212];IF([.U212]&lt;&gt;&quot;&quot;;CONCATENATE([Variables.$I$6];[.U212]);&quot;&quot;);[Variables.$I$2];[Variables.$I$6]);IF([.B212]&lt;&gt;&quot;&quot;;CONCATENATE(&quot;#&quot;;[.B212]);&quot;&quot;))" office:value-type="string" office:string-value="##Dunedain #Arnor" calcext:value-type="string">
            <text:p>##Dunedain #Arnor</text:p>
          </table:table-cell>
          <table:table-cell table:style-name="ce5" office:value-type="string" calcext:value-type="string">
            <text:p>#Dunedain #Arnor</text:p>
          </table:table-cell>
          <table:table-cell table:style-name="ce6" table:number-columns-repeated="19"/>
          <table:table-cell table:style-name="ce6" table:formula="of:=IF(AND([.B212]&lt;&gt;&quot;&quot;;[.C212]&lt;&gt;&quot;&quot;);CONCATENATE([Variables.$I$1];[Variables.$I$7];[.B212];[Variables.$I$7];[Variables.$I$6];[Variables.$I$7];[.C212];[Variables.$I$7];[Variables.$I$6];[Variables.$I$7];[.D212];[Variables.$I$7];[Variables.$I$6];[.E212];[Variables.$I$6];[.F212];[Variables.$I$6];[.G212];[Variables.$I$6];[.H212];[Variables.$I$6];[Variables.$I$1];[.I212];[.J212];[.K212];[.L212];[.M212];[.N212];[.O212];[Variables.$I$2];[Variables.$I$6];[.P212];[Variables.$I$6];[.Q212];[Variables.$I$6];[.R212];[Variables.$I$6];[.S212];[Variables.$I$6];[.T212];IF([.U212]&lt;&gt;&quot;&quot;;CONCATENATE([Variables.$I$6];[.U212]);&quot;&quot;);[Variables.$I$2];[Variables.$I$6]);IF([.B212]&lt;&gt;&quot;&quot;;CONCATENATE(&quot;#&quot;;[.B212]);&quot;&quot;))" office:value-type="string" office:string-value="##Dunedain #Arnor" calcext:value-type="string">
            <text:p>##Dunedain #Arnor</text:p>
          </table:table-cell>
          <table:table-cell table:number-columns-repeated="16362"/>
        </table:table-row>
        <table:table-row table:style-name="ro1">
          <table:table-cell table:style-name="ce6" table:formula="of:=IF(AND([.B213]&lt;&gt;&quot;&quot;;[.C213]&lt;&gt;&quot;&quot;);CONCATENATE([Variables.$I$1];[Variables.$I$7];[.B213];[Variables.$I$7];[Variables.$I$6];[Variables.$I$7];[.C213];[Variables.$I$7];[Variables.$I$6];[Variables.$I$7];[.D213];[Variables.$I$7];[Variables.$I$6];[.E213];[Variables.$I$6];[.F213];[Variables.$I$6];[.G213];[Variables.$I$6];[.H213];[Variables.$I$6];[Variables.$I$1];[.I213];[.J213];[.K213];[.L213];[.M213];[.N213];[.O213];[Variables.$I$2];[Variables.$I$6];[.P213];[Variables.$I$6];[.Q213];[Variables.$I$6];[.R213];[Variables.$I$6];[.S213];[Variables.$I$6];[.T213];IF([.U213]&lt;&gt;&quot;&quot;;CONCATENATE([Variables.$I$6];[.U213]);&quot;&quot;);[Variables.$I$2];[Variables.$I$6]);IF([.B213]&lt;&gt;&quot;&quot;;CONCATENATE(&quot;#&quot;;[.B213]);&quot;&quot;))" office:value-type="string" office:string-value="[&quot;a1_arnor_scout&quot;,&quot;Dunedain_Scout&quot;,&quot;Dunedain_Scouts&quot;,tf_dunedain| tfg_armor| tfg_boots,0,0,fac_imladris,[itm_hood_grey_bad,itm_arnor_light_a_cloak,itm_leather_gloves,itm_leather_boots_dark_bad,itm_short_bow,itm_arrows,itm_arnor_sword_f,],attr_tier_2,wp_tier_2,knows_common|knows_ironflesh_2|knows_power_strike_1|knows_power_draw_2|knows_athletics_1|knows_tracking_1|knows_tactics_1|knows_pathfinding_1|knows_spotting_1|knows_wound_treatment_1|knows_persuasion_1|knows_leadership_1,arnor_face_middle_1,arnor_face_middle_2]," calcext:value-type="string">
            <text:p>["a1_arnor_scout","Dunedain_Scout","Dunedain_Scouts",tf_dunedain| tfg_armor| tfg_boots,0,0,fac_imladris,[itm_hood_grey_bad,itm_arnor_light_a_cloak,itm_leather_gloves,itm_leather_boots_dark_bad,itm_short_bow,itm_arrows,itm_arnor_sword_f,],attr_tier_2,wp_tier_2,knows_common|knows_ironflesh_2|knows_power_strike_1|knows_power_draw_2|knows_athletics_1|knows_tracking_1|knows_tactics_1|knows_pathfinding_1|knows_spotting_1|knows_wound_treatment_1|knows_persuasion_1|knows_leadership_1,arnor_face_middle_1,arnor_face_middle_2],</text:p>
          </table:table-cell>
          <table:table-cell table:style-name="ce7" office:value-type="string" calcext:value-type="string">
            <text:p>a1_arnor_scout</text:p>
          </table:table-cell>
          <table:table-cell table:style-name="ce7" office:value-type="string" calcext:value-type="string">
            <text:p>Dunedain_Scout</text:p>
          </table:table-cell>
          <table:table-cell table:style-name="ce7" office:value-type="string" calcext:value-type="string">
            <text:p>Dunedain_Scout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mladris</text:p>
          </table:table-cell>
          <table:table-cell table:style-name="ce19" office:value-type="string" calcext:value-type="string">
            <text:p>itm_hood_grey_bad,</text:p>
          </table:table-cell>
          <table:table-cell table:style-name="ce11" office:value-type="string" calcext:value-type="string">
            <text:p>itm_arnor_light_a_cloak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leather_boots_dark_bad,</text:p>
          </table:table-cell>
          <table:table-cell table:style-name="ce11" office:value-type="string" calcext:value-type="string">
            <text:p>itm_short_bow,itm_arrows,</text:p>
          </table:table-cell>
          <table:table-cell table:style-name="ce11" office:value-type="string" calcext:value-type="string">
            <text:p>itm_arnor_sword_f,</text:p>
          </table:table-cell>
          <table:table-cell table:style-name="ce11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2|knows_power_strike_1|knows_power_draw_2|knows_athletics_1|knows_tracking_1|knows_tactics_1|knows_pathfinding_1|knows_spotting_1|knows_wound_treatment_1|knows_persuasion_1|knows_leadership_1</text:p>
          </table:table-cell>
          <table:table-cell table:style-name="ce14" office:value-type="string" calcext:value-type="string">
            <text:p>arnor_face_middle_1</text:p>
          </table:table-cell>
          <table:table-cell table:style-name="ce14" office:value-type="string" calcext:value-type="string">
            <text:p>arnor_face_middle_2</text:p>
          </table:table-cell>
          <table:table-cell table:style-name="ce15"/>
          <table:table-cell table:style-name="ce6" table:formula="of:=IF(AND([.B213]&lt;&gt;&quot;&quot;;[.C213]&lt;&gt;&quot;&quot;);CONCATENATE([Variables.$I$1];[Variables.$I$7];[.B213];[Variables.$I$7];[Variables.$I$6];[Variables.$I$7];[.C213];[Variables.$I$7];[Variables.$I$6];[Variables.$I$7];[.D213];[Variables.$I$7];[Variables.$I$6];[.E213];[Variables.$I$6];[.F213];[Variables.$I$6];[.G213];[Variables.$I$6];[.H213];[Variables.$I$6];[Variables.$I$1];[.I213];[.J213];[.K213];[.L213];[.M213];[.N213];[.O213];[Variables.$I$2];[Variables.$I$6];[.P213];[Variables.$I$6];[.Q213];[Variables.$I$6];[.R213];[Variables.$I$6];[.S213];[Variables.$I$6];[.T213];IF([.U213]&lt;&gt;&quot;&quot;;CONCATENATE([Variables.$I$6];[.U213]);&quot;&quot;);[Variables.$I$2];[Variables.$I$6]);IF([.B213]&lt;&gt;&quot;&quot;;CONCATENATE(&quot;#&quot;;[.B213]);&quot;&quot;))" office:value-type="string" office:string-value="[&quot;a1_arnor_scout&quot;,&quot;Dunedain_Scout&quot;,&quot;Dunedain_Scouts&quot;,tf_dunedain| tfg_armor| tfg_boots,0,0,fac_imladris,[itm_hood_grey_bad,itm_arnor_light_a_cloak,itm_leather_gloves,itm_leather_boots_dark_bad,itm_short_bow,itm_arrows,itm_arnor_sword_f,],attr_tier_2,wp_tier_2,knows_common|knows_ironflesh_2|knows_power_strike_1|knows_power_draw_2|knows_athletics_1|knows_tracking_1|knows_tactics_1|knows_pathfinding_1|knows_spotting_1|knows_wound_treatment_1|knows_persuasion_1|knows_leadership_1,arnor_face_middle_1,arnor_face_middle_2]," calcext:value-type="string">
            <text:p>["a1_arnor_scout","Dunedain_Scout","Dunedain_Scouts",tf_dunedain| tfg_armor| tfg_boots,0,0,fac_imladris,[itm_hood_grey_bad,itm_arnor_light_a_cloak,itm_leather_gloves,itm_leather_boots_dark_bad,itm_short_bow,itm_arrows,itm_arnor_sword_f,],attr_tier_2,wp_tier_2,knows_common|knows_ironflesh_2|knows_power_strike_1|knows_power_draw_2|knows_athletics_1|knows_tracking_1|knows_tactics_1|knows_pathfinding_1|knows_spotting_1|knows_wound_treatment_1|knows_persuasion_1|knows_leadership_1,arnor_face_middle_1,arnor_face_middle_2],</text:p>
          </table:table-cell>
          <table:table-cell table:number-columns-repeated="16362"/>
        </table:table-row>
        <table:table-row table:style-name="ro1">
          <table:table-cell table:style-name="ce6" table:formula="of:=IF(AND([.B214]&lt;&gt;&quot;&quot;;[.C214]&lt;&gt;&quot;&quot;);CONCATENATE([Variables.$I$1];[Variables.$I$7];[.B214];[Variables.$I$7];[Variables.$I$6];[Variables.$I$7];[.C214];[Variables.$I$7];[Variables.$I$6];[Variables.$I$7];[.D214];[Variables.$I$7];[Variables.$I$6];[.E214];[Variables.$I$6];[.F214];[Variables.$I$6];[.G214];[Variables.$I$6];[.H214];[Variables.$I$6];[Variables.$I$1];[.I214];[.J214];[.K214];[.L214];[.M214];[.N214];[.O214];[Variables.$I$2];[Variables.$I$6];[.P214];[Variables.$I$6];[.Q214];[Variables.$I$6];[.R214];[Variables.$I$6];[.S214];[Variables.$I$6];[.T214];IF([.U214]&lt;&gt;&quot;&quot;;CONCATENATE([Variables.$I$6];[.U214]);&quot;&quot;);[Variables.$I$2];[Variables.$I$6]);IF([.B214]&lt;&gt;&quot;&quot;;CONCATENATE(&quot;#&quot;;[.B214]);&quot;&quot;))" office:value-type="string" office:string-value="[&quot;a2_arnor_vet_scout&quot;,&quot;Dunedain_Tracker&quot;,&quot;Dunedain_Trackers&quot;,tf_dunedain| tfg_armor| tfg_boots,0,0,fac_imladris,[itm_hood_grey,itm_arnor_light_a_good_cloak, itm_arnor_med_a_cloak,itm_leather_gloves,itm_leather_boots,itm_leather_boots_dark_bad,itm_regular_bow,itm_arrows,itm_arnor_sword_f,],attr_tier_3,wp_tier_3,knows_common|knows_ironflesh_2|knows_power_strike_3|knows_power_draw_2|knows_athletics_2|knows_tracking_1|knows_tactics_1|knows_pathfinding_1|knows_spotting_1|knows_wound_treatment_1|knows_persuasion_1|knows_leadership_1,arnor_face_middle_1,arnor_face_middle_2]," calcext:value-type="string">
            <text:p>["a2_arnor_vet_scout","Dunedain_Tracker","Dunedain_Trackers",tf_dunedain| tfg_armor| tfg_boots,0,0,fac_imladris,[itm_hood_grey,itm_arnor_light_a_good_cloak, itm_arnor_med_a_cloak,itm_leather_gloves,itm_leather_boots,itm_leather_boots_dark_bad,itm_regular_bow,itm_arrows,itm_arnor_sword_f,],attr_tier_3,wp_tier_3,knows_common|knows_ironflesh_2|knows_power_strike_3|knows_power_draw_2|knows_athletics_2|knows_tracking_1|knows_tactics_1|knows_pathfinding_1|knows_spotting_1|knows_wound_treatment_1|knows_persuasion_1|knows_leadership_1,arnor_face_middle_1,arnor_face_middle_2],</text:p>
          </table:table-cell>
          <table:table-cell table:style-name="ce7" office:value-type="string" calcext:value-type="string">
            <text:p>a2_arnor_vet_scout</text:p>
          </table:table-cell>
          <table:table-cell table:style-name="ce7" office:value-type="string" calcext:value-type="string">
            <text:p>Dunedain_Tracker</text:p>
          </table:table-cell>
          <table:table-cell table:style-name="ce7" office:value-type="string" calcext:value-type="string">
            <text:p>Dunedain_Tracker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mladris</text:p>
          </table:table-cell>
          <table:table-cell table:style-name="ce19" office:value-type="string" calcext:value-type="string">
            <text:p>itm_hood_grey,</text:p>
          </table:table-cell>
          <table:table-cell table:style-name="ce11" office:value-type="string" calcext:value-type="string">
            <text:p>itm_arnor_light_a_good_cloak, itm_arnor_med_a_cloak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leather_boots,itm_leather_boots_dark_bad,</text:p>
          </table:table-cell>
          <table:table-cell table:style-name="ce11" office:value-type="string" calcext:value-type="string">
            <text:p>itm_regular_bow,itm_arrows,</text:p>
          </table:table-cell>
          <table:table-cell table:style-name="ce11" office:value-type="string" calcext:value-type="string">
            <text:p>itm_arnor_sword_f,</text:p>
          </table:table-cell>
          <table:table-cell table:style-name="ce11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3" office:value-type="string" calcext:value-type="string">
            <text:p>knows_common|knows_ironflesh_2|knows_power_strike_3|knows_power_draw_2|knows_athletics_2|knows_tracking_1|knows_tactics_1|knows_pathfinding_1|knows_spotting_1|knows_wound_treatment_1|knows_persuasion_1|knows_leadership_1</text:p>
          </table:table-cell>
          <table:table-cell table:style-name="ce14" office:value-type="string" calcext:value-type="string">
            <text:p>arnor_face_middle_1</text:p>
          </table:table-cell>
          <table:table-cell table:style-name="ce14" office:value-type="string" calcext:value-type="string">
            <text:p>arnor_face_middle_2</text:p>
          </table:table-cell>
          <table:table-cell table:style-name="ce15"/>
          <table:table-cell table:style-name="ce6" table:formula="of:=IF(AND([.B214]&lt;&gt;&quot;&quot;;[.C214]&lt;&gt;&quot;&quot;);CONCATENATE([Variables.$I$1];[Variables.$I$7];[.B214];[Variables.$I$7];[Variables.$I$6];[Variables.$I$7];[.C214];[Variables.$I$7];[Variables.$I$6];[Variables.$I$7];[.D214];[Variables.$I$7];[Variables.$I$6];[.E214];[Variables.$I$6];[.F214];[Variables.$I$6];[.G214];[Variables.$I$6];[.H214];[Variables.$I$6];[Variables.$I$1];[.I214];[.J214];[.K214];[.L214];[.M214];[.N214];[.O214];[Variables.$I$2];[Variables.$I$6];[.P214];[Variables.$I$6];[.Q214];[Variables.$I$6];[.R214];[Variables.$I$6];[.S214];[Variables.$I$6];[.T214];IF([.U214]&lt;&gt;&quot;&quot;;CONCATENATE([Variables.$I$6];[.U214]);&quot;&quot;);[Variables.$I$2];[Variables.$I$6]);IF([.B214]&lt;&gt;&quot;&quot;;CONCATENATE(&quot;#&quot;;[.B214]);&quot;&quot;))" office:value-type="string" office:string-value="[&quot;a2_arnor_vet_scout&quot;,&quot;Dunedain_Tracker&quot;,&quot;Dunedain_Trackers&quot;,tf_dunedain| tfg_armor| tfg_boots,0,0,fac_imladris,[itm_hood_grey,itm_arnor_light_a_good_cloak, itm_arnor_med_a_cloak,itm_leather_gloves,itm_leather_boots,itm_leather_boots_dark_bad,itm_regular_bow,itm_arrows,itm_arnor_sword_f,],attr_tier_3,wp_tier_3,knows_common|knows_ironflesh_2|knows_power_strike_3|knows_power_draw_2|knows_athletics_2|knows_tracking_1|knows_tactics_1|knows_pathfinding_1|knows_spotting_1|knows_wound_treatment_1|knows_persuasion_1|knows_leadership_1,arnor_face_middle_1,arnor_face_middle_2]," calcext:value-type="string">
            <text:p>["a2_arnor_vet_scout","Dunedain_Tracker","Dunedain_Trackers",tf_dunedain| tfg_armor| tfg_boots,0,0,fac_imladris,[itm_hood_grey,itm_arnor_light_a_good_cloak, itm_arnor_med_a_cloak,itm_leather_gloves,itm_leather_boots,itm_leather_boots_dark_bad,itm_regular_bow,itm_arrows,itm_arnor_sword_f,],attr_tier_3,wp_tier_3,knows_common|knows_ironflesh_2|knows_power_strike_3|knows_power_draw_2|knows_athletics_2|knows_tracking_1|knows_tactics_1|knows_pathfinding_1|knows_spotting_1|knows_wound_treatment_1|knows_persuasion_1|knows_leadership_1,arnor_face_middle_1,arnor_face_middle_2],</text:p>
          </table:table-cell>
          <table:table-cell table:number-columns-repeated="16362"/>
        </table:table-row>
        <table:table-row table:style-name="ro1">
          <table:table-cell table:style-name="ce6" table:formula="of:=IF(AND([.B215]&lt;&gt;&quot;&quot;;[.C215]&lt;&gt;&quot;&quot;);CONCATENATE([Variables.$I$1];[Variables.$I$7];[.B215];[Variables.$I$7];[Variables.$I$6];[Variables.$I$7];[.C215];[Variables.$I$7];[Variables.$I$6];[Variables.$I$7];[.D215];[Variables.$I$7];[Variables.$I$6];[.E215];[Variables.$I$6];[.F215];[Variables.$I$6];[.G215];[Variables.$I$6];[.H215];[Variables.$I$6];[Variables.$I$1];[.I215];[.J215];[.K215];[.L215];[.M215];[.N215];[.O215];[Variables.$I$2];[Variables.$I$6];[.P215];[Variables.$I$6];[.Q215];[Variables.$I$6];[.R215];[Variables.$I$6];[.S215];[Variables.$I$6];[.T215];IF([.U215]&lt;&gt;&quot;&quot;;CONCATENATE([Variables.$I$6];[.U215]);&quot;&quot;);[Variables.$I$2];[Variables.$I$6]);IF([.B215]&lt;&gt;&quot;&quot;;CONCATENATE(&quot;#&quot;;[.B215]);&quot;&quot;))" office:value-type="string" office:string-value="[&quot;i3_arnor_swordsman&quot;,&quot;Dunedain_Swordsman&quot;,&quot;Dunedain_Swordsmen&quot;,tf_dunedain| tfg_armor| tfg_helm| tfg_boots,0,0,fac_imladris,[itm_arnor_helm_a, itm_arnor_helm_b_bad,itm_mail_coif,itm_arnor_light_b_good,itm_arnor_med_a_good, itm_arnor_med_b_bad,itm_leather_gloves,itm_leather_boots, itm_leather_boots_dark,itm_arnor_sword_f,itm_arnor_sword_a,itm_arnor_shield_a,],attr_tier_4,wp_tier_4,knows_common|knows_athletics_4|knows_shield_3|knows_power_strike_3|knows_ironflesh_4,arnor_face_middle_1,arnor_face_middle_2]," calcext:value-type="string">
            <text:p>["i3_arnor_swordsman","Dunedain_Swordsman","Dunedain_Swordsmen",tf_dunedain| tfg_armor| tfg_helm| tfg_boots,0,0,fac_imladris,[itm_arnor_helm_a, itm_arnor_helm_b_bad,itm_mail_coif,itm_arnor_light_b_good,itm_arnor_med_a_good, itm_arnor_med_b_bad,itm_leather_gloves,itm_leather_boots, itm_leather_boots_dark,itm_arnor_sword_f,itm_arnor_sword_a,itm_arnor_shield_a,],attr_tier_4,wp_tier_4,knows_common|knows_athletics_4|knows_shield_3|knows_power_strike_3|knows_ironflesh_4,arnor_face_middle_1,arnor_face_middle_2],</text:p>
          </table:table-cell>
          <table:table-cell table:style-name="ce7" office:value-type="string" calcext:value-type="string">
            <text:p>i3_arnor_swordsman</text:p>
          </table:table-cell>
          <table:table-cell table:style-name="ce7" office:value-type="string" calcext:value-type="string">
            <text:p>Dunedain_Swordsman</text:p>
          </table:table-cell>
          <table:table-cell table:style-name="ce7" office:value-type="string" calcext:value-type="string">
            <text:p>Dunedain_Swordsmen</text:p>
          </table:table-cell>
          <table:table-cell table:style-name="ce8" office:value-type="string" calcext:value-type="string">
            <text:p>tf_dunedai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mladris</text:p>
          </table:table-cell>
          <table:table-cell table:style-name="ce11" office:value-type="string" calcext:value-type="string">
            <text:p>itm_arnor_helm_a, itm_arnor_helm_b_bad,itm_mail_coif,</text:p>
          </table:table-cell>
          <table:table-cell table:style-name="ce11" office:value-type="string" calcext:value-type="string">
            <text:p>itm_arnor_light_b_good,itm_arnor_med_a_good, itm_arnor_med_b_bad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leather_boots, itm_leather_boots_dark,</text:p>
          </table:table-cell>
          <table:table-cell table:style-name="ce11" office:value-type="string" calcext:value-type="string">
            <text:p>itm_arnor_sword_f,itm_arnor_sword_a,</text:p>
          </table:table-cell>
          <table:table-cell table:style-name="ce11" office:value-type="string" calcext:value-type="string">
            <text:p>itm_arnor_shield_a,</text:p>
          </table:table-cell>
          <table:table-cell table:style-name="ce11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4|knows_shield_3|knows_power_strike_3|knows_ironflesh_4</text:p>
          </table:table-cell>
          <table:table-cell table:style-name="ce14" office:value-type="string" calcext:value-type="string">
            <text:p>arnor_face_middle_1</text:p>
          </table:table-cell>
          <table:table-cell table:style-name="ce14" office:value-type="string" calcext:value-type="string">
            <text:p>arnor_face_middle_2</text:p>
          </table:table-cell>
          <table:table-cell table:style-name="ce15"/>
          <table:table-cell table:style-name="ce6" table:formula="of:=IF(AND([.B215]&lt;&gt;&quot;&quot;;[.C215]&lt;&gt;&quot;&quot;);CONCATENATE([Variables.$I$1];[Variables.$I$7];[.B215];[Variables.$I$7];[Variables.$I$6];[Variables.$I$7];[.C215];[Variables.$I$7];[Variables.$I$6];[Variables.$I$7];[.D215];[Variables.$I$7];[Variables.$I$6];[.E215];[Variables.$I$6];[.F215];[Variables.$I$6];[.G215];[Variables.$I$6];[.H215];[Variables.$I$6];[Variables.$I$1];[.I215];[.J215];[.K215];[.L215];[.M215];[.N215];[.O215];[Variables.$I$2];[Variables.$I$6];[.P215];[Variables.$I$6];[.Q215];[Variables.$I$6];[.R215];[Variables.$I$6];[.S215];[Variables.$I$6];[.T215];IF([.U215]&lt;&gt;&quot;&quot;;CONCATENATE([Variables.$I$6];[.U215]);&quot;&quot;);[Variables.$I$2];[Variables.$I$6]);IF([.B215]&lt;&gt;&quot;&quot;;CONCATENATE(&quot;#&quot;;[.B215]);&quot;&quot;))" office:value-type="string" office:string-value="[&quot;i3_arnor_swordsman&quot;,&quot;Dunedain_Swordsman&quot;,&quot;Dunedain_Swordsmen&quot;,tf_dunedain| tfg_armor| tfg_helm| tfg_boots,0,0,fac_imladris,[itm_arnor_helm_a, itm_arnor_helm_b_bad,itm_mail_coif,itm_arnor_light_b_good,itm_arnor_med_a_good, itm_arnor_med_b_bad,itm_leather_gloves,itm_leather_boots, itm_leather_boots_dark,itm_arnor_sword_f,itm_arnor_sword_a,itm_arnor_shield_a,],attr_tier_4,wp_tier_4,knows_common|knows_athletics_4|knows_shield_3|knows_power_strike_3|knows_ironflesh_4,arnor_face_middle_1,arnor_face_middle_2]," calcext:value-type="string">
            <text:p>["i3_arnor_swordsman","Dunedain_Swordsman","Dunedain_Swordsmen",tf_dunedain| tfg_armor| tfg_helm| tfg_boots,0,0,fac_imladris,[itm_arnor_helm_a, itm_arnor_helm_b_bad,itm_mail_coif,itm_arnor_light_b_good,itm_arnor_med_a_good, itm_arnor_med_b_bad,itm_leather_gloves,itm_leather_boots, itm_leather_boots_dark,itm_arnor_sword_f,itm_arnor_sword_a,itm_arnor_shield_a,],attr_tier_4,wp_tier_4,knows_common|knows_athletics_4|knows_shield_3|knows_power_strike_3|knows_ironflesh_4,arnor_face_middle_1,arnor_face_middle_2],</text:p>
          </table:table-cell>
          <table:table-cell table:number-columns-repeated="16362"/>
        </table:table-row>
        <table:table-row table:style-name="ro1">
          <table:table-cell table:style-name="ce6" table:formula="of:=IF(AND([.B216]&lt;&gt;&quot;&quot;;[.C216]&lt;&gt;&quot;&quot;);CONCATENATE([Variables.$I$1];[Variables.$I$7];[.B216];[Variables.$I$7];[Variables.$I$6];[Variables.$I$7];[.C216];[Variables.$I$7];[Variables.$I$6];[Variables.$I$7];[.D216];[Variables.$I$7];[Variables.$I$6];[.E216];[Variables.$I$6];[.F216];[Variables.$I$6];[.G216];[Variables.$I$6];[.H216];[Variables.$I$6];[Variables.$I$1];[.I216];[.J216];[.K216];[.L216];[.M216];[.N216];[.O216];[Variables.$I$2];[Variables.$I$6];[.P216];[Variables.$I$6];[.Q216];[Variables.$I$6];[.R216];[Variables.$I$6];[.S216];[Variables.$I$6];[.T216];IF([.U216]&lt;&gt;&quot;&quot;;CONCATENATE([Variables.$I$6];[.U216]);&quot;&quot;);[Variables.$I$2];[Variables.$I$6]);IF([.B216]&lt;&gt;&quot;&quot;;CONCATENATE(&quot;#&quot;;[.B216]);&quot;&quot;))" office:value-type="string" office:string-value="[&quot;i4_arnor_vet_swordsman&quot;,&quot;Dunedain_Veteran_Swordsman&quot;,&quot;Dunedain_Veteran_Swordsmen&quot;,tf_dunedain| tfg_gloves| tfg_armor| tfg_helm| tfg_boots,0,0,fac_imladris,[itm_arnor_helm_a_good, itm_arnor_helm_b,itm_mail_coif_good,itm_arnor_med_b_good, itm_arnor_heavy_bad,itm_leather_gloves,itm_leather_boots, itm_leather_boots_dark,itm_arnor_sword_a,itm_arnor_shield_a,],attr_tier_5,wp_elf_tier_3,knows_common|knows_athletics_5|knows_shield_4|knows_power_strike_4|knows_ironflesh_5,arnor_face_middle_1,arnor_face_middle_2]," calcext:value-type="string">
            <text:p>["i4_arnor_vet_swordsman","Dunedain_Veteran_Swordsman","Dunedain_Veteran_Swordsmen",tf_dunedain| tfg_gloves| tfg_armor| tfg_helm| tfg_boots,0,0,fac_imladris,[itm_arnor_helm_a_good, itm_arnor_helm_b,itm_mail_coif_good,itm_arnor_med_b_good, itm_arnor_heavy_bad,itm_leather_gloves,itm_leather_boots, itm_leather_boots_dark,itm_arnor_sword_a,itm_arnor_shield_a,],attr_tier_5,wp_elf_tier_3,knows_common|knows_athletics_5|knows_shield_4|knows_power_strike_4|knows_ironflesh_5,arnor_face_middle_1,arnor_face_middle_2],</text:p>
          </table:table-cell>
          <table:table-cell table:style-name="ce7" office:value-type="string" calcext:value-type="string">
            <text:p>i4_arnor_vet_swordsman</text:p>
          </table:table-cell>
          <table:table-cell table:style-name="ce7" office:value-type="string" calcext:value-type="string">
            <text:p>Dunedain_Veteran_Swordsman</text:p>
          </table:table-cell>
          <table:table-cell table:style-name="ce7" office:value-type="string" calcext:value-type="string">
            <text:p>Dunedain_Veteran_Swordsmen</text:p>
          </table:table-cell>
          <table:table-cell table:style-name="ce8" office:value-type="string" calcext:value-type="string">
            <text:p>tf_dunedain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mladris</text:p>
          </table:table-cell>
          <table:table-cell table:style-name="ce11" office:value-type="string" calcext:value-type="string">
            <text:p>itm_arnor_helm_a_good, itm_arnor_helm_b,itm_mail_coif_good,</text:p>
          </table:table-cell>
          <table:table-cell table:style-name="ce11" office:value-type="string" calcext:value-type="string">
            <text:p>itm_arnor_med_b_good, itm_arnor_heavy_bad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leather_boots, itm_leather_boots_dark,</text:p>
          </table:table-cell>
          <table:table-cell table:style-name="ce11" office:value-type="string" calcext:value-type="string">
            <text:p>itm_arnor_sword_a,</text:p>
          </table:table-cell>
          <table:table-cell table:style-name="ce11" office:value-type="string" calcext:value-type="string">
            <text:p>itm_arnor_shield_a,</text:p>
          </table:table-cell>
          <table:table-cell table:style-name="ce11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elf_tier_3</text:p>
          </table:table-cell>
          <table:table-cell table:style-name="ce12" office:value-type="string" calcext:value-type="string">
            <text:p>knows_common|knows_athletics_5|knows_shield_4|knows_power_strike_4|knows_ironflesh_5</text:p>
          </table:table-cell>
          <table:table-cell table:style-name="ce14" office:value-type="string" calcext:value-type="string">
            <text:p>arnor_face_middle_1</text:p>
          </table:table-cell>
          <table:table-cell table:style-name="ce14" office:value-type="string" calcext:value-type="string">
            <text:p>arnor_face_middle_2</text:p>
          </table:table-cell>
          <table:table-cell table:style-name="ce15"/>
          <table:table-cell table:style-name="ce6" table:formula="of:=IF(AND([.B216]&lt;&gt;&quot;&quot;;[.C216]&lt;&gt;&quot;&quot;);CONCATENATE([Variables.$I$1];[Variables.$I$7];[.B216];[Variables.$I$7];[Variables.$I$6];[Variables.$I$7];[.C216];[Variables.$I$7];[Variables.$I$6];[Variables.$I$7];[.D216];[Variables.$I$7];[Variables.$I$6];[.E216];[Variables.$I$6];[.F216];[Variables.$I$6];[.G216];[Variables.$I$6];[.H216];[Variables.$I$6];[Variables.$I$1];[.I216];[.J216];[.K216];[.L216];[.M216];[.N216];[.O216];[Variables.$I$2];[Variables.$I$6];[.P216];[Variables.$I$6];[.Q216];[Variables.$I$6];[.R216];[Variables.$I$6];[.S216];[Variables.$I$6];[.T216];IF([.U216]&lt;&gt;&quot;&quot;;CONCATENATE([Variables.$I$6];[.U216]);&quot;&quot;);[Variables.$I$2];[Variables.$I$6]);IF([.B216]&lt;&gt;&quot;&quot;;CONCATENATE(&quot;#&quot;;[.B216]);&quot;&quot;))" office:value-type="string" office:string-value="[&quot;i4_arnor_vet_swordsman&quot;,&quot;Dunedain_Veteran_Swordsman&quot;,&quot;Dunedain_Veteran_Swordsmen&quot;,tf_dunedain| tfg_gloves| tfg_armor| tfg_helm| tfg_boots,0,0,fac_imladris,[itm_arnor_helm_a_good, itm_arnor_helm_b,itm_mail_coif_good,itm_arnor_med_b_good, itm_arnor_heavy_bad,itm_leather_gloves,itm_leather_boots, itm_leather_boots_dark,itm_arnor_sword_a,itm_arnor_shield_a,],attr_tier_5,wp_elf_tier_3,knows_common|knows_athletics_5|knows_shield_4|knows_power_strike_4|knows_ironflesh_5,arnor_face_middle_1,arnor_face_middle_2]," calcext:value-type="string">
            <text:p>["i4_arnor_vet_swordsman","Dunedain_Veteran_Swordsman","Dunedain_Veteran_Swordsmen",tf_dunedain| tfg_gloves| tfg_armor| tfg_helm| tfg_boots,0,0,fac_imladris,[itm_arnor_helm_a_good, itm_arnor_helm_b,itm_mail_coif_good,itm_arnor_med_b_good, itm_arnor_heavy_bad,itm_leather_gloves,itm_leather_boots, itm_leather_boots_dark,itm_arnor_sword_a,itm_arnor_shield_a,],attr_tier_5,wp_elf_tier_3,knows_common|knows_athletics_5|knows_shield_4|knows_power_strike_4|knows_ironflesh_5,arnor_face_middle_1,arnor_face_middle_2],</text:p>
          </table:table-cell>
          <table:table-cell table:number-columns-repeated="16362"/>
        </table:table-row>
        <table:table-row table:style-name="ro1">
          <table:table-cell table:style-name="ce6" table:formula="of:=IF(AND([.B217]&lt;&gt;&quot;&quot;;[.C217]&lt;&gt;&quot;&quot;);CONCATENATE([Variables.$I$1];[Variables.$I$7];[.B217];[Variables.$I$7];[Variables.$I$6];[Variables.$I$7];[.C217];[Variables.$I$7];[Variables.$I$6];[Variables.$I$7];[.D217];[Variables.$I$7];[Variables.$I$6];[.E217];[Variables.$I$6];[.F217];[Variables.$I$6];[.G217];[Variables.$I$6];[.H217];[Variables.$I$6];[Variables.$I$1];[.I217];[.J217];[.K217];[.L217];[.M217];[.N217];[.O217];[Variables.$I$2];[Variables.$I$6];[.P217];[Variables.$I$6];[.Q217];[Variables.$I$6];[.R217];[Variables.$I$6];[.S217];[Variables.$I$6];[.T217];IF([.U217]&lt;&gt;&quot;&quot;;CONCATENATE([Variables.$I$6];[.U217]);&quot;&quot;);[Variables.$I$2];[Variables.$I$6]);IF([.B217]&lt;&gt;&quot;&quot;;CONCATENATE(&quot;#&quot;;[.B217]);&quot;&quot;))" office:value-type="string" office:string-value="[&quot;i5_arnor_champion&quot;,&quot;Champion_of_Arnor&quot;,&quot;Champions_of_Arnor&quot;,tf_dunedain| tfg_gloves| tfg_shield| tfg_armor| tfg_helm| tfg_boots,0,0,fac_imladris,[itm_arnor_helm_c,itm_arnor_heavy_cloak,itm_mail_mittens,itm_arnor_greaves,itm_arnor_sword_c,itm_arnor_sword_a,itm_arnor_shield_a,itm_arnor_shield_c,],attr_tier_6,wp_elf_tier_4,knows_common|knows_athletics_5|knows_shield_5|knows_power_strike_6|knows_ironflesh_7,arnor_face_older_1,arnor_face_older_2]," calcext:value-type="string">
            <text:p>["i5_arnor_champion","Champion_of_Arnor","Champions_of_Arnor",tf_dunedain| tfg_gloves| tfg_shield| tfg_armor| tfg_helm| tfg_boots,0,0,fac_imladris,[itm_arnor_helm_c,itm_arnor_heavy_cloak,itm_mail_mittens,itm_arnor_greaves,itm_arnor_sword_c,itm_arnor_sword_a,itm_arnor_shield_a,itm_arnor_shield_c,],attr_tier_6,wp_elf_tier_4,knows_common|knows_athletics_5|knows_shield_5|knows_power_strike_6|knows_ironflesh_7,arnor_face_older_1,arnor_face_older_2],</text:p>
          </table:table-cell>
          <table:table-cell table:style-name="ce7" office:value-type="string" calcext:value-type="string">
            <text:p>i5_arnor_champion</text:p>
          </table:table-cell>
          <table:table-cell table:style-name="ce7" office:value-type="string" calcext:value-type="string">
            <text:p>Champion_of_Arnor</text:p>
          </table:table-cell>
          <table:table-cell table:style-name="ce7" office:value-type="string" calcext:value-type="string">
            <text:p>Champions_of_Arnor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mladris</text:p>
          </table:table-cell>
          <table:table-cell table:style-name="ce11" office:value-type="string" calcext:value-type="string">
            <text:p>itm_arnor_helm_c,</text:p>
          </table:table-cell>
          <table:table-cell table:style-name="ce11" office:value-type="string" calcext:value-type="string">
            <text:p>itm_arnor_heavy_cloak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arnor_greaves,</text:p>
          </table:table-cell>
          <table:table-cell table:style-name="ce11" office:value-type="string" calcext:value-type="string">
            <text:p>itm_arnor_sword_c,itm_arnor_sword_a,</text:p>
          </table:table-cell>
          <table:table-cell table:style-name="ce11" office:value-type="string" calcext:value-type="string">
            <text:p>itm_arnor_shield_a,itm_arnor_shield_c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elf_tier_4</text:p>
          </table:table-cell>
          <table:table-cell table:style-name="ce29" office:value-type="string" calcext:value-type="string">
            <text:p>knows_common|knows_athletics_5|knows_shield_5|knows_power_strike_6|knows_ironflesh_7</text:p>
          </table:table-cell>
          <table:table-cell table:style-name="ce14" office:value-type="string" calcext:value-type="string">
            <text:p>arnor_face_older_1</text:p>
          </table:table-cell>
          <table:table-cell table:style-name="ce14" office:value-type="string" calcext:value-type="string">
            <text:p>arnor_face_older_2</text:p>
          </table:table-cell>
          <table:table-cell table:style-name="ce15"/>
          <table:table-cell table:style-name="ce6" table:formula="of:=IF(AND([.B217]&lt;&gt;&quot;&quot;;[.C217]&lt;&gt;&quot;&quot;);CONCATENATE([Variables.$I$1];[Variables.$I$7];[.B217];[Variables.$I$7];[Variables.$I$6];[Variables.$I$7];[.C217];[Variables.$I$7];[Variables.$I$6];[Variables.$I$7];[.D217];[Variables.$I$7];[Variables.$I$6];[.E217];[Variables.$I$6];[.F217];[Variables.$I$6];[.G217];[Variables.$I$6];[.H217];[Variables.$I$6];[Variables.$I$1];[.I217];[.J217];[.K217];[.L217];[.M217];[.N217];[.O217];[Variables.$I$2];[Variables.$I$6];[.P217];[Variables.$I$6];[.Q217];[Variables.$I$6];[.R217];[Variables.$I$6];[.S217];[Variables.$I$6];[.T217];IF([.U217]&lt;&gt;&quot;&quot;;CONCATENATE([Variables.$I$6];[.U217]);&quot;&quot;);[Variables.$I$2];[Variables.$I$6]);IF([.B217]&lt;&gt;&quot;&quot;;CONCATENATE(&quot;#&quot;;[.B217]);&quot;&quot;))" office:value-type="string" office:string-value="[&quot;i5_arnor_champion&quot;,&quot;Champion_of_Arnor&quot;,&quot;Champions_of_Arnor&quot;,tf_dunedain| tfg_gloves| tfg_shield| tfg_armor| tfg_helm| tfg_boots,0,0,fac_imladris,[itm_arnor_helm_c,itm_arnor_heavy_cloak,itm_mail_mittens,itm_arnor_greaves,itm_arnor_sword_c,itm_arnor_sword_a,itm_arnor_shield_a,itm_arnor_shield_c,],attr_tier_6,wp_elf_tier_4,knows_common|knows_athletics_5|knows_shield_5|knows_power_strike_6|knows_ironflesh_7,arnor_face_older_1,arnor_face_older_2]," calcext:value-type="string">
            <text:p>["i5_arnor_champion","Champion_of_Arnor","Champions_of_Arnor",tf_dunedain| tfg_gloves| tfg_shield| tfg_armor| tfg_helm| tfg_boots,0,0,fac_imladris,[itm_arnor_helm_c,itm_arnor_heavy_cloak,itm_mail_mittens,itm_arnor_greaves,itm_arnor_sword_c,itm_arnor_sword_a,itm_arnor_shield_a,itm_arnor_shield_c,],attr_tier_6,wp_elf_tier_4,knows_common|knows_athletics_5|knows_shield_5|knows_power_strike_6|knows_ironflesh_7,arnor_face_older_1,arnor_face_older_2],</text:p>
          </table:table-cell>
          <table:table-cell table:number-columns-repeated="16362"/>
        </table:table-row>
        <table:table-row table:style-name="ro1">
          <table:table-cell table:style-name="ce6" table:formula="of:=IF(AND([.B218]&lt;&gt;&quot;&quot;;[.C218]&lt;&gt;&quot;&quot;);CONCATENATE([Variables.$I$1];[Variables.$I$7];[.B218];[Variables.$I$7];[Variables.$I$6];[Variables.$I$7];[.C218];[Variables.$I$7];[Variables.$I$6];[Variables.$I$7];[.D218];[Variables.$I$7];[Variables.$I$6];[.E218];[Variables.$I$6];[.F218];[Variables.$I$6];[.G218];[Variables.$I$6];[.H218];[Variables.$I$6];[Variables.$I$1];[.I218];[.J218];[.K218];[.L218];[.M218];[.N218];[.O218];[Variables.$I$2];[Variables.$I$6];[.P218];[Variables.$I$6];[.Q218];[Variables.$I$6];[.R218];[Variables.$I$6];[.S218];[Variables.$I$6];[.T218];IF([.U218]&lt;&gt;&quot;&quot;;CONCATENATE([Variables.$I$6];[.U218]);&quot;&quot;);[Variables.$I$2];[Variables.$I$6]);IF([.B218]&lt;&gt;&quot;&quot;;CONCATENATE(&quot;#&quot;;[.B218]);&quot;&quot;))" office:value-type="string" office:string-value="[&quot;c4_arnor_horseman&quot;,&quot;Dunedain_Horseman&quot;,&quot;Dunedain_Horsemen&quot;,tf_dunedain| tf_mounted| tfg_armor| tfg_helm| tfg_horse| tfg_boots,0,0,fac_imladris,[itm_arnor_helm_b_good,itm_mail_coif_good,itm_arnor_heavy, itm_arnor_med_b_good,itm_mail_mittens,itm_arnor_greaves,itm_arnor_sword_a,itm_arnor_shield_c,itm_dunedain_warhorse,],attr_tier_5,wp_elf_tier_3,knows_common|knows_riding_4|knows_shield_2|knows_athletics_4|knows_power_strike_6|knows_ironflesh_4,arnor_face_older_1,arnor_face_older_2]," calcext:value-type="string">
            <text:p>["c4_arnor_horseman","Dunedain_Horseman","Dunedain_Horsemen",tf_dunedain| tf_mounted| tfg_armor| tfg_helm| tfg_horse| tfg_boots,0,0,fac_imladris,[itm_arnor_helm_b_good,itm_mail_coif_good,itm_arnor_heavy, itm_arnor_med_b_good,itm_mail_mittens,itm_arnor_greaves,itm_arnor_sword_a,itm_arnor_shield_c,itm_dunedain_warhorse,],attr_tier_5,wp_elf_tier_3,knows_common|knows_riding_4|knows_shield_2|knows_athletics_4|knows_power_strike_6|knows_ironflesh_4,arnor_face_older_1,arnor_face_older_2],</text:p>
          </table:table-cell>
          <table:table-cell table:style-name="ce7" office:value-type="string" calcext:value-type="string">
            <text:p>c4_arnor_horseman</text:p>
          </table:table-cell>
          <table:table-cell table:style-name="ce7" office:value-type="string" calcext:value-type="string">
            <text:p>Dunedain_Horseman</text:p>
          </table:table-cell>
          <table:table-cell table:style-name="ce7" office:value-type="string" calcext:value-type="string">
            <text:p>Dunedain_Horsemen</text:p>
          </table:table-cell>
          <table:table-cell table:style-name="ce8" office:value-type="string" calcext:value-type="string">
            <text:p>tf_dunedain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mladris</text:p>
          </table:table-cell>
          <table:table-cell table:style-name="ce11" office:value-type="string" calcext:value-type="string">
            <text:p>itm_arnor_helm_b_good,itm_mail_coif_good,</text:p>
          </table:table-cell>
          <table:table-cell table:style-name="ce11" office:value-type="string" calcext:value-type="string">
            <text:p>itm_arnor_heavy, itm_arnor_med_b_good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arnor_greaves,</text:p>
          </table:table-cell>
          <table:table-cell table:style-name="ce11" office:value-type="string" calcext:value-type="string">
            <text:p>itm_arnor_sword_a,</text:p>
          </table:table-cell>
          <table:table-cell table:style-name="ce11" office:value-type="string" calcext:value-type="string">
            <text:p>itm_arnor_shield_c,</text:p>
          </table:table-cell>
          <table:table-cell table:style-name="ce11" office:value-type="string" calcext:value-type="string">
            <text:p>itm_dunedain_warhorse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elf_tier_3</text:p>
          </table:table-cell>
          <table:table-cell table:style-name="ce12" office:value-type="string" calcext:value-type="string">
            <text:p>knows_common|knows_riding_4|knows_shield_2|knows_athletics_4|knows_power_strike_6|knows_ironflesh_4</text:p>
          </table:table-cell>
          <table:table-cell table:style-name="ce14" office:value-type="string" calcext:value-type="string">
            <text:p>arnor_face_older_1</text:p>
          </table:table-cell>
          <table:table-cell table:style-name="ce14" office:value-type="string" calcext:value-type="string">
            <text:p>arnor_face_older_2</text:p>
          </table:table-cell>
          <table:table-cell table:style-name="ce15"/>
          <table:table-cell table:style-name="ce6" table:formula="of:=IF(AND([.B218]&lt;&gt;&quot;&quot;;[.C218]&lt;&gt;&quot;&quot;);CONCATENATE([Variables.$I$1];[Variables.$I$7];[.B218];[Variables.$I$7];[Variables.$I$6];[Variables.$I$7];[.C218];[Variables.$I$7];[Variables.$I$6];[Variables.$I$7];[.D218];[Variables.$I$7];[Variables.$I$6];[.E218];[Variables.$I$6];[.F218];[Variables.$I$6];[.G218];[Variables.$I$6];[.H218];[Variables.$I$6];[Variables.$I$1];[.I218];[.J218];[.K218];[.L218];[.M218];[.N218];[.O218];[Variables.$I$2];[Variables.$I$6];[.P218];[Variables.$I$6];[.Q218];[Variables.$I$6];[.R218];[Variables.$I$6];[.S218];[Variables.$I$6];[.T218];IF([.U218]&lt;&gt;&quot;&quot;;CONCATENATE([Variables.$I$6];[.U218]);&quot;&quot;);[Variables.$I$2];[Variables.$I$6]);IF([.B218]&lt;&gt;&quot;&quot;;CONCATENATE(&quot;#&quot;;[.B218]);&quot;&quot;))" office:value-type="string" office:string-value="[&quot;c4_arnor_horseman&quot;,&quot;Dunedain_Horseman&quot;,&quot;Dunedain_Horsemen&quot;,tf_dunedain| tf_mounted| tfg_armor| tfg_helm| tfg_horse| tfg_boots,0,0,fac_imladris,[itm_arnor_helm_b_good,itm_mail_coif_good,itm_arnor_heavy, itm_arnor_med_b_good,itm_mail_mittens,itm_arnor_greaves,itm_arnor_sword_a,itm_arnor_shield_c,itm_dunedain_warhorse,],attr_tier_5,wp_elf_tier_3,knows_common|knows_riding_4|knows_shield_2|knows_athletics_4|knows_power_strike_6|knows_ironflesh_4,arnor_face_older_1,arnor_face_older_2]," calcext:value-type="string">
            <text:p>["c4_arnor_horseman","Dunedain_Horseman","Dunedain_Horsemen",tf_dunedain| tf_mounted| tfg_armor| tfg_helm| tfg_horse| tfg_boots,0,0,fac_imladris,[itm_arnor_helm_b_good,itm_mail_coif_good,itm_arnor_heavy, itm_arnor_med_b_good,itm_mail_mittens,itm_arnor_greaves,itm_arnor_sword_a,itm_arnor_shield_c,itm_dunedain_warhorse,],attr_tier_5,wp_elf_tier_3,knows_common|knows_riding_4|knows_shield_2|knows_athletics_4|knows_power_strike_6|knows_ironflesh_4,arnor_face_older_1,arnor_face_older_2],</text:p>
          </table:table-cell>
          <table:table-cell table:number-columns-repeated="16362"/>
        </table:table-row>
        <table:table-row table:style-name="ro1">
          <table:table-cell table:style-name="ce6" table:formula="of:=IF(AND([.B219]&lt;&gt;&quot;&quot;;[.C219]&lt;&gt;&quot;&quot;);CONCATENATE([Variables.$I$1];[Variables.$I$7];[.B219];[Variables.$I$7];[Variables.$I$6];[Variables.$I$7];[.C219];[Variables.$I$7];[Variables.$I$6];[Variables.$I$7];[.D219];[Variables.$I$7];[Variables.$I$6];[.E219];[Variables.$I$6];[.F219];[Variables.$I$6];[.G219];[Variables.$I$6];[.H219];[Variables.$I$6];[Variables.$I$1];[.I219];[.J219];[.K219];[.L219];[.M219];[.N219];[.O219];[Variables.$I$2];[Variables.$I$6];[.P219];[Variables.$I$6];[.Q219];[Variables.$I$6];[.R219];[Variables.$I$6];[.S219];[Variables.$I$6];[.T219];IF([.U219]&lt;&gt;&quot;&quot;;CONCATENATE([Variables.$I$6];[.U219]);&quot;&quot;);[Variables.$I$2];[Variables.$I$6]);IF([.B219]&lt;&gt;&quot;&quot;;CONCATENATE(&quot;#&quot;;[.B219]);&quot;&quot;))" office:value-type="string" office:string-value="[&quot;c5_arnor_knight&quot;,&quot;Knight_of_Arnor&quot;,&quot;Knights_of_Arnor&quot;,tf_dunedain| tf_mounted| tfg_gloves| tfg_shield| tfg_armor| tfg_helm| tfg_horse| tfg_boots |tfg_polearm,0,0,fac_imladris,[itm_arnor_helm_c_good,itm_arnor_heavy_good,itm_mail_mittens,itm_arnor_greaves,itm_leather_boots_dark,itm_lance,itm_arnor_sword_c,itm_arnor_shield_c,itm_dunedain_warhorse_heavy,],attr_tier_6,wp_elf_tier_4,knows_common|knows_riding_5|knows_shield_3|knows_athletics_5|knows_power_strike_7|knows_ironflesh_5,arnor_face_older_1,arnor_face_older_2]," calcext:value-type="string">
            <text:p>["c5_arnor_knight","Knight_of_Arnor","Knights_of_Arnor",tf_dunedain| tf_mounted| tfg_gloves| tfg_shield| tfg_armor| tfg_helm| tfg_horse| tfg_boots |tfg_polearm,0,0,fac_imladris,[itm_arnor_helm_c_good,itm_arnor_heavy_good,itm_mail_mittens,itm_arnor_greaves,itm_leather_boots_dark,itm_lance,itm_arnor_sword_c,itm_arnor_shield_c,itm_dunedain_warhorse_heavy,],attr_tier_6,wp_elf_tier_4,knows_common|knows_riding_5|knows_shield_3|knows_athletics_5|knows_power_strike_7|knows_ironflesh_5,arnor_face_older_1,arnor_face_older_2],</text:p>
          </table:table-cell>
          <table:table-cell table:style-name="ce7" office:value-type="string" calcext:value-type="string">
            <text:p>c5_arnor_knight</text:p>
          </table:table-cell>
          <table:table-cell table:style-name="ce7" office:value-type="string" calcext:value-type="string">
            <text:p>Knight_of_Arnor</text:p>
          </table:table-cell>
          <table:table-cell table:style-name="ce7" office:value-type="string" calcext:value-type="string">
            <text:p>Knight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mladris</text:p>
          </table:table-cell>
          <table:table-cell table:style-name="ce11" office:value-type="string" calcext:value-type="string">
            <text:p>itm_arnor_helm_c_good,</text:p>
          </table:table-cell>
          <table:table-cell table:style-name="ce11" office:value-type="string" calcext:value-type="string">
            <text:p>itm_arnor_heavy_good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arnor_greaves,itm_leather_boots_dark,</text:p>
          </table:table-cell>
          <table:table-cell table:style-name="ce11" office:value-type="string" calcext:value-type="string">
            <text:p>itm_lance,</text:p>
          </table:table-cell>
          <table:table-cell table:style-name="ce30" office:value-type="string" calcext:value-type="string">
            <text:p>itm_arnor_sword_c,itm_arnor_shield_c,</text:p>
          </table:table-cell>
          <table:table-cell table:style-name="ce11" office:value-type="string" calcext:value-type="string">
            <text:p>itm_dunedain_warhorse_heavy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elf_tier_4</text:p>
          </table:table-cell>
          <table:table-cell table:style-name="ce12" office:value-type="string" calcext:value-type="string">
            <text:p>knows_common|knows_riding_5|knows_shield_3|knows_athletics_5|knows_power_strike_7|knows_ironflesh_5</text:p>
          </table:table-cell>
          <table:table-cell table:style-name="ce14" office:value-type="string" calcext:value-type="string">
            <text:p>arnor_face_older_1</text:p>
          </table:table-cell>
          <table:table-cell table:style-name="ce14" office:value-type="string" calcext:value-type="string">
            <text:p>arnor_face_older_2</text:p>
          </table:table-cell>
          <table:table-cell table:style-name="ce15"/>
          <table:table-cell table:style-name="ce6" table:formula="of:=IF(AND([.B219]&lt;&gt;&quot;&quot;;[.C219]&lt;&gt;&quot;&quot;);CONCATENATE([Variables.$I$1];[Variables.$I$7];[.B219];[Variables.$I$7];[Variables.$I$6];[Variables.$I$7];[.C219];[Variables.$I$7];[Variables.$I$6];[Variables.$I$7];[.D219];[Variables.$I$7];[Variables.$I$6];[.E219];[Variables.$I$6];[.F219];[Variables.$I$6];[.G219];[Variables.$I$6];[.H219];[Variables.$I$6];[Variables.$I$1];[.I219];[.J219];[.K219];[.L219];[.M219];[.N219];[.O219];[Variables.$I$2];[Variables.$I$6];[.P219];[Variables.$I$6];[.Q219];[Variables.$I$6];[.R219];[Variables.$I$6];[.S219];[Variables.$I$6];[.T219];IF([.U219]&lt;&gt;&quot;&quot;;CONCATENATE([Variables.$I$6];[.U219]);&quot;&quot;);[Variables.$I$2];[Variables.$I$6]);IF([.B219]&lt;&gt;&quot;&quot;;CONCATENATE(&quot;#&quot;;[.B219]);&quot;&quot;))" office:value-type="string" office:string-value="[&quot;c5_arnor_knight&quot;,&quot;Knight_of_Arnor&quot;,&quot;Knights_of_Arnor&quot;,tf_dunedain| tf_mounted| tfg_gloves| tfg_shield| tfg_armor| tfg_helm| tfg_horse| tfg_boots |tfg_polearm,0,0,fac_imladris,[itm_arnor_helm_c_good,itm_arnor_heavy_good,itm_mail_mittens,itm_arnor_greaves,itm_leather_boots_dark,itm_lance,itm_arnor_sword_c,itm_arnor_shield_c,itm_dunedain_warhorse_heavy,],attr_tier_6,wp_elf_tier_4,knows_common|knows_riding_5|knows_shield_3|knows_athletics_5|knows_power_strike_7|knows_ironflesh_5,arnor_face_older_1,arnor_face_older_2]," calcext:value-type="string">
            <text:p>["c5_arnor_knight","Knight_of_Arnor","Knights_of_Arnor",tf_dunedain| tf_mounted| tfg_gloves| tfg_shield| tfg_armor| tfg_helm| tfg_horse| tfg_boots |tfg_polearm,0,0,fac_imladris,[itm_arnor_helm_c_good,itm_arnor_heavy_good,itm_mail_mittens,itm_arnor_greaves,itm_leather_boots_dark,itm_lance,itm_arnor_sword_c,itm_arnor_shield_c,itm_dunedain_warhorse_heavy,],attr_tier_6,wp_elf_tier_4,knows_common|knows_riding_5|knows_shield_3|knows_athletics_5|knows_power_strike_7|knows_ironflesh_5,arnor_face_older_1,arnor_face_older_2],</text:p>
          </table:table-cell>
          <table:table-cell table:number-columns-repeated="16362"/>
        </table:table-row>
        <table:table-row table:style-name="ro1">
          <table:table-cell table:style-name="ce6" table:formula="of:=IF(AND([.B220]&lt;&gt;&quot;&quot;;[.C220]&lt;&gt;&quot;&quot;);CONCATENATE([Variables.$I$1];[Variables.$I$7];[.B220];[Variables.$I$7];[Variables.$I$6];[Variables.$I$7];[.C220];[Variables.$I$7];[Variables.$I$6];[Variables.$I$7];[.D220];[Variables.$I$7];[Variables.$I$6];[.E220];[Variables.$I$6];[.F220];[Variables.$I$6];[.G220];[Variables.$I$6];[.H220];[Variables.$I$6];[Variables.$I$1];[.I220];[.J220];[.K220];[.L220];[.M220];[.N220];[.O220];[Variables.$I$2];[Variables.$I$6];[.P220];[Variables.$I$6];[.Q220];[Variables.$I$6];[.R220];[Variables.$I$6];[.S220];[Variables.$I$6];[.T220];IF([.U220]&lt;&gt;&quot;&quot;;CONCATENATE([Variables.$I$6];[.U220]);&quot;&quot;);[Variables.$I$2];[Variables.$I$6]);IF([.B220]&lt;&gt;&quot;&quot;;CONCATENATE(&quot;#&quot;;[.B220]);&quot;&quot;))" office:value-type="string" office:string-value="[&quot;a3_arnor_ranger&quot;,&quot;Dunedain_Ranger&quot;,&quot;Dunedain_Rangers&quot;,tf_dunedain| tfg_ranged| tfg_gloves| tfg_armor| tfg_boots,0,0,fac_imladris,[itm_hood_grey,itm_arnor_med_a_good_cloak, itm_arnor_light_b_cloak,itm_leather_gloves,itm_leather_boots,itm_leather_boots_dark_bad,itm_elven_bow,itm_ithilien_arrows,itm_arnor_sword_f,itm_riv_spear,itm_arnor_shield_a,],attr_tier_4,wp_archery(170)|wp(170),knows_common|knows_athletics_6|knows_shield_2|knows_power_draw_3|knows_power_strike_4|knows_ironflesh_4,arnor_face_middle_1,arnor_face_middle_2]," calcext:value-type="string">
            <text:p>["a3_arnor_ranger","Dunedain_Ranger","Dunedain_Rangers",tf_dunedain| tfg_ranged| tfg_gloves| tfg_armor| tfg_boots,0,0,fac_imladris,[itm_hood_grey,itm_arnor_med_a_good_cloak, itm_arnor_light_b_cloak,itm_leather_gloves,itm_leather_boots,itm_leather_boots_dark_bad,itm_elven_bow,itm_ithilien_arrows,itm_arnor_sword_f,itm_riv_spear,itm_arnor_shield_a,],attr_tier_4,wp_archery(170)|wp(170),knows_common|knows_athletics_6|knows_shield_2|knows_power_draw_3|knows_power_strike_4|knows_ironflesh_4,arnor_face_middle_1,arnor_face_middle_2],</text:p>
          </table:table-cell>
          <table:table-cell table:style-name="ce7" office:value-type="string" calcext:value-type="string">
            <text:p>a3_arnor_ranger</text:p>
          </table:table-cell>
          <table:table-cell table:style-name="ce7" office:value-type="string" calcext:value-type="string">
            <text:p>Dunedain_Ranger</text:p>
          </table:table-cell>
          <table:table-cell table:style-name="ce7" office:value-type="string" calcext:value-type="string">
            <text:p>Dunedai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mladris</text:p>
          </table:table-cell>
          <table:table-cell table:style-name="ce19" office:value-type="string" calcext:value-type="string">
            <text:p>itm_hood_grey,</text:p>
          </table:table-cell>
          <table:table-cell table:style-name="ce11" office:value-type="string" calcext:value-type="string">
            <text:p>itm_arnor_med_a_good_cloak, itm_arnor_light_b_cloak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leather_boots,itm_leather_boots_dark_bad,</text:p>
          </table:table-cell>
          <table:table-cell table:style-name="ce11" office:value-type="string" calcext:value-type="string">
            <text:p>itm_elven_bow,itm_ithilien_arrows,</text:p>
          </table:table-cell>
          <table:table-cell table:style-name="ce11" office:value-type="string" calcext:value-type="string">
            <text:p>itm_arnor_sword_f,itm_riv_spear,itm_arnor_shield_a,</text:p>
          </table:table-cell>
          <table:table-cell table:style-name="ce11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archery(170)|wp(170)</text:p>
          </table:table-cell>
          <table:table-cell table:style-name="ce12" office:value-type="string" calcext:value-type="string">
            <text:p>knows_common|knows_athletics_6|knows_shield_2|knows_power_draw_3|knows_power_strike_4|knows_ironflesh_4</text:p>
          </table:table-cell>
          <table:table-cell table:style-name="ce14" office:value-type="string" calcext:value-type="string">
            <text:p>arnor_face_middle_1</text:p>
          </table:table-cell>
          <table:table-cell table:style-name="ce14" office:value-type="string" calcext:value-type="string">
            <text:p>arnor_face_middle_2</text:p>
          </table:table-cell>
          <table:table-cell table:style-name="ce15"/>
          <table:table-cell table:style-name="ce6" table:formula="of:=IF(AND([.B220]&lt;&gt;&quot;&quot;;[.C220]&lt;&gt;&quot;&quot;);CONCATENATE([Variables.$I$1];[Variables.$I$7];[.B220];[Variables.$I$7];[Variables.$I$6];[Variables.$I$7];[.C220];[Variables.$I$7];[Variables.$I$6];[Variables.$I$7];[.D220];[Variables.$I$7];[Variables.$I$6];[.E220];[Variables.$I$6];[.F220];[Variables.$I$6];[.G220];[Variables.$I$6];[.H220];[Variables.$I$6];[Variables.$I$1];[.I220];[.J220];[.K220];[.L220];[.M220];[.N220];[.O220];[Variables.$I$2];[Variables.$I$6];[.P220];[Variables.$I$6];[.Q220];[Variables.$I$6];[.R220];[Variables.$I$6];[.S220];[Variables.$I$6];[.T220];IF([.U220]&lt;&gt;&quot;&quot;;CONCATENATE([Variables.$I$6];[.U220]);&quot;&quot;);[Variables.$I$2];[Variables.$I$6]);IF([.B220]&lt;&gt;&quot;&quot;;CONCATENATE(&quot;#&quot;;[.B220]);&quot;&quot;))" office:value-type="string" office:string-value="[&quot;a3_arnor_ranger&quot;,&quot;Dunedain_Ranger&quot;,&quot;Dunedain_Rangers&quot;,tf_dunedain| tfg_ranged| tfg_gloves| tfg_armor| tfg_boots,0,0,fac_imladris,[itm_hood_grey,itm_arnor_med_a_good_cloak, itm_arnor_light_b_cloak,itm_leather_gloves,itm_leather_boots,itm_leather_boots_dark_bad,itm_elven_bow,itm_ithilien_arrows,itm_arnor_sword_f,itm_riv_spear,itm_arnor_shield_a,],attr_tier_4,wp_archery(170)|wp(170),knows_common|knows_athletics_6|knows_shield_2|knows_power_draw_3|knows_power_strike_4|knows_ironflesh_4,arnor_face_middle_1,arnor_face_middle_2]," calcext:value-type="string">
            <text:p>["a3_arnor_ranger","Dunedain_Ranger","Dunedain_Rangers",tf_dunedain| tfg_ranged| tfg_gloves| tfg_armor| tfg_boots,0,0,fac_imladris,[itm_hood_grey,itm_arnor_med_a_good_cloak, itm_arnor_light_b_cloak,itm_leather_gloves,itm_leather_boots,itm_leather_boots_dark_bad,itm_elven_bow,itm_ithilien_arrows,itm_arnor_sword_f,itm_riv_spear,itm_arnor_shield_a,],attr_tier_4,wp_archery(170)|wp(170),knows_common|knows_athletics_6|knows_shield_2|knows_power_draw_3|knows_power_strike_4|knows_ironflesh_4,arnor_face_middle_1,arnor_face_middle_2],</text:p>
          </table:table-cell>
          <table:table-cell table:number-columns-repeated="16362"/>
        </table:table-row>
        <table:table-row table:style-name="ro1">
          <table:table-cell table:style-name="ce6" table:formula="of:=IF(AND([.B221]&lt;&gt;&quot;&quot;;[.C221]&lt;&gt;&quot;&quot;);CONCATENATE([Variables.$I$1];[Variables.$I$7];[.B221];[Variables.$I$7];[Variables.$I$6];[Variables.$I$7];[.C221];[Variables.$I$7];[Variables.$I$6];[Variables.$I$7];[.D221];[Variables.$I$7];[Variables.$I$6];[.E221];[Variables.$I$6];[.F221];[Variables.$I$6];[.G221];[Variables.$I$6];[.H221];[Variables.$I$6];[Variables.$I$1];[.I221];[.J221];[.K221];[.L221];[.M221];[.N221];[.O221];[Variables.$I$2];[Variables.$I$6];[.P221];[Variables.$I$6];[.Q221];[Variables.$I$6];[.R221];[Variables.$I$6];[.S221];[Variables.$I$6];[.T221];IF([.U221]&lt;&gt;&quot;&quot;;CONCATENATE([Variables.$I$6];[.U221]);&quot;&quot;);[Variables.$I$2];[Variables.$I$6]);IF([.B221]&lt;&gt;&quot;&quot;;CONCATENATE(&quot;#&quot;;[.B221]);&quot;&quot;))" office:value-type="string" office:string-value="[&quot;a4_arnor_vet_ranger&quot;,&quot;Dunedain_Veteran_Ranger&quot;,&quot;Dunedain_Veteran_Rangers&quot;,tf_dunedain| tfg_ranged| tfg_gloves| tfg_armor| tfg_boots,0,0,fac_imladris,[itm_hood_grey,itm_arnor_helm_a,itm_arnor_light_b_good_cloak, itm_arnor_med_b_cloak,itm_leather_gloves,itm_leather_boots,itm_leather_boots_dark_bad,itm_elven_bow,itm_ithilien_arrows,itm_arnor_sword_f,itm_riv_spear,itm_arnor_shield_a,],attr_tier_5,wp(220),knows_common|knows_athletics_6|knows_shield_3|knows_power_draw_4|knows_power_strike_4|knows_ironflesh_5,arnor_face_older_1,arnor_face_older_2]," calcext:value-type="string">
            <text:p>["a4_arnor_vet_ranger","Dunedain_Veteran_Ranger","Dunedain_Veteran_Rangers",tf_dunedain| tfg_ranged| tfg_gloves| tfg_armor| tfg_boots,0,0,fac_imladris,[itm_hood_grey,itm_arnor_helm_a,itm_arnor_light_b_good_cloak, itm_arnor_med_b_cloak,itm_leather_gloves,itm_leather_boots,itm_leather_boots_dark_bad,itm_elven_bow,itm_ithilien_arrows,itm_arnor_sword_f,itm_riv_spear,itm_arnor_shield_a,],attr_tier_5,wp(220),knows_common|knows_athletics_6|knows_shield_3|knows_power_draw_4|knows_power_strike_4|knows_ironflesh_5,arnor_face_older_1,arnor_face_older_2],</text:p>
          </table:table-cell>
          <table:table-cell table:style-name="ce7" office:value-type="string" calcext:value-type="string">
            <text:p>a4_arnor_vet_ranger</text:p>
          </table:table-cell>
          <table:table-cell table:style-name="ce7" office:value-type="string" calcext:value-type="string">
            <text:p>Dunedain_Veteran_Ranger</text:p>
          </table:table-cell>
          <table:table-cell table:style-name="ce7" office:value-type="string" calcext:value-type="string">
            <text:p>Dunedain_Vetera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mladris</text:p>
          </table:table-cell>
          <table:table-cell table:style-name="ce19" office:value-type="string" calcext:value-type="string">
            <text:p>itm_hood_grey,itm_arnor_helm_a,</text:p>
          </table:table-cell>
          <table:table-cell table:style-name="ce11" office:value-type="string" calcext:value-type="string">
            <text:p>itm_arnor_light_b_good_cloak, itm_arnor_med_b_cloak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leather_boots,itm_leather_boots_dark_bad,</text:p>
          </table:table-cell>
          <table:table-cell table:style-name="ce11" office:value-type="string" calcext:value-type="string">
            <text:p>itm_elven_bow,itm_ithilien_arrows,</text:p>
          </table:table-cell>
          <table:table-cell table:style-name="ce11" office:value-type="string" calcext:value-type="string">
            <text:p>itm_arnor_sword_f,itm_riv_spear,itm_arnor_shield_a,</text:p>
          </table:table-cell>
          <table:table-cell table:style-name="ce11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(220)</text:p>
          </table:table-cell>
          <table:table-cell table:style-name="ce12" office:value-type="string" calcext:value-type="string">
            <text:p>knows_common|knows_athletics_6|knows_shield_3|knows_power_draw_4|knows_power_strike_4|knows_ironflesh_5</text:p>
          </table:table-cell>
          <table:table-cell table:style-name="ce14" office:value-type="string" calcext:value-type="string">
            <text:p>arnor_face_older_1</text:p>
          </table:table-cell>
          <table:table-cell table:style-name="ce14" office:value-type="string" calcext:value-type="string">
            <text:p>arnor_face_older_2</text:p>
          </table:table-cell>
          <table:table-cell table:style-name="ce15"/>
          <table:table-cell table:style-name="ce6" table:formula="of:=IF(AND([.B221]&lt;&gt;&quot;&quot;;[.C221]&lt;&gt;&quot;&quot;);CONCATENATE([Variables.$I$1];[Variables.$I$7];[.B221];[Variables.$I$7];[Variables.$I$6];[Variables.$I$7];[.C221];[Variables.$I$7];[Variables.$I$6];[Variables.$I$7];[.D221];[Variables.$I$7];[Variables.$I$6];[.E221];[Variables.$I$6];[.F221];[Variables.$I$6];[.G221];[Variables.$I$6];[.H221];[Variables.$I$6];[Variables.$I$1];[.I221];[.J221];[.K221];[.L221];[.M221];[.N221];[.O221];[Variables.$I$2];[Variables.$I$6];[.P221];[Variables.$I$6];[.Q221];[Variables.$I$6];[.R221];[Variables.$I$6];[.S221];[Variables.$I$6];[.T221];IF([.U221]&lt;&gt;&quot;&quot;;CONCATENATE([Variables.$I$6];[.U221]);&quot;&quot;);[Variables.$I$2];[Variables.$I$6]);IF([.B221]&lt;&gt;&quot;&quot;;CONCATENATE(&quot;#&quot;;[.B221]);&quot;&quot;))" office:value-type="string" office:string-value="[&quot;a4_arnor_vet_ranger&quot;,&quot;Dunedain_Veteran_Ranger&quot;,&quot;Dunedain_Veteran_Rangers&quot;,tf_dunedain| tfg_ranged| tfg_gloves| tfg_armor| tfg_boots,0,0,fac_imladris,[itm_hood_grey,itm_arnor_helm_a,itm_arnor_light_b_good_cloak, itm_arnor_med_b_cloak,itm_leather_gloves,itm_leather_boots,itm_leather_boots_dark_bad,itm_elven_bow,itm_ithilien_arrows,itm_arnor_sword_f,itm_riv_spear,itm_arnor_shield_a,],attr_tier_5,wp(220),knows_common|knows_athletics_6|knows_shield_3|knows_power_draw_4|knows_power_strike_4|knows_ironflesh_5,arnor_face_older_1,arnor_face_older_2]," calcext:value-type="string">
            <text:p>["a4_arnor_vet_ranger","Dunedain_Veteran_Ranger","Dunedain_Veteran_Rangers",tf_dunedain| tfg_ranged| tfg_gloves| tfg_armor| tfg_boots,0,0,fac_imladris,[itm_hood_grey,itm_arnor_helm_a,itm_arnor_light_b_good_cloak, itm_arnor_med_b_cloak,itm_leather_gloves,itm_leather_boots,itm_leather_boots_dark_bad,itm_elven_bow,itm_ithilien_arrows,itm_arnor_sword_f,itm_riv_spear,itm_arnor_shield_a,],attr_tier_5,wp(220),knows_common|knows_athletics_6|knows_shield_3|knows_power_draw_4|knows_power_strike_4|knows_ironflesh_5,arnor_face_older_1,arnor_face_older_2],</text:p>
          </table:table-cell>
          <table:table-cell table:number-columns-repeated="16362"/>
        </table:table-row>
        <table:table-row table:style-name="ro1">
          <table:table-cell table:style-name="ce6" table:formula="of:=IF(AND([.B222]&lt;&gt;&quot;&quot;;[.C222]&lt;&gt;&quot;&quot;);CONCATENATE([Variables.$I$1];[Variables.$I$7];[.B222];[Variables.$I$7];[Variables.$I$6];[Variables.$I$7];[.C222];[Variables.$I$7];[Variables.$I$6];[Variables.$I$7];[.D222];[Variables.$I$7];[Variables.$I$6];[.E222];[Variables.$I$6];[.F222];[Variables.$I$6];[.G222];[Variables.$I$6];[.H222];[Variables.$I$6];[Variables.$I$1];[.I222];[.J222];[.K222];[.L222];[.M222];[.N222];[.O222];[Variables.$I$2];[Variables.$I$6];[.P222];[Variables.$I$6];[.Q222];[Variables.$I$6];[.R222];[Variables.$I$6];[.S222];[Variables.$I$6];[.T222];IF([.U222]&lt;&gt;&quot;&quot;;CONCATENATE([Variables.$I$6];[.U222]);&quot;&quot;);[Variables.$I$2];[Variables.$I$6]);IF([.B222]&lt;&gt;&quot;&quot;;CONCATENATE(&quot;#&quot;;[.B222]);&quot;&quot;))" office:value-type="string" office:string-value="[&quot;a5_arnor_master_ranger&quot;,&quot;Master_Ranger_of_Arnor&quot;,&quot;Master_Rangers_of_Arnor&quot;,tf_dunedain| tfg_ranged| tfg_gloves| tfg_armor| tfg_boots,0,0,fac_imladris,[itm_arnor_helm_c_bad,itm_arnor_med_b_good_cloak,itm_leather_gloves,itm_leather_boots,itm_leather_boots_dark_bad,itm_elven_bow,itm_ithilien_arrows,itm_arnor_sword_f,itm_arnor_sword_a,itm_riv_spear,itm_arnor_shield_a,],attr_tier_6,wp_melee(360)|wp_archery(300),knows_common|knows_athletics_8|knows_shield_3|knows_power_draw_5|knows_power_strike_5|knows_ironflesh_6,arnor_face_older_1,arnor_face_older_2]," calcext:value-type="string">
            <text:p>["a5_arnor_master_ranger","Master_Ranger_of_Arnor","Master_Rangers_of_Arnor",tf_dunedain| tfg_ranged| tfg_gloves| tfg_armor| tfg_boots,0,0,fac_imladris,[itm_arnor_helm_c_bad,itm_arnor_med_b_good_cloak,itm_leather_gloves,itm_leather_boots,itm_leather_boots_dark_bad,itm_elven_bow,itm_ithilien_arrows,itm_arnor_sword_f,itm_arnor_sword_a,itm_riv_spear,itm_arnor_shield_a,],attr_tier_6,wp_melee(360)|wp_archery(300),knows_common|knows_athletics_8|knows_shield_3|knows_power_draw_5|knows_power_strike_5|knows_ironflesh_6,arnor_face_older_1,arnor_face_older_2],</text:p>
          </table:table-cell>
          <table:table-cell table:style-name="ce7" office:value-type="string" calcext:value-type="string">
            <text:p>a5_arnor_master_ranger</text:p>
          </table:table-cell>
          <table:table-cell table:style-name="ce7" office:value-type="string" calcext:value-type="string">
            <text:p>Master_Ranger_of_Arnor</text:p>
          </table:table-cell>
          <table:table-cell table:style-name="ce7" office:value-type="string" calcext:value-type="string">
            <text:p>Master_Rangers_of_Arnor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mladris</text:p>
          </table:table-cell>
          <table:table-cell table:style-name="ce11" office:value-type="string" calcext:value-type="string">
            <text:p>itm_arnor_helm_c_bad,</text:p>
          </table:table-cell>
          <table:table-cell table:style-name="ce11" office:value-type="string" calcext:value-type="string">
            <text:p>itm_arnor_med_b_good_cloak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leather_boots,itm_leather_boots_dark_bad,</text:p>
          </table:table-cell>
          <table:table-cell table:style-name="ce11" office:value-type="string" calcext:value-type="string">
            <text:p>itm_elven_bow,itm_ithilien_arrows,</text:p>
          </table:table-cell>
          <table:table-cell table:style-name="ce11" office:value-type="string" calcext:value-type="string">
            <text:p>itm_arnor_sword_f,itm_arnor_sword_a,itm_riv_spear,itm_arnor_shield_a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melee(360)|wp_archery(300)</text:p>
          </table:table-cell>
          <table:table-cell table:style-name="ce12" office:value-type="string" calcext:value-type="string">
            <text:p>knows_common|knows_athletics_8|knows_shield_3|knows_power_draw_5|knows_power_strike_5|knows_ironflesh_6</text:p>
          </table:table-cell>
          <table:table-cell table:style-name="ce14" office:value-type="string" calcext:value-type="string">
            <text:p>arnor_face_older_1</text:p>
          </table:table-cell>
          <table:table-cell table:style-name="ce14" office:value-type="string" calcext:value-type="string">
            <text:p>arnor_face_older_2</text:p>
          </table:table-cell>
          <table:table-cell table:style-name="ce15"/>
          <table:table-cell table:style-name="ce6" table:formula="of:=IF(AND([.B222]&lt;&gt;&quot;&quot;;[.C222]&lt;&gt;&quot;&quot;);CONCATENATE([Variables.$I$1];[Variables.$I$7];[.B222];[Variables.$I$7];[Variables.$I$6];[Variables.$I$7];[.C222];[Variables.$I$7];[Variables.$I$6];[Variables.$I$7];[.D222];[Variables.$I$7];[Variables.$I$6];[.E222];[Variables.$I$6];[.F222];[Variables.$I$6];[.G222];[Variables.$I$6];[.H222];[Variables.$I$6];[Variables.$I$1];[.I222];[.J222];[.K222];[.L222];[.M222];[.N222];[.O222];[Variables.$I$2];[Variables.$I$6];[.P222];[Variables.$I$6];[.Q222];[Variables.$I$6];[.R222];[Variables.$I$6];[.S222];[Variables.$I$6];[.T222];IF([.U222]&lt;&gt;&quot;&quot;;CONCATENATE([Variables.$I$6];[.U222]);&quot;&quot;);[Variables.$I$2];[Variables.$I$6]);IF([.B222]&lt;&gt;&quot;&quot;;CONCATENATE(&quot;#&quot;;[.B222]);&quot;&quot;))" office:value-type="string" office:string-value="[&quot;a5_arnor_master_ranger&quot;,&quot;Master_Ranger_of_Arnor&quot;,&quot;Master_Rangers_of_Arnor&quot;,tf_dunedain| tfg_ranged| tfg_gloves| tfg_armor| tfg_boots,0,0,fac_imladris,[itm_arnor_helm_c_bad,itm_arnor_med_b_good_cloak,itm_leather_gloves,itm_leather_boots,itm_leather_boots_dark_bad,itm_elven_bow,itm_ithilien_arrows,itm_arnor_sword_f,itm_arnor_sword_a,itm_riv_spear,itm_arnor_shield_a,],attr_tier_6,wp_melee(360)|wp_archery(300),knows_common|knows_athletics_8|knows_shield_3|knows_power_draw_5|knows_power_strike_5|knows_ironflesh_6,arnor_face_older_1,arnor_face_older_2]," calcext:value-type="string">
            <text:p>["a5_arnor_master_ranger","Master_Ranger_of_Arnor","Master_Rangers_of_Arnor",tf_dunedain| tfg_ranged| tfg_gloves| tfg_armor| tfg_boots,0,0,fac_imladris,[itm_arnor_helm_c_bad,itm_arnor_med_b_good_cloak,itm_leather_gloves,itm_leather_boots,itm_leather_boots_dark_bad,itm_elven_bow,itm_ithilien_arrows,itm_arnor_sword_f,itm_arnor_sword_a,itm_riv_spear,itm_arnor_shield_a,],attr_tier_6,wp_melee(360)|wp_archery(300),knows_common|knows_athletics_8|knows_shield_3|knows_power_draw_5|knows_power_strike_5|knows_ironflesh_6,arnor_face_older_1,arnor_face_older_2],</text:p>
          </table:table-cell>
          <table:table-cell table:number-columns-repeated="16362"/>
        </table:table-row>
        <table:table-row table:style-name="ro1">
          <table:table-cell table:formula="of:=IF(AND([.B223]&lt;&gt;&quot;&quot;;[.C223]&lt;&gt;&quot;&quot;);CONCATENATE([Variables.$I$1];[Variables.$I$7];[.B223];[Variables.$I$7];[Variables.$I$6];[Variables.$I$7];[.C223];[Variables.$I$7];[Variables.$I$6];[Variables.$I$7];[.D223];[Variables.$I$7];[Variables.$I$6];[.E223];[Variables.$I$6];[.F223];[Variables.$I$6];[.G223];[Variables.$I$6];[.H223];[Variables.$I$6];[Variables.$I$1];[.I223];[.J223];[.K223];[.L223];[.M223];[.N223];[.O223];[Variables.$I$2];[Variables.$I$6];[.P223];[Variables.$I$6];[.Q223];[Variables.$I$6];[.R223];[Variables.$I$6];[.S223];[Variables.$I$6];[.T223];IF([.U223]&lt;&gt;&quot;&quot;;CONCATENATE([Variables.$I$6];[.U223]);&quot;&quot;);[Variables.$I$2];[Variables.$I$6]);IF([.B223]&lt;&gt;&quot;&quot;;CONCATENATE(&quot;#&quot;;[.B223]);&quot;&quot;))">
            <text:p/>
          </table:table-cell>
          <table:table-cell table:style-name="ce5"/>
          <table:table-cell table:style-name="ce6" table:number-columns-repeated="19"/>
          <table:table-cell table:style-name="ce36" table:formula="of:=IF(AND([.B223]&lt;&gt;&quot;&quot;;[.C223]&lt;&gt;&quot;&quot;);CONCATENATE([Variables.$I$1];[Variables.$I$7];[.B223];[Variables.$I$7];[Variables.$I$6];[Variables.$I$7];[.C223];[Variables.$I$7];[Variables.$I$6];[Variables.$I$7];[.D223];[Variables.$I$7];[Variables.$I$6];[.E223];[Variables.$I$6];[.F223];[Variables.$I$6];[.G223];[Variables.$I$6];[.H223];[Variables.$I$6];[Variables.$I$1];[.I223];[.J223];[.K223];[.L223];[.M223];[.N223];[.O223];[Variables.$I$2];[Variables.$I$6];[.P223];[Variables.$I$6];[.Q223];[Variables.$I$6];[.R223];[Variables.$I$6];[.S223];[Variables.$I$6];[.T223];IF([.U223]&lt;&gt;&quot;&quot;;CONCATENATE([Variables.$I$6];[.U223]);&quot;&quot;);[Variables.$I$2];[Variables.$I$6]);IF([.B223]&lt;&gt;&quot;&quot;;CONCATENATE(&quot;#&quot;;[.B223]);&quot;&quot;))">
            <text:p/>
          </table:table-cell>
          <table:table-cell table:number-columns-repeated="16362"/>
        </table:table-row>
        <table:table-row table:style-name="ro1">
          <table:table-cell table:style-name="ce6" table:formula="of:=IF(AND([.B224]&lt;&gt;&quot;&quot;;[.C224]&lt;&gt;&quot;&quot;);CONCATENATE([Variables.$I$1];[Variables.$I$7];[.B224];[Variables.$I$7];[Variables.$I$6];[Variables.$I$7];[.C224];[Variables.$I$7];[Variables.$I$6];[Variables.$I$7];[.D224];[Variables.$I$7];[Variables.$I$6];[.E224];[Variables.$I$6];[.F224];[Variables.$I$6];[.G224];[Variables.$I$6];[.H224];[Variables.$I$6];[Variables.$I$1];[.I224];[.J224];[.K224];[.L224];[.M224];[.N224];[.O224];[Variables.$I$2];[Variables.$I$6];[.P224];[Variables.$I$6];[.Q224];[Variables.$I$6];[.R224];[Variables.$I$6];[.S224];[Variables.$I$6];[.T224];IF([.U224]&lt;&gt;&quot;&quot;;CONCATENATE([Variables.$I$6];[.U224]);&quot;&quot;);[Variables.$I$2];[Variables.$I$6]);IF([.B224]&lt;&gt;&quot;&quot;;CONCATENATE(&quot;#&quot;;[.B224]);&quot;&quot;))" office:value-type="string" office:string-value="#ROHAN" calcext:value-type="string">
            <text:p>#ROHAN</text:p>
          </table:table-cell>
          <table:table-cell table:style-name="ce5" office:value-type="string" calcext:value-type="string">
            <text:p>ROHAN</text:p>
          </table:table-cell>
          <table:table-cell table:style-name="ce6" table:number-columns-repeated="19"/>
          <table:table-cell table:style-name="ce6" table:formula="of:=IF(AND([.B224]&lt;&gt;&quot;&quot;;[.C224]&lt;&gt;&quot;&quot;);CONCATENATE([Variables.$I$1];[Variables.$I$7];[.B224];[Variables.$I$7];[Variables.$I$6];[Variables.$I$7];[.C224];[Variables.$I$7];[Variables.$I$6];[Variables.$I$7];[.D224];[Variables.$I$7];[Variables.$I$6];[.E224];[Variables.$I$6];[.F224];[Variables.$I$6];[.G224];[Variables.$I$6];[.H224];[Variables.$I$6];[Variables.$I$1];[.I224];[.J224];[.K224];[.L224];[.M224];[.N224];[.O224];[Variables.$I$2];[Variables.$I$6];[.P224];[Variables.$I$6];[.Q224];[Variables.$I$6];[.R224];[Variables.$I$6];[.S224];[Variables.$I$6];[.T224];IF([.U224]&lt;&gt;&quot;&quot;;CONCATENATE([Variables.$I$6];[.U224]);&quot;&quot;);[Variables.$I$2];[Variables.$I$6]);IF([.B224]&lt;&gt;&quot;&quot;;CONCATENATE(&quot;#&quot;;[.B224]);&quot;&quot;))" office:value-type="string" office:string-value="#ROHAN" calcext:value-type="string">
            <text:p>#ROHAN</text:p>
          </table:table-cell>
          <table:table-cell table:number-columns-repeated="16362"/>
        </table:table-row>
        <table:table-row table:style-name="ro1">
          <table:table-cell table:style-name="ce6" table:formula="of:=IF(AND([.B225]&lt;&gt;&quot;&quot;;[.C225]&lt;&gt;&quot;&quot;);CONCATENATE([Variables.$I$1];[Variables.$I$7];[.B225];[Variables.$I$7];[Variables.$I$6];[Variables.$I$7];[.C225];[Variables.$I$7];[Variables.$I$6];[Variables.$I$7];[.D225];[Variables.$I$7];[Variables.$I$6];[.E225];[Variables.$I$6];[.F225];[Variables.$I$6];[.G225];[Variables.$I$6];[.H225];[Variables.$I$6];[Variables.$I$1];[.I225];[.J225];[.K225];[.L225];[.M225];[.N225];[.O225];[Variables.$I$2];[Variables.$I$6];[.P225];[Variables.$I$6];[.Q225];[Variables.$I$6];[.R225];[Variables.$I$6];[.S225];[Variables.$I$6];[.T225];IF([.U225]&lt;&gt;&quot;&quot;;CONCATENATE([Variables.$I$6];[.U225]);&quot;&quot;);[Variables.$I$2];[Variables.$I$6]);IF([.B225]&lt;&gt;&quot;&quot;;CONCATENATE(&quot;#&quot;;[.B225]);&quot;&quot;))" office:value-type="string" office:string-value="[&quot;i1_rohan_youth&quot;,&quot;Rohan_Youth&quot;,&quot;Rohan_Youths&quot;,tf_rohan| tfg_armor| tfg_boots,0,0,fac_rohan,[itm_hood_green_bad, itm_hood_grey_bad,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" calcext:value-type="string">
            <text:p>["i1_rohan_youth","Rohan_Youth","Rohan_Youths",tf_rohan| tfg_armor| tfg_boots,0,0,fac_rohan,[itm_hood_green_bad, itm_hood_grey_bad,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</text:p>
          </table:table-cell>
          <table:table-cell table:style-name="ce7" office:value-type="string" calcext:value-type="string">
            <text:p>i1_rohan_youth</text:p>
          </table:table-cell>
          <table:table-cell table:style-name="ce7" office:value-type="string" calcext:value-type="string">
            <text:p>Rohan_Youth</text:p>
          </table:table-cell>
          <table:table-cell table:style-name="ce7" office:value-type="string" calcext:value-type="string">
            <text:p>Rohan_Youths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ohan</text:p>
          </table:table-cell>
          <table:table-cell table:style-name="ce31" office:value-type="string" calcext:value-type="string">
            <text:p>itm_hood_green_bad, itm_hood_grey_bad,</text:p>
          </table:table-cell>
          <table:table-cell table:style-name="ce11" office:value-type="string" calcext:value-type="string">
            <text:p>itm_rohan_recruit_bad, itm_rohan_recruit, itm_rohan_recruit_good, itm_rohan_leather_bad,itm_north_leather_bad,itm_north_leather_ok,itm_rohan_tunic_a,itm_rohan_tunic_b,</text:p>
          </table:table-cell>
          <table:table-cell table:style-name="ce11"/>
          <table:table-cell table:style-name="ce11" office:value-type="string" calcext:value-type="string">
            <text:p>itm_rohan_shoes,</text:p>
          </table:table-cell>
          <table:table-cell table:style-name="ce11" office:value-type="string" calcext:value-type="string">
            <text:p>itm_rohirrim_short_axe,itm_spear,</text:p>
          </table:table-cell>
          <table:table-cell table:style-name="ce11"/>
          <table:table-cell table:style-name="ce11" office:value-type="string" calcext:value-type="string">
            <text:p>itm_metal_scraps_bad,itm_metal_scraps_medium,itm_metal_scraps_good,</text:p>
          </table:table-cell>
          <table:table-cell table:style-name="ce12" office:value-type="string" calcext:value-type="string">
            <text:p>attr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power_strike_1|knows_athletics_1|knows_riding_2|knows_horse_archery_1|knows_looting_1|knows_tactics_1|knows_pathfinding_1|knows_spotting_1|knows_inventory_management_1|knows_prisoner_management_1|knows_leadership_1|knows_trade_1</text:p>
          </table:table-cell>
          <table:table-cell table:style-name="ce14" office:value-type="string" calcext:value-type="string">
            <text:p>rohan_face_younger_1</text:p>
          </table:table-cell>
          <table:table-cell table:style-name="ce14" office:value-type="string" calcext:value-type="string">
            <text:p>rohan_face_middle_2</text:p>
          </table:table-cell>
          <table:table-cell table:style-name="ce15"/>
          <table:table-cell table:style-name="ce6" table:formula="of:=IF(AND([.B225]&lt;&gt;&quot;&quot;;[.C225]&lt;&gt;&quot;&quot;);CONCATENATE([Variables.$I$1];[Variables.$I$7];[.B225];[Variables.$I$7];[Variables.$I$6];[Variables.$I$7];[.C225];[Variables.$I$7];[Variables.$I$6];[Variables.$I$7];[.D225];[Variables.$I$7];[Variables.$I$6];[.E225];[Variables.$I$6];[.F225];[Variables.$I$6];[.G225];[Variables.$I$6];[.H225];[Variables.$I$6];[Variables.$I$1];[.I225];[.J225];[.K225];[.L225];[.M225];[.N225];[.O225];[Variables.$I$2];[Variables.$I$6];[.P225];[Variables.$I$6];[.Q225];[Variables.$I$6];[.R225];[Variables.$I$6];[.S225];[Variables.$I$6];[.T225];IF([.U225]&lt;&gt;&quot;&quot;;CONCATENATE([Variables.$I$6];[.U225]);&quot;&quot;);[Variables.$I$2];[Variables.$I$6]);IF([.B225]&lt;&gt;&quot;&quot;;CONCATENATE(&quot;#&quot;;[.B225]);&quot;&quot;))" office:value-type="string" office:string-value="[&quot;i1_rohan_youth&quot;,&quot;Rohan_Youth&quot;,&quot;Rohan_Youths&quot;,tf_rohan| tfg_armor| tfg_boots,0,0,fac_rohan,[itm_hood_green_bad, itm_hood_grey_bad,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" calcext:value-type="string">
            <text:p>["i1_rohan_youth","Rohan_Youth","Rohan_Youths",tf_rohan| tfg_armor| tfg_boots,0,0,fac_rohan,[itm_hood_green_bad, itm_hood_grey_bad,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</text:p>
          </table:table-cell>
          <table:table-cell table:number-columns-repeated="16362"/>
        </table:table-row>
        <table:table-row table:style-name="ro1">
          <table:table-cell table:style-name="ce6" table:formula="of:=IF(AND([.B226]&lt;&gt;&quot;&quot;;[.C226]&lt;&gt;&quot;&quot;);CONCATENATE([Variables.$I$1];[Variables.$I$7];[.B226];[Variables.$I$7];[Variables.$I$6];[Variables.$I$7];[.C226];[Variables.$I$7];[Variables.$I$6];[Variables.$I$7];[.D226];[Variables.$I$7];[Variables.$I$6];[.E226];[Variables.$I$6];[.F226];[Variables.$I$6];[.G226];[Variables.$I$6];[.H226];[Variables.$I$6];[Variables.$I$1];[.I226];[.J226];[.K226];[.L226];[.M226];[.N226];[.O226];[Variables.$I$2];[Variables.$I$6];[.P226];[Variables.$I$6];[.Q226];[Variables.$I$6];[.R226];[Variables.$I$6];[.S226];[Variables.$I$6];[.T226];IF([.U226]&lt;&gt;&quot;&quot;;CONCATENATE([Variables.$I$6];[.U226]);&quot;&quot;);[Variables.$I$2];[Variables.$I$6]);IF([.B226]&lt;&gt;&quot;&quot;;CONCATENATE(&quot;#&quot;;[.B226]);&quot;&quot;))" office:value-type="string" office:string-value="[&quot;i2_guardsman_of_rohan&quot;,&quot;Guardsman_of_Rohan&quot;,&quot;Guardsmen_of_Rohan&quot;,tf_rohan| tfg_armor| tfg_boots,0,0,fac_rohan,[itm_rohan_light_helmet_a_bad,itm_rohan_light_helmet_b_bad,itm_rohan_leather, itm_rohan_leather_cloak,itm_dale_light_b_bad,itm_north_leather_ok,itm_dale_light_b_cloak,itm_rohan_shoes,itm_leather_boots_bad,itm_spear,itm_rohan_sword_c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" calcext:value-type="string">
            <text:p>["i2_guardsman_of_rohan","Guardsman_of_Rohan","Guardsmen_of_Rohan",tf_rohan| tfg_armor| tfg_boots,0,0,fac_rohan,[itm_rohan_light_helmet_a_bad,itm_rohan_light_helmet_b_bad,itm_rohan_leather, itm_rohan_leather_cloak,itm_dale_light_b_bad,itm_north_leather_ok,itm_dale_light_b_cloak,itm_rohan_shoes,itm_leather_boots_bad,itm_spear,itm_rohan_sword_c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</text:p>
          </table:table-cell>
          <table:table-cell table:style-name="ce7" office:value-type="string" calcext:value-type="string">
            <text:p>i2_guardsman_of_rohan</text:p>
          </table:table-cell>
          <table:table-cell table:style-name="ce7" office:value-type="string" calcext:value-type="string">
            <text:p>Guardsman_of_Rohan</text:p>
          </table:table-cell>
          <table:table-cell table:style-name="ce7" office:value-type="string" calcext:value-type="string">
            <text:p>Guardsmen_of_Rohan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ohan</text:p>
          </table:table-cell>
          <table:table-cell table:style-name="ce11" office:value-type="string" calcext:value-type="string">
            <text:p>itm_rohan_light_helmet_a_bad,itm_rohan_light_helmet_b_bad,</text:p>
          </table:table-cell>
          <table:table-cell table:style-name="ce11" office:value-type="string" calcext:value-type="string">
            <text:p>itm_rohan_leather, itm_rohan_leather_cloak,itm_dale_light_b_bad,itm_north_leather_ok,itm_dale_light_b_cloak,</text:p>
          </table:table-cell>
          <table:table-cell table:style-name="ce11"/>
          <table:table-cell table:style-name="ce11" office:value-type="string" calcext:value-type="string">
            <text:p>itm_rohan_shoes,itm_leather_boots_bad,</text:p>
          </table:table-cell>
          <table:table-cell table:style-name="ce11" office:value-type="string" calcext:value-type="string">
            <text:p>itm_spear,itm_rohan_sword_c,</text:p>
          </table:table-cell>
          <table:table-cell table:style-name="ce11" office:value-type="string" calcext:value-type="string">
            <text:p>itm_rohan_shield_a,itm_rohan_shield_b,itm_rohan_shield_c,</text:p>
          </table:table-cell>
          <table:table-cell table:style-name="ce11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2|knows_power_strike_2|knows_shield_1|knows_athletics_1|knows_riding_1|knows_looting_1|knows_tactics_1|knows_pathfinding_1|knows_spotting_1|knows_inventory_management_1|knows_prisoner_management_1|knows_leadership_1|knows_trade_1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B226]&lt;&gt;&quot;&quot;;[.C226]&lt;&gt;&quot;&quot;);CONCATENATE([Variables.$I$1];[Variables.$I$7];[.B226];[Variables.$I$7];[Variables.$I$6];[Variables.$I$7];[.C226];[Variables.$I$7];[Variables.$I$6];[Variables.$I$7];[.D226];[Variables.$I$7];[Variables.$I$6];[.E226];[Variables.$I$6];[.F226];[Variables.$I$6];[.G226];[Variables.$I$6];[.H226];[Variables.$I$6];[Variables.$I$1];[.I226];[.J226];[.K226];[.L226];[.M226];[.N226];[.O226];[Variables.$I$2];[Variables.$I$6];[.P226];[Variables.$I$6];[.Q226];[Variables.$I$6];[.R226];[Variables.$I$6];[.S226];[Variables.$I$6];[.T226];IF([.U226]&lt;&gt;&quot;&quot;;CONCATENATE([Variables.$I$6];[.U226]);&quot;&quot;);[Variables.$I$2];[Variables.$I$6]);IF([.B226]&lt;&gt;&quot;&quot;;CONCATENATE(&quot;#&quot;;[.B226]);&quot;&quot;))" office:value-type="string" office:string-value="[&quot;i2_guardsman_of_rohan&quot;,&quot;Guardsman_of_Rohan&quot;,&quot;Guardsmen_of_Rohan&quot;,tf_rohan| tfg_armor| tfg_boots,0,0,fac_rohan,[itm_rohan_light_helmet_a_bad,itm_rohan_light_helmet_b_bad,itm_rohan_leather, itm_rohan_leather_cloak,itm_dale_light_b_bad,itm_north_leather_ok,itm_dale_light_b_cloak,itm_rohan_shoes,itm_leather_boots_bad,itm_spear,itm_rohan_sword_c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" calcext:value-type="string">
            <text:p>["i2_guardsman_of_rohan","Guardsman_of_Rohan","Guardsmen_of_Rohan",tf_rohan| tfg_armor| tfg_boots,0,0,fac_rohan,[itm_rohan_light_helmet_a_bad,itm_rohan_light_helmet_b_bad,itm_rohan_leather, itm_rohan_leather_cloak,itm_dale_light_b_bad,itm_north_leather_ok,itm_dale_light_b_cloak,itm_rohan_shoes,itm_leather_boots_bad,itm_spear,itm_rohan_sword_c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16362"/>
        </table:table-row>
        <table:table-row table:style-name="ro1">
          <table:table-cell table:style-name="ce6" table:formula="of:=IF(AND([.B227]&lt;&gt;&quot;&quot;;[.C227]&lt;&gt;&quot;&quot;);CONCATENATE([Variables.$I$1];[Variables.$I$7];[.B227];[Variables.$I$7];[Variables.$I$6];[Variables.$I$7];[.C227];[Variables.$I$7];[Variables.$I$6];[Variables.$I$7];[.D227];[Variables.$I$7];[Variables.$I$6];[.E227];[Variables.$I$6];[.F227];[Variables.$I$6];[.G227];[Variables.$I$6];[.H227];[Variables.$I$6];[Variables.$I$1];[.I227];[.J227];[.K227];[.L227];[.M227];[.N227];[.O227];[Variables.$I$2];[Variables.$I$6];[.P227];[Variables.$I$6];[.Q227];[Variables.$I$6];[.R227];[Variables.$I$6];[.S227];[Variables.$I$6];[.T227];IF([.U227]&lt;&gt;&quot;&quot;;CONCATENATE([Variables.$I$6];[.U227]);&quot;&quot;);[Variables.$I$2];[Variables.$I$6]);IF([.B227]&lt;&gt;&quot;&quot;;CONCATENATE(&quot;#&quot;;[.B227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mail,itm_rohan_mail_cloak, itm_dale_med_a_bad,itm_dale_light_b_lordly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mail,itm_rohan_mail_cloak, itm_dale_med_a_bad,itm_dale_light_b_lordly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style-name="ce7" office:value-type="string" calcext:value-type="string">
            <text:p>i3_footman_of_rohan</text:p>
          </table:table-cell>
          <table:table-cell table:style-name="ce7" office:value-type="string" calcext:value-type="string">
            <text:p>Footman_of_Rohan</text:p>
          </table:table-cell>
          <table:table-cell table:style-name="ce7" office:value-type="string" calcext:value-type="string">
            <text:p>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ohan</text:p>
          </table:table-cell>
          <table:table-cell table:style-name="ce11" office:value-type="string" calcext:value-type="string">
            <text:p>itm_rohan_light_helmet_b,itm_rohan_light_helmet_a,</text:p>
          </table:table-cell>
          <table:table-cell table:style-name="ce11" office:value-type="string" calcext:value-type="string">
            <text:p>itm_rohan_mail,itm_rohan_mail_cloak, itm_dale_med_a_bad,itm_dale_light_b_lordly,</text:p>
          </table:table-cell>
          <table:table-cell table:style-name="ce11"/>
          <table:table-cell table:style-name="ce11" office:value-type="string" calcext:value-type="string">
            <text:p>itm_rohan_light_greaves,itm_leather_boots,</text:p>
          </table:table-cell>
          <table:table-cell table:style-name="ce11" office:value-type="string" calcext:value-type="string">
            <text:p>itm_rohirrim_short_axe,itm_spear,itm_rohan_sword_c,</text:p>
          </table:table-cell>
          <table:table-cell table:style-name="ce11" office:value-type="string" calcext:value-type="string">
            <text:p>itm_rohan_shield_a,itm_rohan_shield_b,itm_rohan_shield_c,</text:p>
          </table:table-cell>
          <table:table-cell table:style-name="ce11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2|knows_shield_2|knows_power_strike_2|knows_ironflesh_1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B227]&lt;&gt;&quot;&quot;;[.C227]&lt;&gt;&quot;&quot;);CONCATENATE([Variables.$I$1];[Variables.$I$7];[.B227];[Variables.$I$7];[Variables.$I$6];[Variables.$I$7];[.C227];[Variables.$I$7];[Variables.$I$6];[Variables.$I$7];[.D227];[Variables.$I$7];[Variables.$I$6];[.E227];[Variables.$I$6];[.F227];[Variables.$I$6];[.G227];[Variables.$I$6];[.H227];[Variables.$I$6];[Variables.$I$1];[.I227];[.J227];[.K227];[.L227];[.M227];[.N227];[.O227];[Variables.$I$2];[Variables.$I$6];[.P227];[Variables.$I$6];[.Q227];[Variables.$I$6];[.R227];[Variables.$I$6];[.S227];[Variables.$I$6];[.T227];IF([.U227]&lt;&gt;&quot;&quot;;CONCATENATE([Variables.$I$6];[.U227]);&quot;&quot;);[Variables.$I$2];[Variables.$I$6]);IF([.B227]&lt;&gt;&quot;&quot;;CONCATENATE(&quot;#&quot;;[.B227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mail,itm_rohan_mail_cloak, itm_dale_med_a_bad,itm_dale_light_b_lordly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mail,itm_rohan_mail_cloak, itm_dale_med_a_bad,itm_dale_light_b_lordly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16362"/>
        </table:table-row>
        <table:table-row table:style-name="ro1">
          <table:table-cell table:style-name="ce6" table:formula="of:=IF(AND([.B228]&lt;&gt;&quot;&quot;;[.C228]&lt;&gt;&quot;&quot;);CONCATENATE([Variables.$I$1];[Variables.$I$7];[.B228];[Variables.$I$7];[Variables.$I$6];[Variables.$I$7];[.C228];[Variables.$I$7];[Variables.$I$6];[Variables.$I$7];[.D228];[Variables.$I$7];[Variables.$I$6];[.E228];[Variables.$I$6];[.F228];[Variables.$I$6];[.G228];[Variables.$I$6];[.H228];[Variables.$I$6];[Variables.$I$1];[.I228];[.J228];[.K228];[.L228];[.M228];[.N228];[.O228];[Variables.$I$2];[Variables.$I$6];[.P228];[Variables.$I$6];[.Q228];[Variables.$I$6];[.R228];[Variables.$I$6];[.S228];[Variables.$I$6];[.T228];IF([.U228]&lt;&gt;&quot;&quot;;CONCATENATE([Variables.$I$6];[.U228]);&quot;&quot;);[Variables.$I$2];[Variables.$I$6]);IF([.B228]&lt;&gt;&quot;&quot;;CONCATENATE(&quot;#&quot;;[.B228]);&quot;&quot;))" office:value-type="string" office:string-value="[&quot;i4_veteran_footman_of_rohan&quot;,&quot;Veteran_Footman_of_Rohan&quot;,&quot;Veteran_Footmen_of_Rohan&quot;,tf_rohan| tfg_shield| tfg_armor| tfg_helm| tfg_boots,0,0,fac_rohan,[itm_rohan_inf_helmet_b_bad,itm_mail_coif,itm_rohan_mail_cloak,itm_rohan_mail_good, itm_rohan_rider_bad,itm_dale_med_a_cloak,itm_rohan_scale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itm_mail_coif,itm_rohan_mail_cloak,itm_rohan_mail_good, itm_rohan_rider_bad,itm_dale_med_a_cloak,itm_rohan_scale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style-name="ce7" office:value-type="string" calcext:value-type="string">
            <text:p>i4_veteran_footman_of_rohan</text:p>
          </table:table-cell>
          <table:table-cell table:style-name="ce7" office:value-type="string" calcext:value-type="string">
            <text:p>Veteran_Footman_of_Rohan</text:p>
          </table:table-cell>
          <table:table-cell table:style-name="ce7" office:value-type="string" calcext:value-type="string">
            <text:p>Veteran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ohan</text:p>
          </table:table-cell>
          <table:table-cell table:style-name="ce11" office:value-type="string" calcext:value-type="string">
            <text:p>itm_rohan_inf_helmet_b_bad,itm_mail_coif,</text:p>
          </table:table-cell>
          <table:table-cell table:style-name="ce11" office:value-type="string" calcext:value-type="string">
            <text:p>itm_rohan_mail_cloak,itm_rohan_mail_good, itm_rohan_rider_bad,itm_dale_med_a_cloak,itm_rohan_scale_bad,</text:p>
          </table:table-cell>
          <table:table-cell table:style-name="ce11"/>
          <table:table-cell table:style-name="ce11" office:value-type="string" calcext:value-type="string">
            <text:p>itm_rohan_light_greaves,</text:p>
          </table:table-cell>
          <table:table-cell table:style-name="ce11" office:value-type="string" calcext:value-type="string">
            <text:p>itm_rohirrim_short_axe,itm_rohan_spear,itm_rohan_sword_c,</text:p>
          </table:table-cell>
          <table:table-cell table:style-name="ce11" office:value-type="string" calcext:value-type="string">
            <text:p>itm_rohan_shield_d,itm_rohan_shield_e,itm_rohan_shield_f,</text:p>
          </table:table-cell>
          <table:table-cell table:style-name="ce11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2|knows_shield_2|knows_power_strike_3|knows_ironflesh_2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B228]&lt;&gt;&quot;&quot;;[.C228]&lt;&gt;&quot;&quot;);CONCATENATE([Variables.$I$1];[Variables.$I$7];[.B228];[Variables.$I$7];[Variables.$I$6];[Variables.$I$7];[.C228];[Variables.$I$7];[Variables.$I$6];[Variables.$I$7];[.D228];[Variables.$I$7];[Variables.$I$6];[.E228];[Variables.$I$6];[.F228];[Variables.$I$6];[.G228];[Variables.$I$6];[.H228];[Variables.$I$6];[Variables.$I$1];[.I228];[.J228];[.K228];[.L228];[.M228];[.N228];[.O228];[Variables.$I$2];[Variables.$I$6];[.P228];[Variables.$I$6];[.Q228];[Variables.$I$6];[.R228];[Variables.$I$6];[.S228];[Variables.$I$6];[.T228];IF([.U228]&lt;&gt;&quot;&quot;;CONCATENATE([Variables.$I$6];[.U228]);&quot;&quot;);[Variables.$I$2];[Variables.$I$6]);IF([.B228]&lt;&gt;&quot;&quot;;CONCATENATE(&quot;#&quot;;[.B228]);&quot;&quot;))" office:value-type="string" office:string-value="[&quot;i4_veteran_footman_of_rohan&quot;,&quot;Veteran_Footman_of_Rohan&quot;,&quot;Veteran_Footmen_of_Rohan&quot;,tf_rohan| tfg_shield| tfg_armor| tfg_helm| tfg_boots,0,0,fac_rohan,[itm_rohan_inf_helmet_b_bad,itm_mail_coif,itm_rohan_mail_cloak,itm_rohan_mail_good, itm_rohan_rider_bad,itm_dale_med_a_cloak,itm_rohan_scale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itm_mail_coif,itm_rohan_mail_cloak,itm_rohan_mail_good, itm_rohan_rider_bad,itm_dale_med_a_cloak,itm_rohan_scale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16362"/>
        </table:table-row>
        <table:table-row table:style-name="ro1">
          <table:table-cell table:style-name="ce6" table:formula="of:=IF(AND([.B229]&lt;&gt;&quot;&quot;;[.C229]&lt;&gt;&quot;&quot;);CONCATENATE([Variables.$I$1];[Variables.$I$7];[.B229];[Variables.$I$7];[Variables.$I$6];[Variables.$I$7];[.C229];[Variables.$I$7];[Variables.$I$6];[Variables.$I$7];[.D229];[Variables.$I$7];[Variables.$I$6];[.E229];[Variables.$I$6];[.F229];[Variables.$I$6];[.G229];[Variables.$I$6];[.H229];[Variables.$I$6];[Variables.$I$1];[.I229];[.J229];[.K229];[.L229];[.M229];[.N229];[.O229];[Variables.$I$2];[Variables.$I$6];[.P229];[Variables.$I$6];[.Q229];[Variables.$I$6];[.R229];[Variables.$I$6];[.S229];[Variables.$I$6];[.T229];IF([.U229]&lt;&gt;&quot;&quot;;CONCATENATE([Variables.$I$6];[.U229]);&quot;&quot;);[Variables.$I$2];[Variables.$I$6]);IF([.B229]&lt;&gt;&quot;&quot;;CONCATENATE(&quot;#&quot;;[.B229]);&quot;&quot;))" office:value-type="string" office:string-value="[&quot;i5_elite_footman_of_rohan&quot;,&quot;Elite_Footman_of_Rohan&quot;,&quot;Elite_Footmen_of_Rohan&quot;,tf_rohan| tfg_shield| tfg_armor| tfg_helm| tfg_boots,0,0,fac_rohan,[itm_rohan_inf_helmet_b,itm_mail_coif,itm_rohan_scale_cloak, itm_rohan_scale_good,itm_rohan_rider_good_cloak, itm_rohan_rider_good,itm_dale_med_a_good,itm_dale_med_a_lordly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mail_coif,itm_rohan_scale_cloak, itm_rohan_scale_good,itm_rohan_rider_good_cloak, itm_rohan_rider_good,itm_dale_med_a_good,itm_dale_med_a_lordly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style-name="ce7" office:value-type="string" calcext:value-type="string">
            <text:p>i5_elite_footman_of_rohan</text:p>
          </table:table-cell>
          <table:table-cell table:style-name="ce7" office:value-type="string" calcext:value-type="string">
            <text:p>Elite_Footman_of_Rohan</text:p>
          </table:table-cell>
          <table:table-cell table:style-name="ce7" office:value-type="string" calcext:value-type="string">
            <text:p>Elite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ohan</text:p>
          </table:table-cell>
          <table:table-cell table:style-name="ce11" office:value-type="string" calcext:value-type="string">
            <text:p>itm_rohan_inf_helmet_b,itm_mail_coif,</text:p>
          </table:table-cell>
          <table:table-cell table:style-name="ce11" office:value-type="string" calcext:value-type="string">
            <text:p>itm_rohan_scale_cloak, itm_rohan_scale_good,itm_rohan_rider_good_cloak, itm_rohan_rider_good,itm_dale_med_a_good,itm_dale_med_a_lordly,</text:p>
          </table:table-cell>
          <table:table-cell table:style-name="ce11"/>
          <table:table-cell table:style-name="ce11" office:value-type="string" calcext:value-type="string">
            <text:p>itm_rohirrim_war_greaves,</text:p>
          </table:table-cell>
          <table:table-cell table:style-name="ce11" office:value-type="string" calcext:value-type="string">
            <text:p>itm_rohirrim_long_hafted_axe,itm_rohirrim_short_axe,itm_rohan_spear,itm_rohan_sword_c,</text:p>
          </table:table-cell>
          <table:table-cell table:style-name="ce11" office:value-type="string" calcext:value-type="string">
            <text:p>itm_rohan_shield_d,itm_rohan_shield_e,itm_rohan_shield_f,</text:p>
          </table:table-cell>
          <table:table-cell table:style-name="ce11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3|knows_shield_2|knows_power_strike_3|knows_ironflesh_2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B229]&lt;&gt;&quot;&quot;;[.C229]&lt;&gt;&quot;&quot;);CONCATENATE([Variables.$I$1];[Variables.$I$7];[.B229];[Variables.$I$7];[Variables.$I$6];[Variables.$I$7];[.C229];[Variables.$I$7];[Variables.$I$6];[Variables.$I$7];[.D229];[Variables.$I$7];[Variables.$I$6];[.E229];[Variables.$I$6];[.F229];[Variables.$I$6];[.G229];[Variables.$I$6];[.H229];[Variables.$I$6];[Variables.$I$1];[.I229];[.J229];[.K229];[.L229];[.M229];[.N229];[.O229];[Variables.$I$2];[Variables.$I$6];[.P229];[Variables.$I$6];[.Q229];[Variables.$I$6];[.R229];[Variables.$I$6];[.S229];[Variables.$I$6];[.T229];IF([.U229]&lt;&gt;&quot;&quot;;CONCATENATE([Variables.$I$6];[.U229]);&quot;&quot;);[Variables.$I$2];[Variables.$I$6]);IF([.B229]&lt;&gt;&quot;&quot;;CONCATENATE(&quot;#&quot;;[.B229]);&quot;&quot;))" office:value-type="string" office:string-value="[&quot;i5_elite_footman_of_rohan&quot;,&quot;Elite_Footman_of_Rohan&quot;,&quot;Elite_Footmen_of_Rohan&quot;,tf_rohan| tfg_shield| tfg_armor| tfg_helm| tfg_boots,0,0,fac_rohan,[itm_rohan_inf_helmet_b,itm_mail_coif,itm_rohan_scale_cloak, itm_rohan_scale_good,itm_rohan_rider_good_cloak, itm_rohan_rider_good,itm_dale_med_a_good,itm_dale_med_a_lordly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mail_coif,itm_rohan_scale_cloak, itm_rohan_scale_good,itm_rohan_rider_good_cloak, itm_rohan_rider_good,itm_dale_med_a_good,itm_dale_med_a_lordly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16362"/>
        </table:table-row>
        <table:table-row table:style-name="ro1">
          <table:table-cell table:style-name="ce6" table:formula="of:=IF(AND([.B230]&lt;&gt;&quot;&quot;;[.C230]&lt;&gt;&quot;&quot;);CONCATENATE([Variables.$I$1];[Variables.$I$7];[.B230];[Variables.$I$7];[Variables.$I$6];[Variables.$I$7];[.C230];[Variables.$I$7];[Variables.$I$6];[Variables.$I$7];[.D230];[Variables.$I$7];[Variables.$I$6];[.E230];[Variables.$I$6];[.F230];[Variables.$I$6];[.G230];[Variables.$I$6];[.H230];[Variables.$I$6];[Variables.$I$1];[.I230];[.J230];[.K230];[.L230];[.M230];[.N230];[.O230];[Variables.$I$2];[Variables.$I$6];[.P230];[Variables.$I$6];[.Q230];[Variables.$I$6];[.R230];[Variables.$I$6];[.S230];[Variables.$I$6];[.T230];IF([.U230]&lt;&gt;&quot;&quot;;CONCATENATE([Variables.$I$6];[.U230]);&quot;&quot;);[Variables.$I$2];[Variables.$I$6]);IF([.B230]&lt;&gt;&quot;&quot;;CONCATENATE(&quot;#&quot;;[.B230]);&quot;&quot;))" office:value-type="string" office:string-value="[&quot;i6_footman_guard_of_rohan&quot;,&quot;Folcwine_Guard_of_Rohan&quot;,&quot;Folcwine_Guards_of_Rohan&quot;,tf_rohan| tfg_shield| tfg_armor| tfg_helm| tfg_boots,0,0,fac_rohan,[itm_rohan_inf_helmet_b_good,itm_mail_coif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evil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mail_coif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evil_tier_6,wp_tier_6,knows_common|knows_athletics_3|knows_shield_4|knows_power_throw_4|knows_power_strike_6|knows_ironflesh_4,rohan_face_middle_1,rohan_face_old_2],</text:p>
          </table:table-cell>
          <table:table-cell table:style-name="ce7" office:value-type="string" calcext:value-type="string">
            <text:p>i6_footman_guard_of_rohan</text:p>
          </table:table-cell>
          <table:table-cell table:style-name="ce7" office:value-type="string" calcext:value-type="string">
            <text:p>Folcwine_Guard_of_Rohan</text:p>
          </table:table-cell>
          <table:table-cell table:style-name="ce7" office:value-type="string" calcext:value-type="string">
            <text:p>Folcwine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ohan</text:p>
          </table:table-cell>
          <table:table-cell table:style-name="ce11" office:value-type="string" calcext:value-type="string">
            <text:p>itm_rohan_inf_helmet_b_good,itm_mail_coif_good,</text:p>
          </table:table-cell>
          <table:table-cell table:style-name="ce11" office:value-type="string" calcext:value-type="string">
            <text:p>itm_rohan_surcoat_cloak,itm_rohan_surcoat_good_cloak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rohirrim_war_greaves,</text:p>
          </table:table-cell>
          <table:table-cell table:style-name="ce11" office:value-type="string" calcext:value-type="string">
            <text:p>itm_rohirrim_long_hafted_axe,itm_rohirrim_short_axe,itm_rohan_sword_c,</text:p>
          </table:table-cell>
          <table:table-cell table:style-name="ce11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1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3|knows_shield_4|knows_power_throw_4|knows_power_strike_6|knows_ironflesh_4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B230]&lt;&gt;&quot;&quot;;[.C230]&lt;&gt;&quot;&quot;);CONCATENATE([Variables.$I$1];[Variables.$I$7];[.B230];[Variables.$I$7];[Variables.$I$6];[Variables.$I$7];[.C230];[Variables.$I$7];[Variables.$I$6];[Variables.$I$7];[.D230];[Variables.$I$7];[Variables.$I$6];[.E230];[Variables.$I$6];[.F230];[Variables.$I$6];[.G230];[Variables.$I$6];[.H230];[Variables.$I$6];[Variables.$I$1];[.I230];[.J230];[.K230];[.L230];[.M230];[.N230];[.O230];[Variables.$I$2];[Variables.$I$6];[.P230];[Variables.$I$6];[.Q230];[Variables.$I$6];[.R230];[Variables.$I$6];[.S230];[Variables.$I$6];[.T230];IF([.U230]&lt;&gt;&quot;&quot;;CONCATENATE([Variables.$I$6];[.U230]);&quot;&quot;);[Variables.$I$2];[Variables.$I$6]);IF([.B230]&lt;&gt;&quot;&quot;;CONCATENATE(&quot;#&quot;;[.B230]);&quot;&quot;))" office:value-type="string" office:string-value="[&quot;i6_footman_guard_of_rohan&quot;,&quot;Folcwine_Guard_of_Rohan&quot;,&quot;Folcwine_Guards_of_Rohan&quot;,tf_rohan| tfg_shield| tfg_armor| tfg_helm| tfg_boots,0,0,fac_rohan,[itm_rohan_inf_helmet_b_good,itm_mail_coif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evil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mail_coif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evil_tier_6,wp_tier_6,knows_common|knows_athletics_3|knows_shield_4|knows_power_throw_4|knows_power_strike_6|knows_ironflesh_4,rohan_face_middle_1,rohan_face_old_2],</text:p>
          </table:table-cell>
          <table:table-cell table:number-columns-repeated="16362"/>
        </table:table-row>
        <table:table-row table:style-name="ro1">
          <table:table-cell table:style-name="ce6" table:formula="of:=IF(AND([.B231]&lt;&gt;&quot;&quot;;[.C231]&lt;&gt;&quot;&quot;);CONCATENATE([Variables.$I$1];[Variables.$I$7];[.B231];[Variables.$I$7];[Variables.$I$6];[Variables.$I$7];[.C231];[Variables.$I$7];[Variables.$I$6];[Variables.$I$7];[.D231];[Variables.$I$7];[Variables.$I$6];[.E231];[Variables.$I$6];[.F231];[Variables.$I$6];[.G231];[Variables.$I$6];[.H231];[Variables.$I$6];[Variables.$I$1];[.I231];[.J231];[.K231];[.L231];[.M231];[.N231];[.O231];[Variables.$I$2];[Variables.$I$6];[.P231];[Variables.$I$6];[.Q231];[Variables.$I$6];[.R231];[Variables.$I$6];[.S231];[Variables.$I$6];[.T231];IF([.U231]&lt;&gt;&quot;&quot;;CONCATENATE([Variables.$I$6];[.U231]);&quot;&quot;);[Variables.$I$2];[Variables.$I$6]);IF([.B231]&lt;&gt;&quot;&quot;;CONCATENATE(&quot;#&quot;;[.B231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dale_med_a_good,itm_dale_med_a_lordly,itm_rohan_light_greaves,itm_rohirrim_long_hafted_axe,itm_rohirrim_short_axe,itm_heavy_throwing_spear,itm_heavy_throwing_spear,itm_rohirrim_throwing_axe,itm_rohirrim_throwing_axe,itm_rohan_shield_a,itm_rohan_shield_b,itm_rohan_shield_c,itm_marker_night_troop,],attr_evil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dale_med_a_good,itm_dale_med_a_lordly,itm_rohan_light_greaves,itm_rohirrim_long_hafted_axe,itm_rohirrim_short_axe,itm_heavy_throwing_spear,itm_heavy_throwing_spear,itm_rohirrim_throwing_axe,itm_rohirrim_throwing_axe,itm_rohan_shield_a,itm_rohan_shield_b,itm_rohan_shield_c,itm_marker_night_troop,],attr_evil_tier_6,wp_tier_6,knows_common|knows_athletics_7|knows_shield_3|knows_power_throw_6|knows_power_strike_6|knows_ironflesh_5,rohan_face_middle_1,rohan_face_old_2],</text:p>
          </table:table-cell>
          <table:table-cell table:style-name="ce7" office:value-type="string" calcext:value-type="string">
            <text:p>i6_frealaf_raider</text:p>
          </table:table-cell>
          <table:table-cell table:style-name="ce7" office:value-type="string" calcext:value-type="string">
            <text:p>Frealaf_Raider</text:p>
          </table:table-cell>
          <table:table-cell table:style-name="ce7" office:value-type="string" calcext:value-type="string">
            <text:p>Frealaf_Raiders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ohan</text:p>
          </table:table-cell>
          <table:table-cell table:style-name="ce11" office:value-type="string" calcext:value-type="string">
            <text:p>itm_rohan_light_helmet_b,itm_rohan_light_helmet_a,</text:p>
          </table:table-cell>
          <table:table-cell table:style-name="ce11" office:value-type="string" calcext:value-type="string">
            <text:p>itm_rohan_rider_cloak,itm_rohan_rider_good_cloak,itm_dale_med_a_good,itm_dale_med_a_lordly,</text:p>
          </table:table-cell>
          <table:table-cell table:style-name="ce11"/>
          <table:table-cell table:style-name="ce11" office:value-type="string" calcext:value-type="string">
            <text:p>itm_rohan_light_greaves,</text:p>
          </table:table-cell>
          <table:table-cell table:style-name="ce11" office:value-type="string" calcext:value-type="string">
            <text:p>itm_rohirrim_long_hafted_axe,itm_rohirrim_short_axe,</text:p>
          </table:table-cell>
          <table:table-cell table:style-name="ce11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1" office:value-type="string" calcext:value-type="string">
            <text:p>itm_marker_night_troop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7|knows_shield_3|knows_power_throw_6|knows_power_strike_6|knows_ironflesh_5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B231]&lt;&gt;&quot;&quot;;[.C231]&lt;&gt;&quot;&quot;);CONCATENATE([Variables.$I$1];[Variables.$I$7];[.B231];[Variables.$I$7];[Variables.$I$6];[Variables.$I$7];[.C231];[Variables.$I$7];[Variables.$I$6];[Variables.$I$7];[.D231];[Variables.$I$7];[Variables.$I$6];[.E231];[Variables.$I$6];[.F231];[Variables.$I$6];[.G231];[Variables.$I$6];[.H231];[Variables.$I$6];[Variables.$I$1];[.I231];[.J231];[.K231];[.L231];[.M231];[.N231];[.O231];[Variables.$I$2];[Variables.$I$6];[.P231];[Variables.$I$6];[.Q231];[Variables.$I$6];[.R231];[Variables.$I$6];[.S231];[Variables.$I$6];[.T231];IF([.U231]&lt;&gt;&quot;&quot;;CONCATENATE([Variables.$I$6];[.U231]);&quot;&quot;);[Variables.$I$2];[Variables.$I$6]);IF([.B231]&lt;&gt;&quot;&quot;;CONCATENATE(&quot;#&quot;;[.B231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dale_med_a_good,itm_dale_med_a_lordly,itm_rohan_light_greaves,itm_rohirrim_long_hafted_axe,itm_rohirrim_short_axe,itm_heavy_throwing_spear,itm_heavy_throwing_spear,itm_rohirrim_throwing_axe,itm_rohirrim_throwing_axe,itm_rohan_shield_a,itm_rohan_shield_b,itm_rohan_shield_c,itm_marker_night_troop,],attr_evil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dale_med_a_good,itm_dale_med_a_lordly,itm_rohan_light_greaves,itm_rohirrim_long_hafted_axe,itm_rohirrim_short_axe,itm_heavy_throwing_spear,itm_heavy_throwing_spear,itm_rohirrim_throwing_axe,itm_rohirrim_throwing_axe,itm_rohan_shield_a,itm_rohan_shield_b,itm_rohan_shield_c,itm_marker_night_troop,],attr_evil_tier_6,wp_tier_6,knows_common|knows_athletics_7|knows_shield_3|knows_power_throw_6|knows_power_strike_6|knows_ironflesh_5,rohan_face_middle_1,rohan_face_old_2],</text:p>
          </table:table-cell>
          <table:table-cell table:number-columns-repeated="16362"/>
        </table:table-row>
        <table:table-row table:style-name="ro1">
          <table:table-cell table:style-name="ce6" table:formula="of:=IF(AND([.B232]&lt;&gt;&quot;&quot;;[.C232]&lt;&gt;&quot;&quot;);CONCATENATE([Variables.$I$1];[Variables.$I$7];[.B232];[Variables.$I$7];[Variables.$I$6];[Variables.$I$7];[.C232];[Variables.$I$7];[Variables.$I$6];[Variables.$I$7];[.D232];[Variables.$I$7];[Variables.$I$6];[.E232];[Variables.$I$6];[.F232];[Variables.$I$6];[.G232];[Variables.$I$6];[.H232];[Variables.$I$6];[Variables.$I$1];[.I232];[.J232];[.K232];[.L232];[.M232];[.N232];[.O232];[Variables.$I$2];[Variables.$I$6];[.P232];[Variables.$I$6];[.Q232];[Variables.$I$6];[.R232];[Variables.$I$6];[.S232];[Variables.$I$6];[.T232];IF([.U232]&lt;&gt;&quot;&quot;;CONCATENATE([Variables.$I$6];[.U232]);&quot;&quot;);[Variables.$I$2];[Variables.$I$6]);IF([.B232]&lt;&gt;&quot;&quot;;CONCATENATE(&quot;#&quot;;[.B232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style-name="ce7" office:value-type="string" calcext:value-type="string">
            <text:p>i5_raider_of_rohan</text:p>
          </table:table-cell>
          <table:table-cell table:style-name="ce7" office:value-type="string" calcext:value-type="string">
            <text:p>Raider_of_Rohan</text:p>
          </table:table-cell>
          <table:table-cell table:style-name="ce7" office:value-type="string" calcext:value-type="string">
            <text:p>Raiders_of_Rohan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ohan</text:p>
          </table:table-cell>
          <table:table-cell table:style-name="ce11" office:value-type="string" calcext:value-type="string">
            <text:p>itm_rohan_light_helmet_a_bad,itm_rohan_light_helmet_b_bad,</text:p>
          </table:table-cell>
          <table:table-cell table:style-name="ce11" office:value-type="string" calcext:value-type="string">
            <text:p>itm_rohan_mail, itm_rohan_mail_cloak,itm_rohan_mail_good, itm_rohan_rider_bad,itm_dale_light_b_cloak,itm_dale_light_b_good,</text:p>
          </table:table-cell>
          <table:table-cell table:style-name="ce11"/>
          <table:table-cell table:style-name="ce11" office:value-type="string" calcext:value-type="string">
            <text:p>itm_leather_boots,</text:p>
          </table:table-cell>
          <table:table-cell table:style-name="ce11" office:value-type="string" calcext:value-type="string">
            <text:p>itm_rohirrim_long_hafted_axe,itm_rohirrim_short_axe,</text:p>
          </table:table-cell>
          <table:table-cell table:style-name="ce11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1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5|knows_shield_2|knows_power_throw_4|knows_power_strike_4|knows_ironflesh_3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B232]&lt;&gt;&quot;&quot;;[.C232]&lt;&gt;&quot;&quot;);CONCATENATE([Variables.$I$1];[Variables.$I$7];[.B232];[Variables.$I$7];[Variables.$I$6];[Variables.$I$7];[.C232];[Variables.$I$7];[Variables.$I$6];[Variables.$I$7];[.D232];[Variables.$I$7];[Variables.$I$6];[.E232];[Variables.$I$6];[.F232];[Variables.$I$6];[.G232];[Variables.$I$6];[.H232];[Variables.$I$6];[Variables.$I$1];[.I232];[.J232];[.K232];[.L232];[.M232];[.N232];[.O232];[Variables.$I$2];[Variables.$I$6];[.P232];[Variables.$I$6];[.Q232];[Variables.$I$6];[.R232];[Variables.$I$6];[.S232];[Variables.$I$6];[.T232];IF([.U232]&lt;&gt;&quot;&quot;;CONCATENATE([Variables.$I$6];[.U232]);&quot;&quot;);[Variables.$I$2];[Variables.$I$6]);IF([.B232]&lt;&gt;&quot;&quot;;CONCATENATE(&quot;#&quot;;[.B232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16362"/>
        </table:table-row>
        <table:table-row table:style-name="ro1">
          <table:table-cell table:style-name="ce6" table:formula="of:=IF(AND([.B233]&lt;&gt;&quot;&quot;;[.C233]&lt;&gt;&quot;&quot;);CONCATENATE([Variables.$I$1];[Variables.$I$7];[.B233];[Variables.$I$7];[Variables.$I$6];[Variables.$I$7];[.C233];[Variables.$I$7];[Variables.$I$6];[Variables.$I$7];[.D233];[Variables.$I$7];[Variables.$I$6];[.E233];[Variables.$I$6];[.F233];[Variables.$I$6];[.G233];[Variables.$I$6];[.H233];[Variables.$I$6];[Variables.$I$1];[.I233];[.J233];[.K233];[.L233];[.M233];[.N233];[.O233];[Variables.$I$2];[Variables.$I$6];[.P233];[Variables.$I$6];[.Q233];[Variables.$I$6];[.R233];[Variables.$I$6];[.S233];[Variables.$I$6];[.T233];IF([.U233]&lt;&gt;&quot;&quot;;CONCATENATE([Variables.$I$6];[.U233]);&quot;&quot;);[Variables.$I$2];[Variables.$I$6]);IF([.B233]&lt;&gt;&quot;&quot;;CONCATENATE(&quot;#&quot;;[.B233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evil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evil_tier_6,wp_tier_6,knows_common|knows_athletics_3|knows_shield_5|knows_power_strike_5|knows_ironflesh_6,rohan_face_old_1,rohan_face_older_2],</text:p>
          </table:table-cell>
          <table:table-cell table:style-name="ce7" office:value-type="string" calcext:value-type="string">
            <text:p>i6_warden_of_methuseld</text:p>
          </table:table-cell>
          <table:table-cell table:style-name="ce7" office:value-type="string" calcext:value-type="string">
            <text:p>Warden_of_Meduseld</text:p>
          </table:table-cell>
          <table:table-cell table:style-name="ce7" office:value-type="string" calcext:value-type="string">
            <text:p>Wardens_of_Meduseld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ohan</text:p>
          </table:table-cell>
          <table:table-cell table:style-name="ce11" office:value-type="string" calcext:value-type="string">
            <text:p>itm_rohan_archer_helmet_c_good,itm_rohan_archer_helmet_c_bad,</text:p>
          </table:table-cell>
          <table:table-cell table:style-name="ce11" office:value-type="string" calcext:value-type="string">
            <text:p><text:s/>itm_rohan_guard_cloak, itm_rohan_guard_good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rohirrim_war_greaves,</text:p>
          </table:table-cell>
          <table:table-cell table:style-name="ce11" office:value-type="string" calcext:value-type="string">
            <text:p>itm_rohan_spear,itm_rohan_lance_banner_sun,itm_rohan_lance_banner_horse,</text:p>
          </table:table-cell>
          <table:table-cell table:style-name="ce11" office:value-type="string" calcext:value-type="string">
            <text:p>itm_rohan_shield_g,</text:p>
          </table:table-cell>
          <table:table-cell table:style-name="ce11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3|knows_shield_5|knows_power_strike_5|knows_ironflesh_6</text:p>
          </table:table-cell>
          <table:table-cell table:style-name="ce14" office:value-type="string" calcext:value-type="string">
            <text:p>rohan_face_old_1</text:p>
          </table:table-cell>
          <table:table-cell table:style-name="ce14" office:value-type="string" calcext:value-type="string">
            <text:p>rohan_face_older_2</text:p>
          </table:table-cell>
          <table:table-cell table:style-name="ce15"/>
          <table:table-cell table:style-name="ce6" table:formula="of:=IF(AND([.B233]&lt;&gt;&quot;&quot;;[.C233]&lt;&gt;&quot;&quot;);CONCATENATE([Variables.$I$1];[Variables.$I$7];[.B233];[Variables.$I$7];[Variables.$I$6];[Variables.$I$7];[.C233];[Variables.$I$7];[Variables.$I$6];[Variables.$I$7];[.D233];[Variables.$I$7];[Variables.$I$6];[.E233];[Variables.$I$6];[.F233];[Variables.$I$6];[.G233];[Variables.$I$6];[.H233];[Variables.$I$6];[Variables.$I$1];[.I233];[.J233];[.K233];[.L233];[.M233];[.N233];[.O233];[Variables.$I$2];[Variables.$I$6];[.P233];[Variables.$I$6];[.Q233];[Variables.$I$6];[.R233];[Variables.$I$6];[.S233];[Variables.$I$6];[.T233];IF([.U233]&lt;&gt;&quot;&quot;;CONCATENATE([Variables.$I$6];[.U233]);&quot;&quot;);[Variables.$I$2];[Variables.$I$6]);IF([.B233]&lt;&gt;&quot;&quot;;CONCATENATE(&quot;#&quot;;[.B233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evil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evil_tier_6,wp_tier_6,knows_common|knows_athletics_3|knows_shield_5|knows_power_strike_5|knows_ironflesh_6,rohan_face_old_1,rohan_face_older_2],</text:p>
          </table:table-cell>
          <table:table-cell table:number-columns-repeated="16362"/>
        </table:table-row>
        <table:table-row table:style-name="ro1">
          <table:table-cell table:style-name="ce6" table:formula="of:=IF(AND([.B234]&lt;&gt;&quot;&quot;;[.C234]&lt;&gt;&quot;&quot;);CONCATENATE([Variables.$I$1];[Variables.$I$7];[.B234];[Variables.$I$7];[Variables.$I$6];[Variables.$I$7];[.C234];[Variables.$I$7];[Variables.$I$6];[Variables.$I$7];[.D234];[Variables.$I$7];[Variables.$I$6];[.E234];[Variables.$I$6];[.F234];[Variables.$I$6];[.G234];[Variables.$I$6];[.H234];[Variables.$I$6];[Variables.$I$1];[.I234];[.J234];[.K234];[.L234];[.M234];[.N234];[.O234];[Variables.$I$2];[Variables.$I$6];[.P234];[Variables.$I$6];[.Q234];[Variables.$I$6];[.R234];[Variables.$I$6];[.S234];[Variables.$I$6];[.T234];IF([.U234]&lt;&gt;&quot;&quot;;CONCATENATE([Variables.$I$6];[.U234]);&quot;&quot;);[Variables.$I$2];[Variables.$I$6]);IF([.B234]&lt;&gt;&quot;&quot;;CONCATENATE(&quot;#&quot;;[.B234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</text:p>
          </table:table-cell>
          <table:table-cell table:style-name="ce7" office:value-type="string" calcext:value-type="string">
            <text:p>ac3_skirmisher_of_rohan</text:p>
          </table:table-cell>
          <table:table-cell table:style-name="ce7" office:value-type="string" calcext:value-type="string">
            <text:p>Skirmisher_of_Rohan</text:p>
          </table:table-cell>
          <table:table-cell table:style-name="ce7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ohan</text:p>
          </table:table-cell>
          <table:table-cell table:style-name="ce11" office:value-type="string" calcext:value-type="string">
            <text:p>itm_rohan_light_helmet_a,itm_rohan_light_helmet_b,itm_rohan_light_helmet_b_good,</text:p>
          </table:table-cell>
          <table:table-cell table:style-name="ce11" office:value-type="string" calcext:value-type="string">
            <text:p>itm_rohan_recruit_good, itm_rohan_leather_bad, itm_rohan_leather,itm_dale_light_b_bad,itm_north_leather_good,</text:p>
          </table:table-cell>
          <table:table-cell table:style-name="ce11"/>
          <table:table-cell table:style-name="ce11" office:value-type="string" calcext:value-type="string">
            <text:p>itm_rohan_shoes,itm_leather_boots_bad,</text:p>
          </table:table-cell>
          <table:table-cell table:style-name="ce11" office:value-type="string" calcext:value-type="string">
            <text:p>itm_nomad_bow,itm_khergit_arrows,</text:p>
          </table:table-cell>
          <table:table-cell table:style-name="ce11" office:value-type="string" calcext:value-type="string">
            <text:p>itm_rohan_sword_c,itm_spear,</text:p>
          </table:table-cell>
          <table:table-cell table:style-name="ce11" office:value-type="string" calcext:value-type="string">
            <text:p>itm_rohirrim_courser,</text:p>
          </table:table-cell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bow_3</text:p>
          </table:table-cell>
          <table:table-cell table:style-name="ce12" office:value-type="string" calcext:value-type="string">
            <text:p>knows_common|knows_horse_archery_3|knows_shield_1| knows_riding_3|knows_power_draw_1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middle_2</text:p>
          </table:table-cell>
          <table:table-cell table:style-name="ce15"/>
          <table:table-cell table:style-name="ce6" table:formula="of:=IF(AND([.B234]&lt;&gt;&quot;&quot;;[.C234]&lt;&gt;&quot;&quot;);CONCATENATE([Variables.$I$1];[Variables.$I$7];[.B234];[Variables.$I$7];[Variables.$I$6];[Variables.$I$7];[.C234];[Variables.$I$7];[Variables.$I$6];[Variables.$I$7];[.D234];[Variables.$I$7];[Variables.$I$6];[.E234];[Variables.$I$6];[.F234];[Variables.$I$6];[.G234];[Variables.$I$6];[.H234];[Variables.$I$6];[Variables.$I$1];[.I234];[.J234];[.K234];[.L234];[.M234];[.N234];[.O234];[Variables.$I$2];[Variables.$I$6];[.P234];[Variables.$I$6];[.Q234];[Variables.$I$6];[.R234];[Variables.$I$6];[.S234];[Variables.$I$6];[.T234];IF([.U234]&lt;&gt;&quot;&quot;;CONCATENATE([Variables.$I$6];[.U234]);&quot;&quot;);[Variables.$I$2];[Variables.$I$6]);IF([.B234]&lt;&gt;&quot;&quot;;CONCATENATE(&quot;#&quot;;[.B234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</text:p>
          </table:table-cell>
          <table:table-cell table:number-columns-repeated="16362"/>
        </table:table-row>
        <table:table-row table:style-name="ro1">
          <table:table-cell table:style-name="ce6" table:formula="of:=IF(AND([.B235]&lt;&gt;&quot;&quot;;[.C235]&lt;&gt;&quot;&quot;);CONCATENATE([Variables.$I$1];[Variables.$I$7];[.B235];[Variables.$I$7];[Variables.$I$6];[Variables.$I$7];[.C235];[Variables.$I$7];[Variables.$I$6];[Variables.$I$7];[.D235];[Variables.$I$7];[Variables.$I$6];[.E235];[Variables.$I$6];[.F235];[Variables.$I$6];[.G235];[Variables.$I$6];[.H235];[Variables.$I$6];[Variables.$I$1];[.I235];[.J235];[.K235];[.L235];[.M235];[.N235];[.O235];[Variables.$I$2];[Variables.$I$6];[.P235];[Variables.$I$6];[.Q235];[Variables.$I$6];[.R235];[Variables.$I$6];[.S235];[Variables.$I$6];[.T235];IF([.U235]&lt;&gt;&quot;&quot;;CONCATENATE([Variables.$I$6];[.U235]);&quot;&quot;);[Variables.$I$2];[Variables.$I$6]);IF([.B235]&lt;&gt;&quot;&quot;;CONCATENATE(&quot;#&quot;;[.B235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</text:p>
          </table:table-cell>
          <table:table-cell table:style-name="ce7" office:value-type="string" calcext:value-type="string">
            <text:p>ac4_veteran_skirmisher_of_rohan</text:p>
          </table:table-cell>
          <table:table-cell table:style-name="ce7" office:value-type="string" calcext:value-type="string">
            <text:p>Veteran_Skirmisher_of_Rohan</text:p>
          </table:table-cell>
          <table:table-cell table:style-name="ce7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ohan</text:p>
          </table:table-cell>
          <table:table-cell table:style-name="ce11" office:value-type="string" calcext:value-type="string">
            <text:p>itm_rohan_light_helmet_a,itm_rohan_light_helmet_b_good,itm_rohan_archer_helmet_a_bad,</text:p>
          </table:table-cell>
          <table:table-cell table:style-name="ce11" office:value-type="string" calcext:value-type="string">
            <text:p>itm_rohan_leather_good,itm_rohan_mail_bad, itm_rohan_mail,itm_dale_light_b,</text:p>
          </table:table-cell>
          <table:table-cell table:style-name="ce11"/>
          <table:table-cell table:style-name="ce11" office:value-type="string" calcext:value-type="string">
            <text:p>itm_leather_boots,</text:p>
          </table:table-cell>
          <table:table-cell table:style-name="ce11" office:value-type="string" calcext:value-type="string">
            <text:p>itm_nomad_bow,itm_khergit_arrows,</text:p>
          </table:table-cell>
          <table:table-cell table:style-name="ce11" office:value-type="string" calcext:value-type="string">
            <text:p>itm_rohirrim_long_hafted_axe,itm_rohan_sword_c,</text:p>
          </table:table-cell>
          <table:table-cell table:style-name="ce11" office:value-type="string" calcext:value-type="string">
            <text:p>itm_rohirrim_courser,itm_rohirrim_hunter,</text:p>
          </table:table-cell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bow_4</text:p>
          </table:table-cell>
          <table:table-cell table:style-name="ce12" office:value-type="string" calcext:value-type="string">
            <text:p>knows_common|knows_horse_archery_5|knows_riding_4|knows_power_draw_3|knows_power_strike_2|knows_ironflesh_1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B235]&lt;&gt;&quot;&quot;;[.C235]&lt;&gt;&quot;&quot;);CONCATENATE([Variables.$I$1];[Variables.$I$7];[.B235];[Variables.$I$7];[Variables.$I$6];[Variables.$I$7];[.C235];[Variables.$I$7];[Variables.$I$6];[Variables.$I$7];[.D235];[Variables.$I$7];[Variables.$I$6];[.E235];[Variables.$I$6];[.F235];[Variables.$I$6];[.G235];[Variables.$I$6];[.H235];[Variables.$I$6];[Variables.$I$1];[.I235];[.J235];[.K235];[.L235];[.M235];[.N235];[.O235];[Variables.$I$2];[Variables.$I$6];[.P235];[Variables.$I$6];[.Q235];[Variables.$I$6];[.R235];[Variables.$I$6];[.S235];[Variables.$I$6];[.T235];IF([.U235]&lt;&gt;&quot;&quot;;CONCATENATE([Variables.$I$6];[.U235]);&quot;&quot;);[Variables.$I$2];[Variables.$I$6]);IF([.B235]&lt;&gt;&quot;&quot;;CONCATENATE(&quot;#&quot;;[.B235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</text:p>
          </table:table-cell>
          <table:table-cell table:number-columns-repeated="16362"/>
        </table:table-row>
        <table:table-row table:style-name="ro1">
          <table:table-cell table:style-name="ce6" table:formula="of:=IF(AND([.B236]&lt;&gt;&quot;&quot;;[.C236]&lt;&gt;&quot;&quot;);CONCATENATE([Variables.$I$1];[Variables.$I$7];[.B236];[Variables.$I$7];[Variables.$I$6];[Variables.$I$7];[.C236];[Variables.$I$7];[Variables.$I$6];[Variables.$I$7];[.D236];[Variables.$I$7];[Variables.$I$6];[.E236];[Variables.$I$6];[.F236];[Variables.$I$6];[.G236];[Variables.$I$6];[.H236];[Variables.$I$6];[Variables.$I$1];[.I236];[.J236];[.K236];[.L236];[.M236];[.N236];[.O236];[Variables.$I$2];[Variables.$I$6];[.P236];[Variables.$I$6];[.Q236];[Variables.$I$6];[.R236];[Variables.$I$6];[.S236];[Variables.$I$6];[.T236];IF([.U236]&lt;&gt;&quot;&quot;;CONCATENATE([Variables.$I$6];[.U236]);&quot;&quot;);[Variables.$I$2];[Variables.$I$6]);IF([.B236]&lt;&gt;&quot;&quot;;CONCATENATE(&quot;#&quot;;[.B236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</text:p>
          </table:table-cell>
          <table:table-cell table:style-name="ce7" office:value-type="string" calcext:value-type="string">
            <text:p>ac5_elite_skirmisher_of_rohan</text:p>
          </table:table-cell>
          <table:table-cell table:style-name="ce7" office:value-type="string" calcext:value-type="string">
            <text:p>Elite_Skirmisher_of_Rohan</text:p>
          </table:table-cell>
          <table:table-cell table:style-name="ce7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ohan</text:p>
          </table:table-cell>
          <table:table-cell table:style-name="ce11" office:value-type="string" calcext:value-type="string">
            <text:p>itm_rohan_archer_helmet_a,itm_rohan_light_helmet_a,</text:p>
          </table:table-cell>
          <table:table-cell table:style-name="ce11" office:value-type="string" calcext:value-type="string">
            <text:p>itm_rohan_mail_good, itm_rohan_rider,itm_rohan_rider_bad,itm_dale_light_b_good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rohan_light_greaves,itm_leather_boots,</text:p>
          </table:table-cell>
          <table:table-cell table:style-name="ce11" office:value-type="string" calcext:value-type="string">
            <text:p>itm_strong_bow,itm_khergit_arrows,</text:p>
          </table:table-cell>
          <table:table-cell table:style-name="ce11" office:value-type="string" calcext:value-type="string">
            <text:p>itm_rohan_spear,itm_rohan_sword_c,itm_rohirrim_long_hafted_axe,</text:p>
          </table:table-cell>
          <table:table-cell table:style-name="ce11" office:value-type="string" calcext:value-type="string">
            <text:p>itm_rohirrim_courser2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bow_5</text:p>
          </table:table-cell>
          <table:table-cell table:style-name="ce12" office:value-type="string" calcext:value-type="string">
            <text:p>knows_common|knows_horse_archery_6|knows_riding_6|knows_power_draw_4|knows_power_strike_2|knows_ironflesh_2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B236]&lt;&gt;&quot;&quot;;[.C236]&lt;&gt;&quot;&quot;);CONCATENATE([Variables.$I$1];[Variables.$I$7];[.B236];[Variables.$I$7];[Variables.$I$6];[Variables.$I$7];[.C236];[Variables.$I$7];[Variables.$I$6];[Variables.$I$7];[.D236];[Variables.$I$7];[Variables.$I$6];[.E236];[Variables.$I$6];[.F236];[Variables.$I$6];[.G236];[Variables.$I$6];[.H236];[Variables.$I$6];[Variables.$I$1];[.I236];[.J236];[.K236];[.L236];[.M236];[.N236];[.O236];[Variables.$I$2];[Variables.$I$6];[.P236];[Variables.$I$6];[.Q236];[Variables.$I$6];[.R236];[Variables.$I$6];[.S236];[Variables.$I$6];[.T236];IF([.U236]&lt;&gt;&quot;&quot;;CONCATENATE([Variables.$I$6];[.U236]);&quot;&quot;);[Variables.$I$2];[Variables.$I$6]);IF([.B236]&lt;&gt;&quot;&quot;;CONCATENATE(&quot;#&quot;;[.B236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</text:p>
          </table:table-cell>
          <table:table-cell table:number-columns-repeated="16362"/>
        </table:table-row>
        <table:table-row table:style-name="ro1">
          <table:table-cell table:style-name="ce6" table:formula="of:=IF(AND([.B237]&lt;&gt;&quot;&quot;;[.C237]&lt;&gt;&quot;&quot;);CONCATENATE([Variables.$I$1];[Variables.$I$7];[.B237];[Variables.$I$7];[Variables.$I$6];[Variables.$I$7];[.C237];[Variables.$I$7];[Variables.$I$6];[Variables.$I$7];[.D237];[Variables.$I$7];[Variables.$I$6];[.E237];[Variables.$I$6];[.F237];[Variables.$I$6];[.G237];[Variables.$I$6];[.H237];[Variables.$I$6];[Variables.$I$1];[.I237];[.J237];[.K237];[.L237];[.M237];[.N237];[.O237];[Variables.$I$2];[Variables.$I$6];[.P237];[Variables.$I$6];[.Q237];[Variables.$I$6];[.R237];[Variables.$I$6];[.S237];[Variables.$I$6];[.T237];IF([.U237]&lt;&gt;&quot;&quot;;CONCATENATE([Variables.$I$6];[.U237]);&quot;&quot;);[Variables.$I$2];[Variables.$I$6]);IF([.B237]&lt;&gt;&quot;&quot;;CONCATENATE(&quot;#&quot;;[.B237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evil_tier_6,wp_tier_bow_6,knows_common|knows_horse_archery_8|knows_riding_7|knows_power_draw_5|knows_power_strike_3|knows_ironflesh_3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evil_tier_6,wp_tier_bow_6,knows_common|knows_horse_archery_8|knows_riding_7|knows_power_draw_5|knows_power_strike_3|knows_ironflesh_3,rohan_face_middle_1,rohan_face_old_2],</text:p>
          </table:table-cell>
          <table:table-cell table:style-name="ce7" office:value-type="string" calcext:value-type="string">
            <text:p>ac6_skirmisher_guard_of_rohan</text:p>
          </table:table-cell>
          <table:table-cell table:style-name="ce7" office:value-type="string" calcext:value-type="string">
            <text:p>Thengel_Guard_of_Rohan</text:p>
          </table:table-cell>
          <table:table-cell table:style-name="ce7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ohan</text:p>
          </table:table-cell>
          <table:table-cell table:style-name="ce11" office:value-type="string" calcext:value-type="string">
            <text:p>itm_rohan_archer_helmet_a_good,itm_rohan_light_helmet_a_good,</text:p>
          </table:table-cell>
          <table:table-cell table:style-name="ce11" office:value-type="string" calcext:value-type="string">
            <text:p>itm_rohan_surcoat_bad,itm_rohan_surcoat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rohan_light_greaves,</text:p>
          </table:table-cell>
          <table:table-cell table:style-name="ce11" office:value-type="string" calcext:value-type="string">
            <text:p>itm_strong_bow,itm_khergit_arrows,</text:p>
          </table:table-cell>
          <table:table-cell table:style-name="ce11" office:value-type="string" calcext:value-type="string">
            <text:p>itm_rohan_spear,itm_rohirrim_long_hafted_axe,</text:p>
          </table:table-cell>
          <table:table-cell table:style-name="ce11" office:value-type="string" calcext:value-type="string">
            <text:p>itm_rohan_warhorse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bow_6</text:p>
          </table:table-cell>
          <table:table-cell table:style-name="ce12" office:value-type="string" calcext:value-type="string">
            <text:p>knows_common|knows_horse_archery_8|knows_riding_7|knows_power_draw_5|knows_power_strike_3|knows_ironflesh_3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B237]&lt;&gt;&quot;&quot;;[.C237]&lt;&gt;&quot;&quot;);CONCATENATE([Variables.$I$1];[Variables.$I$7];[.B237];[Variables.$I$7];[Variables.$I$6];[Variables.$I$7];[.C237];[Variables.$I$7];[Variables.$I$6];[Variables.$I$7];[.D237];[Variables.$I$7];[Variables.$I$6];[.E237];[Variables.$I$6];[.F237];[Variables.$I$6];[.G237];[Variables.$I$6];[.H237];[Variables.$I$6];[Variables.$I$1];[.I237];[.J237];[.K237];[.L237];[.M237];[.N237];[.O237];[Variables.$I$2];[Variables.$I$6];[.P237];[Variables.$I$6];[.Q237];[Variables.$I$6];[.R237];[Variables.$I$6];[.S237];[Variables.$I$6];[.T237];IF([.U237]&lt;&gt;&quot;&quot;;CONCATENATE([Variables.$I$6];[.U237]);&quot;&quot;);[Variables.$I$2];[Variables.$I$6]);IF([.B237]&lt;&gt;&quot;&quot;;CONCATENATE(&quot;#&quot;;[.B237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evil_tier_6,wp_tier_bow_6,knows_common|knows_horse_archery_8|knows_riding_7|knows_power_draw_5|knows_power_strike_3|knows_ironflesh_3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evil_tier_6,wp_tier_bow_6,knows_common|knows_horse_archery_8|knows_riding_7|knows_power_draw_5|knows_power_strike_3|knows_ironflesh_3,rohan_face_middle_1,rohan_face_old_2],</text:p>
          </table:table-cell>
          <table:table-cell table:number-columns-repeated="16362"/>
        </table:table-row>
        <table:table-row table:style-name="ro1">
          <table:table-cell table:style-name="ce6" table:formula="of:=IF(AND([.B238]&lt;&gt;&quot;&quot;;[.C238]&lt;&gt;&quot;&quot;);CONCATENATE([Variables.$I$1];[Variables.$I$7];[.B238];[Variables.$I$7];[Variables.$I$6];[Variables.$I$7];[.C238];[Variables.$I$7];[Variables.$I$6];[Variables.$I$7];[.D238];[Variables.$I$7];[Variables.$I$6];[.E238];[Variables.$I$6];[.F238];[Variables.$I$6];[.G238];[Variables.$I$6];[.H238];[Variables.$I$6];[Variables.$I$1];[.I238];[.J238];[.K238];[.L238];[.M238];[.N238];[.O238];[Variables.$I$2];[Variables.$I$6];[.P238];[Variables.$I$6];[.Q238];[Variables.$I$6];[.R238];[Variables.$I$6];[.S238];[Variables.$I$6];[.T238];IF([.U238]&lt;&gt;&quot;&quot;;CONCATENATE([Variables.$I$6];[.U238]);&quot;&quot;);[Variables.$I$2];[Variables.$I$6]);IF([.B238]&lt;&gt;&quot;&quot;;CONCATENATE(&quot;#&quot;;[.B238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style-name="ce7" office:value-type="string" calcext:value-type="string">
            <text:p>c4_lancer_of_rohan</text:p>
          </table:table-cell>
          <table:table-cell table:style-name="ce7" office:value-type="string" calcext:value-type="string">
            <text:p>Lancer_of_Rohan</text:p>
          </table:table-cell>
          <table:table-cell table:style-name="ce7" office:value-type="string" calcext:value-type="string">
            <text:p>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ohan</text:p>
          </table:table-cell>
          <table:table-cell table:style-name="ce11" office:value-type="string" calcext:value-type="string">
            <text:p>itm_rohan_archer_helmet_a, itm_rohan_archer_helmet_b,itm_rohan_inf_helmet_a_bad, itm_rohan_inf_helmet_b_bad,</text:p>
          </table:table-cell>
          <table:table-cell table:style-name="ce11" office:value-type="string" calcext:value-type="string">
            <text:p>itm_rohan_mail_bad, itm_rohan_mail,itm_rohan_mail_cloak,itm_rohan_rider_bad,itm_rohan_rider_cloak,itm_dale_light_b_cloak,itm_dale_med_a_cloak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rohirrim_war_greaves,</text:p>
          </table:table-cell>
          <table:table-cell table:style-name="ce11" office:value-type="string" calcext:value-type="string">
            <text:p>itm_rohan_lance,</text:p>
          </table:table-cell>
          <table:table-cell table:style-name="ce11" office:value-type="string" calcext:value-type="string">
            <text:p>itm_rohan_cav_sword,itm_rohan_shield_a,itm_rohan_shield_b,itm_rohan_shield_c,</text:p>
          </table:table-cell>
          <table:table-cell table:style-name="ce11" office:value-type="string" calcext:value-type="string">
            <text:p>itm_rohirrim_courser2,</text:p>
          </table:table-cell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riding_4|knows_shield_1|knows_power_strike_4|knows_ironflesh_2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B238]&lt;&gt;&quot;&quot;;[.C238]&lt;&gt;&quot;&quot;);CONCATENATE([Variables.$I$1];[Variables.$I$7];[.B238];[Variables.$I$7];[Variables.$I$6];[Variables.$I$7];[.C238];[Variables.$I$7];[Variables.$I$6];[Variables.$I$7];[.D238];[Variables.$I$7];[Variables.$I$6];[.E238];[Variables.$I$6];[.F238];[Variables.$I$6];[.G238];[Variables.$I$6];[.H238];[Variables.$I$6];[Variables.$I$1];[.I238];[.J238];[.K238];[.L238];[.M238];[.N238];[.O238];[Variables.$I$2];[Variables.$I$6];[.P238];[Variables.$I$6];[.Q238];[Variables.$I$6];[.R238];[Variables.$I$6];[.S238];[Variables.$I$6];[.T238];IF([.U238]&lt;&gt;&quot;&quot;;CONCATENATE([Variables.$I$6];[.U238]);&quot;&quot;);[Variables.$I$2];[Variables.$I$6]);IF([.B238]&lt;&gt;&quot;&quot;;CONCATENATE(&quot;#&quot;;[.B238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16362"/>
        </table:table-row>
        <table:table-row table:style-name="ro1">
          <table:table-cell table:style-name="ce6" table:formula="of:=IF(AND([.B239]&lt;&gt;&quot;&quot;;[.C239]&lt;&gt;&quot;&quot;);CONCATENATE([Variables.$I$1];[Variables.$I$7];[.B239];[Variables.$I$7];[Variables.$I$6];[Variables.$I$7];[.C239];[Variables.$I$7];[Variables.$I$6];[Variables.$I$7];[.D239];[Variables.$I$7];[Variables.$I$6];[.E239];[Variables.$I$6];[.F239];[Variables.$I$6];[.G239];[Variables.$I$6];[.H239];[Variables.$I$6];[Variables.$I$1];[.I239];[.J239];[.K239];[.L239];[.M239];[.N239];[.O239];[Variables.$I$2];[Variables.$I$6];[.P239];[Variables.$I$6];[.Q239];[Variables.$I$6];[.R239];[Variables.$I$6];[.S239];[Variables.$I$6];[.T239];IF([.U239]&lt;&gt;&quot;&quot;;CONCATENATE([Variables.$I$6];[.U239]);&quot;&quot;);[Variables.$I$2];[Variables.$I$6]);IF([.B239]&lt;&gt;&quot;&quot;;CONCATENATE(&quot;#&quot;;[.B239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style-name="ce7" office:value-type="string" calcext:value-type="string">
            <text:p>c5_elite_lancer_of_rohan</text:p>
          </table:table-cell>
          <table:table-cell table:style-name="ce7" office:value-type="string" calcext:value-type="string">
            <text:p>Elite_Lancer_of_Rohan</text:p>
          </table:table-cell>
          <table:table-cell table:style-name="ce7" office:value-type="string" calcext:value-type="string">
            <text:p>Elite_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ohan</text:p>
          </table:table-cell>
          <table:table-cell table:style-name="ce11" office:value-type="string" calcext:value-type="string">
            <text:p>itm_rohan_archer_helmet_b_good, itm_rohan_inf_helmet_a, itm_rohan_inf_helmet_b,</text:p>
          </table:table-cell>
          <table:table-cell table:style-name="ce11" office:value-type="string" calcext:value-type="string">
            <text:p>itm_rohan_mail_good_cloak, itm_rohan_rider_bad, itm_rohan_rider,itm_rohan_rider_good,itm_rohan_rider_cloak, itm_rohan_rider_good_cloak,itm_dale_med_a_cloak,itm_dale_med_a_good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rohirrim_war_greaves,</text:p>
          </table:table-cell>
          <table:table-cell table:style-name="ce11" office:value-type="string" calcext:value-type="string">
            <text:p>itm_rohan_lance,itm_rohan_lance,itm_rohan_lance_banner_horse,</text:p>
          </table:table-cell>
          <table:table-cell table:style-name="ce11" office:value-type="string" calcext:value-type="string">
            <text:p>itm_rohan_cav_sword,itm_rohan_shield_d,itm_rohan_shield_e,itm_rohan_shield_f,</text:p>
          </table:table-cell>
          <table:table-cell table:style-name="ce11" office:value-type="string" calcext:value-type="string">
            <text:p>itm_rohan_warhorse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riding_5|knows_shield_2|knows_power_strike_5|knows_ironflesh_3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B239]&lt;&gt;&quot;&quot;;[.C239]&lt;&gt;&quot;&quot;);CONCATENATE([Variables.$I$1];[Variables.$I$7];[.B239];[Variables.$I$7];[Variables.$I$6];[Variables.$I$7];[.C239];[Variables.$I$7];[Variables.$I$6];[Variables.$I$7];[.D239];[Variables.$I$7];[Variables.$I$6];[.E239];[Variables.$I$6];[.F239];[Variables.$I$6];[.G239];[Variables.$I$6];[.H239];[Variables.$I$6];[Variables.$I$1];[.I239];[.J239];[.K239];[.L239];[.M239];[.N239];[.O239];[Variables.$I$2];[Variables.$I$6];[.P239];[Variables.$I$6];[.Q239];[Variables.$I$6];[.R239];[Variables.$I$6];[.S239];[Variables.$I$6];[.T239];IF([.U239]&lt;&gt;&quot;&quot;;CONCATENATE([Variables.$I$6];[.U239]);&quot;&quot;);[Variables.$I$2];[Variables.$I$6]);IF([.B239]&lt;&gt;&quot;&quot;;CONCATENATE(&quot;#&quot;;[.B239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16362"/>
        </table:table-row>
        <table:table-row table:style-name="ro1">
          <table:table-cell table:style-name="ce6" table:formula="of:=IF(AND([.B240]&lt;&gt;&quot;&quot;;[.C240]&lt;&gt;&quot;&quot;);CONCATENATE([Variables.$I$1];[Variables.$I$7];[.B240];[Variables.$I$7];[Variables.$I$6];[Variables.$I$7];[.C240];[Variables.$I$7];[Variables.$I$6];[Variables.$I$7];[.D240];[Variables.$I$7];[Variables.$I$6];[.E240];[Variables.$I$6];[.F240];[Variables.$I$6];[.G240];[Variables.$I$6];[.H240];[Variables.$I$6];[Variables.$I$1];[.I240];[.J240];[.K240];[.L240];[.M240];[.N240];[.O240];[Variables.$I$2];[Variables.$I$6];[.P240];[Variables.$I$6];[.Q240];[Variables.$I$6];[.R240];[Variables.$I$6];[.S240];[Variables.$I$6];[.T240];IF([.U240]&lt;&gt;&quot;&quot;;CONCATENATE([Variables.$I$6];[.U240]);&quot;&quot;);[Variables.$I$2];[Variables.$I$6]);IF([.B240]&lt;&gt;&quot;&quot;;CONCATENATE(&quot;#&quot;;[.B240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evil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evil_tier_6,wp_tier_6,knows_common|knows_riding_7|knows_shield_3|knows_power_strike_6|knows_ironflesh_6,rohan_face_middle_1,rohan_face_old_2],</text:p>
          </table:table-cell>
          <table:table-cell table:style-name="ce7" office:value-type="string" calcext:value-type="string">
            <text:p>c6_lancer_guard_of_rohan</text:p>
          </table:table-cell>
          <table:table-cell table:style-name="ce7" office:value-type="string" calcext:value-type="string">
            <text:p>Brego_Guard_of_Rohan</text:p>
          </table:table-cell>
          <table:table-cell table:style-name="ce7" office:value-type="string" calcext:value-type="string">
            <text:p>Brego_Guard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ohan</text:p>
          </table:table-cell>
          <table:table-cell table:style-name="ce11" office:value-type="string" calcext:value-type="string">
            <text:p>itm_rohan_inf_helmet_b_good,</text:p>
          </table:table-cell>
          <table:table-cell table:style-name="ce11" office:value-type="string" calcext:value-type="string">
            <text:p>itm_rohan_surcoat,itm_rohan_surcoat_cloak,itm_rohan_surcoat_good,itm_rohan_surcoat_good_cloak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rohirrim_war_greaves,</text:p>
          </table:table-cell>
          <table:table-cell table:style-name="ce11" office:value-type="string" calcext:value-type="string">
            <text:p>itm_rohan_lance_banner_sun,itm_rohan_lance_banner_horse,</text:p>
          </table:table-cell>
          <table:table-cell table:style-name="ce11" office:value-type="string" calcext:value-type="string">
            <text:p>itm_rohan_cav_sword,itm_rohan_shield_d,itm_rohan_shield_e,itm_rohan_shield_f,</text:p>
          </table:table-cell>
          <table:table-cell table:style-name="ce11" office:value-type="string" calcext:value-type="string">
            <text:p>itm_thengel_warhorse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7|knows_shield_3|knows_power_strike_6|knows_ironflesh_6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B240]&lt;&gt;&quot;&quot;;[.C240]&lt;&gt;&quot;&quot;);CONCATENATE([Variables.$I$1];[Variables.$I$7];[.B240];[Variables.$I$7];[Variables.$I$6];[Variables.$I$7];[.C240];[Variables.$I$7];[Variables.$I$6];[Variables.$I$7];[.D240];[Variables.$I$7];[Variables.$I$6];[.E240];[Variables.$I$6];[.F240];[Variables.$I$6];[.G240];[Variables.$I$6];[.H240];[Variables.$I$6];[Variables.$I$1];[.I240];[.J240];[.K240];[.L240];[.M240];[.N240];[.O240];[Variables.$I$2];[Variables.$I$6];[.P240];[Variables.$I$6];[.Q240];[Variables.$I$6];[.R240];[Variables.$I$6];[.S240];[Variables.$I$6];[.T240];IF([.U240]&lt;&gt;&quot;&quot;;CONCATENATE([Variables.$I$6];[.U240]);&quot;&quot;);[Variables.$I$2];[Variables.$I$6]);IF([.B240]&lt;&gt;&quot;&quot;;CONCATENATE(&quot;#&quot;;[.B240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evil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evil_tier_6,wp_tier_6,knows_common|knows_riding_7|knows_shield_3|knows_power_strike_6|knows_ironflesh_6,rohan_face_middle_1,rohan_face_old_2],</text:p>
          </table:table-cell>
          <table:table-cell table:number-columns-repeated="16362"/>
        </table:table-row>
        <table:table-row table:style-name="ro1">
          <table:table-cell table:style-name="ce6" table:formula="of:=IF(AND([.B241]&lt;&gt;&quot;&quot;;[.C241]&lt;&gt;&quot;&quot;);CONCATENATE([Variables.$I$1];[Variables.$I$7];[.B241];[Variables.$I$7];[Variables.$I$6];[Variables.$I$7];[.C241];[Variables.$I$7];[Variables.$I$6];[Variables.$I$7];[.D241];[Variables.$I$7];[Variables.$I$6];[.E241];[Variables.$I$6];[.F241];[Variables.$I$6];[.G241];[Variables.$I$6];[.H241];[Variables.$I$6];[Variables.$I$1];[.I241];[.J241];[.K241];[.L241];[.M241];[.N241];[.O241];[Variables.$I$2];[Variables.$I$6];[.P241];[Variables.$I$6];[.Q241];[Variables.$I$6];[.R241];[Variables.$I$6];[.S241];[Variables.$I$6];[.T241];IF([.U241]&lt;&gt;&quot;&quot;;CONCATENATE([Variables.$I$6];[.U241]);&quot;&quot;);[Variables.$I$2];[Variables.$I$6]);IF([.B241]&lt;&gt;&quot;&quot;;CONCATENATE(&quot;#&quot;;[.B241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evil_tier_6,wp_tier_6,knows_common|knows_riding_9|knows_shield_3|knows_power_strike_8|knows_ironflesh_8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evil_tier_6,wp_tier_6,knows_common|knows_riding_9|knows_shield_3|knows_power_strike_8|knows_ironflesh_8,rohan_face_old_1,rohan_face_older_2],</text:p>
          </table:table-cell>
          <table:table-cell table:style-name="ce7" office:value-type="string" calcext:value-type="string">
            <text:p>c6_king_s_man_of_rohan</text:p>
          </table:table-cell>
          <table:table-cell table:style-name="ce7" office:value-type="string" calcext:value-type="string">
            <text:p>King's_Guard</text:p>
          </table:table-cell>
          <table:table-cell table:style-name="ce7" office:value-type="string" calcext:value-type="string">
            <text:p>King's_Guards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ohan</text:p>
          </table:table-cell>
          <table:table-cell table:style-name="ce11" office:value-type="string" calcext:value-type="string">
            <text:p>itm_rohan_inf_helmet_b_lordly,itm_rohan_archer_helmet_c_lordly,</text:p>
          </table:table-cell>
          <table:table-cell table:style-name="ce11" office:value-type="string" calcext:value-type="string">
            <text:p>itm_rohan_guard_good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rohirrim_war_greaves,</text:p>
          </table:table-cell>
          <table:table-cell table:style-name="ce11" office:value-type="string" calcext:value-type="string">
            <text:p>itm_rohan_lance_banner_sun,itm_rohan_lance_banner_horse,</text:p>
          </table:table-cell>
          <table:table-cell table:style-name="ce11" office:value-type="string" calcext:value-type="string">
            <text:p>itm_rohirrim_long_hafted_axe,itm_rohan_sword_c,itm_rohan_shield_g,</text:p>
          </table:table-cell>
          <table:table-cell table:style-name="ce11" office:value-type="string" calcext:value-type="string">
            <text:p>itm_thengel_warhorse_heavy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9|knows_shield_3|knows_power_strike_8|knows_ironflesh_8</text:p>
          </table:table-cell>
          <table:table-cell table:style-name="ce14" office:value-type="string" calcext:value-type="string">
            <text:p>rohan_face_old_1</text:p>
          </table:table-cell>
          <table:table-cell table:style-name="ce14" office:value-type="string" calcext:value-type="string">
            <text:p>rohan_face_older_2</text:p>
          </table:table-cell>
          <table:table-cell table:style-name="ce15"/>
          <table:table-cell table:style-name="ce6" table:formula="of:=IF(AND([.B241]&lt;&gt;&quot;&quot;;[.C241]&lt;&gt;&quot;&quot;);CONCATENATE([Variables.$I$1];[Variables.$I$7];[.B241];[Variables.$I$7];[Variables.$I$6];[Variables.$I$7];[.C241];[Variables.$I$7];[Variables.$I$6];[Variables.$I$7];[.D241];[Variables.$I$7];[Variables.$I$6];[.E241];[Variables.$I$6];[.F241];[Variables.$I$6];[.G241];[Variables.$I$6];[.H241];[Variables.$I$6];[Variables.$I$1];[.I241];[.J241];[.K241];[.L241];[.M241];[.N241];[.O241];[Variables.$I$2];[Variables.$I$6];[.P241];[Variables.$I$6];[.Q241];[Variables.$I$6];[.R241];[Variables.$I$6];[.S241];[Variables.$I$6];[.T241];IF([.U241]&lt;&gt;&quot;&quot;;CONCATENATE([Variables.$I$6];[.U241]);&quot;&quot;);[Variables.$I$2];[Variables.$I$6]);IF([.B241]&lt;&gt;&quot;&quot;;CONCATENATE(&quot;#&quot;;[.B241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evil_tier_6,wp_tier_6,knows_common|knows_riding_9|knows_shield_3|knows_power_strike_8|knows_ironflesh_8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evil_tier_6,wp_tier_6,knows_common|knows_riding_9|knows_shield_3|knows_power_strike_8|knows_ironflesh_8,rohan_face_old_1,rohan_face_older_2],</text:p>
          </table:table-cell>
          <table:table-cell table:number-columns-repeated="16362"/>
        </table:table-row>
        <table:table-row table:style-name="ro1">
          <table:table-cell table:style-name="ce6" table:formula="of:=IF(AND([.B242]&lt;&gt;&quot;&quot;;[.C242]&lt;&gt;&quot;&quot;);CONCATENATE([Variables.$I$1];[Variables.$I$7];[.B242];[Variables.$I$7];[Variables.$I$6];[Variables.$I$7];[.C242];[Variables.$I$7];[Variables.$I$6];[Variables.$I$7];[.D242];[Variables.$I$7];[Variables.$I$6];[.E242];[Variables.$I$6];[.F242];[Variables.$I$6];[.G242];[Variables.$I$6];[.H242];[Variables.$I$6];[Variables.$I$1];[.I242];[.J242];[.K242];[.L242];[.M242];[.N242];[.O242];[Variables.$I$2];[Variables.$I$6];[.P242];[Variables.$I$6];[.Q242];[Variables.$I$6];[.R242];[Variables.$I$6];[.S242];[Variables.$I$6];[.T242];IF([.U242]&lt;&gt;&quot;&quot;;CONCATENATE([Variables.$I$6];[.U242]);&quot;&quot;);[Variables.$I$2];[Variables.$I$6]);IF([.B242]&lt;&gt;&quot;&quot;;CONCATENATE(&quot;#&quot;;[.B242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mail_coif,itm_rohan_recruit_good, itm_rohan_leather_bad, itm_rohan_leather,itm_north_leather_ok,itm_north_leather_good, itm_rohan_leather_cloak,itm_rohan_leather_cloak,itm_dale_light_b_cloak,itm_leather_gloves,itm_rohan_shoes,itm_leather_boots,itm_spear,itm_rohan_sword_c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mail_coif,itm_rohan_recruit_good, itm_rohan_leather_bad, itm_rohan_leather,itm_north_leather_ok,itm_north_leather_good, itm_rohan_leather_cloak,itm_rohan_leather_cloak,itm_dale_light_b_cloak,itm_leather_gloves,itm_rohan_shoes,itm_leather_boots,itm_spear,itm_rohan_sword_c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</text:p>
          </table:table-cell>
          <table:table-cell table:style-name="ce7" office:value-type="string" calcext:value-type="string">
            <text:p>c2_squire_of_rohan</text:p>
          </table:table-cell>
          <table:table-cell table:style-name="ce7" office:value-type="string" calcext:value-type="string">
            <text:p>Squire_of_Rohan</text:p>
          </table:table-cell>
          <table:table-cell table:style-name="ce7" office:value-type="string" calcext:value-type="string">
            <text:p>Squires_of_Rohan</text:p>
          </table:table-cell>
          <table:table-cell table:style-name="ce8" office:value-type="string" calcext:value-type="string">
            <text:p>tf_roh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ohan</text:p>
          </table:table-cell>
          <table:table-cell table:style-name="ce11" office:value-type="string" calcext:value-type="string">
            <text:p>itm_rohan_light_helmet_a_bad,itm_rohan_light_helmet_b_bad,itm_mail_coif,</text:p>
          </table:table-cell>
          <table:table-cell table:style-name="ce11" office:value-type="string" calcext:value-type="string">
            <text:p>itm_rohan_recruit_good, itm_rohan_leather_bad, itm_rohan_leather,itm_north_leather_ok,itm_north_leather_good, itm_rohan_leather_cloak,itm_rohan_leather_cloak,itm_dale_light_b_cloak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rohan_shoes,itm_leather_boots,</text:p>
          </table:table-cell>
          <table:table-cell table:style-name="ce11" office:value-type="string" calcext:value-type="string">
            <text:p>itm_spear,itm_rohan_sword_c,</text:p>
          </table:table-cell>
          <table:table-cell table:style-name="ce11" office:value-type="string" calcext:value-type="string">
            <text:p>itm_rohan_shield_a,itm_rohan_shield_b,itm_rohan_shield_c,</text:p>
          </table:table-cell>
          <table:table-cell table:style-name="ce11" office:value-type="string" calcext:value-type="string">
            <text:p>itm_saddle_horse,itm_rohirrim_courser,</text:p>
          </table:table-cell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power_strike_1|knows_athletics_1|knows_riding_3|knows_horse_archery_2|knows_looting_1|knows_tactics_1|knows_pathfinding_1|knows_spotting_1|knows_inventory_management_1|knows_prisoner_management_1|knows_leadership_1|knows_trade_1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B242]&lt;&gt;&quot;&quot;;[.C242]&lt;&gt;&quot;&quot;);CONCATENATE([Variables.$I$1];[Variables.$I$7];[.B242];[Variables.$I$7];[Variables.$I$6];[Variables.$I$7];[.C242];[Variables.$I$7];[Variables.$I$6];[Variables.$I$7];[.D242];[Variables.$I$7];[Variables.$I$6];[.E242];[Variables.$I$6];[.F242];[Variables.$I$6];[.G242];[Variables.$I$6];[.H242];[Variables.$I$6];[Variables.$I$1];[.I242];[.J242];[.K242];[.L242];[.M242];[.N242];[.O242];[Variables.$I$2];[Variables.$I$6];[.P242];[Variables.$I$6];[.Q242];[Variables.$I$6];[.R242];[Variables.$I$6];[.S242];[Variables.$I$6];[.T242];IF([.U242]&lt;&gt;&quot;&quot;;CONCATENATE([Variables.$I$6];[.U242]);&quot;&quot;);[Variables.$I$2];[Variables.$I$6]);IF([.B242]&lt;&gt;&quot;&quot;;CONCATENATE(&quot;#&quot;;[.B242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mail_coif,itm_rohan_recruit_good, itm_rohan_leather_bad, itm_rohan_leather,itm_north_leather_ok,itm_north_leather_good, itm_rohan_leather_cloak,itm_rohan_leather_cloak,itm_dale_light_b_cloak,itm_leather_gloves,itm_rohan_shoes,itm_leather_boots,itm_spear,itm_rohan_sword_c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mail_coif,itm_rohan_recruit_good, itm_rohan_leather_bad, itm_rohan_leather,itm_north_leather_ok,itm_north_leather_good, itm_rohan_leather_cloak,itm_rohan_leather_cloak,itm_dale_light_b_cloak,itm_leather_gloves,itm_rohan_shoes,itm_leather_boots,itm_spear,itm_rohan_sword_c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16362"/>
        </table:table-row>
        <table:table-row table:style-name="ro1">
          <table:table-cell table:style-name="ce6" table:formula="of:=IF(AND([.B243]&lt;&gt;&quot;&quot;;[.C243]&lt;&gt;&quot;&quot;);CONCATENATE([Variables.$I$1];[Variables.$I$7];[.B243];[Variables.$I$7];[Variables.$I$6];[Variables.$I$7];[.C243];[Variables.$I$7];[Variables.$I$6];[Variables.$I$7];[.D243];[Variables.$I$7];[Variables.$I$6];[.E243];[Variables.$I$6];[.F243];[Variables.$I$6];[.G243];[Variables.$I$6];[.H243];[Variables.$I$6];[Variables.$I$1];[.I243];[.J243];[.K243];[.L243];[.M243];[.N243];[.O243];[Variables.$I$2];[Variables.$I$6];[.P243];[Variables.$I$6];[.Q243];[Variables.$I$6];[.R243];[Variables.$I$6];[.S243];[Variables.$I$6];[.T243];IF([.U243]&lt;&gt;&quot;&quot;;CONCATENATE([Variables.$I$6];[.U243]);&quot;&quot;);[Variables.$I$2];[Variables.$I$6]);IF([.B243]&lt;&gt;&quot;&quot;;CONCATENATE(&quot;#&quot;;[.B243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mail_coif,itm_rohan_leather_good,itm_rohan_leather_good_cloak,itm_rohan_mail_bad, itm_rohan_mail,itm_rohan_mail_cloak,itm_rohan_rider_bad,itm_dale_light_b_lordly,itm_leather_gloves,itm_rohan_light_greaves,itm_rohan_spear,itm_rohan_spear,itm_rohan_sword_c,itm_rohirrim_long_hafted_axe,itm_rohan_shield_a,itm_rohan_shield_b,itm_rohan_shield_c,itm_rohirrim_courser,itm_rohirrim_hunter,],attr_tier_3,wp_tier_3,knows_common|knows_horse_archery_2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mail_coif,itm_rohan_leather_good,itm_rohan_leather_good_cloak,itm_rohan_mail_bad, itm_rohan_mail,itm_rohan_mail_cloak,itm_rohan_rider_bad,itm_dale_light_b_lordly,itm_leather_gloves,itm_rohan_light_greaves,itm_rohan_spear,itm_rohan_spear,itm_rohan_sword_c,itm_rohirrim_long_hafted_axe,itm_rohan_shield_a,itm_rohan_shield_b,itm_rohan_shield_c,itm_rohirrim_courser,itm_rohirrim_hunter,],attr_tier_3,wp_tier_3,knows_common|knows_horse_archery_2|knows_riding_3|knows_shield_1|knows_power_throw_2|knows_power_strike_2,rohan_face_young_1,rohan_face_old_2],</text:p>
          </table:table-cell>
          <table:table-cell table:style-name="ce7" office:value-type="string" calcext:value-type="string">
            <text:p>c3_rider_of_rohan</text:p>
          </table:table-cell>
          <table:table-cell table:style-name="ce7" office:value-type="string" calcext:value-type="string">
            <text:p>Rider_of_Rohan</text:p>
          </table:table-cell>
          <table:table-cell table:style-name="ce7" office:value-type="string" calcext:value-type="string">
            <text:p>Riders_of_Rohan</text:p>
          </table:table-cell>
          <table:table-cell table:style-name="ce8" office:value-type="string" calcext:value-type="string">
            <text:p>tf_rohan| tf_mounted| 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ohan</text:p>
          </table:table-cell>
          <table:table-cell table:style-name="ce11" office:value-type="string" calcext:value-type="string">
            <text:p>itm_rohan_light_helmet_a, itm_rohan_light_helmet_b_good, itm_rohan_archer_helmet_a_bad, itm_rohan_archer_helmet_b_bad,itm_mail_coif,</text:p>
          </table:table-cell>
          <table:table-cell table:style-name="ce11" office:value-type="string" calcext:value-type="string">
            <text:p>itm_rohan_leather_good,itm_rohan_leather_good_cloak,itm_rohan_mail_bad, itm_rohan_mail,itm_rohan_mail_cloak,itm_rohan_rider_bad,itm_dale_light_b_lordly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rohan_light_greaves,</text:p>
          </table:table-cell>
          <table:table-cell table:style-name="ce11" office:value-type="string" calcext:value-type="string">
            <text:p>itm_rohan_spear,itm_rohan_spear,</text:p>
          </table:table-cell>
          <table:table-cell table:style-name="ce11" office:value-type="string" calcext:value-type="string">
            <text:p>itm_rohan_sword_c,itm_rohirrim_long_hafted_axe,itm_rohan_shield_a,itm_rohan_shield_b,itm_rohan_shield_c,</text:p>
          </table:table-cell>
          <table:table-cell table:style-name="ce11" office:value-type="string" calcext:value-type="string">
            <text:p>itm_rohirrim_courser,itm_rohirrim_hunter,</text:p>
          </table:table-cell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horse_archery_2|knows_riding_3|knows_shield_1|knows_power_throw_2|knows_power_strike_2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B243]&lt;&gt;&quot;&quot;;[.C243]&lt;&gt;&quot;&quot;);CONCATENATE([Variables.$I$1];[Variables.$I$7];[.B243];[Variables.$I$7];[Variables.$I$6];[Variables.$I$7];[.C243];[Variables.$I$7];[Variables.$I$6];[Variables.$I$7];[.D243];[Variables.$I$7];[Variables.$I$6];[.E243];[Variables.$I$6];[.F243];[Variables.$I$6];[.G243];[Variables.$I$6];[.H243];[Variables.$I$6];[Variables.$I$1];[.I243];[.J243];[.K243];[.L243];[.M243];[.N243];[.O243];[Variables.$I$2];[Variables.$I$6];[.P243];[Variables.$I$6];[.Q243];[Variables.$I$6];[.R243];[Variables.$I$6];[.S243];[Variables.$I$6];[.T243];IF([.U243]&lt;&gt;&quot;&quot;;CONCATENATE([Variables.$I$6];[.U243]);&quot;&quot;);[Variables.$I$2];[Variables.$I$6]);IF([.B243]&lt;&gt;&quot;&quot;;CONCATENATE(&quot;#&quot;;[.B243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mail_coif,itm_rohan_leather_good,itm_rohan_leather_good_cloak,itm_rohan_mail_bad, itm_rohan_mail,itm_rohan_mail_cloak,itm_rohan_rider_bad,itm_dale_light_b_lordly,itm_leather_gloves,itm_rohan_light_greaves,itm_rohan_spear,itm_rohan_spear,itm_rohan_sword_c,itm_rohirrim_long_hafted_axe,itm_rohan_shield_a,itm_rohan_shield_b,itm_rohan_shield_c,itm_rohirrim_courser,itm_rohirrim_hunter,],attr_tier_3,wp_tier_3,knows_common|knows_horse_archery_2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mail_coif,itm_rohan_leather_good,itm_rohan_leather_good_cloak,itm_rohan_mail_bad, itm_rohan_mail,itm_rohan_mail_cloak,itm_rohan_rider_bad,itm_dale_light_b_lordly,itm_leather_gloves,itm_rohan_light_greaves,itm_rohan_spear,itm_rohan_spear,itm_rohan_sword_c,itm_rohirrim_long_hafted_axe,itm_rohan_shield_a,itm_rohan_shield_b,itm_rohan_shield_c,itm_rohirrim_courser,itm_rohirrim_hunter,],attr_tier_3,wp_tier_3,knows_common|knows_horse_archery_2|knows_riding_3|knows_shield_1|knows_power_throw_2|knows_power_strike_2,rohan_face_young_1,rohan_face_old_2],</text:p>
          </table:table-cell>
          <table:table-cell table:number-columns-repeated="16362"/>
        </table:table-row>
        <table:table-row table:style-name="ro1">
          <table:table-cell table:style-name="ce6" table:formula="of:=IF(AND([.B244]&lt;&gt;&quot;&quot;;[.C244]&lt;&gt;&quot;&quot;);CONCATENATE([Variables.$I$1];[Variables.$I$7];[.B244];[Variables.$I$7];[Variables.$I$6];[Variables.$I$7];[.C244];[Variables.$I$7];[Variables.$I$6];[Variables.$I$7];[.D244];[Variables.$I$7];[Variables.$I$6];[.E244];[Variables.$I$6];[.F244];[Variables.$I$6];[.G244];[Variables.$I$6];[.H244];[Variables.$I$6];[Variables.$I$1];[.I244];[.J244];[.K244];[.L244];[.M244];[.N244];[.O244];[Variables.$I$2];[Variables.$I$6];[.P244];[Variables.$I$6];[.Q244];[Variables.$I$6];[.R244];[Variables.$I$6];[.S244];[Variables.$I$6];[.T244];IF([.U244]&lt;&gt;&quot;&quot;;CONCATENATE([Variables.$I$6];[.U244]);&quot;&quot;);[Variables.$I$2];[Variables.$I$6]);IF([.B244]&lt;&gt;&quot;&quot;;CONCATENATE(&quot;#&quot;;[.B244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mail_coif,itm_rohan_mail_good,itm_rohan_mail_good_cloak, itm_rohan_rider_bad, itm_rohan_rider,itm_rohan_rider_cloak,itm_rohan_scale_bad,itm_dale_med_a_cloak,itm_mail_mittens,itm_rohan_light_greaves,itm_rohan_spear,itm_rohan_cav_sword,itm_rohan_sword_c,itm_rohirrim_long_hafted_axe,itm_rohirrim_long_hafted_axe,itm_rohan_shield_d,itm_rohan_shield_e,itm_rohan_shield_f,itm_rohirrim_courser2,itm_rohirrim_hunter,],attr_tier_4,wp_tier_4,knows_common|knows_horse_archery_3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mail_coif,itm_rohan_mail_good,itm_rohan_mail_good_cloak, itm_rohan_rider_bad, itm_rohan_rider,itm_rohan_rider_cloak,itm_rohan_scale_bad,itm_dale_med_a_cloak,itm_mail_mittens,itm_rohan_light_greaves,itm_rohan_spear,itm_rohan_cav_sword,itm_rohan_sword_c,itm_rohirrim_long_hafted_axe,itm_rohirrim_long_hafted_axe,itm_rohan_shield_d,itm_rohan_shield_e,itm_rohan_shield_f,itm_rohirrim_courser2,itm_rohirrim_hunter,],attr_tier_4,wp_tier_4,knows_common|knows_horse_archery_3|knows_riding_5|knows_shield_2|knows_power_throw_3|knows_power_strike_3|knows_ironflesh_2,rohan_face_middle_1,rohan_face_old_2],</text:p>
          </table:table-cell>
          <table:table-cell table:style-name="ce7" office:value-type="string" calcext:value-type="string">
            <text:p>c4_veteran_rider_of_rohan</text:p>
          </table:table-cell>
          <table:table-cell table:style-name="ce7" office:value-type="string" calcext:value-type="string">
            <text:p>Veteran_Rider_of_Rohan</text:p>
          </table:table-cell>
          <table:table-cell table:style-name="ce7" office:value-type="string" calcext:value-type="string">
            <text:p>Veteran_Riders_of_Rohan</text:p>
          </table:table-cell>
          <table:table-cell table:style-name="ce8" office:value-type="string" calcext:value-type="string">
            <text:p>tf_roh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ohan</text:p>
          </table:table-cell>
          <table:table-cell table:style-name="ce11" office:value-type="string" calcext:value-type="string">
            <text:p>itm_rohan_archer_helmet_a, itm_rohan_archer_helmet_b,itm_rohan_inf_helmet_a_bad, itm_rohan_inf_helmet_b_bad,itm_mail_coif,</text:p>
          </table:table-cell>
          <table:table-cell table:style-name="ce11" office:value-type="string" calcext:value-type="string">
            <text:p>itm_rohan_mail_good,itm_rohan_mail_good_cloak, itm_rohan_rider_bad, itm_rohan_rider,itm_rohan_rider_cloak,itm_rohan_scale_bad,itm_dale_med_a_cloak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rohan_light_greaves,</text:p>
          </table:table-cell>
          <table:table-cell table:style-name="ce11" office:value-type="string" calcext:value-type="string">
            <text:p>itm_rohan_spear,</text:p>
          </table:table-cell>
          <table:table-cell table:style-name="ce11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1" office:value-type="string" calcext:value-type="string">
            <text:p>itm_rohirrim_courser2,itm_rohirrim_hunter,</text:p>
          </table:table-cell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horse_archery_3|knows_riding_5|knows_shield_2|knows_power_throw_3|knows_power_strike_3|knows_ironflesh_2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B244]&lt;&gt;&quot;&quot;;[.C244]&lt;&gt;&quot;&quot;);CONCATENATE([Variables.$I$1];[Variables.$I$7];[.B244];[Variables.$I$7];[Variables.$I$6];[Variables.$I$7];[.C244];[Variables.$I$7];[Variables.$I$6];[Variables.$I$7];[.D244];[Variables.$I$7];[Variables.$I$6];[.E244];[Variables.$I$6];[.F244];[Variables.$I$6];[.G244];[Variables.$I$6];[.H244];[Variables.$I$6];[Variables.$I$1];[.I244];[.J244];[.K244];[.L244];[.M244];[.N244];[.O244];[Variables.$I$2];[Variables.$I$6];[.P244];[Variables.$I$6];[.Q244];[Variables.$I$6];[.R244];[Variables.$I$6];[.S244];[Variables.$I$6];[.T244];IF([.U244]&lt;&gt;&quot;&quot;;CONCATENATE([Variables.$I$6];[.U244]);&quot;&quot;);[Variables.$I$2];[Variables.$I$6]);IF([.B244]&lt;&gt;&quot;&quot;;CONCATENATE(&quot;#&quot;;[.B244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mail_coif,itm_rohan_mail_good,itm_rohan_mail_good_cloak, itm_rohan_rider_bad, itm_rohan_rider,itm_rohan_rider_cloak,itm_rohan_scale_bad,itm_dale_med_a_cloak,itm_mail_mittens,itm_rohan_light_greaves,itm_rohan_spear,itm_rohan_cav_sword,itm_rohan_sword_c,itm_rohirrim_long_hafted_axe,itm_rohirrim_long_hafted_axe,itm_rohan_shield_d,itm_rohan_shield_e,itm_rohan_shield_f,itm_rohirrim_courser2,itm_rohirrim_hunter,],attr_tier_4,wp_tier_4,knows_common|knows_horse_archery_3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mail_coif,itm_rohan_mail_good,itm_rohan_mail_good_cloak, itm_rohan_rider_bad, itm_rohan_rider,itm_rohan_rider_cloak,itm_rohan_scale_bad,itm_dale_med_a_cloak,itm_mail_mittens,itm_rohan_light_greaves,itm_rohan_spear,itm_rohan_cav_sword,itm_rohan_sword_c,itm_rohirrim_long_hafted_axe,itm_rohirrim_long_hafted_axe,itm_rohan_shield_d,itm_rohan_shield_e,itm_rohan_shield_f,itm_rohirrim_courser2,itm_rohirrim_hunter,],attr_tier_4,wp_tier_4,knows_common|knows_horse_archery_3|knows_riding_5|knows_shield_2|knows_power_throw_3|knows_power_strike_3|knows_ironflesh_2,rohan_face_middle_1,rohan_face_old_2],</text:p>
          </table:table-cell>
          <table:table-cell table:number-columns-repeated="16362"/>
        </table:table-row>
        <table:table-row table:style-name="ro1">
          <table:table-cell table:style-name="ce6" table:formula="of:=IF(AND([.B245]&lt;&gt;&quot;&quot;;[.C245]&lt;&gt;&quot;&quot;);CONCATENATE([Variables.$I$1];[Variables.$I$7];[.B245];[Variables.$I$7];[Variables.$I$6];[Variables.$I$7];[.C245];[Variables.$I$7];[Variables.$I$6];[Variables.$I$7];[.D245];[Variables.$I$7];[Variables.$I$6];[.E245];[Variables.$I$6];[.F245];[Variables.$I$6];[.G245];[Variables.$I$6];[.H245];[Variables.$I$6];[Variables.$I$1];[.I245];[.J245];[.K245];[.L245];[.M245];[.N245];[.O245];[Variables.$I$2];[Variables.$I$6];[.P245];[Variables.$I$6];[.Q245];[Variables.$I$6];[.R245];[Variables.$I$6];[.S245];[Variables.$I$6];[.T245];IF([.U245]&lt;&gt;&quot;&quot;;CONCATENATE([Variables.$I$6];[.U245]);&quot;&quot;);[Variables.$I$2];[Variables.$I$6]);IF([.B245]&lt;&gt;&quot;&quot;;CONCATENATE(&quot;#&quot;;[.B245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rohan_cav_sword,itm_rohan_sword_c,itm_rohirrim_long_hafted_axe,itm_rohirrim_long_hafted_axe,itm_rohan_sword_c,itm_rohan_shield_d,itm_rohan_shield_e,itm_rohan_shield_f,itm_rohan_warhorse],attr_tier_5,wp_tier_5,knows_common|knows_horse_archery_3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rohan_cav_sword,itm_rohan_sword_c,itm_rohirrim_long_hafted_axe,itm_rohirrim_long_hafted_axe,itm_rohan_sword_c,itm_rohan_shield_d,itm_rohan_shield_e,itm_rohan_shield_f,itm_rohan_warhorse],attr_tier_5,wp_tier_5,knows_common|knows_horse_archery_3|knows_riding_6|knows_shield_3|knows_power_throw_4|knows_power_strike_4|knows_ironflesh_3,rohan_face_middle_1,rohan_face_old_2],</text:p>
          </table:table-cell>
          <table:table-cell table:style-name="ce7" office:value-type="string" calcext:value-type="string">
            <text:p>c5_elite_rider_of_rohan</text:p>
          </table:table-cell>
          <table:table-cell table:style-name="ce7" office:value-type="string" calcext:value-type="string">
            <text:p>Elite_Rider_of_Rohan</text:p>
          </table:table-cell>
          <table:table-cell table:style-name="ce7" office:value-type="string" calcext:value-type="string">
            <text:p>Elite_Rider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ohan</text:p>
          </table:table-cell>
          <table:table-cell table:style-name="ce11" office:value-type="string" calcext:value-type="string">
            <text:p>itm_rohan_archer_helmet_b_good, itm_rohan_inf_helmet_a, itm_rohan_inf_helmet_b,</text:p>
          </table:table-cell>
          <table:table-cell table:style-name="ce11" office:value-type="string" calcext:value-type="string">
            <text:p>itm_rohan_rider_good, itm_rohan_rider_good_cloak, itm_rohan_scale,itm_rohan_scale_cloak, itm_rohan_scale_good,itm_rohan_scale_good_cloak,itm_dale_med_a_good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rohirrim_war_greaves,</text:p>
          </table:table-cell>
          <table:table-cell table:style-name="ce11" office:value-type="string" calcext:value-type="string">
            <text:p>itm_rohan_spear,</text:p>
          </table:table-cell>
          <table:table-cell table:style-name="ce11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1" office:value-type="string" calcext:value-type="string">
            <text:p>itm_rohan_warhorse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horse_archery_3|knows_riding_6|knows_shield_3|knows_power_throw_4|knows_power_strike_4|knows_ironflesh_3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B245]&lt;&gt;&quot;&quot;;[.C245]&lt;&gt;&quot;&quot;);CONCATENATE([Variables.$I$1];[Variables.$I$7];[.B245];[Variables.$I$7];[Variables.$I$6];[Variables.$I$7];[.C245];[Variables.$I$7];[Variables.$I$6];[Variables.$I$7];[.D245];[Variables.$I$7];[Variables.$I$6];[.E245];[Variables.$I$6];[.F245];[Variables.$I$6];[.G245];[Variables.$I$6];[.H245];[Variables.$I$6];[Variables.$I$1];[.I245];[.J245];[.K245];[.L245];[.M245];[.N245];[.O245];[Variables.$I$2];[Variables.$I$6];[.P245];[Variables.$I$6];[.Q245];[Variables.$I$6];[.R245];[Variables.$I$6];[.S245];[Variables.$I$6];[.T245];IF([.U245]&lt;&gt;&quot;&quot;;CONCATENATE([Variables.$I$6];[.U245]);&quot;&quot;);[Variables.$I$2];[Variables.$I$6]);IF([.B245]&lt;&gt;&quot;&quot;;CONCATENATE(&quot;#&quot;;[.B245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rohan_cav_sword,itm_rohan_sword_c,itm_rohirrim_long_hafted_axe,itm_rohirrim_long_hafted_axe,itm_rohan_sword_c,itm_rohan_shield_d,itm_rohan_shield_e,itm_rohan_shield_f,itm_rohan_warhorse],attr_tier_5,wp_tier_5,knows_common|knows_horse_archery_3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rohan_cav_sword,itm_rohan_sword_c,itm_rohirrim_long_hafted_axe,itm_rohirrim_long_hafted_axe,itm_rohan_sword_c,itm_rohan_shield_d,itm_rohan_shield_e,itm_rohan_shield_f,itm_rohan_warhorse],attr_tier_5,wp_tier_5,knows_common|knows_horse_archery_3|knows_riding_6|knows_shield_3|knows_power_throw_4|knows_power_strike_4|knows_ironflesh_3,rohan_face_middle_1,rohan_face_old_2],</text:p>
          </table:table-cell>
          <table:table-cell table:number-columns-repeated="16362"/>
        </table:table-row>
        <table:table-row table:style-name="ro1">
          <table:table-cell table:style-name="ce6" table:formula="of:=IF(AND([.B246]&lt;&gt;&quot;&quot;;[.C246]&lt;&gt;&quot;&quot;);CONCATENATE([Variables.$I$1];[Variables.$I$7];[.B246];[Variables.$I$7];[Variables.$I$6];[Variables.$I$7];[.C246];[Variables.$I$7];[Variables.$I$6];[Variables.$I$7];[.D246];[Variables.$I$7];[Variables.$I$6];[.E246];[Variables.$I$6];[.F246];[Variables.$I$6];[.G246];[Variables.$I$6];[.H246];[Variables.$I$6];[Variables.$I$1];[.I246];[.J246];[.K246];[.L246];[.M246];[.N246];[.O246];[Variables.$I$2];[Variables.$I$6];[.P246];[Variables.$I$6];[.Q246];[Variables.$I$6];[.R246];[Variables.$I$6];[.S246];[Variables.$I$6];[.T246];IF([.U246]&lt;&gt;&quot;&quot;;CONCATENATE([Variables.$I$6];[.U246]);&quot;&quot;);[Variables.$I$2];[Variables.$I$6]);IF([.B246]&lt;&gt;&quot;&quot;;CONCATENATE(&quot;#&quot;;[.B246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itm_rohan_guard_cloak, itm_rohan_guard_good,itm_mail_mittens,itm_rohirrim_war_greaves,itm_rohan_spear,itm_rohan_inf_sword,itm_rohan_inf_sword,itm_rohan_cav_sword,itm_rohirrim_long_hafted_axe,itm_rohirrim_long_hafted_axe,itm_rohan_shield_d,itm_rohan_shield_e,itm_rohan_shield_f,itm_rohan_shield_g,itm_thengel_warhorse,],attr_evil_tier_6,wp_tier_6,knows_common|knows_horse_archery_4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itm_rohan_guard_cloak, itm_rohan_guard_good,itm_mail_mittens,itm_rohirrim_war_greaves,itm_rohan_spear,itm_rohan_inf_sword,itm_rohan_inf_sword,itm_rohan_cav_sword,itm_rohirrim_long_hafted_axe,itm_rohirrim_long_hafted_axe,itm_rohan_shield_d,itm_rohan_shield_e,itm_rohan_shield_f,itm_rohan_shield_g,itm_thengel_warhorse,],attr_evil_tier_6,wp_tier_6,knows_common|knows_horse_archery_4|knows_riding_8|knows_shield_3|knows_power_throw_5|knows_power_strike_6|knows_ironflesh_6,rohan_face_middle_1,rohan_face_old_2],</text:p>
          </table:table-cell>
          <table:table-cell table:style-name="ce7" office:value-type="string" calcext:value-type="string">
            <text:p>c6_rider_guard_of_rohan</text:p>
          </table:table-cell>
          <table:table-cell table:style-name="ce7" office:value-type="string" calcext:value-type="string">
            <text:p>Eorl_Guard_of_Rohan</text:p>
          </table:table-cell>
          <table:table-cell table:style-name="ce7" office:value-type="string" calcext:value-type="string">
            <text:p>Eorl_Guard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ohan</text:p>
          </table:table-cell>
          <table:table-cell table:style-name="ce11" office:value-type="string" calcext:value-type="string">
            <text:p>itm_rohan_inf_helmet_b_lordly,</text:p>
          </table:table-cell>
          <table:table-cell table:style-name="ce11" office:value-type="string" calcext:value-type="string">
            <text:p>itm_rohan_guard_bad, itm_rohan_guard,itm_rohan_guard_cloak, itm_rohan_guard_good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rohirrim_war_greaves,</text:p>
          </table:table-cell>
          <table:table-cell table:style-name="ce11" office:value-type="string" calcext:value-type="string">
            <text:p>itm_rohan_spear,</text:p>
          </table:table-cell>
          <table:table-cell table:style-name="ce11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1" office:value-type="string" calcext:value-type="string">
            <text:p>itm_thengel_warhorse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horse_archery_4|knows_riding_8|knows_shield_3|knows_power_throw_5|knows_power_strike_6|knows_ironflesh_6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B246]&lt;&gt;&quot;&quot;;[.C246]&lt;&gt;&quot;&quot;);CONCATENATE([Variables.$I$1];[Variables.$I$7];[.B246];[Variables.$I$7];[Variables.$I$6];[Variables.$I$7];[.C246];[Variables.$I$7];[Variables.$I$6];[Variables.$I$7];[.D246];[Variables.$I$7];[Variables.$I$6];[.E246];[Variables.$I$6];[.F246];[Variables.$I$6];[.G246];[Variables.$I$6];[.H246];[Variables.$I$6];[Variables.$I$1];[.I246];[.J246];[.K246];[.L246];[.M246];[.N246];[.O246];[Variables.$I$2];[Variables.$I$6];[.P246];[Variables.$I$6];[.Q246];[Variables.$I$6];[.R246];[Variables.$I$6];[.S246];[Variables.$I$6];[.T246];IF([.U246]&lt;&gt;&quot;&quot;;CONCATENATE([Variables.$I$6];[.U246]);&quot;&quot;);[Variables.$I$2];[Variables.$I$6]);IF([.B246]&lt;&gt;&quot;&quot;;CONCATENATE(&quot;#&quot;;[.B246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itm_rohan_guard_cloak, itm_rohan_guard_good,itm_mail_mittens,itm_rohirrim_war_greaves,itm_rohan_spear,itm_rohan_inf_sword,itm_rohan_inf_sword,itm_rohan_cav_sword,itm_rohirrim_long_hafted_axe,itm_rohirrim_long_hafted_axe,itm_rohan_shield_d,itm_rohan_shield_e,itm_rohan_shield_f,itm_rohan_shield_g,itm_thengel_warhorse,],attr_evil_tier_6,wp_tier_6,knows_common|knows_horse_archery_4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itm_rohan_guard_cloak, itm_rohan_guard_good,itm_mail_mittens,itm_rohirrim_war_greaves,itm_rohan_spear,itm_rohan_inf_sword,itm_rohan_inf_sword,itm_rohan_cav_sword,itm_rohirrim_long_hafted_axe,itm_rohirrim_long_hafted_axe,itm_rohan_shield_d,itm_rohan_shield_e,itm_rohan_shield_f,itm_rohan_shield_g,itm_thengel_warhorse,],attr_evil_tier_6,wp_tier_6,knows_common|knows_horse_archery_4|knows_riding_8|knows_shield_3|knows_power_throw_5|knows_power_strike_6|knows_ironflesh_6,rohan_face_middle_1,rohan_face_old_2],</text:p>
          </table:table-cell>
          <table:table-cell table:number-columns-repeated="16362"/>
        </table:table-row>
        <table:table-row table:style-name="ro1">
          <table:table-cell table:style-name="ce6" table:formula="of:=IF(AND([.B247]&lt;&gt;&quot;&quot;;[.C247]&lt;&gt;&quot;&quot;);CONCATENATE([Variables.$I$1];[Variables.$I$7];[.B247];[Variables.$I$7];[Variables.$I$6];[Variables.$I$7];[.C247];[Variables.$I$7];[Variables.$I$6];[Variables.$I$7];[.D247];[Variables.$I$7];[Variables.$I$6];[.E247];[Variables.$I$6];[.F247];[Variables.$I$6];[.G247];[Variables.$I$6];[.H247];[Variables.$I$6];[Variables.$I$1];[.I247];[.J247];[.K247];[.L247];[.M247];[.N247];[.O247];[Variables.$I$2];[Variables.$I$6];[.P247];[Variables.$I$6];[.Q247];[Variables.$I$6];[.R247];[Variables.$I$6];[.S247];[Variables.$I$6];[.T247];IF([.U247]&lt;&gt;&quot;&quot;;CONCATENATE([Variables.$I$6];[.U247]);&quot;&quot;);[Variables.$I$2];[Variables.$I$6]);IF([.B247]&lt;&gt;&quot;&quot;;CONCATENATE(&quot;#&quot;;[.B247]);&quot;&quot;))" office:value-type="string" office:string-value="[&quot;i6_2h_guard_of_rohan&quot;,&quot;Helm_Guard_of_Rohan&quot;,&quot;Helm_Guards_of_Rohan&quot;,tf_rohan| tfg_shield| tfg_armor| tfg_helm| tfg_boots,0,0,fac_rohan,[itm_rohan_inf_helmet_b_lordly,itm_mail_coif_good,itm_rohan_guard_bad,itm_rohan_guard_cloak,itm_mail_mittens,itm_rohirrim_war_greaves,itm_rohan_2h_sword, itm_rohirrim_long_hafted_axe,],attr_evil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mail_coif_good,itm_rohan_guard_bad,itm_rohan_guard_cloak,itm_mail_mittens,itm_rohirrim_war_greaves,itm_rohan_2h_sword, itm_rohirrim_long_hafted_axe,],attr_evil_tier_6,wp_tier_6,knows_common|knows_athletics_6|knows_power_strike_7|knows_ironflesh_8,rohan_face_middle_1,rohan_face_old_2],</text:p>
          </table:table-cell>
          <table:table-cell table:style-name="ce7" office:value-type="string" calcext:value-type="string">
            <text:p>i6_2h_guard_of_rohan</text:p>
          </table:table-cell>
          <table:table-cell table:style-name="ce7" office:value-type="string" calcext:value-type="string">
            <text:p>Helm_Guard_of_Rohan</text:p>
          </table:table-cell>
          <table:table-cell table:style-name="ce7" office:value-type="string" calcext:value-type="string">
            <text:p>Helm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ohan</text:p>
          </table:table-cell>
          <table:table-cell table:style-name="ce11" office:value-type="string" calcext:value-type="string">
            <text:p>itm_rohan_inf_helmet_b_lordly,itm_mail_coif_good,</text:p>
          </table:table-cell>
          <table:table-cell table:style-name="ce11" office:value-type="string" calcext:value-type="string">
            <text:p>itm_rohan_guard_bad,itm_rohan_guard_cloak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rohirrim_war_greaves,</text:p>
          </table:table-cell>
          <table:table-cell table:style-name="ce11" office:value-type="string" calcext:value-type="string">
            <text:p>itm_rohan_2h_sword, itm_rohirrim_long_hafted_axe,</text:p>
          </table:table-cell>
          <table:table-cell table:style-name="ce11" table:number-columns-repeated="2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6|knows_power_strike_7|knows_ironflesh_8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B247]&lt;&gt;&quot;&quot;;[.C247]&lt;&gt;&quot;&quot;);CONCATENATE([Variables.$I$1];[Variables.$I$7];[.B247];[Variables.$I$7];[Variables.$I$6];[Variables.$I$7];[.C247];[Variables.$I$7];[Variables.$I$6];[Variables.$I$7];[.D247];[Variables.$I$7];[Variables.$I$6];[.E247];[Variables.$I$6];[.F247];[Variables.$I$6];[.G247];[Variables.$I$6];[.H247];[Variables.$I$6];[Variables.$I$1];[.I247];[.J247];[.K247];[.L247];[.M247];[.N247];[.O247];[Variables.$I$2];[Variables.$I$6];[.P247];[Variables.$I$6];[.Q247];[Variables.$I$6];[.R247];[Variables.$I$6];[.S247];[Variables.$I$6];[.T247];IF([.U247]&lt;&gt;&quot;&quot;;CONCATENATE([Variables.$I$6];[.U247]);&quot;&quot;);[Variables.$I$2];[Variables.$I$6]);IF([.B247]&lt;&gt;&quot;&quot;;CONCATENATE(&quot;#&quot;;[.B247]);&quot;&quot;))" office:value-type="string" office:string-value="[&quot;i6_2h_guard_of_rohan&quot;,&quot;Helm_Guard_of_Rohan&quot;,&quot;Helm_Guards_of_Rohan&quot;,tf_rohan| tfg_shield| tfg_armor| tfg_helm| tfg_boots,0,0,fac_rohan,[itm_rohan_inf_helmet_b_lordly,itm_mail_coif_good,itm_rohan_guard_bad,itm_rohan_guard_cloak,itm_mail_mittens,itm_rohirrim_war_greaves,itm_rohan_2h_sword, itm_rohirrim_long_hafted_axe,],attr_evil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mail_coif_good,itm_rohan_guard_bad,itm_rohan_guard_cloak,itm_mail_mittens,itm_rohirrim_war_greaves,itm_rohan_2h_sword, itm_rohirrim_long_hafted_axe,],attr_evil_tier_6,wp_tier_6,knows_common|knows_athletics_6|knows_power_strike_7|knows_ironflesh_8,rohan_face_middle_1,rohan_face_old_2],</text:p>
          </table:table-cell>
          <table:table-cell table:number-columns-repeated="16362"/>
        </table:table-row>
        <table:table-row table:style-name="ro1">
          <table:table-cell table:style-name="ce6" table:formula="of:=IF(AND([.B248]&lt;&gt;&quot;&quot;;[.C248]&lt;&gt;&quot;&quot;);CONCATENATE([Variables.$I$1];[Variables.$I$7];[.B248];[Variables.$I$7];[Variables.$I$6];[Variables.$I$7];[.C248];[Variables.$I$7];[Variables.$I$6];[Variables.$I$7];[.D248];[Variables.$I$7];[Variables.$I$6];[.E248];[Variables.$I$6];[.F248];[Variables.$I$6];[.G248];[Variables.$I$6];[.H248];[Variables.$I$6];[Variables.$I$1];[.I248];[.J248];[.K248];[.L248];[.M248];[.N248];[.O248];[Variables.$I$2];[Variables.$I$6];[.P248];[Variables.$I$6];[.Q248];[Variables.$I$6];[.R248];[Variables.$I$6];[.S248];[Variables.$I$6];[.T248];IF([.U248]&lt;&gt;&quot;&quot;;CONCATENATE([Variables.$I$6];[.U248]);&quot;&quot;);[Variables.$I$2];[Variables.$I$6]);IF([.B248]&lt;&gt;&quot;&quot;;CONCATENATE(&quot;#&quot;;[.B248]);&quot;&quot;))" office:value-type="string" office:string-value="##Rohan Siege battle dismounted troops" calcext:value-type="string">
            <text:p>##Rohan Siege battle dismounted troops</text:p>
          </table:table-cell>
          <table:table-cell table:style-name="ce5" office:value-type="string" calcext:value-type="string">
            <text:p>#Rohan Siege battle dismounted troops</text:p>
          </table:table-cell>
          <table:table-cell table:style-name="ce6" table:number-columns-repeated="3"/>
          <table:table-cell table:style-name="ce36" table:number-columns-repeated="2"/>
          <table:table-cell table:style-name="ce6" table:number-columns-repeated="14"/>
          <table:table-cell table:style-name="ce6" table:formula="of:=IF(AND([.B248]&lt;&gt;&quot;&quot;;[.C248]&lt;&gt;&quot;&quot;);CONCATENATE([Variables.$I$1];[Variables.$I$7];[.B248];[Variables.$I$7];[Variables.$I$6];[Variables.$I$7];[.C248];[Variables.$I$7];[Variables.$I$6];[Variables.$I$7];[.D248];[Variables.$I$7];[Variables.$I$6];[.E248];[Variables.$I$6];[.F248];[Variables.$I$6];[.G248];[Variables.$I$6];[.H248];[Variables.$I$6];[Variables.$I$1];[.I248];[.J248];[.K248];[.L248];[.M248];[.N248];[.O248];[Variables.$I$2];[Variables.$I$6];[.P248];[Variables.$I$6];[.Q248];[Variables.$I$6];[.R248];[Variables.$I$6];[.S248];[Variables.$I$6];[.T248];IF([.U248]&lt;&gt;&quot;&quot;;CONCATENATE([Variables.$I$6];[.U248]);&quot;&quot;);[Variables.$I$2];[Variables.$I$6]);IF([.B248]&lt;&gt;&quot;&quot;;CONCATENATE(&quot;#&quot;;[.B248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16362"/>
        </table:table-row>
        <table:table-row table:style-name="ro1">
          <table:table-cell table:style-name="ce6" table:formula="of:=IF(AND([.B249]&lt;&gt;&quot;&quot;;[.C249]&lt;&gt;&quot;&quot;);CONCATENATE([Variables.$I$1];[Variables.$I$7];[.B249];[Variables.$I$7];[Variables.$I$6];[Variables.$I$7];[.C249];[Variables.$I$7];[Variables.$I$6];[Variables.$I$7];[.D249];[Variables.$I$7];[Variables.$I$6];[.E249];[Variables.$I$6];[.F249];[Variables.$I$6];[.G249];[Variables.$I$6];[.H249];[Variables.$I$6];[Variables.$I$1];[.I249];[.J249];[.K249];[.L249];[.M249];[.N249];[.O249];[Variables.$I$2];[Variables.$I$6];[.P249];[Variables.$I$6];[.Q249];[Variables.$I$6];[.R249];[Variables.$I$6];[.S249];[Variables.$I$6];[.T249];IF([.U249]&lt;&gt;&quot;&quot;;CONCATENATE([Variables.$I$6];[.U249]);&quot;&quot;);[Variables.$I$2];[Variables.$I$6]);IF([.B249]&lt;&gt;&quot;&quot;;CONCATENATE(&quot;#&quot;;[.B249]);&quot;&quot;))" office:value-type="string" office:string-value="[&quot;a3_dism_skirmisher_of_rohan&quot;,&quot;Skirmisher_of_Rohan&quot;,&quot;Skirmishers_of_Rohan&quot;,tf_rohan| tfg_ranged| tfg_armor| tfg_helm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],attr_tier_4,wp_tier_4,knows_horse_archery_5|knows_riding_6|knows_power_draw_4|knows_power_strike_2|knows_ironflesh_2|knows_power_throw_4,rohan_face_young_1,rohan_face_old_2]," calcext:value-type="string">
            <text:p>["a3_dism_skirmisher_of_rohan","Skirmisher_of_Rohan","Skirmishers_of_Rohan",tf_rohan| tfg_ranged| tfg_armor| tfg_helm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],attr_tier_4,wp_tier_4,knows_horse_archery_5|knows_riding_6|knows_power_draw_4|knows_power_strike_2|knows_ironflesh_2|knows_power_throw_4,rohan_face_young_1,rohan_face_old_2],</text:p>
          </table:table-cell>
          <table:table-cell table:style-name="ce7" office:value-type="string" calcext:value-type="string">
            <text:p>a3_dism_skirmisher_of_rohan</text:p>
          </table:table-cell>
          <table:table-cell table:style-name="ce7" office:value-type="string" calcext:value-type="string">
            <text:p>Skirmisher_of_Rohan</text:p>
          </table:table-cell>
          <table:table-cell table:style-name="ce7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ohan</text:p>
          </table:table-cell>
          <table:table-cell table:style-name="ce11" office:value-type="string" calcext:value-type="string">
            <text:p>itm_rohan_light_helmet_a,itm_rohan_light_helmet_b,itm_rohan_light_helmet_b_good,</text:p>
          </table:table-cell>
          <table:table-cell table:style-name="ce11" office:value-type="string" calcext:value-type="string">
            <text:p>itm_rohan_recruit_good, itm_rohan_leather_bad, itm_rohan_leather,itm_dale_light_b_bad,itm_north_leather_good,</text:p>
          </table:table-cell>
          <table:table-cell table:style-name="ce11"/>
          <table:table-cell table:style-name="ce11" office:value-type="string" calcext:value-type="string">
            <text:p>itm_rohan_shoes,itm_leather_boots_bad,</text:p>
          </table:table-cell>
          <table:table-cell table:style-name="ce11" office:value-type="string" calcext:value-type="string">
            <text:p>itm_nomad_bow,itm_khergit_arrows,</text:p>
          </table:table-cell>
          <table:table-cell table:style-name="ce11" office:value-type="string" calcext:value-type="string">
            <text:p>itm_rohan_sword_c,itm_spear,</text:p>
          </table:table-cell>
          <table:table-cell table:style-name="ce11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B249]&lt;&gt;&quot;&quot;;[.C249]&lt;&gt;&quot;&quot;);CONCATENATE([Variables.$I$1];[Variables.$I$7];[.B249];[Variables.$I$7];[Variables.$I$6];[Variables.$I$7];[.C249];[Variables.$I$7];[Variables.$I$6];[Variables.$I$7];[.D249];[Variables.$I$7];[Variables.$I$6];[.E249];[Variables.$I$6];[.F249];[Variables.$I$6];[.G249];[Variables.$I$6];[.H249];[Variables.$I$6];[Variables.$I$1];[.I249];[.J249];[.K249];[.L249];[.M249];[.N249];[.O249];[Variables.$I$2];[Variables.$I$6];[.P249];[Variables.$I$6];[.Q249];[Variables.$I$6];[.R249];[Variables.$I$6];[.S249];[Variables.$I$6];[.T249];IF([.U249]&lt;&gt;&quot;&quot;;CONCATENATE([Variables.$I$6];[.U249]);&quot;&quot;);[Variables.$I$2];[Variables.$I$6]);IF([.B249]&lt;&gt;&quot;&quot;;CONCATENATE(&quot;#&quot;;[.B249]);&quot;&quot;))" office:value-type="string" office:string-value="[&quot;a3_dism_skirmisher_of_rohan&quot;,&quot;Skirmisher_of_Rohan&quot;,&quot;Skirmishers_of_Rohan&quot;,tf_rohan| tfg_ranged| tfg_armor| tfg_helm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],attr_tier_4,wp_tier_4,knows_horse_archery_5|knows_riding_6|knows_power_draw_4|knows_power_strike_2|knows_ironflesh_2|knows_power_throw_4,rohan_face_young_1,rohan_face_old_2]," calcext:value-type="string">
            <text:p>["a3_dism_skirmisher_of_rohan","Skirmisher_of_Rohan","Skirmishers_of_Rohan",tf_rohan| tfg_ranged| tfg_armor| tfg_helm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],attr_tier_4,wp_tier_4,knows_horse_archery_5|knows_riding_6|knows_power_draw_4|knows_power_strike_2|knows_ironflesh_2|knows_power_throw_4,rohan_face_young_1,rohan_face_old_2],</text:p>
          </table:table-cell>
          <table:table-cell table:number-columns-repeated="16362"/>
        </table:table-row>
        <table:table-row table:style-name="ro1">
          <table:table-cell table:style-name="ce6" table:formula="of:=IF(AND([.B250]&lt;&gt;&quot;&quot;;[.C250]&lt;&gt;&quot;&quot;);CONCATENATE([Variables.$I$1];[Variables.$I$7];[.B250];[Variables.$I$7];[Variables.$I$6];[Variables.$I$7];[.C250];[Variables.$I$7];[Variables.$I$6];[Variables.$I$7];[.D250];[Variables.$I$7];[Variables.$I$6];[.E250];[Variables.$I$6];[.F250];[Variables.$I$6];[.G250];[Variables.$I$6];[.H250];[Variables.$I$6];[Variables.$I$1];[.I250];[.J250];[.K250];[.L250];[.M250];[.N250];[.O250];[Variables.$I$2];[Variables.$I$6];[.P250];[Variables.$I$6];[.Q250];[Variables.$I$6];[.R250];[Variables.$I$6];[.S250];[Variables.$I$6];[.T250];IF([.U250]&lt;&gt;&quot;&quot;;CONCATENATE([Variables.$I$6];[.U250]);&quot;&quot;);[Variables.$I$2];[Variables.$I$6]);IF([.B250]&lt;&gt;&quot;&quot;;CONCATENATE(&quot;#&quot;;[.B250]);&quot;&quot;))" office:value-type="string" office:string-value="[&quot;a4_dism_veteran_skirmisher_of_rohan&quot;,&quot;Veteran_Skirmisher_of_Rohan&quot;,&quot;Veteran_Skirmishers_of_Rohan&quot;,tf_rohan| tfg_ranged| tfg_shield| tfg_armor| tfg_helm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],attr_tier_5,wp_tier_5,knows_horse_archery_7|knows_riding_7|knows_power_draw_5|knows_power_strike_3|knows_ironflesh_3|knows_power_throw_5,rohan_face_middle_1,rohan_face_old_2]," calcext:value-type="string">
            <text:p>["a4_dism_veteran_skirmisher_of_rohan","Veteran_Skirmisher_of_Rohan","Veteran_Skirmishers_of_Rohan",tf_rohan| tfg_ranged| tfg_shield| tfg_armor| tfg_helm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],attr_tier_5,wp_tier_5,knows_horse_archery_7|knows_riding_7|knows_power_draw_5|knows_power_strike_3|knows_ironflesh_3|knows_power_throw_5,rohan_face_middle_1,rohan_face_old_2],</text:p>
          </table:table-cell>
          <table:table-cell table:style-name="ce7" office:value-type="string" calcext:value-type="string">
            <text:p>a4_dism_veteran_skirmisher_of_rohan</text:p>
          </table:table-cell>
          <table:table-cell table:style-name="ce7" office:value-type="string" calcext:value-type="string">
            <text:p>Veteran_Skirmisher_of_Rohan</text:p>
          </table:table-cell>
          <table:table-cell table:style-name="ce7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ohan</text:p>
          </table:table-cell>
          <table:table-cell table:style-name="ce11" office:value-type="string" calcext:value-type="string">
            <text:p>itm_rohan_light_helmet_a,itm_rohan_light_helmet_b_good,itm_rohan_archer_helmet_a_bad,</text:p>
          </table:table-cell>
          <table:table-cell table:style-name="ce11" office:value-type="string" calcext:value-type="string">
            <text:p>itm_rohan_leather_good,itm_rohan_mail_bad, itm_rohan_mail,itm_dale_light_b,</text:p>
          </table:table-cell>
          <table:table-cell table:style-name="ce11"/>
          <table:table-cell table:style-name="ce11" office:value-type="string" calcext:value-type="string">
            <text:p>itm_leather_boots,</text:p>
          </table:table-cell>
          <table:table-cell table:style-name="ce11" office:value-type="string" calcext:value-type="string">
            <text:p>itm_nomad_bow,itm_khergit_arrows,</text:p>
          </table:table-cell>
          <table:table-cell table:style-name="ce11" office:value-type="string" calcext:value-type="string">
            <text:p>itm_rohirrim_long_hafted_axe,itm_rohan_sword_c,</text:p>
          </table:table-cell>
          <table:table-cell table:style-name="ce11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B250]&lt;&gt;&quot;&quot;;[.C250]&lt;&gt;&quot;&quot;);CONCATENATE([Variables.$I$1];[Variables.$I$7];[.B250];[Variables.$I$7];[Variables.$I$6];[Variables.$I$7];[.C250];[Variables.$I$7];[Variables.$I$6];[Variables.$I$7];[.D250];[Variables.$I$7];[Variables.$I$6];[.E250];[Variables.$I$6];[.F250];[Variables.$I$6];[.G250];[Variables.$I$6];[.H250];[Variables.$I$6];[Variables.$I$1];[.I250];[.J250];[.K250];[.L250];[.M250];[.N250];[.O250];[Variables.$I$2];[Variables.$I$6];[.P250];[Variables.$I$6];[.Q250];[Variables.$I$6];[.R250];[Variables.$I$6];[.S250];[Variables.$I$6];[.T250];IF([.U250]&lt;&gt;&quot;&quot;;CONCATENATE([Variables.$I$6];[.U250]);&quot;&quot;);[Variables.$I$2];[Variables.$I$6]);IF([.B250]&lt;&gt;&quot;&quot;;CONCATENATE(&quot;#&quot;;[.B250]);&quot;&quot;))" office:value-type="string" office:string-value="[&quot;a4_dism_veteran_skirmisher_of_rohan&quot;,&quot;Veteran_Skirmisher_of_Rohan&quot;,&quot;Veteran_Skirmishers_of_Rohan&quot;,tf_rohan| tfg_ranged| tfg_shield| tfg_armor| tfg_helm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],attr_tier_5,wp_tier_5,knows_horse_archery_7|knows_riding_7|knows_power_draw_5|knows_power_strike_3|knows_ironflesh_3|knows_power_throw_5,rohan_face_middle_1,rohan_face_old_2]," calcext:value-type="string">
            <text:p>["a4_dism_veteran_skirmisher_of_rohan","Veteran_Skirmisher_of_Rohan","Veteran_Skirmishers_of_Rohan",tf_rohan| tfg_ranged| tfg_shield| tfg_armor| tfg_helm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],attr_tier_5,wp_tier_5,knows_horse_archery_7|knows_riding_7|knows_power_draw_5|knows_power_strike_3|knows_ironflesh_3|knows_power_throw_5,rohan_face_middle_1,rohan_face_old_2],</text:p>
          </table:table-cell>
          <table:table-cell table:number-columns-repeated="16362"/>
        </table:table-row>
        <table:table-row table:style-name="ro1">
          <table:table-cell table:style-name="ce6" table:formula="of:=IF(AND([.B251]&lt;&gt;&quot;&quot;;[.C251]&lt;&gt;&quot;&quot;);CONCATENATE([Variables.$I$1];[Variables.$I$7];[.B251];[Variables.$I$7];[Variables.$I$6];[Variables.$I$7];[.C251];[Variables.$I$7];[Variables.$I$6];[Variables.$I$7];[.D251];[Variables.$I$7];[Variables.$I$6];[.E251];[Variables.$I$6];[.F251];[Variables.$I$6];[.G251];[Variables.$I$6];[.H251];[Variables.$I$6];[Variables.$I$1];[.I251];[.J251];[.K251];[.L251];[.M251];[.N251];[.O251];[Variables.$I$2];[Variables.$I$6];[.P251];[Variables.$I$6];[.Q251];[Variables.$I$6];[.R251];[Variables.$I$6];[.S251];[Variables.$I$6];[.T251];IF([.U251]&lt;&gt;&quot;&quot;;CONCATENATE([Variables.$I$6];[.U251]);&quot;&quot;);[Variables.$I$2];[Variables.$I$6]);IF([.B251]&lt;&gt;&quot;&quot;;CONCATENATE(&quot;#&quot;;[.B251]);&quot;&quot;))" office:value-type="string" office:string-value="[&quot;a5_dism_elite_skirmisher_of_rohan&quot;,&quot;Elite_Skirmisher_of_Rohan&quot;,&quot;Elite_Skirmishers_of_Rohan&quot;,tf_rohan| tfg_ranged| tfg_shield| tfg_armor| tfg_helm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],attr_tier_6,wp_tier_6,knows_horse_archery_5|knows_riding_7|knows_power_draw_5|knows_power_throw_5|knows_power_strike_3|knows_ironflesh_3,rohan_face_middle_1,rohan_face_old_2]," calcext:value-type="string">
            <text:p>["a5_dism_elite_skirmisher_of_rohan","Elite_Skirmisher_of_Rohan","Elite_Skirmishers_of_Rohan",tf_rohan| tfg_ranged| tfg_shield| tfg_armor| tfg_helm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],attr_tier_6,wp_tier_6,knows_horse_archery_5|knows_riding_7|knows_power_draw_5|knows_power_throw_5|knows_power_strike_3|knows_ironflesh_3,rohan_face_middle_1,rohan_face_old_2],</text:p>
          </table:table-cell>
          <table:table-cell table:style-name="ce7" office:value-type="string" calcext:value-type="string">
            <text:p>a5_dism_elite_skirmisher_of_rohan</text:p>
          </table:table-cell>
          <table:table-cell table:style-name="ce7" office:value-type="string" calcext:value-type="string">
            <text:p>Elite_Skirmisher_of_Rohan</text:p>
          </table:table-cell>
          <table:table-cell table:style-name="ce7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ohan</text:p>
          </table:table-cell>
          <table:table-cell table:style-name="ce11" office:value-type="string" calcext:value-type="string">
            <text:p>itm_rohan_archer_helmet_a,itm_rohan_light_helmet_a,</text:p>
          </table:table-cell>
          <table:table-cell table:style-name="ce11" office:value-type="string" calcext:value-type="string">
            <text:p>itm_rohan_mail_good, itm_rohan_rider,itm_rohan_rider_bad,itm_dale_light_b_good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rohan_light_greaves,itm_leather_boots,</text:p>
          </table:table-cell>
          <table:table-cell table:style-name="ce11" office:value-type="string" calcext:value-type="string">
            <text:p>itm_strong_bow,itm_khergit_arrows,</text:p>
          </table:table-cell>
          <table:table-cell table:style-name="ce11" office:value-type="string" calcext:value-type="string">
            <text:p>itm_rohan_spear,itm_rohan_sword_c,itm_rohirrim_long_hafted_axe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B251]&lt;&gt;&quot;&quot;;[.C251]&lt;&gt;&quot;&quot;);CONCATENATE([Variables.$I$1];[Variables.$I$7];[.B251];[Variables.$I$7];[Variables.$I$6];[Variables.$I$7];[.C251];[Variables.$I$7];[Variables.$I$6];[Variables.$I$7];[.D251];[Variables.$I$7];[Variables.$I$6];[.E251];[Variables.$I$6];[.F251];[Variables.$I$6];[.G251];[Variables.$I$6];[.H251];[Variables.$I$6];[Variables.$I$1];[.I251];[.J251];[.K251];[.L251];[.M251];[.N251];[.O251];[Variables.$I$2];[Variables.$I$6];[.P251];[Variables.$I$6];[.Q251];[Variables.$I$6];[.R251];[Variables.$I$6];[.S251];[Variables.$I$6];[.T251];IF([.U251]&lt;&gt;&quot;&quot;;CONCATENATE([Variables.$I$6];[.U251]);&quot;&quot;);[Variables.$I$2];[Variables.$I$6]);IF([.B251]&lt;&gt;&quot;&quot;;CONCATENATE(&quot;#&quot;;[.B251]);&quot;&quot;))" office:value-type="string" office:string-value="[&quot;a5_dism_elite_skirmisher_of_rohan&quot;,&quot;Elite_Skirmisher_of_Rohan&quot;,&quot;Elite_Skirmishers_of_Rohan&quot;,tf_rohan| tfg_ranged| tfg_shield| tfg_armor| tfg_helm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],attr_tier_6,wp_tier_6,knows_horse_archery_5|knows_riding_7|knows_power_draw_5|knows_power_throw_5|knows_power_strike_3|knows_ironflesh_3,rohan_face_middle_1,rohan_face_old_2]," calcext:value-type="string">
            <text:p>["a5_dism_elite_skirmisher_of_rohan","Elite_Skirmisher_of_Rohan","Elite_Skirmishers_of_Rohan",tf_rohan| tfg_ranged| tfg_shield| tfg_armor| tfg_helm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],attr_tier_6,wp_tier_6,knows_horse_archery_5|knows_riding_7|knows_power_draw_5|knows_power_throw_5|knows_power_strike_3|knows_ironflesh_3,rohan_face_middle_1,rohan_face_old_2],</text:p>
          </table:table-cell>
          <table:table-cell table:number-columns-repeated="16362"/>
        </table:table-row>
        <table:table-row table:style-name="ro1">
          <table:table-cell table:formula="of:=IF(AND([.B252]&lt;&gt;&quot;&quot;;[.C252]&lt;&gt;&quot;&quot;);CONCATENATE([Variables.$I$1];[Variables.$I$7];[.B252];[Variables.$I$7];[Variables.$I$6];[Variables.$I$7];[.C252];[Variables.$I$7];[Variables.$I$6];[Variables.$I$7];[.D252];[Variables.$I$7];[Variables.$I$6];[.E252];[Variables.$I$6];[.F252];[Variables.$I$6];[.G252];[Variables.$I$6];[.H252];[Variables.$I$6];[Variables.$I$1];[.I252];[.J252];[.K252];[.L252];[.M252];[.N252];[.O252];[Variables.$I$2];[Variables.$I$6];[.P252];[Variables.$I$6];[.Q252];[Variables.$I$6];[.R252];[Variables.$I$6];[.S252];[Variables.$I$6];[.T252];IF([.U252]&lt;&gt;&quot;&quot;;CONCATENATE([Variables.$I$6];[.U252]);&quot;&quot;);[Variables.$I$2];[Variables.$I$6]);IF([.B252]&lt;&gt;&quot;&quot;;CONCATENATE(&quot;#&quot;;[.B252]);&quot;&quot;))">
            <text:p/>
          </table:table-cell>
          <table:table-cell table:style-name="ce6" table:number-columns-repeated="20"/>
          <table:table-cell table:style-name="ce36" table:formula="of:=IF(AND([.B252]&lt;&gt;&quot;&quot;;[.C252]&lt;&gt;&quot;&quot;);CONCATENATE([Variables.$I$1];[Variables.$I$7];[.B252];[Variables.$I$7];[Variables.$I$6];[Variables.$I$7];[.C252];[Variables.$I$7];[Variables.$I$6];[Variables.$I$7];[.D252];[Variables.$I$7];[Variables.$I$6];[.E252];[Variables.$I$6];[.F252];[Variables.$I$6];[.G252];[Variables.$I$6];[.H252];[Variables.$I$6];[Variables.$I$1];[.I252];[.J252];[.K252];[.L252];[.M252];[.N252];[.O252];[Variables.$I$2];[Variables.$I$6];[.P252];[Variables.$I$6];[.Q252];[Variables.$I$6];[.R252];[Variables.$I$6];[.S252];[Variables.$I$6];[.T252];IF([.U252]&lt;&gt;&quot;&quot;;CONCATENATE([Variables.$I$6];[.U252]);&quot;&quot;);[Variables.$I$2];[Variables.$I$6]);IF([.B252]&lt;&gt;&quot;&quot;;CONCATENATE(&quot;#&quot;;[.B252]);&quot;&quot;))">
            <text:p/>
          </table:table-cell>
          <table:table-cell table:number-columns-repeated="16362"/>
        </table:table-row>
        <table:table-row table:style-name="ro1">
          <table:table-cell table:style-name="ce6" table:formula="of:=IF(AND([.B253]&lt;&gt;&quot;&quot;;[.C253]&lt;&gt;&quot;&quot;);CONCATENATE([Variables.$I$1];[Variables.$I$7];[.B253];[Variables.$I$7];[Variables.$I$6];[Variables.$I$7];[.C253];[Variables.$I$7];[Variables.$I$6];[Variables.$I$7];[.D253];[Variables.$I$7];[Variables.$I$6];[.E253];[Variables.$I$6];[.F253];[Variables.$I$6];[.G253];[Variables.$I$6];[.H253];[Variables.$I$6];[Variables.$I$1];[.I253];[.J253];[.K253];[.L253];[.M253];[.N253];[.O253];[Variables.$I$2];[Variables.$I$6];[.P253];[Variables.$I$6];[.Q253];[Variables.$I$6];[.R253];[Variables.$I$6];[.S253];[Variables.$I$6];[.T253];IF([.U253]&lt;&gt;&quot;&quot;;CONCATENATE([Variables.$I$6];[.U253]);&quot;&quot;);[Variables.$I$2];[Variables.$I$6]);IF([.B253]&lt;&gt;&quot;&quot;;CONCATENATE(&quot;#&quot;;[.B253]);&quot;&quot;))" office:value-type="string" office:string-value="#HARAD" calcext:value-type="string">
            <text:p>#HARAD</text:p>
          </table:table-cell>
          <table:table-cell table:style-name="ce5" office:value-type="string" calcext:value-type="string">
            <text:p>HARAD</text:p>
          </table:table-cell>
          <table:table-cell table:style-name="ce6" table:number-columns-repeated="19"/>
          <table:table-cell table:style-name="ce6" table:formula="of:=IF(AND([.B253]&lt;&gt;&quot;&quot;;[.C253]&lt;&gt;&quot;&quot;);CONCATENATE([Variables.$I$1];[Variables.$I$7];[.B253];[Variables.$I$7];[Variables.$I$6];[Variables.$I$7];[.C253];[Variables.$I$7];[Variables.$I$6];[Variables.$I$7];[.D253];[Variables.$I$7];[Variables.$I$6];[.E253];[Variables.$I$6];[.F253];[Variables.$I$6];[.G253];[Variables.$I$6];[.H253];[Variables.$I$6];[Variables.$I$1];[.I253];[.J253];[.K253];[.L253];[.M253];[.N253];[.O253];[Variables.$I$2];[Variables.$I$6];[.P253];[Variables.$I$6];[.Q253];[Variables.$I$6];[.R253];[Variables.$I$6];[.S253];[Variables.$I$6];[.T253];IF([.U253]&lt;&gt;&quot;&quot;;CONCATENATE([Variables.$I$6];[.U253]);&quot;&quot;);[Variables.$I$2];[Variables.$I$6]);IF([.B253]&lt;&gt;&quot;&quot;;CONCATENATE(&quot;#&quot;;[.B253]);&quot;&quot;))" office:value-type="string" office:string-value="#HARAD" calcext:value-type="string">
            <text:p>#HARAD</text:p>
          </table:table-cell>
          <table:table-cell table:number-columns-repeated="16362"/>
        </table:table-row>
        <table:table-row table:style-name="ro1">
          <table:table-cell table:style-name="ce6" table:formula="of:=IF(AND([.B254]&lt;&gt;&quot;&quot;;[.C254]&lt;&gt;&quot;&quot;);CONCATENATE([Variables.$I$1];[Variables.$I$7];[.B254];[Variables.$I$7];[Variables.$I$6];[Variables.$I$7];[.C254];[Variables.$I$7];[Variables.$I$6];[Variables.$I$7];[.D254];[Variables.$I$7];[Variables.$I$6];[.E254];[Variables.$I$6];[.F254];[Variables.$I$6];[.G254];[Variables.$I$6];[.H254];[Variables.$I$6];[Variables.$I$1];[.I254];[.J254];[.K254];[.L254];[.M254];[.N254];[.O254];[Variables.$I$2];[Variables.$I$6];[.P254];[Variables.$I$6];[.Q254];[Variables.$I$6];[.R254];[Variables.$I$6];[.S254];[Variables.$I$6];[.T254];IF([.U254]&lt;&gt;&quot;&quot;;CONCATENATE([Variables.$I$6];[.U254]);&quot;&quot;);[Variables.$I$2];[Variables.$I$6]);IF([.B254]&lt;&gt;&quot;&quot;;CONCATENATE(&quot;#&quot;;[.B254]);&quot;&quot;))" office:value-type="string" office:string-value="[&quot;i1_harad_levy&quot;,&quot;Harad_Levy&quot;,&quot;Harad_Levies&quot;,tf_harad| tfg_armor,0,0,fac_harad,[itm_harad_tunic,itm_harad_padded_bad,itm_harad_tunic_bad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" calcext:value-type="string">
            <text:p>["i1_harad_levy","Harad_Levy","Harad_Levies",tf_harad| tfg_armor,0,0,fac_harad,[itm_harad_tunic,itm_harad_padded_bad,itm_harad_tunic_bad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style-name="ce7" office:value-type="string" calcext:value-type="string">
            <text:p>i1_harad_levy</text:p>
          </table:table-cell>
          <table:table-cell table:style-name="ce7" office:value-type="string" calcext:value-type="string">
            <text:p>Harad_Levy</text:p>
          </table:table-cell>
          <table:table-cell table:style-name="ce7" office:value-type="string" calcext:value-type="string">
            <text:p>Harad_Levies</text:p>
          </table:table-cell>
          <table:table-cell table:style-name="ce8" office:value-type="string" calcext:value-type="string">
            <text:p>tf_hara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harad</text:p>
          </table:table-cell>
          <table:table-cell table:style-name="ce31"/>
          <table:table-cell table:style-name="ce11" office:value-type="string" calcext:value-type="string">
            <text:p>itm_harad_tunic,itm_harad_padded_bad,itm_harad_tunic_bad,</text:p>
          </table:table-cell>
          <table:table-cell table:style-name="ce11"/>
          <table:table-cell table:style-name="ce11" office:value-type="string" calcext:value-type="string">
            <text:p>itm_desert_boots,</text:p>
          </table:table-cell>
          <table:table-cell table:style-name="ce11" office:value-type="string" calcext:value-type="string">
            <text:p>itm_harad_javelin,itm_harad_short_spear,</text:p>
          </table:table-cell>
          <table:table-cell table:style-name="ce11" table:number-columns-repeated="2"/>
          <table:table-cell table:style-name="ce12" office:value-type="string" calcext:value-type="string">
            <text:p>attr_evil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power_strike_1|knows_athletics_2|knows_riding_1|knows_horse_archery_1|knows_looting_1|knows_tactics_1|knows_spotting_1|knows_wound_treatment_1|knows_first_aid_1|knows_leadership_2|knows_trade_1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B254]&lt;&gt;&quot;&quot;;[.C254]&lt;&gt;&quot;&quot;);CONCATENATE([Variables.$I$1];[Variables.$I$7];[.B254];[Variables.$I$7];[Variables.$I$6];[Variables.$I$7];[.C254];[Variables.$I$7];[Variables.$I$6];[Variables.$I$7];[.D254];[Variables.$I$7];[Variables.$I$6];[.E254];[Variables.$I$6];[.F254];[Variables.$I$6];[.G254];[Variables.$I$6];[.H254];[Variables.$I$6];[Variables.$I$1];[.I254];[.J254];[.K254];[.L254];[.M254];[.N254];[.O254];[Variables.$I$2];[Variables.$I$6];[.P254];[Variables.$I$6];[.Q254];[Variables.$I$6];[.R254];[Variables.$I$6];[.S254];[Variables.$I$6];[.T254];IF([.U254]&lt;&gt;&quot;&quot;;CONCATENATE([Variables.$I$6];[.U254]);&quot;&quot;);[Variables.$I$2];[Variables.$I$6]);IF([.B254]&lt;&gt;&quot;&quot;;CONCATENATE(&quot;#&quot;;[.B254]);&quot;&quot;))" office:value-type="string" office:string-value="[&quot;i1_harad_levy&quot;,&quot;Harad_Levy&quot;,&quot;Harad_Levies&quot;,tf_harad| tfg_armor,0,0,fac_harad,[itm_harad_tunic,itm_harad_padded_bad,itm_harad_tunic_bad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" calcext:value-type="string">
            <text:p>["i1_harad_levy","Harad_Levy","Harad_Levies",tf_harad| tfg_armor,0,0,fac_harad,[itm_harad_tunic,itm_harad_padded_bad,itm_harad_tunic_bad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16362"/>
        </table:table-row>
        <table:table-row table:style-name="ro1">
          <table:table-cell table:style-name="ce6" table:formula="of:=IF(AND([.B255]&lt;&gt;&quot;&quot;;[.C255]&lt;&gt;&quot;&quot;);CONCATENATE([Variables.$I$1];[Variables.$I$7];[.B255];[Variables.$I$7];[Variables.$I$6];[Variables.$I$7];[.C255];[Variables.$I$7];[Variables.$I$6];[Variables.$I$7];[.D255];[Variables.$I$7];[Variables.$I$6];[.E255];[Variables.$I$6];[.F255];[Variables.$I$6];[.G255];[Variables.$I$6];[.H255];[Variables.$I$6];[Variables.$I$1];[.I255];[.J255];[.K255];[.L255];[.M255];[.N255];[.O255];[Variables.$I$2];[Variables.$I$6];[.P255];[Variables.$I$6];[.Q255];[Variables.$I$6];[.R255];[Variables.$I$6];[.S255];[Variables.$I$6];[.T255];IF([.U255]&lt;&gt;&quot;&quot;;CONCATENATE([Variables.$I$6];[.U255]);&quot;&quot;);[Variables.$I$2];[Variables.$I$6]);IF([.B255]&lt;&gt;&quot;&quot;;CONCATENATE(&quot;#&quot;;[.B255]);&quot;&quot;))" office:value-type="string" office:string-value="[&quot;i3_harad_infantry&quot;,&quot;Harad_Light_Footman&quot;,&quot;Harad_Light_Footmen&quot;,tf_harad| tfg_armor| tfg_boots,0,0,fac_harad,[itm_harad_tunic,itm_harad_padded, itm_harad_pectoral_bad,itm_harad_scale_bad,itm_harad_leather_greaves,itm_desert_boots,itm_harad_short_spear,itm_harad_dagger,itm_skirmisher_sword,itm_harad_sabre_ba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" calcext:value-type="string">
            <text:p>["i3_harad_infantry","Harad_Light_Footman","Harad_Light_Footmen",tf_harad| tfg_armor| tfg_boots,0,0,fac_harad,[itm_harad_tunic,itm_harad_padded, itm_harad_pectoral_bad,itm_harad_scale_bad,itm_harad_leather_greaves,itm_desert_boots,itm_harad_short_spear,itm_harad_dagger,itm_skirmisher_sword,itm_harad_sabre_ba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style-name="ce7" office:value-type="string" calcext:value-type="string">
            <text:p>i3_harad_infantry</text:p>
          </table:table-cell>
          <table:table-cell table:style-name="ce7" office:value-type="string" calcext:value-type="string">
            <text:p>Harad_Light_Footman</text:p>
          </table:table-cell>
          <table:table-cell table:style-name="ce7" office:value-type="string" calcext:value-type="string">
            <text:p>Harad_Light_Foot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harad</text:p>
          </table:table-cell>
          <table:table-cell table:style-name="ce11"/>
          <table:table-cell table:style-name="ce11" office:value-type="string" calcext:value-type="string">
            <text:p>itm_harad_tunic,itm_harad_padded, itm_harad_pectoral_bad,itm_harad_scale_bad,</text:p>
          </table:table-cell>
          <table:table-cell table:style-name="ce11"/>
          <table:table-cell table:style-name="ce11" office:value-type="string" calcext:value-type="string">
            <text:p>itm_harad_leather_greaves,itm_desert_boots,</text:p>
          </table:table-cell>
          <table:table-cell table:style-name="ce11" office:value-type="string" calcext:value-type="string">
            <text:p>itm_harad_short_spear,itm_harad_dagger,itm_skirmisher_sword,itm_harad_sabre_bad,</text:p>
          </table:table-cell>
          <table:table-cell table:style-name="ce11" office:value-type="string" calcext:value-type="string">
            <text:p>itm_harad_long_shield_d,itm_harad_long_shield_e,</text:p>
          </table:table-cell>
          <table:table-cell table:style-name="ce11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3" office:value-type="string" calcext:value-type="string">
            <text:p>knows_common|knows_ironflesh_1|knows_power_strike_1|knows_shield_2|knows_athletics_2|knows_riding_1|knows_horse_archery_1|knows_looting_1|knows_tactics_1|knows_spotting_1|knows_wound_treatment_1|knows_first_aid_1|knows_leadership_2|knows_trade_1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B255]&lt;&gt;&quot;&quot;;[.C255]&lt;&gt;&quot;&quot;);CONCATENATE([Variables.$I$1];[Variables.$I$7];[.B255];[Variables.$I$7];[Variables.$I$6];[Variables.$I$7];[.C255];[Variables.$I$7];[Variables.$I$6];[Variables.$I$7];[.D255];[Variables.$I$7];[Variables.$I$6];[.E255];[Variables.$I$6];[.F255];[Variables.$I$6];[.G255];[Variables.$I$6];[.H255];[Variables.$I$6];[Variables.$I$1];[.I255];[.J255];[.K255];[.L255];[.M255];[.N255];[.O255];[Variables.$I$2];[Variables.$I$6];[.P255];[Variables.$I$6];[.Q255];[Variables.$I$6];[.R255];[Variables.$I$6];[.S255];[Variables.$I$6];[.T255];IF([.U255]&lt;&gt;&quot;&quot;;CONCATENATE([Variables.$I$6];[.U255]);&quot;&quot;);[Variables.$I$2];[Variables.$I$6]);IF([.B255]&lt;&gt;&quot;&quot;;CONCATENATE(&quot;#&quot;;[.B255]);&quot;&quot;))" office:value-type="string" office:string-value="[&quot;i3_harad_infantry&quot;,&quot;Harad_Light_Footman&quot;,&quot;Harad_Light_Footmen&quot;,tf_harad| tfg_armor| tfg_boots,0,0,fac_harad,[itm_harad_tunic,itm_harad_padded, itm_harad_pectoral_bad,itm_harad_scale_bad,itm_harad_leather_greaves,itm_desert_boots,itm_harad_short_spear,itm_harad_dagger,itm_skirmisher_sword,itm_harad_sabre_ba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" calcext:value-type="string">
            <text:p>["i3_harad_infantry","Harad_Light_Footman","Harad_Light_Footmen",tf_harad| tfg_armor| tfg_boots,0,0,fac_harad,[itm_harad_tunic,itm_harad_padded, itm_harad_pectoral_bad,itm_harad_scale_bad,itm_harad_leather_greaves,itm_desert_boots,itm_harad_short_spear,itm_harad_dagger,itm_skirmisher_sword,itm_harad_sabre_ba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16362"/>
        </table:table-row>
        <table:table-row table:style-name="ro1">
          <table:table-cell table:style-name="ce6" table:formula="of:=IF(AND([.B256]&lt;&gt;&quot;&quot;;[.C256]&lt;&gt;&quot;&quot;);CONCATENATE([Variables.$I$1];[Variables.$I$7];[.B256];[Variables.$I$7];[Variables.$I$6];[Variables.$I$7];[.C256];[Variables.$I$7];[Variables.$I$6];[Variables.$I$7];[.D256];[Variables.$I$7];[Variables.$I$6];[.E256];[Variables.$I$6];[.F256];[Variables.$I$6];[.G256];[Variables.$I$6];[.H256];[Variables.$I$6];[Variables.$I$1];[.I256];[.J256];[.K256];[.L256];[.M256];[.N256];[.O256];[Variables.$I$2];[Variables.$I$6];[.P256];[Variables.$I$6];[.Q256];[Variables.$I$6];[.R256];[Variables.$I$6];[.S256];[Variables.$I$6];[.T256];IF([.U256]&lt;&gt;&quot;&quot;;CONCATENATE([Variables.$I$6];[.U256]);&quot;&quot;);[Variables.$I$2];[Variables.$I$6]);IF([.B256]&lt;&gt;&quot;&quot;;CONCATENATE(&quot;#&quot;;[.B256]);&quot;&quot;))" office:value-type="string" office:string-value="[&quot;i4_harad_spearman&quot;,&quot;Harad_Spearman&quot;,&quot;Harad_Spearmen&quot;,tf_harad| tfg_shield| tfg_armor| tfg_helm| tfg_boots  |tfg_polearm,0,0,fac_harad,[itm_harad_finhelm,itm_harad_pectoral, itm_harad_padded_good,itm_harad_scale_greaves,itm_harad_leather_greaves,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pectoral, itm_harad_padded_good,itm_harad_scale_greaves,itm_harad_leather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style-name="ce7" office:value-type="string" calcext:value-type="string">
            <text:p>i4_harad_spearman</text:p>
          </table:table-cell>
          <table:table-cell table:style-name="ce7" office:value-type="string" calcext:value-type="string">
            <text:p>Harad_Spearman</text:p>
          </table:table-cell>
          <table:table-cell table:style-name="ce7" office:value-type="string" calcext:value-type="string">
            <text:p>Harad_Spearmen</text:p>
          </table:table-cell>
          <table:table-cell table:style-name="ce8" office:value-type="string" calcext:value-type="string">
            <text:p>tf_harad| tfg_shield| tfg_armor| tfg_helm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harad</text:p>
          </table:table-cell>
          <table:table-cell table:style-name="ce11" office:value-type="string" calcext:value-type="string">
            <text:p>itm_harad_finhelm,</text:p>
          </table:table-cell>
          <table:table-cell table:style-name="ce11" office:value-type="string" calcext:value-type="string">
            <text:p>itm_harad_pectoral, itm_harad_padded_good,</text:p>
          </table:table-cell>
          <table:table-cell table:style-name="ce11"/>
          <table:table-cell table:style-name="ce11" office:value-type="string" calcext:value-type="string">
            <text:p>itm_harad_scale_greaves,itm_harad_leather_greaves,</text:p>
          </table:table-cell>
          <table:table-cell table:style-name="ce11" office:value-type="string" calcext:value-type="string">
            <text:p>itm_harad_long_spear,</text:p>
          </table:table-cell>
          <table:table-cell table:style-name="ce11" office:value-type="string" calcext:value-type="string">
            <text:p>itm_harad_long_shield_d,itm_harad_long_shield_e,</text:p>
          </table:table-cell>
          <table:table-cell table:style-name="ce11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3|knows_shield_3|knows_power_strike_3|knows_ironflesh_2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B256]&lt;&gt;&quot;&quot;;[.C256]&lt;&gt;&quot;&quot;);CONCATENATE([Variables.$I$1];[Variables.$I$7];[.B256];[Variables.$I$7];[Variables.$I$6];[Variables.$I$7];[.C256];[Variables.$I$7];[Variables.$I$6];[Variables.$I$7];[.D256];[Variables.$I$7];[Variables.$I$6];[.E256];[Variables.$I$6];[.F256];[Variables.$I$6];[.G256];[Variables.$I$6];[.H256];[Variables.$I$6];[Variables.$I$1];[.I256];[.J256];[.K256];[.L256];[.M256];[.N256];[.O256];[Variables.$I$2];[Variables.$I$6];[.P256];[Variables.$I$6];[.Q256];[Variables.$I$6];[.R256];[Variables.$I$6];[.S256];[Variables.$I$6];[.T256];IF([.U256]&lt;&gt;&quot;&quot;;CONCATENATE([Variables.$I$6];[.U256]);&quot;&quot;);[Variables.$I$2];[Variables.$I$6]);IF([.B256]&lt;&gt;&quot;&quot;;CONCATENATE(&quot;#&quot;;[.B256]);&quot;&quot;))" office:value-type="string" office:string-value="[&quot;i4_harad_spearman&quot;,&quot;Harad_Spearman&quot;,&quot;Harad_Spearmen&quot;,tf_harad| tfg_shield| tfg_armor| tfg_helm| tfg_boots  |tfg_polearm,0,0,fac_harad,[itm_harad_finhelm,itm_harad_pectoral, itm_harad_padded_good,itm_harad_scale_greaves,itm_harad_leather_greaves,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pectoral, itm_harad_padded_good,itm_harad_scale_greaves,itm_harad_leather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6362"/>
        </table:table-row>
        <table:table-row table:style-name="ro1">
          <table:table-cell table:style-name="ce6" table:formula="of:=IF(AND([.B257]&lt;&gt;&quot;&quot;;[.C257]&lt;&gt;&quot;&quot;);CONCATENATE([Variables.$I$1];[Variables.$I$7];[.B257];[Variables.$I$7];[Variables.$I$6];[Variables.$I$7];[.C257];[Variables.$I$7];[Variables.$I$6];[Variables.$I$7];[.D257];[Variables.$I$7];[Variables.$I$6];[.E257];[Variables.$I$6];[.F257];[Variables.$I$6];[.G257];[Variables.$I$6];[.H257];[Variables.$I$6];[Variables.$I$1];[.I257];[.J257];[.K257];[.L257];[.M257];[.N257];[.O257];[Variables.$I$2];[Variables.$I$6];[.P257];[Variables.$I$6];[.Q257];[Variables.$I$6];[.R257];[Variables.$I$6];[.S257];[Variables.$I$6];[.T257];IF([.U257]&lt;&gt;&quot;&quot;;CONCATENATE([Variables.$I$6];[.U257]);&quot;&quot;);[Variables.$I$2];[Variables.$I$6]);IF([.B257]&lt;&gt;&quot;&quot;;CONCATENATE(&quot;#&quot;;[.B257]);&quot;&quot;))" office:value-type="string" office:string-value="[&quot;i5_harad_tiger_guard&quot;,&quot;Tiger_Guard&quot;,&quot;Tiger_Guards&quot;,tf_harad| tfg_shield| tfg_armor| tfg_helm| tfg_boots| tfg_gloves  |tfg_polearm,0,0,fac_harad,[itm_lion_helm,itm_harad_pectoral_lordly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pectoral_lordly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style-name="ce7" office:value-type="string" calcext:value-type="string">
            <text:p>i5_harad_tiger_guard</text:p>
          </table:table-cell>
          <table:table-cell table:style-name="ce7" office:value-type="string" calcext:value-type="string">
            <text:p>Tiger_Guard</text:p>
          </table:table-cell>
          <table:table-cell table:style-name="ce7" office:value-type="string" calcext:value-type="string">
            <text:p>Tiger_Guards</text:p>
          </table:table-cell>
          <table:table-cell table:style-name="ce8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harad</text:p>
          </table:table-cell>
          <table:table-cell table:style-name="ce11" office:value-type="string" calcext:value-type="string">
            <text:p>itm_lion_helm,</text:p>
          </table:table-cell>
          <table:table-cell table:style-name="ce11" office:value-type="string" calcext:value-type="string">
            <text:p>itm_harad_pectoral_lordly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harad_scale_greaves,</text:p>
          </table:table-cell>
          <table:table-cell table:style-name="ce11" office:value-type="string" calcext:value-type="string">
            <text:p>itm_harad_long_spear,</text:p>
          </table:table-cell>
          <table:table-cell table:style-name="ce11" office:value-type="string" calcext:value-type="string">
            <text:p>itm_harad_long_shield_b,</text:p>
          </table:table-cell>
          <table:table-cell table:style-name="ce11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3|knows_shield_4|knows_power_strike_4|knows_ironflesh_6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B257]&lt;&gt;&quot;&quot;;[.C257]&lt;&gt;&quot;&quot;);CONCATENATE([Variables.$I$1];[Variables.$I$7];[.B257];[Variables.$I$7];[Variables.$I$6];[Variables.$I$7];[.C257];[Variables.$I$7];[Variables.$I$6];[Variables.$I$7];[.D257];[Variables.$I$7];[Variables.$I$6];[.E257];[Variables.$I$6];[.F257];[Variables.$I$6];[.G257];[Variables.$I$6];[.H257];[Variables.$I$6];[Variables.$I$1];[.I257];[.J257];[.K257];[.L257];[.M257];[.N257];[.O257];[Variables.$I$2];[Variables.$I$6];[.P257];[Variables.$I$6];[.Q257];[Variables.$I$6];[.R257];[Variables.$I$6];[.S257];[Variables.$I$6];[.T257];IF([.U257]&lt;&gt;&quot;&quot;;CONCATENATE([Variables.$I$6];[.U257]);&quot;&quot;);[Variables.$I$2];[Variables.$I$6]);IF([.B257]&lt;&gt;&quot;&quot;;CONCATENATE(&quot;#&quot;;[.B257]);&quot;&quot;))" office:value-type="string" office:string-value="[&quot;i5_harad_tiger_guard&quot;,&quot;Tiger_Guard&quot;,&quot;Tiger_Guards&quot;,tf_harad| tfg_shield| tfg_armor| tfg_helm| tfg_boots| tfg_gloves  |tfg_polearm,0,0,fac_harad,[itm_lion_helm,itm_harad_pectoral_lordly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pectoral_lordly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number-columns-repeated="16362"/>
        </table:table-row>
        <table:table-row table:style-name="ro1">
          <table:table-cell table:style-name="ce6" table:formula="of:=IF(AND([.B258]&lt;&gt;&quot;&quot;;[.C258]&lt;&gt;&quot;&quot;);CONCATENATE([Variables.$I$1];[Variables.$I$7];[.B258];[Variables.$I$7];[Variables.$I$6];[Variables.$I$7];[.C258];[Variables.$I$7];[Variables.$I$6];[Variables.$I$7];[.D258];[Variables.$I$7];[Variables.$I$6];[.E258];[Variables.$I$6];[.F258];[Variables.$I$6];[.G258];[Variables.$I$6];[.H258];[Variables.$I$6];[Variables.$I$1];[.I258];[.J258];[.K258];[.L258];[.M258];[.N258];[.O258];[Variables.$I$2];[Variables.$I$6];[.P258];[Variables.$I$6];[.Q258];[Variables.$I$6];[.R258];[Variables.$I$6];[.S258];[Variables.$I$6];[.T258];IF([.U258]&lt;&gt;&quot;&quot;;CONCATENATE([Variables.$I$6];[.U258]);&quot;&quot;);[Variables.$I$2];[Variables.$I$6]);IF([.B258]&lt;&gt;&quot;&quot;;CONCATENATE(&quot;#&quot;;[.B258]);&quot;&quot;))" office:value-type="string" office:string-value="[&quot;i4_harad_swordsman&quot;,&quot;Harad_Swordsman&quot;,&quot;Harad_Swordsmen&quot;,tf_harad| tfg_shield| tfg_armor| tfg_helm| tfg_boots,0,0,fac_harad,[itm_harad_finhelm,itm_harad_scale,itm_harad_lamellar_good,itm_harad_heavy_lamellar,itm_harad_scale_greaves,itm_harad_sabre,itm_skirmisher_sword,itm_black_snake_sword_ba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lamellar_good,itm_harad_heavy_lamellar,itm_harad_scale_greaves,itm_harad_sabre,itm_skirmisher_sword,itm_black_snake_sword_bad,itm_harad_long_shield_d,itm_harad_long_shield_e,],attr_evil_tier_4,wp_tier_4,knows_common|knows_athletics_3|knows_shield_3|knows_power_strike_3|knows_ironflesh_2,haradrim_face_1,haradrim_face_2],</text:p>
          </table:table-cell>
          <table:table-cell table:style-name="ce7" office:value-type="string" calcext:value-type="string">
            <text:p>i4_harad_swordsman</text:p>
          </table:table-cell>
          <table:table-cell table:style-name="ce7" office:value-type="string" calcext:value-type="string">
            <text:p>Harad_Swordsman</text:p>
          </table:table-cell>
          <table:table-cell table:style-name="ce7" office:value-type="string" calcext:value-type="string">
            <text:p>Harad_Swordsmen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harad</text:p>
          </table:table-cell>
          <table:table-cell table:style-name="ce11" office:value-type="string" calcext:value-type="string">
            <text:p>itm_harad_finhelm,</text:p>
          </table:table-cell>
          <table:table-cell table:style-name="ce11" office:value-type="string" calcext:value-type="string">
            <text:p>itm_harad_scale,itm_harad_lamellar_good,itm_harad_heavy_lamellar,</text:p>
          </table:table-cell>
          <table:table-cell table:style-name="ce11"/>
          <table:table-cell table:style-name="ce11" office:value-type="string" calcext:value-type="string">
            <text:p>itm_harad_scale_greaves,</text:p>
          </table:table-cell>
          <table:table-cell table:style-name="ce11" office:value-type="string" calcext:value-type="string">
            <text:p>itm_harad_sabre,itm_skirmisher_sword,itm_black_snake_sword_bad,</text:p>
          </table:table-cell>
          <table:table-cell table:style-name="ce11" office:value-type="string" calcext:value-type="string">
            <text:p>itm_harad_long_shield_d,itm_harad_long_shield_e,</text:p>
          </table:table-cell>
          <table:table-cell table:style-name="ce11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3|knows_shield_3|knows_power_strike_3|knows_ironflesh_2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B258]&lt;&gt;&quot;&quot;;[.C258]&lt;&gt;&quot;&quot;);CONCATENATE([Variables.$I$1];[Variables.$I$7];[.B258];[Variables.$I$7];[Variables.$I$6];[Variables.$I$7];[.C258];[Variables.$I$7];[Variables.$I$6];[Variables.$I$7];[.D258];[Variables.$I$7];[Variables.$I$6];[.E258];[Variables.$I$6];[.F258];[Variables.$I$6];[.G258];[Variables.$I$6];[.H258];[Variables.$I$6];[Variables.$I$1];[.I258];[.J258];[.K258];[.L258];[.M258];[.N258];[.O258];[Variables.$I$2];[Variables.$I$6];[.P258];[Variables.$I$6];[.Q258];[Variables.$I$6];[.R258];[Variables.$I$6];[.S258];[Variables.$I$6];[.T258];IF([.U258]&lt;&gt;&quot;&quot;;CONCATENATE([Variables.$I$6];[.U258]);&quot;&quot;);[Variables.$I$2];[Variables.$I$6]);IF([.B258]&lt;&gt;&quot;&quot;;CONCATENATE(&quot;#&quot;;[.B258]);&quot;&quot;))" office:value-type="string" office:string-value="[&quot;i4_harad_swordsman&quot;,&quot;Harad_Swordsman&quot;,&quot;Harad_Swordsmen&quot;,tf_harad| tfg_shield| tfg_armor| tfg_helm| tfg_boots,0,0,fac_harad,[itm_harad_finhelm,itm_harad_scale,itm_harad_lamellar_good,itm_harad_heavy_lamellar,itm_harad_scale_greaves,itm_harad_sabre,itm_skirmisher_sword,itm_black_snake_sword_ba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lamellar_good,itm_harad_heavy_lamellar,itm_harad_scale_greaves,itm_harad_sabre,itm_skirmisher_sword,itm_black_snake_sword_ba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6362"/>
        </table:table-row>
        <table:table-row table:style-name="ro1">
          <table:table-cell table:style-name="ce6" table:formula="of:=IF(AND([.B259]&lt;&gt;&quot;&quot;;[.C259]&lt;&gt;&quot;&quot;);CONCATENATE([Variables.$I$1];[Variables.$I$7];[.B259];[Variables.$I$7];[Variables.$I$6];[Variables.$I$7];[.C259];[Variables.$I$7];[Variables.$I$6];[Variables.$I$7];[.D259];[Variables.$I$7];[Variables.$I$6];[.E259];[Variables.$I$6];[.F259];[Variables.$I$6];[.G259];[Variables.$I$6];[.H259];[Variables.$I$6];[Variables.$I$1];[.I259];[.J259];[.K259];[.L259];[.M259];[.N259];[.O259];[Variables.$I$2];[Variables.$I$6];[.P259];[Variables.$I$6];[.Q259];[Variables.$I$6];[.R259];[Variables.$I$6];[.S259];[Variables.$I$6];[.T259];IF([.U259]&lt;&gt;&quot;&quot;;CONCATENATE([Variables.$I$6];[.U259]);&quot;&quot;);[Variables.$I$2];[Variables.$I$6]);IF([.B259]&lt;&gt;&quot;&quot;;CONCATENATE(&quot;#&quot;;[.B259]);&quot;&quot;))" office:value-type="string" office:string-value="[&quot;i5_harad_lion_guard&quot;,&quot;Lion_Guard&quot;,&quot;Lion_Guards&quot;,tf_harad| tfg_shield| tfg_armor| tfg_helm| tfg_boots,0,0,fac_harad,[itm_lion_helm,itm_harad_heavy_lamellar_lordly,itm_leather_gloves,itm_harad_scale_greaves,itm_harad_khopesh,itm_black_snake_sword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heavy_lamellar_lordly,itm_leather_gloves,itm_harad_scale_greaves,itm_harad_khopesh,itm_black_snake_sword,itm_harad_long_shield_b,],attr_evil_tier_5,wp_tier_5,knows_common|knows_athletics_6|knows_power_strike_5|knows_ironflesh_4|knows_shield_3,haradrim_face_1,haradrim_face_2],</text:p>
          </table:table-cell>
          <table:table-cell table:style-name="ce7" office:value-type="string" calcext:value-type="string">
            <text:p>i5_harad_lion_guard</text:p>
          </table:table-cell>
          <table:table-cell table:style-name="ce7" office:value-type="string" calcext:value-type="string">
            <text:p>Lion_Guard</text:p>
          </table:table-cell>
          <table:table-cell table:style-name="ce7" office:value-type="string" calcext:value-type="string">
            <text:p>Lion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harad</text:p>
          </table:table-cell>
          <table:table-cell table:style-name="ce11" office:value-type="string" calcext:value-type="string">
            <text:p>itm_lion_helm,</text:p>
          </table:table-cell>
          <table:table-cell table:style-name="ce11" office:value-type="string" calcext:value-type="string">
            <text:p>itm_harad_heavy_lamellar_lordly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harad_scale_greaves,</text:p>
          </table:table-cell>
          <table:table-cell table:style-name="ce11" office:value-type="string" calcext:value-type="string">
            <text:p>itm_harad_khopesh,itm_black_snake_sword,</text:p>
          </table:table-cell>
          <table:table-cell table:style-name="ce30" office:value-type="string" calcext:value-type="string">
            <text:p>itm_harad_long_shield_b,</text:p>
          </table:table-cell>
          <table:table-cell table:style-name="ce11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6|knows_power_strike_5|knows_ironflesh_4|knows_shield_3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B259]&lt;&gt;&quot;&quot;;[.C259]&lt;&gt;&quot;&quot;);CONCATENATE([Variables.$I$1];[Variables.$I$7];[.B259];[Variables.$I$7];[Variables.$I$6];[Variables.$I$7];[.C259];[Variables.$I$7];[Variables.$I$6];[Variables.$I$7];[.D259];[Variables.$I$7];[Variables.$I$6];[.E259];[Variables.$I$6];[.F259];[Variables.$I$6];[.G259];[Variables.$I$6];[.H259];[Variables.$I$6];[Variables.$I$1];[.I259];[.J259];[.K259];[.L259];[.M259];[.N259];[.O259];[Variables.$I$2];[Variables.$I$6];[.P259];[Variables.$I$6];[.Q259];[Variables.$I$6];[.R259];[Variables.$I$6];[.S259];[Variables.$I$6];[.T259];IF([.U259]&lt;&gt;&quot;&quot;;CONCATENATE([Variables.$I$6];[.U259]);&quot;&quot;);[Variables.$I$2];[Variables.$I$6]);IF([.B259]&lt;&gt;&quot;&quot;;CONCATENATE(&quot;#&quot;;[.B259]);&quot;&quot;))" office:value-type="string" office:string-value="[&quot;i5_harad_lion_guard&quot;,&quot;Lion_Guard&quot;,&quot;Lion_Guards&quot;,tf_harad| tfg_shield| tfg_armor| tfg_helm| tfg_boots,0,0,fac_harad,[itm_lion_helm,itm_harad_heavy_lamellar_lordly,itm_leather_gloves,itm_harad_scale_greaves,itm_harad_khopesh,itm_black_snake_sword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heavy_lamellar_lordly,itm_leather_gloves,itm_harad_scale_greaves,itm_harad_khopesh,itm_black_snake_sword,itm_harad_long_shield_b,],attr_evil_tier_5,wp_tier_5,knows_common|knows_athletics_6|knows_power_strike_5|knows_ironflesh_4|knows_shield_3,haradrim_face_1,haradrim_face_2],</text:p>
          </table:table-cell>
          <table:table-cell table:number-columns-repeated="16362"/>
        </table:table-row>
        <table:table-row table:style-name="ro1">
          <table:table-cell table:style-name="ce6" table:formula="of:=IF(AND([.B260]&lt;&gt;&quot;&quot;;[.C260]&lt;&gt;&quot;&quot;);CONCATENATE([Variables.$I$1];[Variables.$I$7];[.B260];[Variables.$I$7];[Variables.$I$6];[Variables.$I$7];[.C260];[Variables.$I$7];[Variables.$I$6];[Variables.$I$7];[.D260];[Variables.$I$7];[Variables.$I$6];[.E260];[Variables.$I$6];[.F260];[Variables.$I$6];[.G260];[Variables.$I$6];[.H260];[Variables.$I$6];[Variables.$I$1];[.I260];[.J260];[.K260];[.L260];[.M260];[.N260];[.O260];[Variables.$I$2];[Variables.$I$6];[.P260];[Variables.$I$6];[.Q260];[Variables.$I$6];[.R260];[Variables.$I$6];[.S260];[Variables.$I$6];[.T260];IF([.U260]&lt;&gt;&quot;&quot;;CONCATENATE([Variables.$I$6];[.U260]);&quot;&quot;);[Variables.$I$2];[Variables.$I$6]);IF([.B260]&lt;&gt;&quot;&quot;;CONCATENATE(&quot;#&quot;;[.B260]);&quot;&quot;))" office:value-type="string" office:string-value="[&quot;a3_harad_hunter&quot;,&quot;Harad_Hunter&quot;,&quot;Harad_Hunters&quot;,tf_harad| tfg_ranged| tfg_armor| tfg_helm| tfg_boots,0,0,fac_harad,[itm_harad_heavy_inf_helm,itm_harad_tunic,itm_harad_padded_bad,itm_harad_tunic_good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" calcext:value-type="string">
            <text:p>["a3_harad_hunter","Harad_Hunter","Harad_Hunters",tf_harad| tfg_ranged| tfg_armor| tfg_helm| tfg_boots,0,0,fac_harad,[itm_harad_heavy_inf_helm,itm_harad_tunic,itm_harad_padded_bad,itm_harad_tunic_good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</text:p>
          </table:table-cell>
          <table:table-cell table:style-name="ce7" office:value-type="string" calcext:value-type="string">
            <text:p>a3_harad_hunter</text:p>
          </table:table-cell>
          <table:table-cell table:style-name="ce7" office:value-type="string" calcext:value-type="string">
            <text:p>Harad_Hunter</text:p>
          </table:table-cell>
          <table:table-cell table:style-name="ce7" office:value-type="string" calcext:value-type="string">
            <text:p>Harad_Hunt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harad</text:p>
          </table:table-cell>
          <table:table-cell table:style-name="ce11" office:value-type="string" calcext:value-type="string">
            <text:p>itm_harad_heavy_inf_helm,</text:p>
          </table:table-cell>
          <table:table-cell table:style-name="ce11" office:value-type="string" calcext:value-type="string">
            <text:p>itm_harad_tunic,itm_harad_padded_bad,itm_harad_tunic_good,</text:p>
          </table:table-cell>
          <table:table-cell table:style-name="ce11"/>
          <table:table-cell table:style-name="ce11" office:value-type="string" calcext:value-type="string">
            <text:p>itm_desert_boots,</text:p>
          </table:table-cell>
          <table:table-cell table:style-name="ce11" office:value-type="string" calcext:value-type="string">
            <text:p>itm_harad_bow,itm_harad_arrows,</text:p>
          </table:table-cell>
          <table:table-cell table:style-name="ce11" office:value-type="string" calcext:value-type="string">
            <text:p>itm_harad_short_spear,itm_harad_dagger,</text:p>
          </table:table-cell>
          <table:table-cell table:style-name="ce11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bow_3</text:p>
          </table:table-cell>
          <table:table-cell table:style-name="ce13" office:value-type="string" calcext:value-type="string">
            <text:p>knows_common|knows_ironflesh_1|knows_power_throw_2|knows_power_draw_2|knows_athletics_3|knows_riding_1|knows_horse_archery_1|knows_looting_1|knows_tactics_1|knows_spotting_1|knows_wound_treatment_1|knows_first_aid_1|knows_leadership_2|knows_trade_1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B260]&lt;&gt;&quot;&quot;;[.C260]&lt;&gt;&quot;&quot;);CONCATENATE([Variables.$I$1];[Variables.$I$7];[.B260];[Variables.$I$7];[Variables.$I$6];[Variables.$I$7];[.C260];[Variables.$I$7];[Variables.$I$6];[Variables.$I$7];[.D260];[Variables.$I$7];[Variables.$I$6];[.E260];[Variables.$I$6];[.F260];[Variables.$I$6];[.G260];[Variables.$I$6];[.H260];[Variables.$I$6];[Variables.$I$1];[.I260];[.J260];[.K260];[.L260];[.M260];[.N260];[.O260];[Variables.$I$2];[Variables.$I$6];[.P260];[Variables.$I$6];[.Q260];[Variables.$I$6];[.R260];[Variables.$I$6];[.S260];[Variables.$I$6];[.T260];IF([.U260]&lt;&gt;&quot;&quot;;CONCATENATE([Variables.$I$6];[.U260]);&quot;&quot;);[Variables.$I$2];[Variables.$I$6]);IF([.B260]&lt;&gt;&quot;&quot;;CONCATENATE(&quot;#&quot;;[.B260]);&quot;&quot;))" office:value-type="string" office:string-value="[&quot;a3_harad_hunter&quot;,&quot;Harad_Hunter&quot;,&quot;Harad_Hunters&quot;,tf_harad| tfg_ranged| tfg_armor| tfg_helm| tfg_boots,0,0,fac_harad,[itm_harad_heavy_inf_helm,itm_harad_tunic,itm_harad_padded_bad,itm_harad_tunic_good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" calcext:value-type="string">
            <text:p>["a3_harad_hunter","Harad_Hunter","Harad_Hunters",tf_harad| tfg_ranged| tfg_armor| tfg_helm| tfg_boots,0,0,fac_harad,[itm_harad_heavy_inf_helm,itm_harad_tunic,itm_harad_padded_bad,itm_harad_tunic_good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16362"/>
        </table:table-row>
        <table:table-row table:style-name="ro1">
          <table:table-cell table:style-name="ce6" table:formula="of:=IF(AND([.B261]&lt;&gt;&quot;&quot;;[.C261]&lt;&gt;&quot;&quot;);CONCATENATE([Variables.$I$1];[Variables.$I$7];[.B261];[Variables.$I$7];[Variables.$I$6];[Variables.$I$7];[.C261];[Variables.$I$7];[Variables.$I$6];[Variables.$I$7];[.D261];[Variables.$I$7];[Variables.$I$6];[.E261];[Variables.$I$6];[.F261];[Variables.$I$6];[.G261];[Variables.$I$6];[.H261];[Variables.$I$6];[Variables.$I$1];[.I261];[.J261];[.K261];[.L261];[.M261];[.N261];[.O261];[Variables.$I$2];[Variables.$I$6];[.P261];[Variables.$I$6];[.Q261];[Variables.$I$6];[.R261];[Variables.$I$6];[.S261];[Variables.$I$6];[.T261];IF([.U261]&lt;&gt;&quot;&quot;;CONCATENATE([Variables.$I$6];[.U261]);&quot;&quot;);[Variables.$I$2];[Variables.$I$6]);IF([.B261]&lt;&gt;&quot;&quot;;CONCATENATE(&quot;#&quot;;[.B261]);&quot;&quot;))" office:value-type="string" office:string-value="[&quot;a4_harad_archer&quot;,&quot;Harad_Archer&quot;,&quot;Harad_Archers&quot;,tf_harad| tfg_ranged| tfg_armor| tfg_helm| tfg_boots,0,0,fac_harad,[itm_harad_heavy_inf_helm,itm_harad_tunic_good,itm_harad_padded,itm_harad_lamellar_bad,itm_harad_leather_greaves,itm_desert_boots,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tunic_good,itm_harad_padded,itm_harad_lamellar_bad,itm_harad_leather_greaves,itm_desert_boots,itm_harad_bow,itm_harad_arrows,itm_harad_short_spear,itm_harad_dagger,],attr_evil_tier_4,wp_tier_bow_4,knows_common|knows_athletics_3|knows_power_draw_3|knows_ironflesh_1,haradrim_face_1,haradrim_face_2],</text:p>
          </table:table-cell>
          <table:table-cell table:style-name="ce7" office:value-type="string" calcext:value-type="string">
            <text:p>a4_harad_archer</text:p>
          </table:table-cell>
          <table:table-cell table:style-name="ce7" office:value-type="string" calcext:value-type="string">
            <text:p>Harad_Archer</text:p>
          </table:table-cell>
          <table:table-cell table:style-name="ce7" office:value-type="string" calcext:value-type="string">
            <text:p>Harad_Arch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harad</text:p>
          </table:table-cell>
          <table:table-cell table:style-name="ce11" office:value-type="string" calcext:value-type="string">
            <text:p>itm_harad_heavy_inf_helm,</text:p>
          </table:table-cell>
          <table:table-cell table:style-name="ce11" office:value-type="string" calcext:value-type="string">
            <text:p>itm_harad_tunic_good,itm_harad_padded,itm_harad_lamellar_bad,</text:p>
          </table:table-cell>
          <table:table-cell table:style-name="ce11"/>
          <table:table-cell table:style-name="ce11" office:value-type="string" calcext:value-type="string">
            <text:p>itm_harad_leather_greaves,itm_desert_boots,</text:p>
          </table:table-cell>
          <table:table-cell table:style-name="ce11" office:value-type="string" calcext:value-type="string">
            <text:p>itm_harad_bow,itm_harad_arrows,</text:p>
          </table:table-cell>
          <table:table-cell table:style-name="ce11" office:value-type="string" calcext:value-type="string">
            <text:p>itm_harad_short_spear,itm_harad_dagger,</text:p>
          </table:table-cell>
          <table:table-cell table:style-name="ce11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bow_4</text:p>
          </table:table-cell>
          <table:table-cell table:style-name="ce12" office:value-type="string" calcext:value-type="string">
            <text:p>knows_common|knows_athletics_3|knows_power_draw_3|knows_ironflesh_1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B261]&lt;&gt;&quot;&quot;;[.C261]&lt;&gt;&quot;&quot;);CONCATENATE([Variables.$I$1];[Variables.$I$7];[.B261];[Variables.$I$7];[Variables.$I$6];[Variables.$I$7];[.C261];[Variables.$I$7];[Variables.$I$6];[Variables.$I$7];[.D261];[Variables.$I$7];[Variables.$I$6];[.E261];[Variables.$I$6];[.F261];[Variables.$I$6];[.G261];[Variables.$I$6];[.H261];[Variables.$I$6];[Variables.$I$1];[.I261];[.J261];[.K261];[.L261];[.M261];[.N261];[.O261];[Variables.$I$2];[Variables.$I$6];[.P261];[Variables.$I$6];[.Q261];[Variables.$I$6];[.R261];[Variables.$I$6];[.S261];[Variables.$I$6];[.T261];IF([.U261]&lt;&gt;&quot;&quot;;CONCATENATE([Variables.$I$6];[.U261]);&quot;&quot;);[Variables.$I$2];[Variables.$I$6]);IF([.B261]&lt;&gt;&quot;&quot;;CONCATENATE(&quot;#&quot;;[.B261]);&quot;&quot;))" office:value-type="string" office:string-value="[&quot;a4_harad_archer&quot;,&quot;Harad_Archer&quot;,&quot;Harad_Archers&quot;,tf_harad| tfg_ranged| tfg_armor| tfg_helm| tfg_boots,0,0,fac_harad,[itm_harad_heavy_inf_helm,itm_harad_tunic_good,itm_harad_padded,itm_harad_lamellar_bad,itm_harad_leather_greaves,itm_desert_boots,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tunic_good,itm_harad_padded,itm_harad_lamellar_bad,itm_harad_leather_greaves,itm_desert_boots,itm_harad_bow,itm_harad_arrows,itm_harad_short_spear,itm_harad_dagger,],attr_evil_tier_4,wp_tier_bow_4,knows_common|knows_athletics_3|knows_power_draw_3|knows_ironflesh_1,haradrim_face_1,haradrim_face_2],</text:p>
          </table:table-cell>
          <table:table-cell table:number-columns-repeated="16362"/>
        </table:table-row>
        <table:table-row table:style-name="ro1">
          <table:table-cell table:style-name="ce6" table:formula="of:=IF(AND([.B262]&lt;&gt;&quot;&quot;;[.C262]&lt;&gt;&quot;&quot;);CONCATENATE([Variables.$I$1];[Variables.$I$7];[.B262];[Variables.$I$7];[Variables.$I$6];[Variables.$I$7];[.C262];[Variables.$I$7];[Variables.$I$6];[Variables.$I$7];[.D262];[Variables.$I$7];[Variables.$I$6];[.E262];[Variables.$I$6];[.F262];[Variables.$I$6];[.G262];[Variables.$I$6];[.H262];[Variables.$I$6];[Variables.$I$1];[.I262];[.J262];[.K262];[.L262];[.M262];[.N262];[.O262];[Variables.$I$2];[Variables.$I$6];[.P262];[Variables.$I$6];[.Q262];[Variables.$I$6];[.R262];[Variables.$I$6];[.S262];[Variables.$I$6];[.T262];IF([.U262]&lt;&gt;&quot;&quot;;CONCATENATE([Variables.$I$6];[.U262]);&quot;&quot;);[Variables.$I$2];[Variables.$I$6]);IF([.B262]&lt;&gt;&quot;&quot;;CONCATENATE(&quot;#&quot;;[.B262]);&quot;&quot;))" office:value-type="string" office:string-value="[&quot;a5_harad_eagle_guard&quot;,&quot;Eagle_Guard&quot;,&quot;Eagle_Guards&quot;,tf_harad| tfg_ranged| tfg_armor| tfg_helm| tfg_boots,0,0,fac_harad,[itm_harad_eaglehelm,itm_black_snake_armor_bad,itm_harad_pectoral,itm_leather_gloves,itm_harad_leather_greaves,itm_lg_bow,itm_harad_arrows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black_snake_armor_bad,itm_harad_pectoral,itm_leather_gloves,itm_harad_leather_greaves,itm_lg_bow,itm_harad_arrows,itm_harad_arrows,itm_eagle_guard_spear,],attr_evil_tier_5,wp_tier_bow_5,knows_common|knows_athletics_4|knows_power_draw_4|knows_ironflesh_2,haradrim_face_1,haradrim_face_2],</text:p>
          </table:table-cell>
          <table:table-cell table:style-name="ce7" office:value-type="string" calcext:value-type="string">
            <text:p>a5_harad_eagle_guard</text:p>
          </table:table-cell>
          <table:table-cell table:style-name="ce7" office:value-type="string" calcext:value-type="string">
            <text:p>Eagle_Guard</text:p>
          </table:table-cell>
          <table:table-cell table:style-name="ce7" office:value-type="string" calcext:value-type="string">
            <text:p>Eagle_Guard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harad</text:p>
          </table:table-cell>
          <table:table-cell table:style-name="ce11" office:value-type="string" calcext:value-type="string">
            <text:p>itm_harad_eaglehelm,</text:p>
          </table:table-cell>
          <table:table-cell table:style-name="ce11" office:value-type="string" calcext:value-type="string">
            <text:p>itm_black_snake_armor_bad,itm_harad_pectoral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harad_leather_greaves,</text:p>
          </table:table-cell>
          <table:table-cell table:style-name="ce11" office:value-type="string" calcext:value-type="string">
            <text:p>itm_lg_bow,itm_harad_arrows,itm_harad_arrows,</text:p>
          </table:table-cell>
          <table:table-cell table:style-name="ce11" office:value-type="string" calcext:value-type="string">
            <text:p>itm_eagle_guard_spear,</text:p>
          </table:table-cell>
          <table:table-cell table:style-name="ce11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bow_5</text:p>
          </table:table-cell>
          <table:table-cell table:style-name="ce12" office:value-type="string" calcext:value-type="string">
            <text:p>knows_common|knows_athletics_4|knows_power_draw_4|knows_ironflesh_2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B262]&lt;&gt;&quot;&quot;;[.C262]&lt;&gt;&quot;&quot;);CONCATENATE([Variables.$I$1];[Variables.$I$7];[.B262];[Variables.$I$7];[Variables.$I$6];[Variables.$I$7];[.C262];[Variables.$I$7];[Variables.$I$6];[Variables.$I$7];[.D262];[Variables.$I$7];[Variables.$I$6];[.E262];[Variables.$I$6];[.F262];[Variables.$I$6];[.G262];[Variables.$I$6];[.H262];[Variables.$I$6];[Variables.$I$1];[.I262];[.J262];[.K262];[.L262];[.M262];[.N262];[.O262];[Variables.$I$2];[Variables.$I$6];[.P262];[Variables.$I$6];[.Q262];[Variables.$I$6];[.R262];[Variables.$I$6];[.S262];[Variables.$I$6];[.T262];IF([.U262]&lt;&gt;&quot;&quot;;CONCATENATE([Variables.$I$6];[.U262]);&quot;&quot;);[Variables.$I$2];[Variables.$I$6]);IF([.B262]&lt;&gt;&quot;&quot;;CONCATENATE(&quot;#&quot;;[.B262]);&quot;&quot;))" office:value-type="string" office:string-value="[&quot;a5_harad_eagle_guard&quot;,&quot;Eagle_Guard&quot;,&quot;Eagle_Guards&quot;,tf_harad| tfg_ranged| tfg_armor| tfg_helm| tfg_boots,0,0,fac_harad,[itm_harad_eaglehelm,itm_black_snake_armor_bad,itm_harad_pectoral,itm_leather_gloves,itm_harad_leather_greaves,itm_lg_bow,itm_harad_arrows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black_snake_armor_bad,itm_harad_pectoral,itm_leather_gloves,itm_harad_leather_greaves,itm_lg_bow,itm_harad_arrows,itm_harad_arrows,itm_eagle_guard_spear,],attr_evil_tier_5,wp_tier_bow_5,knows_common|knows_athletics_4|knows_power_draw_4|knows_ironflesh_2,haradrim_face_1,haradrim_face_2],</text:p>
          </table:table-cell>
          <table:table-cell table:number-columns-repeated="16362"/>
        </table:table-row>
        <table:table-row table:style-name="ro1">
          <table:table-cell table:style-name="ce6" table:formula="of:=IF(AND([.B263]&lt;&gt;&quot;&quot;;[.C263]&lt;&gt;&quot;&quot;);CONCATENATE([Variables.$I$1];[Variables.$I$7];[.B263];[Variables.$I$7];[Variables.$I$6];[Variables.$I$7];[.C263];[Variables.$I$7];[Variables.$I$6];[Variables.$I$7];[.D263];[Variables.$I$7];[Variables.$I$6];[.E263];[Variables.$I$6];[.F263];[Variables.$I$6];[.G263];[Variables.$I$6];[.H263];[Variables.$I$6];[Variables.$I$1];[.I263];[.J263];[.K263];[.L263];[.M263];[.N263];[.O263];[Variables.$I$2];[Variables.$I$6];[.P263];[Variables.$I$6];[.Q263];[Variables.$I$6];[.R263];[Variables.$I$6];[.S263];[Variables.$I$6];[.T263];IF([.U263]&lt;&gt;&quot;&quot;;CONCATENATE([Variables.$I$6];[.U263]);&quot;&quot;);[Variables.$I$2];[Variables.$I$6]);IF([.B263]&lt;&gt;&quot;&quot;;CONCATENATE(&quot;#&quot;;[.B263]);&quot;&quot;))" office:value-type="string" office:string-value="#HARONDOR" calcext:value-type="string">
            <text:p>#HARONDOR</text:p>
          </table:table-cell>
          <table:table-cell table:style-name="ce5" office:value-type="string" calcext:value-type="string">
            <text:p>HARONDOR</text:p>
          </table:table-cell>
          <table:table-cell table:style-name="ce6" table:number-columns-repeated="19"/>
          <table:table-cell table:style-name="ce6" table:formula="of:=IF(AND([.B263]&lt;&gt;&quot;&quot;;[.C263]&lt;&gt;&quot;&quot;);CONCATENATE([Variables.$I$1];[Variables.$I$7];[.B263];[Variables.$I$7];[Variables.$I$6];[Variables.$I$7];[.C263];[Variables.$I$7];[Variables.$I$6];[Variables.$I$7];[.D263];[Variables.$I$7];[Variables.$I$6];[.E263];[Variables.$I$6];[.F263];[Variables.$I$6];[.G263];[Variables.$I$6];[.H263];[Variables.$I$6];[Variables.$I$1];[.I263];[.J263];[.K263];[.L263];[.M263];[.N263];[.O263];[Variables.$I$2];[Variables.$I$6];[.P263];[Variables.$I$6];[.Q263];[Variables.$I$6];[.R263];[Variables.$I$6];[.S263];[Variables.$I$6];[.T263];IF([.U263]&lt;&gt;&quot;&quot;;CONCATENATE([Variables.$I$6];[.U263]);&quot;&quot;);[Variables.$I$2];[Variables.$I$6]);IF([.B263]&lt;&gt;&quot;&quot;;CONCATENATE(&quot;#&quot;;[.B263]);&quot;&quot;))" office:value-type="string" office:string-value="#HARONDOR" calcext:value-type="string">
            <text:p>#HARONDOR</text:p>
          </table:table-cell>
          <table:table-cell table:number-columns-repeated="16362"/>
        </table:table-row>
        <table:table-row table:style-name="ro1">
          <table:table-cell table:style-name="ce6" table:formula="of:=IF(AND([.B264]&lt;&gt;&quot;&quot;;[.C264]&lt;&gt;&quot;&quot;);CONCATENATE([Variables.$I$1];[Variables.$I$7];[.B264];[Variables.$I$7];[Variables.$I$6];[Variables.$I$7];[.C264];[Variables.$I$7];[Variables.$I$6];[Variables.$I$7];[.D264];[Variables.$I$7];[Variables.$I$6];[.E264];[Variables.$I$6];[.F264];[Variables.$I$6];[.G264];[Variables.$I$6];[.H264];[Variables.$I$6];[Variables.$I$1];[.I264];[.J264];[.K264];[.L264];[.M264];[.N264];[.O264];[Variables.$I$2];[Variables.$I$6];[.P264];[Variables.$I$6];[.Q264];[Variables.$I$6];[.R264];[Variables.$I$6];[.S264];[Variables.$I$6];[.T264];IF([.U264]&lt;&gt;&quot;&quot;;CONCATENATE([Variables.$I$6];[.U264]);&quot;&quot;);[Variables.$I$2];[Variables.$I$6]);IF([.B264]&lt;&gt;&quot;&quot;;CONCATENATE(&quot;#&quot;;[.B264]);&quot;&quot;))" office:value-type="string" office:string-value="[&quot;c2_harondor_scout&quot;,&quot;Harondor_Scout&quot;,&quot;Harondor_Scouts&quot;,tf_harad| tf_mounted| tfg_armor| tfg_horse| tfg_boots,0,0,fac_harad,[itm_harad_cav_helm_a,itm_harad_tunic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tunic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style-name="ce7" office:value-type="string" calcext:value-type="string">
            <text:p>c2_harondor_scout</text:p>
          </table:table-cell>
          <table:table-cell table:style-name="ce7" office:value-type="string" calcext:value-type="string">
            <text:p>Harondor_Scout</text:p>
          </table:table-cell>
          <table:table-cell table:style-name="ce7" office:value-type="string" calcext:value-type="string">
            <text:p>Harondor_Scouts</text:p>
          </table:table-cell>
          <table:table-cell table:style-name="ce8" office:value-type="string" calcext:value-type="string">
            <text:p>tf_hara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harad</text:p>
          </table:table-cell>
          <table:table-cell table:style-name="ce31" office:value-type="string" calcext:value-type="string">
            <text:p>itm_harad_cav_helm_a,</text:p>
          </table:table-cell>
          <table:table-cell table:style-name="ce11" office:value-type="string" calcext:value-type="string">
            <text:p>itm_harad_tunic,itm_harad_padded,</text:p>
          </table:table-cell>
          <table:table-cell table:style-name="ce11"/>
          <table:table-cell table:style-name="ce11" office:value-type="string" calcext:value-type="string">
            <text:p>itm_desert_boots,</text:p>
          </table:table-cell>
          <table:table-cell table:style-name="ce11" office:value-type="string" calcext:value-type="string">
            <text:p>itm_horandor_a,</text:p>
          </table:table-cell>
          <table:table-cell table:style-name="ce11" office:value-type="string" calcext:value-type="string">
            <text:p>itm_harad_shield_a,</text:p>
          </table:table-cell>
          <table:table-cell table:style-name="ce11" office:value-type="string" calcext:value-type="string">
            <text:p>itm_saddle_horse</text:p>
          </table:table-cell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2" office:value-type="string" calcext:value-type="string">
            <text:p>knows_common|knows_athletics_2|knows_shield_1|knows_power_strike_1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B264]&lt;&gt;&quot;&quot;;[.C264]&lt;&gt;&quot;&quot;);CONCATENATE([Variables.$I$1];[Variables.$I$7];[.B264];[Variables.$I$7];[Variables.$I$6];[Variables.$I$7];[.C264];[Variables.$I$7];[Variables.$I$6];[Variables.$I$7];[.D264];[Variables.$I$7];[Variables.$I$6];[.E264];[Variables.$I$6];[.F264];[Variables.$I$6];[.G264];[Variables.$I$6];[.H264];[Variables.$I$6];[Variables.$I$1];[.I264];[.J264];[.K264];[.L264];[.M264];[.N264];[.O264];[Variables.$I$2];[Variables.$I$6];[.P264];[Variables.$I$6];[.Q264];[Variables.$I$6];[.R264];[Variables.$I$6];[.S264];[Variables.$I$6];[.T264];IF([.U264]&lt;&gt;&quot;&quot;;CONCATENATE([Variables.$I$6];[.U264]);&quot;&quot;);[Variables.$I$2];[Variables.$I$6]);IF([.B264]&lt;&gt;&quot;&quot;;CONCATENATE(&quot;#&quot;;[.B264]);&quot;&quot;))" office:value-type="string" office:string-value="[&quot;c2_harondor_scout&quot;,&quot;Harondor_Scout&quot;,&quot;Harondor_Scouts&quot;,tf_harad| tf_mounted| tfg_armor| tfg_horse| tfg_boots,0,0,fac_harad,[itm_harad_cav_helm_a,itm_harad_tunic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tunic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16362"/>
        </table:table-row>
        <table:table-row table:style-name="ro1">
          <table:table-cell table:style-name="ce6" table:formula="of:=IF(AND([.B265]&lt;&gt;&quot;&quot;;[.C265]&lt;&gt;&quot;&quot;);CONCATENATE([Variables.$I$1];[Variables.$I$7];[.B265];[Variables.$I$7];[Variables.$I$6];[Variables.$I$7];[.C265];[Variables.$I$7];[Variables.$I$6];[Variables.$I$7];[.D265];[Variables.$I$7];[Variables.$I$6];[.E265];[Variables.$I$6];[.F265];[Variables.$I$6];[.G265];[Variables.$I$6];[.H265];[Variables.$I$6];[Variables.$I$1];[.I265];[.J265];[.K265];[.L265];[.M265];[.N265];[.O265];[Variables.$I$2];[Variables.$I$6];[.P265];[Variables.$I$6];[.Q265];[Variables.$I$6];[.R265];[Variables.$I$6];[.S265];[Variables.$I$6];[.T265];IF([.U265]&lt;&gt;&quot;&quot;;CONCATENATE([Variables.$I$6];[.U265]);&quot;&quot;);[Variables.$I$2];[Variables.$I$6]);IF([.B265]&lt;&gt;&quot;&quot;;CONCATENATE(&quot;#&quot;;[.B265]);&quot;&quot;))" office:value-type="string" office:string-value="[&quot;c3_harondor_rider&quot;,&quot;Harondor_Rider&quot;,&quot;Harondor_Riders&quot;,tf_harad| tf_mounted| tfg_shield| tfg_armor| tfg_helm| tfg_horse| tfg_boots,0,0,fac_harad,[itm_harad_cav_helm_b,itm_harad_tunic_good,itm_harad_padded_good,itm_harad_scale_bad,itm_harad_lamellar_bad,itm_harad_leather_greaves,itm_desert_boots,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tunic_good,itm_harad_padded_good,itm_harad_scale_bad,itm_harad_lamellar_bad,itm_harad_leather_greaves,itm_desert_boots,itm_horandor_a,itm_harad_shield_b,itm_harad_shield_c,itm_harad_horse],attr_evil_tier_3,wp_tier_3,knows_common|knows_riding_2|knows_shield_2|knows_power_strike_2,haradrim_face_1,haradrim_face_2],</text:p>
          </table:table-cell>
          <table:table-cell table:style-name="ce7" office:value-type="string" calcext:value-type="string">
            <text:p>c3_harondor_rider</text:p>
          </table:table-cell>
          <table:table-cell table:style-name="ce7" office:value-type="string" calcext:value-type="string">
            <text:p>Harondor_Rider</text:p>
          </table:table-cell>
          <table:table-cell table:style-name="ce7" office:value-type="string" calcext:value-type="string">
            <text:p>Harondor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harad</text:p>
          </table:table-cell>
          <table:table-cell table:style-name="ce11" office:value-type="string" calcext:value-type="string">
            <text:p>itm_harad_cav_helm_b,</text:p>
          </table:table-cell>
          <table:table-cell table:style-name="ce11" office:value-type="string" calcext:value-type="string">
            <text:p>itm_harad_tunic_good,itm_harad_padded_good,itm_harad_scale_bad,itm_harad_lamellar_bad,</text:p>
          </table:table-cell>
          <table:table-cell table:style-name="ce11"/>
          <table:table-cell table:style-name="ce11" office:value-type="string" calcext:value-type="string">
            <text:p>itm_harad_leather_greaves,itm_desert_boots,</text:p>
          </table:table-cell>
          <table:table-cell table:style-name="ce11" office:value-type="string" calcext:value-type="string">
            <text:p>itm_horandor_a,</text:p>
          </table:table-cell>
          <table:table-cell table:style-name="ce11" office:value-type="string" calcext:value-type="string">
            <text:p>itm_harad_shield_b,itm_harad_shield_c,</text:p>
          </table:table-cell>
          <table:table-cell table:style-name="ce11" office:value-type="string" calcext:value-type="string">
            <text:p>itm_harad_horse</text:p>
          </table:table-cell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riding_2|knows_shield_2|knows_power_strike_2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B265]&lt;&gt;&quot;&quot;;[.C265]&lt;&gt;&quot;&quot;);CONCATENATE([Variables.$I$1];[Variables.$I$7];[.B265];[Variables.$I$7];[Variables.$I$6];[Variables.$I$7];[.C265];[Variables.$I$7];[Variables.$I$6];[Variables.$I$7];[.D265];[Variables.$I$7];[Variables.$I$6];[.E265];[Variables.$I$6];[.F265];[Variables.$I$6];[.G265];[Variables.$I$6];[.H265];[Variables.$I$6];[Variables.$I$1];[.I265];[.J265];[.K265];[.L265];[.M265];[.N265];[.O265];[Variables.$I$2];[Variables.$I$6];[.P265];[Variables.$I$6];[.Q265];[Variables.$I$6];[.R265];[Variables.$I$6];[.S265];[Variables.$I$6];[.T265];IF([.U265]&lt;&gt;&quot;&quot;;CONCATENATE([Variables.$I$6];[.U265]);&quot;&quot;);[Variables.$I$2];[Variables.$I$6]);IF([.B265]&lt;&gt;&quot;&quot;;CONCATENATE(&quot;#&quot;;[.B265]);&quot;&quot;))" office:value-type="string" office:string-value="[&quot;c3_harondor_rider&quot;,&quot;Harondor_Rider&quot;,&quot;Harondor_Riders&quot;,tf_harad| tf_mounted| tfg_shield| tfg_armor| tfg_helm| tfg_horse| tfg_boots,0,0,fac_harad,[itm_harad_cav_helm_b,itm_harad_tunic_good,itm_harad_padded_good,itm_harad_scale_bad,itm_harad_lamellar_bad,itm_harad_leather_greaves,itm_desert_boots,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tunic_good,itm_harad_padded_good,itm_harad_scale_bad,itm_harad_lamellar_bad,itm_harad_leather_greaves,itm_desert_boot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16362"/>
        </table:table-row>
        <table:table-row table:style-name="ro1">
          <table:table-cell table:style-name="ce6" table:formula="of:=IF(AND([.B266]&lt;&gt;&quot;&quot;;[.C266]&lt;&gt;&quot;&quot;);CONCATENATE([Variables.$I$1];[Variables.$I$7];[.B266];[Variables.$I$7];[Variables.$I$6];[Variables.$I$7];[.C266];[Variables.$I$7];[Variables.$I$6];[Variables.$I$7];[.D266];[Variables.$I$7];[Variables.$I$6];[.E266];[Variables.$I$6];[.F266];[Variables.$I$6];[.G266];[Variables.$I$6];[.H266];[Variables.$I$6];[Variables.$I$1];[.I266];[.J266];[.K266];[.L266];[.M266];[.N266];[.O266];[Variables.$I$2];[Variables.$I$6];[.P266];[Variables.$I$6];[.Q266];[Variables.$I$6];[.R266];[Variables.$I$6];[.S266];[Variables.$I$6];[.T266];IF([.U266]&lt;&gt;&quot;&quot;;CONCATENATE([Variables.$I$6];[.U266]);&quot;&quot;);[Variables.$I$2];[Variables.$I$6]);IF([.B266]&lt;&gt;&quot;&quot;;CONCATENATE(&quot;#&quot;;[.B266]);&quot;&quot;))" office:value-type="string" office:string-value="[&quot;c4_harondor_light_cavalry&quot;,&quot;Harondor_Light_Rider&quot;,&quot;Harondor_Light_Riders&quot;,tf_harad| tf_mounted| tfg_shield| tfg_armor| tfg_helm| tfg_horse| tfg_boots,0,0,fac_harad,[itm_harad_wavy_helm,itm_harad_lamellar_good,itm_harad_heavy_bad,itm_harad_scale,itm_harad_lamellar_greaves,itm_harad_leather_greaves,itm_horandor_a,itm_harad_heavy_sword_bad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Rider","Harondor_Light_Riders",tf_harad| tf_mounted| tfg_shield| tfg_armor| tfg_helm| tfg_horse| tfg_boots,0,0,fac_harad,[itm_harad_wavy_helm,itm_harad_lamellar_good,itm_harad_heavy_bad,itm_harad_scale,itm_harad_lamellar_greaves,itm_harad_leather_greaves,itm_horandor_a,itm_harad_heavy_sword_bad,itm_harad_shield_b,itm_harad_shield_c,itm_harad_warhorse,],attr_evil_tier_4,wp_tier_4,knows_common|knows_riding_3|knows_shield_3|knows_power_strike_3|knows_ironflesh_2,haradrim_face_1,haradrim_face_2],</text:p>
          </table:table-cell>
          <table:table-cell table:style-name="ce7" office:value-type="string" calcext:value-type="string">
            <text:p>c4_harondor_light_cavalry</text:p>
          </table:table-cell>
          <table:table-cell table:style-name="ce7" office:value-type="string" calcext:value-type="string">
            <text:p>Harondor_Light_Rider</text:p>
          </table:table-cell>
          <table:table-cell table:style-name="ce7" office:value-type="string" calcext:value-type="string">
            <text:p>Harondor_Light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harad</text:p>
          </table:table-cell>
          <table:table-cell table:style-name="ce11" office:value-type="string" calcext:value-type="string">
            <text:p>itm_harad_wavy_helm,</text:p>
          </table:table-cell>
          <table:table-cell table:style-name="ce11" office:value-type="string" calcext:value-type="string">
            <text:p>itm_harad_lamellar_good,itm_harad_heavy_bad,itm_harad_scale,</text:p>
          </table:table-cell>
          <table:table-cell table:style-name="ce11"/>
          <table:table-cell table:style-name="ce11" office:value-type="string" calcext:value-type="string">
            <text:p>itm_harad_lamellar_greaves,itm_harad_leather_greaves,</text:p>
          </table:table-cell>
          <table:table-cell table:style-name="ce11" office:value-type="string" calcext:value-type="string">
            <text:p>itm_horandor_a,itm_harad_heavy_sword_bad,</text:p>
          </table:table-cell>
          <table:table-cell table:style-name="ce11" office:value-type="string" calcext:value-type="string">
            <text:p>itm_harad_shield_b,itm_harad_shield_c,</text:p>
          </table:table-cell>
          <table:table-cell table:style-name="ce11" office:value-type="string" calcext:value-type="string">
            <text:p>itm_harad_warhorse,</text:p>
          </table:table-cell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riding_3|knows_shield_3|knows_power_strike_3|knows_ironflesh_2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B266]&lt;&gt;&quot;&quot;;[.C266]&lt;&gt;&quot;&quot;);CONCATENATE([Variables.$I$1];[Variables.$I$7];[.B266];[Variables.$I$7];[Variables.$I$6];[Variables.$I$7];[.C266];[Variables.$I$7];[Variables.$I$6];[Variables.$I$7];[.D266];[Variables.$I$7];[Variables.$I$6];[.E266];[Variables.$I$6];[.F266];[Variables.$I$6];[.G266];[Variables.$I$6];[.H266];[Variables.$I$6];[Variables.$I$1];[.I266];[.J266];[.K266];[.L266];[.M266];[.N266];[.O266];[Variables.$I$2];[Variables.$I$6];[.P266];[Variables.$I$6];[.Q266];[Variables.$I$6];[.R266];[Variables.$I$6];[.S266];[Variables.$I$6];[.T266];IF([.U266]&lt;&gt;&quot;&quot;;CONCATENATE([Variables.$I$6];[.U266]);&quot;&quot;);[Variables.$I$2];[Variables.$I$6]);IF([.B266]&lt;&gt;&quot;&quot;;CONCATENATE(&quot;#&quot;;[.B266]);&quot;&quot;))" office:value-type="string" office:string-value="[&quot;c4_harondor_light_cavalry&quot;,&quot;Harondor_Light_Rider&quot;,&quot;Harondor_Light_Riders&quot;,tf_harad| tf_mounted| tfg_shield| tfg_armor| tfg_helm| tfg_horse| tfg_boots,0,0,fac_harad,[itm_harad_wavy_helm,itm_harad_lamellar_good,itm_harad_heavy_bad,itm_harad_scale,itm_harad_lamellar_greaves,itm_harad_leather_greaves,itm_horandor_a,itm_harad_heavy_sword_bad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Rider","Harondor_Light_Riders",tf_harad| tf_mounted| tfg_shield| tfg_armor| tfg_helm| tfg_horse| tfg_boots,0,0,fac_harad,[itm_harad_wavy_helm,itm_harad_lamellar_good,itm_harad_heavy_bad,itm_harad_scale,itm_harad_lamellar_greaves,itm_harad_leather_greaves,itm_horandor_a,itm_harad_heavy_sword_bad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16362"/>
        </table:table-row>
        <table:table-row table:style-name="ro1">
          <table:table-cell table:style-name="ce6" table:formula="of:=IF(AND([.B267]&lt;&gt;&quot;&quot;;[.C267]&lt;&gt;&quot;&quot;);CONCATENATE([Variables.$I$1];[Variables.$I$7];[.B267];[Variables.$I$7];[Variables.$I$6];[Variables.$I$7];[.C267];[Variables.$I$7];[Variables.$I$6];[Variables.$I$7];[.D267];[Variables.$I$7];[Variables.$I$6];[.E267];[Variables.$I$6];[.F267];[Variables.$I$6];[.G267];[Variables.$I$6];[.H267];[Variables.$I$6];[Variables.$I$1];[.I267];[.J267];[.K267];[.L267];[.M267];[.N267];[.O267];[Variables.$I$2];[Variables.$I$6];[.P267];[Variables.$I$6];[.Q267];[Variables.$I$6];[.R267];[Variables.$I$6];[.S267];[Variables.$I$6];[.T267];IF([.U267]&lt;&gt;&quot;&quot;;CONCATENATE([Variables.$I$6];[.U267]);&quot;&quot;);[Variables.$I$2];[Variables.$I$6]);IF([.B267]&lt;&gt;&quot;&quot;;CONCATENATE(&quot;#&quot;;[.B267]);&quot;&quot;))" office:value-type="string" office:string-value="[&quot;c5_harondor_serpent_knight&quot;,&quot;Gold_Serpent_Knight&quot;,&quot;Gold_Serpent_Knights&quot;,tf_harad| tf_mounted| tfg_shield| tfg_armor| tfg_helm| tfg_horse| tfg_boots|tfg_polearm,0,0,fac_harad,[itm_harad_dragon_helm,itm_harad_heavy_good,itm_leather_gloves,itm_harad_lamellar_greaves,itm_harad_long_spear,itm_harad_heavy_sword_good,itm_harad_yellow_shield,itm_harad_warhorse],attr_evil_tier_5,wp_tier_5,knows_common|knows_ironflesh_3|knows_power_strike_5|knows_shield_3|knows_riding_7,haradrim_face_1,haradrim_face_2]," calcext:value-type="string">
            <text:p>["c5_harondor_serpent_knight","Gold_Serpent_Knight","Gold_Serpent_Knights",tf_harad| tf_mounted| tfg_shield| tfg_armor| tfg_helm| tfg_horse| tfg_boots|tfg_polearm,0,0,fac_harad,[itm_harad_dragon_helm,itm_harad_heavy_good,itm_leather_gloves,itm_harad_lamellar_greaves,itm_harad_long_spear,itm_harad_heavy_sword_good,itm_harad_yellow_shield,itm_harad_warhorse],attr_evil_tier_5,wp_tier_5,knows_common|knows_ironflesh_3|knows_power_strike_5|knows_shield_3|knows_riding_7,haradrim_face_1,haradrim_face_2],</text:p>
          </table:table-cell>
          <table:table-cell table:style-name="ce7" office:value-type="string" calcext:value-type="string">
            <text:p>c5_harondor_serpent_knight</text:p>
          </table:table-cell>
          <table:table-cell table:style-name="ce7" office:value-type="string" calcext:value-type="string">
            <text:p>Gold_Serpent_Knight</text:p>
          </table:table-cell>
          <table:table-cell table:style-name="ce7" office:value-type="string" calcext:value-type="string">
            <text:p>Gold_Serpent_Knights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harad</text:p>
          </table:table-cell>
          <table:table-cell table:style-name="ce11" office:value-type="string" calcext:value-type="string">
            <text:p>itm_harad_dragon_helm,</text:p>
          </table:table-cell>
          <table:table-cell table:style-name="ce11" office:value-type="string" calcext:value-type="string">
            <text:p>itm_harad_heavy_good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harad_lamellar_greaves,</text:p>
          </table:table-cell>
          <table:table-cell table:style-name="ce11" office:value-type="string" calcext:value-type="string">
            <text:p>itm_harad_long_spear,itm_harad_heavy_sword_good,</text:p>
          </table:table-cell>
          <table:table-cell table:style-name="ce11" office:value-type="string" calcext:value-type="string">
            <text:p>itm_harad_yellow_shield,</text:p>
          </table:table-cell>
          <table:table-cell table:style-name="ce11" office:value-type="string" calcext:value-type="string">
            <text:p>itm_harad_warhorse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ironflesh_3|knows_power_strike_5|knows_shield_3|knows_riding_7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B267]&lt;&gt;&quot;&quot;;[.C267]&lt;&gt;&quot;&quot;);CONCATENATE([Variables.$I$1];[Variables.$I$7];[.B267];[Variables.$I$7];[Variables.$I$6];[Variables.$I$7];[.C267];[Variables.$I$7];[Variables.$I$6];[Variables.$I$7];[.D267];[Variables.$I$7];[Variables.$I$6];[.E267];[Variables.$I$6];[.F267];[Variables.$I$6];[.G267];[Variables.$I$6];[.H267];[Variables.$I$6];[Variables.$I$1];[.I267];[.J267];[.K267];[.L267];[.M267];[.N267];[.O267];[Variables.$I$2];[Variables.$I$6];[.P267];[Variables.$I$6];[.Q267];[Variables.$I$6];[.R267];[Variables.$I$6];[.S267];[Variables.$I$6];[.T267];IF([.U267]&lt;&gt;&quot;&quot;;CONCATENATE([Variables.$I$6];[.U267]);&quot;&quot;);[Variables.$I$2];[Variables.$I$6]);IF([.B267]&lt;&gt;&quot;&quot;;CONCATENATE(&quot;#&quot;;[.B267]);&quot;&quot;))" office:value-type="string" office:string-value="[&quot;c5_harondor_serpent_knight&quot;,&quot;Gold_Serpent_Knight&quot;,&quot;Gold_Serpent_Knights&quot;,tf_harad| tf_mounted| tfg_shield| tfg_armor| tfg_helm| tfg_horse| tfg_boots|tfg_polearm,0,0,fac_harad,[itm_harad_dragon_helm,itm_harad_heavy_good,itm_leather_gloves,itm_harad_lamellar_greaves,itm_harad_long_spear,itm_harad_heavy_sword_good,itm_harad_yellow_shield,itm_harad_warhorse],attr_evil_tier_5,wp_tier_5,knows_common|knows_ironflesh_3|knows_power_strike_5|knows_shield_3|knows_riding_7,haradrim_face_1,haradrim_face_2]," calcext:value-type="string">
            <text:p>["c5_harondor_serpent_knight","Gold_Serpent_Knight","Gold_Serpent_Knights",tf_harad| tf_mounted| tfg_shield| tfg_armor| tfg_helm| tfg_horse| tfg_boots|tfg_polearm,0,0,fac_harad,[itm_harad_dragon_helm,itm_harad_heavy_good,itm_leather_gloves,itm_harad_lamellar_greaves,itm_harad_long_spear,itm_harad_heavy_sword_good,itm_harad_yellow_shield,itm_harad_warhorse],attr_evil_tier_5,wp_tier_5,knows_common|knows_ironflesh_3|knows_power_strike_5|knows_shield_3|knows_riding_7,haradrim_face_1,haradrim_face_2],</text:p>
          </table:table-cell>
          <table:table-cell table:number-columns-repeated="16362"/>
        </table:table-row>
        <table:table-row table:style-name="ro1">
          <table:table-cell table:style-name="ce6" table:formula="of:=IF(AND([.B268]&lt;&gt;&quot;&quot;;[.C268]&lt;&gt;&quot;&quot;);CONCATENATE([Variables.$I$1];[Variables.$I$7];[.B268];[Variables.$I$7];[Variables.$I$6];[Variables.$I$7];[.C268];[Variables.$I$7];[Variables.$I$6];[Variables.$I$7];[.D268];[Variables.$I$7];[Variables.$I$6];[.E268];[Variables.$I$6];[.F268];[Variables.$I$6];[.G268];[Variables.$I$6];[.H268];[Variables.$I$6];[Variables.$I$1];[.I268];[.J268];[.K268];[.L268];[.M268];[.N268];[.O268];[Variables.$I$2];[Variables.$I$6];[.P268];[Variables.$I$6];[.Q268];[Variables.$I$6];[.R268];[Variables.$I$6];[.S268];[Variables.$I$6];[.T268];IF([.U268]&lt;&gt;&quot;&quot;;CONCATENATE([Variables.$I$6];[.U268]);&quot;&quot;);[Variables.$I$2];[Variables.$I$6]);IF([.B268]&lt;&gt;&quot;&quot;;CONCATENATE(&quot;#&quot;;[.B268]);&quot;&quot;))" office:value-type="string" office:string-value="[&quot;ac3_harondor_skirmisher&quot;,&quot;Harondor_Skirmisher&quot;,&quot;Harondor_Skirmishers&quot;,tf_harad| tfg_ranged| tf_mounted| tfg_armor| tfg_helm| tfg_horse| tfg_boots,0,0,fac_harad,[itm_harad_cav_helm_b,itm_harad_tunic_good,itm_harad_padded,itm_harad_leather_greaves,itm_desert_boots,itm_harad_bow,itm_harad_arrows,itm_horandor_a,itm_saddle_horse,],attr_evil_tier_3,wp_tier_bow_3,knows_common|knows_horse_archery_3|knows_riding_3|knows_shield_1|knows_power_draw_2|knows_power_strike_2|knows_ironflesh_1,haradrim_face_1,haradrim_face_2]," calcext:value-type="string">
            <text:p>["ac3_harondor_skirmisher","Harondor_Skirmisher","Harondor_Skirmishers",tf_harad| tfg_ranged| tf_mounted| tfg_armor| tfg_helm| tfg_horse| tfg_boots,0,0,fac_harad,[itm_harad_cav_helm_b,itm_harad_tunic_good,itm_harad_padded,itm_harad_leather_greaves,itm_desert_boots,itm_harad_bow,itm_harad_arrows,itm_horandor_a,itm_saddle_horse,],attr_evil_tier_3,wp_tier_bow_3,knows_common|knows_horse_archery_3|knows_riding_3|knows_shield_1|knows_power_draw_2|knows_power_strike_2|knows_ironflesh_1,haradrim_face_1,haradrim_face_2],</text:p>
          </table:table-cell>
          <table:table-cell table:style-name="ce7" office:value-type="string" calcext:value-type="string">
            <text:p>ac3_harondor_skirmisher</text:p>
          </table:table-cell>
          <table:table-cell table:style-name="ce7" office:value-type="string" calcext:value-type="string">
            <text:p>Harondor_Skirmisher</text:p>
          </table:table-cell>
          <table:table-cell table:style-name="ce7" office:value-type="string" calcext:value-type="string">
            <text:p>Harondor_Skirmis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harad</text:p>
          </table:table-cell>
          <table:table-cell table:style-name="ce11" office:value-type="string" calcext:value-type="string">
            <text:p>itm_harad_cav_helm_b,</text:p>
          </table:table-cell>
          <table:table-cell table:style-name="ce11" office:value-type="string" calcext:value-type="string">
            <text:p>itm_harad_tunic_good,itm_harad_padded,</text:p>
          </table:table-cell>
          <table:table-cell table:style-name="ce11"/>
          <table:table-cell table:style-name="ce11" office:value-type="string" calcext:value-type="string">
            <text:p>itm_harad_leather_greaves,itm_desert_boots,</text:p>
          </table:table-cell>
          <table:table-cell table:style-name="ce11" office:value-type="string" calcext:value-type="string">
            <text:p>itm_harad_bow,itm_harad_arrows,</text:p>
          </table:table-cell>
          <table:table-cell table:style-name="ce11" office:value-type="string" calcext:value-type="string">
            <text:p>itm_horandor_a,</text:p>
          </table:table-cell>
          <table:table-cell table:style-name="ce11" office:value-type="string" calcext:value-type="string">
            <text:p>itm_saddle_horse,</text:p>
          </table:table-cell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bow_3</text:p>
          </table:table-cell>
          <table:table-cell table:style-name="ce12" office:value-type="string" calcext:value-type="string">
            <text:p>knows_common|knows_horse_archery_3|knows_riding_3|knows_shield_1|knows_power_draw_2|knows_power_strike_2|knows_ironflesh_1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B268]&lt;&gt;&quot;&quot;;[.C268]&lt;&gt;&quot;&quot;);CONCATENATE([Variables.$I$1];[Variables.$I$7];[.B268];[Variables.$I$7];[Variables.$I$6];[Variables.$I$7];[.C268];[Variables.$I$7];[Variables.$I$6];[Variables.$I$7];[.D268];[Variables.$I$7];[Variables.$I$6];[.E268];[Variables.$I$6];[.F268];[Variables.$I$6];[.G268];[Variables.$I$6];[.H268];[Variables.$I$6];[Variables.$I$1];[.I268];[.J268];[.K268];[.L268];[.M268];[.N268];[.O268];[Variables.$I$2];[Variables.$I$6];[.P268];[Variables.$I$6];[.Q268];[Variables.$I$6];[.R268];[Variables.$I$6];[.S268];[Variables.$I$6];[.T268];IF([.U268]&lt;&gt;&quot;&quot;;CONCATENATE([Variables.$I$6];[.U268]);&quot;&quot;);[Variables.$I$2];[Variables.$I$6]);IF([.B268]&lt;&gt;&quot;&quot;;CONCATENATE(&quot;#&quot;;[.B268]);&quot;&quot;))" office:value-type="string" office:string-value="[&quot;ac3_harondor_skirmisher&quot;,&quot;Harondor_Skirmisher&quot;,&quot;Harondor_Skirmishers&quot;,tf_harad| tfg_ranged| tf_mounted| tfg_armor| tfg_helm| tfg_horse| tfg_boots,0,0,fac_harad,[itm_harad_cav_helm_b,itm_harad_tunic_good,itm_harad_padded,itm_harad_leather_greaves,itm_desert_boots,itm_harad_bow,itm_harad_arrows,itm_horandor_a,itm_saddle_horse,],attr_evil_tier_3,wp_tier_bow_3,knows_common|knows_horse_archery_3|knows_riding_3|knows_shield_1|knows_power_draw_2|knows_power_strike_2|knows_ironflesh_1,haradrim_face_1,haradrim_face_2]," calcext:value-type="string">
            <text:p>["ac3_harondor_skirmisher","Harondor_Skirmisher","Harondor_Skirmishers",tf_harad| tfg_ranged| tf_mounted| tfg_armor| tfg_helm| tfg_horse| tfg_boots,0,0,fac_harad,[itm_harad_cav_helm_b,itm_harad_tunic_good,itm_harad_padded,itm_harad_leather_greaves,itm_desert_boots,itm_harad_bow,itm_harad_arrows,itm_horandor_a,itm_saddle_horse,],attr_evil_tier_3,wp_tier_bow_3,knows_common|knows_horse_archery_3|knows_riding_3|knows_shield_1|knows_power_draw_2|knows_power_strike_2|knows_ironflesh_1,haradrim_face_1,haradrim_face_2],</text:p>
          </table:table-cell>
          <table:table-cell table:number-columns-repeated="16362"/>
        </table:table-row>
        <table:table-row table:style-name="ro1">
          <table:table-cell table:style-name="ce6" table:formula="of:=IF(AND([.B269]&lt;&gt;&quot;&quot;;[.C269]&lt;&gt;&quot;&quot;);CONCATENATE([Variables.$I$1];[Variables.$I$7];[.B269];[Variables.$I$7];[Variables.$I$6];[Variables.$I$7];[.C269];[Variables.$I$7];[Variables.$I$6];[Variables.$I$7];[.D269];[Variables.$I$7];[Variables.$I$6];[.E269];[Variables.$I$6];[.F269];[Variables.$I$6];[.G269];[Variables.$I$6];[.H269];[Variables.$I$6];[Variables.$I$1];[.I269];[.J269];[.K269];[.L269];[.M269];[.N269];[.O269];[Variables.$I$2];[Variables.$I$6];[.P269];[Variables.$I$6];[.Q269];[Variables.$I$6];[.R269];[Variables.$I$6];[.S269];[Variables.$I$6];[.T269];IF([.U269]&lt;&gt;&quot;&quot;;CONCATENATE([Variables.$I$6];[.U269]);&quot;&quot;);[Variables.$I$2];[Variables.$I$6]);IF([.B269]&lt;&gt;&quot;&quot;;CONCATENATE(&quot;#&quot;;[.B269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padded_good,itm_harad_lamellar_greaves,itm_harad_leather_greaves,itm_nomad_bow,itm_harad_arrows,itm_horandor_a,itm_black_snake_sword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padded_good,itm_harad_lamellar_greaves,itm_harad_leather_greaves,itm_nomad_bow,itm_harad_arrows,itm_horandor_a,itm_black_snake_sword,itm_harad_horse,],attr_evil_tier_4,wp_tier_bow_4,knows_common|knows_horse_archery_4|knows_riding_4|knows_power_draw_3|knows_power_strike_2|knows_ironflesh_1,haradrim_face_1,haradrim_face_2],</text:p>
          </table:table-cell>
          <table:table-cell table:style-name="ce7" office:value-type="string" calcext:value-type="string">
            <text:p>ac4_harondor_horse_archer</text:p>
          </table:table-cell>
          <table:table-cell table:style-name="ce7" office:value-type="string" calcext:value-type="string">
            <text:p>Harondor_Horse_Archer</text:p>
          </table:table-cell>
          <table:table-cell table:style-name="ce7" office:value-type="string" calcext:value-type="string">
            <text:p>Harondor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harad</text:p>
          </table:table-cell>
          <table:table-cell table:style-name="ce11" office:value-type="string" calcext:value-type="string">
            <text:p>itm_harad_heavy_inf_helm,</text:p>
          </table:table-cell>
          <table:table-cell table:style-name="ce11" office:value-type="string" calcext:value-type="string">
            <text:p>itm_harad_padded_good,</text:p>
          </table:table-cell>
          <table:table-cell table:style-name="ce11"/>
          <table:table-cell table:style-name="ce11" office:value-type="string" calcext:value-type="string">
            <text:p>itm_harad_lamellar_greaves,itm_harad_leather_greaves,</text:p>
          </table:table-cell>
          <table:table-cell table:style-name="ce11" office:value-type="string" calcext:value-type="string">
            <text:p>itm_nomad_bow,itm_harad_arrows,</text:p>
          </table:table-cell>
          <table:table-cell table:style-name="ce11" office:value-type="string" calcext:value-type="string">
            <text:p>itm_horandor_a,itm_black_snake_sword,</text:p>
          </table:table-cell>
          <table:table-cell table:style-name="ce11" office:value-type="string" calcext:value-type="string">
            <text:p>itm_harad_horse,</text:p>
          </table:table-cell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bow_4</text:p>
          </table:table-cell>
          <table:table-cell table:style-name="ce12" office:value-type="string" calcext:value-type="string">
            <text:p>knows_common|knows_horse_archery_4|knows_riding_4|knows_power_draw_3|knows_power_strike_2|knows_ironflesh_1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B269]&lt;&gt;&quot;&quot;;[.C269]&lt;&gt;&quot;&quot;);CONCATENATE([Variables.$I$1];[Variables.$I$7];[.B269];[Variables.$I$7];[Variables.$I$6];[Variables.$I$7];[.C269];[Variables.$I$7];[Variables.$I$6];[Variables.$I$7];[.D269];[Variables.$I$7];[Variables.$I$6];[.E269];[Variables.$I$6];[.F269];[Variables.$I$6];[.G269];[Variables.$I$6];[.H269];[Variables.$I$6];[Variables.$I$1];[.I269];[.J269];[.K269];[.L269];[.M269];[.N269];[.O269];[Variables.$I$2];[Variables.$I$6];[.P269];[Variables.$I$6];[.Q269];[Variables.$I$6];[.R269];[Variables.$I$6];[.S269];[Variables.$I$6];[.T269];IF([.U269]&lt;&gt;&quot;&quot;;CONCATENATE([Variables.$I$6];[.U269]);&quot;&quot;);[Variables.$I$2];[Variables.$I$6]);IF([.B269]&lt;&gt;&quot;&quot;;CONCATENATE(&quot;#&quot;;[.B269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padded_good,itm_harad_lamellar_greaves,itm_harad_leather_greaves,itm_nomad_bow,itm_harad_arrows,itm_horandor_a,itm_black_snake_sword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padded_good,itm_harad_lamellar_greaves,itm_harad_leather_greaves,itm_nomad_bow,itm_harad_arrows,itm_horandor_a,itm_black_snake_sword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16362"/>
        </table:table-row>
        <table:table-row table:style-name="ro1">
          <table:table-cell table:style-name="ce6" table:formula="of:=IF(AND([.B270]&lt;&gt;&quot;&quot;;[.C270]&lt;&gt;&quot;&quot;);CONCATENATE([Variables.$I$1];[Variables.$I$7];[.B270];[Variables.$I$7];[Variables.$I$6];[Variables.$I$7];[.C270];[Variables.$I$7];[Variables.$I$6];[Variables.$I$7];[.D270];[Variables.$I$7];[Variables.$I$6];[.E270];[Variables.$I$6];[.F270];[Variables.$I$6];[.G270];[Variables.$I$6];[.H270];[Variables.$I$6];[Variables.$I$1];[.I270];[.J270];[.K270];[.L270];[.M270];[.N270];[.O270];[Variables.$I$2];[Variables.$I$6];[.P270];[Variables.$I$6];[.Q270];[Variables.$I$6];[.R270];[Variables.$I$6];[.S270];[Variables.$I$6];[.T270];IF([.U270]&lt;&gt;&quot;&quot;;CONCATENATE([Variables.$I$6];[.U270]);&quot;&quot;);[Variables.$I$2];[Variables.$I$6]);IF([.B270]&lt;&gt;&quot;&quot;;CONCATENATE(&quot;#&quot;;[.B270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amellar_greaves,itm_nomad_bow,itm_harad_arrows,itm_black_snake_sword_good,itm_harad_heavy_sword,itm_harad_warhorse,],attr_evil_tier_5,wp_tier_bow_5,knows_common|knows_ironflesh_3|knows_power_strike_4|knows_power_draw_5|knows_riding_7|knows_horse_archery_7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amellar_greaves,itm_nomad_bow,itm_harad_arrows,itm_black_snake_sword_good,itm_harad_heavy_sword,itm_harad_warhorse,],attr_evil_tier_5,wp_tier_bow_5,knows_common|knows_ironflesh_3|knows_power_strike_4|knows_power_draw_5|knows_riding_7|knows_horse_archery_7,haradrim_face_1,haradrim_face_2],</text:p>
          </table:table-cell>
          <table:table-cell table:style-name="ce7" office:value-type="string" calcext:value-type="string">
            <text:p>ac5_harondor_black_snake</text:p>
          </table:table-cell>
          <table:table-cell table:style-name="ce7" office:value-type="string" calcext:value-type="string">
            <text:p>Black_Snake_Horse_Archer</text:p>
          </table:table-cell>
          <table:table-cell table:style-name="ce7" office:value-type="string" calcext:value-type="string">
            <text:p>Black_Snake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harad</text:p>
          </table:table-cell>
          <table:table-cell table:style-name="ce11" office:value-type="string" calcext:value-type="string">
            <text:p>itm_black_snake_helm,</text:p>
          </table:table-cell>
          <table:table-cell table:style-name="ce11" office:value-type="string" calcext:value-type="string">
            <text:p>itm_black_snake_armor,</text:p>
          </table:table-cell>
          <table:table-cell table:style-name="ce11"/>
          <table:table-cell table:style-name="ce11" office:value-type="string" calcext:value-type="string">
            <text:p>itm_harad_lamellar_greaves,</text:p>
          </table:table-cell>
          <table:table-cell table:style-name="ce11" office:value-type="string" calcext:value-type="string">
            <text:p>itm_nomad_bow,itm_harad_arrows,</text:p>
          </table:table-cell>
          <table:table-cell table:style-name="ce11" office:value-type="string" calcext:value-type="string">
            <text:p>itm_black_snake_sword_good,itm_harad_heavy_sword,</text:p>
          </table:table-cell>
          <table:table-cell table:style-name="ce11" office:value-type="string" calcext:value-type="string">
            <text:p>itm_harad_warhorse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bow_5</text:p>
          </table:table-cell>
          <table:table-cell table:style-name="ce12" office:value-type="string" calcext:value-type="string">
            <text:p>knows_common|knows_ironflesh_3|knows_power_strike_4|knows_power_draw_5|knows_riding_7|knows_horse_archery_7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B270]&lt;&gt;&quot;&quot;;[.C270]&lt;&gt;&quot;&quot;);CONCATENATE([Variables.$I$1];[Variables.$I$7];[.B270];[Variables.$I$7];[Variables.$I$6];[Variables.$I$7];[.C270];[Variables.$I$7];[Variables.$I$6];[Variables.$I$7];[.D270];[Variables.$I$7];[Variables.$I$6];[.E270];[Variables.$I$6];[.F270];[Variables.$I$6];[.G270];[Variables.$I$6];[.H270];[Variables.$I$6];[Variables.$I$1];[.I270];[.J270];[.K270];[.L270];[.M270];[.N270];[.O270];[Variables.$I$2];[Variables.$I$6];[.P270];[Variables.$I$6];[.Q270];[Variables.$I$6];[.R270];[Variables.$I$6];[.S270];[Variables.$I$6];[.T270];IF([.U270]&lt;&gt;&quot;&quot;;CONCATENATE([Variables.$I$6];[.U270]);&quot;&quot;);[Variables.$I$2];[Variables.$I$6]);IF([.B270]&lt;&gt;&quot;&quot;;CONCATENATE(&quot;#&quot;;[.B270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amellar_greaves,itm_nomad_bow,itm_harad_arrows,itm_black_snake_sword_good,itm_harad_heavy_sword,itm_harad_warhorse,],attr_evil_tier_5,wp_tier_bow_5,knows_common|knows_ironflesh_3|knows_power_strike_4|knows_power_draw_5|knows_riding_7|knows_horse_archery_7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amellar_greaves,itm_nomad_bow,itm_harad_arrows,itm_black_snake_sword_good,itm_harad_heavy_sword,itm_harad_warhorse,],attr_evil_tier_5,wp_tier_bow_5,knows_common|knows_ironflesh_3|knows_power_strike_4|knows_power_draw_5|knows_riding_7|knows_horse_archery_7,haradrim_face_1,haradrim_face_2],</text:p>
          </table:table-cell>
          <table:table-cell table:number-columns-repeated="16362"/>
        </table:table-row>
        <table:table-row table:style-name="ro1">
          <table:table-cell table:style-name="ce6" table:formula="of:=IF(AND([.B271]&lt;&gt;&quot;&quot;;[.C271]&lt;&gt;&quot;&quot;);CONCATENATE([Variables.$I$1];[Variables.$I$7];[.B271];[Variables.$I$7];[Variables.$I$6];[Variables.$I$7];[.C271];[Variables.$I$7];[Variables.$I$6];[Variables.$I$7];[.D271];[Variables.$I$7];[Variables.$I$6];[.E271];[Variables.$I$6];[.F271];[Variables.$I$6];[.G271];[Variables.$I$6];[.H271];[Variables.$I$6];[Variables.$I$1];[.I271];[.J271];[.K271];[.L271];[.M271];[.N271];[.O271];[Variables.$I$2];[Variables.$I$6];[.P271];[Variables.$I$6];[.Q271];[Variables.$I$6];[.R271];[Variables.$I$6];[.S271];[Variables.$I$6];[.T271];IF([.U271]&lt;&gt;&quot;&quot;;CONCATENATE([Variables.$I$6];[.U271]);&quot;&quot;);[Variables.$I$2];[Variables.$I$6]);IF([.B271]&lt;&gt;&quot;&quot;;CONCATENATE(&quot;#&quot;;[.B271]);&quot;&quot;))" office:value-type="string" office:string-value="#FAR HARAD" calcext:value-type="string">
            <text:p>#FAR HARAD</text:p>
          </table:table-cell>
          <table:table-cell table:style-name="ce5" office:value-type="string" calcext:value-type="string">
            <text:p>FAR HARAD</text:p>
          </table:table-cell>
          <table:table-cell table:style-name="ce6" table:number-columns-repeated="19"/>
          <table:table-cell table:style-name="ce6" table:formula="of:=IF(AND([.B271]&lt;&gt;&quot;&quot;;[.C271]&lt;&gt;&quot;&quot;);CONCATENATE([Variables.$I$1];[Variables.$I$7];[.B271];[Variables.$I$7];[Variables.$I$6];[Variables.$I$7];[.C271];[Variables.$I$7];[Variables.$I$6];[Variables.$I$7];[.D271];[Variables.$I$7];[Variables.$I$6];[.E271];[Variables.$I$6];[.F271];[Variables.$I$6];[.G271];[Variables.$I$6];[.H271];[Variables.$I$6];[Variables.$I$1];[.I271];[.J271];[.K271];[.L271];[.M271];[.N271];[.O271];[Variables.$I$2];[Variables.$I$6];[.P271];[Variables.$I$6];[.Q271];[Variables.$I$6];[.R271];[Variables.$I$6];[.S271];[Variables.$I$6];[.T271];IF([.U271]&lt;&gt;&quot;&quot;;CONCATENATE([Variables.$I$6];[.U271]);&quot;&quot;);[Variables.$I$2];[Variables.$I$6]);IF([.B271]&lt;&gt;&quot;&quot;;CONCATENATE(&quot;#&quot;;[.B271]);&quot;&quot;))" office:value-type="string" office:string-value="#FAR HARAD" calcext:value-type="string">
            <text:p>#FAR HARAD</text:p>
          </table:table-cell>
          <table:table-cell table:number-columns-repeated="16362"/>
        </table:table-row>
        <table:table-row table:style-name="ro1">
          <table:table-cell table:style-name="ce6" table:formula="of:=IF(AND([.B272]&lt;&gt;&quot;&quot;;[.C272]&lt;&gt;&quot;&quot;);CONCATENATE([Variables.$I$1];[Variables.$I$7];[.B272];[Variables.$I$7];[Variables.$I$6];[Variables.$I$7];[.C272];[Variables.$I$7];[Variables.$I$6];[Variables.$I$7];[.D272];[Variables.$I$7];[Variables.$I$6];[.E272];[Variables.$I$6];[.F272];[Variables.$I$6];[.G272];[Variables.$I$6];[.H272];[Variables.$I$6];[Variables.$I$1];[.I272];[.J272];[.K272];[.L272];[.M272];[.N272];[.O272];[Variables.$I$2];[Variables.$I$6];[.P272];[Variables.$I$6];[.Q272];[Variables.$I$6];[.R272];[Variables.$I$6];[.S272];[Variables.$I$6];[.T272];IF([.U272]&lt;&gt;&quot;&quot;;CONCATENATE([Variables.$I$6];[.U272]);&quot;&quot;);[Variables.$I$2];[Variables.$I$6]);IF([.B272]&lt;&gt;&quot;&quot;;CONCATENATE(&quot;#&quot;;[.B272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</text:p>
          </table:table-cell>
          <table:table-cell table:style-name="ce7" office:value-type="string" calcext:value-type="string">
            <text:p>i2_far_harad_tribesman</text:p>
          </table:table-cell>
          <table:table-cell table:style-name="ce7" office:value-type="string" calcext:value-type="string">
            <text:p>Far_Harad_Tribesman</text:p>
          </table:table-cell>
          <table:table-cell table:style-name="ce7" office:value-type="string" calcext:value-type="string">
            <text:p>Far_Harad_Tribes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harad</text:p>
          </table:table-cell>
          <table:table-cell table:style-name="ce31"/>
          <table:table-cell table:style-name="ce11" table:number-columns-repeated="3"/>
          <table:table-cell table:style-name="ce11" office:value-type="string" calcext:value-type="string">
            <text:p>itm_far_harad_2h_mace,itm_harad_short_spear,</text:p>
          </table:table-cell>
          <table:table-cell table:style-name="ce11" office:value-type="string" calcext:value-type="string">
            <text:p>itm_harad_javelin,</text:p>
          </table:table-cell>
          <table:table-cell table:style-name="ce11"/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1|knows_power_strike_1|knows_power_throw_1|knows_athletics_4|knows_looting_2|knows_tracking_1|knows_pathfinding_1|knows_wound_treatment_2|knows_surgery_1</text:p>
          </table:table-cell>
          <table:table-cell table:style-name="ce14" office:value-type="string" calcext:value-type="string">
            <text:p>far_harad_face1</text:p>
          </table:table-cell>
          <table:table-cell table:style-name="ce14" office:value-type="string" calcext:value-type="string">
            <text:p>far_harad_face2</text:p>
          </table:table-cell>
          <table:table-cell table:style-name="ce15"/>
          <table:table-cell table:style-name="ce6" table:formula="of:=IF(AND([.B272]&lt;&gt;&quot;&quot;;[.C272]&lt;&gt;&quot;&quot;);CONCATENATE([Variables.$I$1];[Variables.$I$7];[.B272];[Variables.$I$7];[Variables.$I$6];[Variables.$I$7];[.C272];[Variables.$I$7];[Variables.$I$6];[Variables.$I$7];[.D272];[Variables.$I$7];[Variables.$I$6];[.E272];[Variables.$I$6];[.F272];[Variables.$I$6];[.G272];[Variables.$I$6];[.H272];[Variables.$I$6];[Variables.$I$1];[.I272];[.J272];[.K272];[.L272];[.M272];[.N272];[.O272];[Variables.$I$2];[Variables.$I$6];[.P272];[Variables.$I$6];[.Q272];[Variables.$I$6];[.R272];[Variables.$I$6];[.S272];[Variables.$I$6];[.T272];IF([.U272]&lt;&gt;&quot;&quot;;CONCATENATE([Variables.$I$6];[.U272]);&quot;&quot;);[Variables.$I$2];[Variables.$I$6]);IF([.B272]&lt;&gt;&quot;&quot;;CONCATENATE(&quot;#&quot;;[.B272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</text:p>
          </table:table-cell>
          <table:table-cell table:number-columns-repeated="16362"/>
        </table:table-row>
        <table:table-row table:style-name="ro1">
          <table:table-cell table:style-name="ce6" table:formula="of:=IF(AND([.B273]&lt;&gt;&quot;&quot;;[.C273]&lt;&gt;&quot;&quot;);CONCATENATE([Variables.$I$1];[Variables.$I$7];[.B273];[Variables.$I$7];[Variables.$I$6];[Variables.$I$7];[.C273];[Variables.$I$7];[Variables.$I$6];[Variables.$I$7];[.D273];[Variables.$I$7];[Variables.$I$6];[.E273];[Variables.$I$6];[.F273];[Variables.$I$6];[.G273];[Variables.$I$6];[.H273];[Variables.$I$6];[Variables.$I$1];[.I273];[.J273];[.K273];[.L273];[.M273];[.N273];[.O273];[Variables.$I$2];[Variables.$I$6];[.P273];[Variables.$I$6];[.Q273];[Variables.$I$6];[.R273];[Variables.$I$6];[.S273];[Variables.$I$6];[.T273];IF([.U273]&lt;&gt;&quot;&quot;;CONCATENATE([Variables.$I$6];[.U273]);&quot;&quot;);[Variables.$I$2];[Variables.$I$6]);IF([.B273]&lt;&gt;&quot;&quot;;CONCATENATE(&quot;#&quot;;[.B273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</text:p>
          </table:table-cell>
          <table:table-cell table:style-name="ce7" office:value-type="string" calcext:value-type="string">
            <text:p>i4_far_harad_champion</text:p>
          </table:table-cell>
          <table:table-cell table:style-name="ce7" office:value-type="string" calcext:value-type="string">
            <text:p>Far_Harad_Champion</text:p>
          </table:table-cell>
          <table:table-cell table:style-name="ce7" office:value-type="string" calcext:value-type="string">
            <text:p>Far_Harad_Champions</text:p>
          </table:table-cell>
          <table:table-cell table:style-name="ce8" office:value-type="string" calcext:value-type="string">
            <text:p>tf_hara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harad</text:p>
          </table:table-cell>
          <table:table-cell table:style-name="ce11"/>
          <table:table-cell table:style-name="ce11" office:value-type="string" calcext:value-type="string">
            <text:p>itm_harad_champion,</text:p>
          </table:table-cell>
          <table:table-cell table:style-name="ce11" table:number-columns-repeated="2"/>
          <table:table-cell table:style-name="ce11" office:value-type="string" calcext:value-type="string">
            <text:p>itm_far_harad_2h_mace,itm_harad_short_spear,</text:p>
          </table:table-cell>
          <table:table-cell table:style-name="ce11" office:value-type="string" calcext:value-type="string">
            <text:p>itm_harad_javelin,</text:p>
          </table:table-cell>
          <table:table-cell table:style-name="ce11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3" office:value-type="string" calcext:value-type="string">
            <text:p>knows_common|knows_ironflesh_1|knows_power_strike_2|knows_power_throw_3|knows_athletics_5|knows_looting_2|knows_tracking_1|knows_pathfinding_1|knows_wound_treatment_2|knows_surgery_1</text:p>
          </table:table-cell>
          <table:table-cell table:style-name="ce14" office:value-type="string" calcext:value-type="string">
            <text:p>far_harad_face1</text:p>
          </table:table-cell>
          <table:table-cell table:style-name="ce14" office:value-type="string" calcext:value-type="string">
            <text:p>far_harad_face2</text:p>
          </table:table-cell>
          <table:table-cell table:style-name="ce15"/>
          <table:table-cell table:style-name="ce6" table:formula="of:=IF(AND([.B273]&lt;&gt;&quot;&quot;;[.C273]&lt;&gt;&quot;&quot;);CONCATENATE([Variables.$I$1];[Variables.$I$7];[.B273];[Variables.$I$7];[Variables.$I$6];[Variables.$I$7];[.C273];[Variables.$I$7];[Variables.$I$6];[Variables.$I$7];[.D273];[Variables.$I$7];[Variables.$I$6];[.E273];[Variables.$I$6];[.F273];[Variables.$I$6];[.G273];[Variables.$I$6];[.H273];[Variables.$I$6];[Variables.$I$1];[.I273];[.J273];[.K273];[.L273];[.M273];[.N273];[.O273];[Variables.$I$2];[Variables.$I$6];[.P273];[Variables.$I$6];[.Q273];[Variables.$I$6];[.R273];[Variables.$I$6];[.S273];[Variables.$I$6];[.T273];IF([.U273]&lt;&gt;&quot;&quot;;CONCATENATE([Variables.$I$6];[.U273]);&quot;&quot;);[Variables.$I$2];[Variables.$I$6]);IF([.B273]&lt;&gt;&quot;&quot;;CONCATENATE(&quot;#&quot;;[.B273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</text:p>
          </table:table-cell>
          <table:table-cell table:number-columns-repeated="16362"/>
        </table:table-row>
        <table:table-row table:style-name="ro1">
          <table:table-cell table:style-name="ce6" table:formula="of:=IF(AND([.B274]&lt;&gt;&quot;&quot;;[.C274]&lt;&gt;&quot;&quot;);CONCATENATE([Variables.$I$1];[Variables.$I$7];[.B274];[Variables.$I$7];[Variables.$I$6];[Variables.$I$7];[.C274];[Variables.$I$7];[Variables.$I$6];[Variables.$I$7];[.D274];[Variables.$I$7];[Variables.$I$6];[.E274];[Variables.$I$6];[.F274];[Variables.$I$6];[.G274];[Variables.$I$6];[.H274];[Variables.$I$6];[Variables.$I$1];[.I274];[.J274];[.K274];[.L274];[.M274];[.N274];[.O274];[Variables.$I$2];[Variables.$I$6];[.P274];[Variables.$I$6];[.Q274];[Variables.$I$6];[.R274];[Variables.$I$6];[.S274];[Variables.$I$6];[.T274];IF([.U274]&lt;&gt;&quot;&quot;;CONCATENATE([Variables.$I$6];[.U274]);&quot;&quot;);[Variables.$I$2];[Variables.$I$6]);IF([.B274]&lt;&gt;&quot;&quot;;CONCATENATE(&quot;#&quot;;[.B274]);&quot;&quot;))" office:value-type="string" office:string-value="[&quot;i5_far_harad_panther_guard&quot;,&quot;Panther_Guard&quot;,&quot;Panther_Guards&quot;,tf_harad| tfg_shield| tfg_armor| tfg_helm| tfg_boots,0,0,fac_harad,[itm_harad_pantherhelm,itm_harad_champion_good,itm_harad_mace,itm_harad_javelin,itm_harad_long_shield_a,itm_marker_night_troop,itm_marker_scares_wargs, itm_marker_scares_horses,itm_marker_hp_shield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harad_champion_good,itm_harad_mace,itm_harad_javelin,itm_harad_long_shield_a,itm_marker_night_troop,itm_marker_scares_wargs, itm_marker_scares_horses,itm_marker_hp_shield,],attr_evil_tier_5,wp_tier_5,knows_common|knows_power_throw_4|knows_power_strike_4|knows_ironflesh_3|knows_athletics_8,far_harad_face1,far_harad_face2],</text:p>
          </table:table-cell>
          <table:table-cell table:style-name="ce7" office:value-type="string" calcext:value-type="string">
            <text:p>i5_far_harad_panther_guard</text:p>
          </table:table-cell>
          <table:table-cell table:style-name="ce7" office:value-type="string" calcext:value-type="string">
            <text:p>Panther_Guard</text:p>
          </table:table-cell>
          <table:table-cell table:style-name="ce7" office:value-type="string" calcext:value-type="string">
            <text:p>Panther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harad</text:p>
          </table:table-cell>
          <table:table-cell table:style-name="ce11" office:value-type="string" calcext:value-type="string">
            <text:p>itm_harad_pantherhelm,</text:p>
          </table:table-cell>
          <table:table-cell table:style-name="ce11" office:value-type="string" calcext:value-type="string">
            <text:p>itm_harad_champion_good,</text:p>
          </table:table-cell>
          <table:table-cell table:style-name="ce11" table:number-columns-repeated="2"/>
          <table:table-cell table:style-name="ce11" office:value-type="string" calcext:value-type="string">
            <text:p>itm_harad_mace,</text:p>
          </table:table-cell>
          <table:table-cell table:style-name="ce11" office:value-type="string" calcext:value-type="string">
            <text:p>itm_harad_javelin,itm_harad_long_shield_a,</text:p>
          </table:table-cell>
          <table:table-cell table:style-name="ce11" office:value-type="string" calcext:value-type="string">
            <text:p>itm_marker_night_troop,itm_marker_scares_wargs, itm_marker_scares_horses,itm_marker_hp_shield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power_throw_4|knows_power_strike_4|knows_ironflesh_3|knows_athletics_8</text:p>
          </table:table-cell>
          <table:table-cell table:style-name="ce14" office:value-type="string" calcext:value-type="string">
            <text:p>far_harad_face1</text:p>
          </table:table-cell>
          <table:table-cell table:style-name="ce14" office:value-type="string" calcext:value-type="string">
            <text:p>far_harad_face2</text:p>
          </table:table-cell>
          <table:table-cell table:style-name="ce15"/>
          <table:table-cell table:style-name="ce6" table:formula="of:=IF(AND([.B274]&lt;&gt;&quot;&quot;;[.C274]&lt;&gt;&quot;&quot;);CONCATENATE([Variables.$I$1];[Variables.$I$7];[.B274];[Variables.$I$7];[Variables.$I$6];[Variables.$I$7];[.C274];[Variables.$I$7];[Variables.$I$6];[Variables.$I$7];[.D274];[Variables.$I$7];[Variables.$I$6];[.E274];[Variables.$I$6];[.F274];[Variables.$I$6];[.G274];[Variables.$I$6];[.H274];[Variables.$I$6];[Variables.$I$1];[.I274];[.J274];[.K274];[.L274];[.M274];[.N274];[.O274];[Variables.$I$2];[Variables.$I$6];[.P274];[Variables.$I$6];[.Q274];[Variables.$I$6];[.R274];[Variables.$I$6];[.S274];[Variables.$I$6];[.T274];IF([.U274]&lt;&gt;&quot;&quot;;CONCATENATE([Variables.$I$6];[.U274]);&quot;&quot;);[Variables.$I$2];[Variables.$I$6]);IF([.B274]&lt;&gt;&quot;&quot;;CONCATENATE(&quot;#&quot;;[.B274]);&quot;&quot;))" office:value-type="string" office:string-value="[&quot;i5_far_harad_panther_guard&quot;,&quot;Panther_Guard&quot;,&quot;Panther_Guards&quot;,tf_harad| tfg_shield| tfg_armor| tfg_helm| tfg_boots,0,0,fac_harad,[itm_harad_pantherhelm,itm_harad_champion_good,itm_harad_mace,itm_harad_javelin,itm_harad_long_shield_a,itm_marker_night_troop,itm_marker_scares_wargs, itm_marker_scares_horses,itm_marker_hp_shield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harad_champion_good,itm_harad_mace,itm_harad_javelin,itm_harad_long_shield_a,itm_marker_night_troop,itm_marker_scares_wargs, itm_marker_scares_horses,itm_marker_hp_shield,],attr_evil_tier_5,wp_tier_5,knows_common|knows_power_throw_4|knows_power_strike_4|knows_ironflesh_3|knows_athletics_8,far_harad_face1,far_harad_face2],</text:p>
          </table:table-cell>
          <table:table-cell table:number-columns-repeated="16362"/>
        </table:table-row>
        <table:table-row table:style-name="ro1">
          <table:table-cell table:style-name="ce6" table:formula="of:=IF(AND([.B275]&lt;&gt;&quot;&quot;;[.C275]&lt;&gt;&quot;&quot;);CONCATENATE([Variables.$I$1];[Variables.$I$7];[.B275];[Variables.$I$7];[Variables.$I$6];[Variables.$I$7];[.C275];[Variables.$I$7];[Variables.$I$6];[Variables.$I$7];[.D275];[Variables.$I$7];[Variables.$I$6];[.E275];[Variables.$I$6];[.F275];[Variables.$I$6];[.G275];[Variables.$I$6];[.H275];[Variables.$I$6];[Variables.$I$1];[.I275];[.J275];[.K275];[.L275];[.M275];[.N275];[.O275];[Variables.$I$2];[Variables.$I$6];[.P275];[Variables.$I$6];[.Q275];[Variables.$I$6];[.R275];[Variables.$I$6];[.S275];[Variables.$I$6];[.T275];IF([.U275]&lt;&gt;&quot;&quot;;CONCATENATE([Variables.$I$6];[.U275]);&quot;&quot;);[Variables.$I$2];[Variables.$I$6]);IF([.B275]&lt;&gt;&quot;&quot;;CONCATENATE(&quot;#&quot;;[.B275]);&quot;&quot;))" office:value-type="string" office:string-value="#CAMEL RIDER" calcext:value-type="string">
            <text:p>#CAMEL RIDER</text:p>
          </table:table-cell>
          <table:table-cell table:style-name="ce5" office:value-type="string" calcext:value-type="string">
            <text:p>CAMEL RIDER</text:p>
          </table:table-cell>
          <table:table-cell table:style-name="ce6" table:number-columns-repeated="19"/>
          <table:table-cell table:style-name="ce6" table:formula="of:=IF(AND([.B275]&lt;&gt;&quot;&quot;;[.C275]&lt;&gt;&quot;&quot;);CONCATENATE([Variables.$I$1];[Variables.$I$7];[.B275];[Variables.$I$7];[Variables.$I$6];[Variables.$I$7];[.C275];[Variables.$I$7];[Variables.$I$6];[Variables.$I$7];[.D275];[Variables.$I$7];[Variables.$I$6];[.E275];[Variables.$I$6];[.F275];[Variables.$I$6];[.G275];[Variables.$I$6];[.H275];[Variables.$I$6];[Variables.$I$1];[.I275];[.J275];[.K275];[.L275];[.M275];[.N275];[.O275];[Variables.$I$2];[Variables.$I$6];[.P275];[Variables.$I$6];[.Q275];[Variables.$I$6];[.R275];[Variables.$I$6];[.S275];[Variables.$I$6];[.T275];IF([.U275]&lt;&gt;&quot;&quot;;CONCATENATE([Variables.$I$6];[.U275]);&quot;&quot;);[Variables.$I$2];[Variables.$I$6]);IF([.B275]&lt;&gt;&quot;&quot;;CONCATENATE(&quot;#&quot;;[.B275]);&quot;&quot;))" office:value-type="string" office:string-value="#CAMEL RIDER" calcext:value-type="string">
            <text:p>#CAMEL RIDER</text:p>
          </table:table-cell>
          <table:table-cell table:number-columns-repeated="16362"/>
        </table:table-row>
        <table:table-row table:style-name="ro1">
          <table:table-cell table:style-name="ce6" table:formula="of:=IF(AND([.B276]&lt;&gt;&quot;&quot;;[.C276]&lt;&gt;&quot;&quot;);CONCATENATE([Variables.$I$1];[Variables.$I$7];[.B276];[Variables.$I$7];[Variables.$I$6];[Variables.$I$7];[.C276];[Variables.$I$7];[Variables.$I$6];[Variables.$I$7];[.D276];[Variables.$I$7];[Variables.$I$6];[.E276];[Variables.$I$6];[.F276];[Variables.$I$6];[.G276];[Variables.$I$6];[.H276];[Variables.$I$6];[Variables.$I$1];[.I276];[.J276];[.K276];[.L276];[.M276];[.N276];[.O276];[Variables.$I$2];[Variables.$I$6];[.P276];[Variables.$I$6];[.Q276];[Variables.$I$6];[.R276];[Variables.$I$6];[.S276];[Variables.$I$6];[.T276];IF([.U276]&lt;&gt;&quot;&quot;;CONCATENATE([Variables.$I$6];[.U276]);&quot;&quot;);[Variables.$I$2];[Variables.$I$6]);IF([.B276]&lt;&gt;&quot;&quot;;CONCATENATE(&quot;#&quot;;[.B276]);&quot;&quot;))" office:value-type="string" office:string-value="[&quot;ac5_camel_rider&quot;,&quot;Harad_Camel_Rider&quot;,&quot;Harad_Camel_Riders&quot;,tf_harad| tfg_ranged| tf_mounted| tfg_armor| tfg_helm| tfg_horse|tfg_gloves| tfg_boots,0,0,fac_harad,[itm_black_snake_helm,itm_harad_heavy_inf_helm,itm_black_snake_armor,itm_leather_gloves,itm_harad_leather_greaves,itm_harad_javelin_big,itm_harad_javelin_big,itm_far_harad_2h_mace,itm_harad_long_spear,itm_camel],attr_evil_tier_5,wp_tier_5,knows_common|knows_ironflesh_6|knows_power_strike_4|knows_power_throw_7|knows_riding_7|knows_horse_archery_8,haradrim_face_1,haradrim_face_2]," calcext:value-type="string">
            <text:p>["ac5_camel_rider","Harad_Camel_Rider","Harad_Camel_Riders",tf_harad| tfg_ranged| tf_mounted| tfg_armor| tfg_helm| tfg_horse|tfg_gloves| tfg_boots,0,0,fac_harad,[itm_black_snake_helm,itm_harad_heavy_inf_helm,itm_black_snake_armor,itm_leather_gloves,itm_harad_leather_greaves,itm_harad_javelin_big,itm_harad_javelin_big,itm_far_harad_2h_mace,itm_harad_long_spear,itm_camel],attr_evil_tier_5,wp_tier_5,knows_common|knows_ironflesh_6|knows_power_strike_4|knows_power_throw_7|knows_riding_7|knows_horse_archery_8,haradrim_face_1,haradrim_face_2],</text:p>
          </table:table-cell>
          <table:table-cell table:style-name="ce7" office:value-type="string" calcext:value-type="string">
            <text:p>ac5_camel_rider</text:p>
          </table:table-cell>
          <table:table-cell table:style-name="ce7" office:value-type="string" calcext:value-type="string">
            <text:p>Harad_Camel_Rider</text:p>
          </table:table-cell>
          <table:table-cell table:style-name="ce7" office:value-type="string" calcext:value-type="string">
            <text:p>Harad_Camel_Riders</text:p>
          </table:table-cell>
          <table:table-cell table:style-name="ce8" office:value-type="string" calcext:value-type="string">
            <text:p>tf_harad| tfg_ranged| tf_mounted| tfg_armor| tfg_helm| tfg_horse|tfg_gloves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harad</text:p>
          </table:table-cell>
          <table:table-cell table:style-name="ce11" office:value-type="string" calcext:value-type="string">
            <text:p>itm_black_snake_helm,itm_harad_heavy_inf_helm,</text:p>
          </table:table-cell>
          <table:table-cell table:style-name="ce11" office:value-type="string" calcext:value-type="string">
            <text:p>itm_black_snake_armor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harad_leather_greaves,</text:p>
          </table:table-cell>
          <table:table-cell table:style-name="ce11" office:value-type="string" calcext:value-type="string">
            <text:p>itm_harad_javelin_big,itm_harad_javelin_big,</text:p>
          </table:table-cell>
          <table:table-cell table:style-name="ce11" office:value-type="string" calcext:value-type="string">
            <text:p>itm_far_harad_2h_mace,itm_harad_long_spear,</text:p>
          </table:table-cell>
          <table:table-cell table:style-name="ce11" office:value-type="string" calcext:value-type="string">
            <text:p>itm_camel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ironflesh_6|knows_power_strike_4|knows_power_throw_7|knows_riding_7|knows_horse_archery_8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B276]&lt;&gt;&quot;&quot;;[.C276]&lt;&gt;&quot;&quot;);CONCATENATE([Variables.$I$1];[Variables.$I$7];[.B276];[Variables.$I$7];[Variables.$I$6];[Variables.$I$7];[.C276];[Variables.$I$7];[Variables.$I$6];[Variables.$I$7];[.D276];[Variables.$I$7];[Variables.$I$6];[.E276];[Variables.$I$6];[.F276];[Variables.$I$6];[.G276];[Variables.$I$6];[.H276];[Variables.$I$6];[Variables.$I$1];[.I276];[.J276];[.K276];[.L276];[.M276];[.N276];[.O276];[Variables.$I$2];[Variables.$I$6];[.P276];[Variables.$I$6];[.Q276];[Variables.$I$6];[.R276];[Variables.$I$6];[.S276];[Variables.$I$6];[.T276];IF([.U276]&lt;&gt;&quot;&quot;;CONCATENATE([Variables.$I$6];[.U276]);&quot;&quot;);[Variables.$I$2];[Variables.$I$6]);IF([.B276]&lt;&gt;&quot;&quot;;CONCATENATE(&quot;#&quot;;[.B276]);&quot;&quot;))" office:value-type="string" office:string-value="[&quot;ac5_camel_rider&quot;,&quot;Harad_Camel_Rider&quot;,&quot;Harad_Camel_Riders&quot;,tf_harad| tfg_ranged| tf_mounted| tfg_armor| tfg_helm| tfg_horse|tfg_gloves| tfg_boots,0,0,fac_harad,[itm_black_snake_helm,itm_harad_heavy_inf_helm,itm_black_snake_armor,itm_leather_gloves,itm_harad_leather_greaves,itm_harad_javelin_big,itm_harad_javelin_big,itm_far_harad_2h_mace,itm_harad_long_spear,itm_camel],attr_evil_tier_5,wp_tier_5,knows_common|knows_ironflesh_6|knows_power_strike_4|knows_power_throw_7|knows_riding_7|knows_horse_archery_8,haradrim_face_1,haradrim_face_2]," calcext:value-type="string">
            <text:p>["ac5_camel_rider","Harad_Camel_Rider","Harad_Camel_Riders",tf_harad| tfg_ranged| tf_mounted| tfg_armor| tfg_helm| tfg_horse|tfg_gloves| tfg_boots,0,0,fac_harad,[itm_black_snake_helm,itm_harad_heavy_inf_helm,itm_black_snake_armor,itm_leather_gloves,itm_harad_leather_greaves,itm_harad_javelin_big,itm_harad_javelin_big,itm_far_harad_2h_mace,itm_harad_long_spear,itm_camel],attr_evil_tier_5,wp_tier_5,knows_common|knows_ironflesh_6|knows_power_strike_4|knows_power_throw_7|knows_riding_7|knows_horse_archery_8,haradrim_face_1,haradrim_face_2],</text:p>
          </table:table-cell>
          <table:table-cell table:number-columns-repeated="16362"/>
        </table:table-row>
        <table:table-row table:style-name="ro1">
          <table:table-cell table:formula="of:=IF(AND([.B277]&lt;&gt;&quot;&quot;;[.C277]&lt;&gt;&quot;&quot;);CONCATENATE([Variables.$I$1];[Variables.$I$7];[.B277];[Variables.$I$7];[Variables.$I$6];[Variables.$I$7];[.C277];[Variables.$I$7];[Variables.$I$6];[Variables.$I$7];[.D277];[Variables.$I$7];[Variables.$I$6];[.E277];[Variables.$I$6];[.F277];[Variables.$I$6];[.G277];[Variables.$I$6];[.H277];[Variables.$I$6];[Variables.$I$1];[.I277];[.J277];[.K277];[.L277];[.M277];[.N277];[.O277];[Variables.$I$2];[Variables.$I$6];[.P277];[Variables.$I$6];[.Q277];[Variables.$I$6];[.R277];[Variables.$I$6];[.S277];[Variables.$I$6];[.T277];IF([.U277]&lt;&gt;&quot;&quot;;CONCATENATE([Variables.$I$6];[.U277]);&quot;&quot;);[Variables.$I$2];[Variables.$I$6]);IF([.B277]&lt;&gt;&quot;&quot;;CONCATENATE(&quot;#&quot;;[.B277]);&quot;&quot;))">
            <text:p/>
          </table:table-cell>
          <table:table-cell table:style-name="ce6" table:number-columns-repeated="20"/>
          <table:table-cell table:style-name="ce36" table:formula="of:=IF(AND([.B277]&lt;&gt;&quot;&quot;;[.C277]&lt;&gt;&quot;&quot;);CONCATENATE([Variables.$I$1];[Variables.$I$7];[.B277];[Variables.$I$7];[Variables.$I$6];[Variables.$I$7];[.C277];[Variables.$I$7];[Variables.$I$6];[Variables.$I$7];[.D277];[Variables.$I$7];[Variables.$I$6];[.E277];[Variables.$I$6];[.F277];[Variables.$I$6];[.G277];[Variables.$I$6];[.H277];[Variables.$I$6];[Variables.$I$1];[.I277];[.J277];[.K277];[.L277];[.M277];[.N277];[.O277];[Variables.$I$2];[Variables.$I$6];[.P277];[Variables.$I$6];[.Q277];[Variables.$I$6];[.R277];[Variables.$I$6];[.S277];[Variables.$I$6];[.T277];IF([.U277]&lt;&gt;&quot;&quot;;CONCATENATE([Variables.$I$6];[.U277]);&quot;&quot;);[Variables.$I$2];[Variables.$I$6]);IF([.B277]&lt;&gt;&quot;&quot;;CONCATENATE(&quot;#&quot;;[.B277]);&quot;&quot;))">
            <text:p/>
          </table:table-cell>
          <table:table-cell table:number-columns-repeated="16362"/>
        </table:table-row>
        <table:table-row table:style-name="ro1">
          <table:table-cell table:style-name="ce6" table:formula="of:=IF(AND([.B278]&lt;&gt;&quot;&quot;;[.C278]&lt;&gt;&quot;&quot;);CONCATENATE([Variables.$I$1];[Variables.$I$7];[.B278];[Variables.$I$7];[Variables.$I$6];[Variables.$I$7];[.C278];[Variables.$I$7];[Variables.$I$6];[Variables.$I$7];[.D278];[Variables.$I$7];[Variables.$I$6];[.E278];[Variables.$I$6];[.F278];[Variables.$I$6];[.G278];[Variables.$I$6];[.H278];[Variables.$I$6];[Variables.$I$1];[.I278];[.J278];[.K278];[.L278];[.M278];[.N278];[.O278];[Variables.$I$2];[Variables.$I$6];[.P278];[Variables.$I$6];[.Q278];[Variables.$I$6];[.R278];[Variables.$I$6];[.S278];[Variables.$I$6];[.T278];IF([.U278]&lt;&gt;&quot;&quot;;CONCATENATE([Variables.$I$6];[.U278]);&quot;&quot;);[Variables.$I$2];[Variables.$I$6]);IF([.B278]&lt;&gt;&quot;&quot;;CONCATENATE(&quot;#&quot;;[.B278]);&quot;&quot;))" office:value-type="string" office:string-value="#DUNLAND #Dunnish #Dunlendings" calcext:value-type="string">
            <text:p>#DUNLAND #Dunnish #Dunlendings</text:p>
          </table:table-cell>
          <table:table-cell table:style-name="ce5" office:value-type="string" calcext:value-type="string">
            <text:p>DUNLAND #Dunnish #Dunlendings</text:p>
          </table:table-cell>
          <table:table-cell table:style-name="ce6" table:number-columns-repeated="19"/>
          <table:table-cell table:style-name="ce6" table:formula="of:=IF(AND([.B278]&lt;&gt;&quot;&quot;;[.C278]&lt;&gt;&quot;&quot;);CONCATENATE([Variables.$I$1];[Variables.$I$7];[.B278];[Variables.$I$7];[Variables.$I$6];[Variables.$I$7];[.C278];[Variables.$I$7];[Variables.$I$6];[Variables.$I$7];[.D278];[Variables.$I$7];[Variables.$I$6];[.E278];[Variables.$I$6];[.F278];[Variables.$I$6];[.G278];[Variables.$I$6];[.H278];[Variables.$I$6];[Variables.$I$1];[.I278];[.J278];[.K278];[.L278];[.M278];[.N278];[.O278];[Variables.$I$2];[Variables.$I$6];[.P278];[Variables.$I$6];[.Q278];[Variables.$I$6];[.R278];[Variables.$I$6];[.S278];[Variables.$I$6];[.T278];IF([.U278]&lt;&gt;&quot;&quot;;CONCATENATE([Variables.$I$6];[.U278]);&quot;&quot;);[Variables.$I$2];[Variables.$I$6]);IF([.B278]&lt;&gt;&quot;&quot;;CONCATENATE(&quot;#&quot;;[.B278]);&quot;&quot;))" office:value-type="string" office:string-value="#DUNLAND #Dunnish #Dunlendings" calcext:value-type="string">
            <text:p>#DUNLAND #Dunnish #Dunlendings</text:p>
          </table:table-cell>
          <table:table-cell table:number-columns-repeated="16362"/>
        </table:table-row>
        <table:table-row table:style-name="ro1">
          <table:table-cell table:style-name="ce6" table:formula="of:=IF(AND([.B279]&lt;&gt;&quot;&quot;;[.C279]&lt;&gt;&quot;&quot;);CONCATENATE([Variables.$I$1];[Variables.$I$7];[.B279];[Variables.$I$7];[Variables.$I$6];[Variables.$I$7];[.C279];[Variables.$I$7];[Variables.$I$6];[Variables.$I$7];[.D279];[Variables.$I$7];[Variables.$I$6];[.E279];[Variables.$I$6];[.F279];[Variables.$I$6];[.G279];[Variables.$I$6];[.H279];[Variables.$I$6];[Variables.$I$1];[.I279];[.J279];[.K279];[.L279];[.M279];[.N279];[.O279];[Variables.$I$2];[Variables.$I$6];[.P279];[Variables.$I$6];[.Q279];[Variables.$I$6];[.R279];[Variables.$I$6];[.S279];[Variables.$I$6];[.T279];IF([.U279]&lt;&gt;&quot;&quot;;CONCATENATE([Variables.$I$6];[.U279]);&quot;&quot;);[Variables.$I$2];[Variables.$I$6]);IF([.B279]&lt;&gt;&quot;&quot;;CONCATENATE(&quot;#&quot;;[.B279]);&quot;&quot;))" office:value-type="string" office:string-value="[&quot;i1_dun_wildman&quot;,&quot;Dunnish_Wildman&quot;,&quot;Dunnish_Wildmen&quot;,tf_dunland| tf_randomize_face| tfg_armor| tfg_boots,0,0,fac_dunland,[itm_gundabad_helm_a, itm_dun_helm_b_bad,itm_dun_helm_d_bad,itm_dunland_tunic_1_bad, itm_dunland_tunic_2_bad, itm_dunland_fur_1_bad, itm_dunland_fur_2_bad,itm_dunland_wolfboots,itm_wood_club,itm_orc_slasher,itm_orc_axe,itm_dunland_spear,itm_dunnish_axe_bad,itm_orc_shield_a, itm_orc_shield_b,itm_dunland_javelin,],attr_evil_tier_1,wp_tier_1,knows_common|knows_ironflesh_2|knows_power_strike_1|knows_power_throw_1|knows_shield_1|knows_athletics_3|knows_looting_1|knows_tracking_1|knows_pathfinding_2|knows_spotting_1|knows_wound_treatment_1|knows_persuasion_1,dunland_face1,dunland_face2]," calcext:value-type="string">
            <text:p>["i1_dun_wildman","Dunnish_Wildman","Dunnish_Wildmen",tf_dunland| tf_randomize_face| tfg_armor| tfg_boots,0,0,fac_dunland,[itm_gundabad_helm_a, itm_dun_helm_b_bad,itm_dun_helm_d_bad,itm_dunland_tunic_1_bad, itm_dunland_tunic_2_bad, itm_dunland_fur_1_bad, itm_dunland_fur_2_bad,itm_dunland_wolfboots,itm_wood_club,itm_orc_slasher,itm_orc_axe,itm_dunland_spear,itm_dunnish_axe_bad,itm_orc_shield_a, itm_orc_shield_b,itm_dunland_javelin,],attr_evil_tier_1,wp_tier_1,knows_common|knows_ironflesh_2|knows_power_strike_1|knows_power_throw_1|knows_shield_1|knows_athletics_3|knows_looting_1|knows_tracking_1|knows_pathfinding_2|knows_spotting_1|knows_wound_treatment_1|knows_persuasion_1,dunland_face1,dunland_face2],</text:p>
          </table:table-cell>
          <table:table-cell table:style-name="ce7" office:value-type="string" calcext:value-type="string">
            <text:p>i1_dun_wildman</text:p>
          </table:table-cell>
          <table:table-cell table:style-name="ce7" office:value-type="string" calcext:value-type="string">
            <text:p>Dunnish_Wildman</text:p>
          </table:table-cell>
          <table:table-cell table:style-name="ce7" office:value-type="string" calcext:value-type="string">
            <text:p>Dunnish_Wild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unland</text:p>
          </table:table-cell>
          <table:table-cell table:style-name="ce11" office:value-type="string" calcext:value-type="string">
            <text:p>itm_gundabad_helm_a, itm_dun_helm_b_bad,itm_dun_helm_d_bad,</text:p>
          </table:table-cell>
          <table:table-cell table:style-name="ce11" office:value-type="string" calcext:value-type="string">
            <text:p>itm_dunland_tunic_1_bad, itm_dunland_tunic_2_bad, itm_dunland_fur_1_bad, itm_dunland_fur_2_bad,</text:p>
          </table:table-cell>
          <table:table-cell table:style-name="ce11"/>
          <table:table-cell table:style-name="ce11" office:value-type="string" calcext:value-type="string">
            <text:p>itm_dunland_wolfboots,</text:p>
          </table:table-cell>
          <table:table-cell table:style-name="ce11" office:value-type="string" calcext:value-type="string">
            <text:p>itm_wood_club,itm_orc_slasher,itm_orc_axe,itm_dunland_spear,itm_dunnish_axe_bad,</text:p>
          </table:table-cell>
          <table:table-cell table:style-name="ce11" office:value-type="string" calcext:value-type="string">
            <text:p>itm_orc_shield_a, itm_orc_shield_b,itm_dunland_javelin,</text:p>
          </table:table-cell>
          <table:table-cell table:style-name="ce11"/>
          <table:table-cell table:style-name="ce12" office:value-type="string" calcext:value-type="string">
            <text:p>attr_evil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ironflesh_2|knows_power_strike_1|knows_power_throw_1|knows_shield_1|knows_athletics_3|knows_looting_1|knows_tracking_1|knows_pathfinding_2|knows_spotting_1|knows_wound_treatment_1|knows_persuasion_1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6" table:formula="of:=IF(AND([.B279]&lt;&gt;&quot;&quot;;[.C279]&lt;&gt;&quot;&quot;);CONCATENATE([Variables.$I$1];[Variables.$I$7];[.B279];[Variables.$I$7];[Variables.$I$6];[Variables.$I$7];[.C279];[Variables.$I$7];[Variables.$I$6];[Variables.$I$7];[.D279];[Variables.$I$7];[Variables.$I$6];[.E279];[Variables.$I$6];[.F279];[Variables.$I$6];[.G279];[Variables.$I$6];[.H279];[Variables.$I$6];[Variables.$I$1];[.I279];[.J279];[.K279];[.L279];[.M279];[.N279];[.O279];[Variables.$I$2];[Variables.$I$6];[.P279];[Variables.$I$6];[.Q279];[Variables.$I$6];[.R279];[Variables.$I$6];[.S279];[Variables.$I$6];[.T279];IF([.U279]&lt;&gt;&quot;&quot;;CONCATENATE([Variables.$I$6];[.U279]);&quot;&quot;);[Variables.$I$2];[Variables.$I$6]);IF([.B279]&lt;&gt;&quot;&quot;;CONCATENATE(&quot;#&quot;;[.B279]);&quot;&quot;))" office:value-type="string" office:string-value="[&quot;i1_dun_wildman&quot;,&quot;Dunnish_Wildman&quot;,&quot;Dunnish_Wildmen&quot;,tf_dunland| tf_randomize_face| tfg_armor| tfg_boots,0,0,fac_dunland,[itm_gundabad_helm_a, itm_dun_helm_b_bad,itm_dun_helm_d_bad,itm_dunland_tunic_1_bad, itm_dunland_tunic_2_bad, itm_dunland_fur_1_bad, itm_dunland_fur_2_bad,itm_dunland_wolfboots,itm_wood_club,itm_orc_slasher,itm_orc_axe,itm_dunland_spear,itm_dunnish_axe_bad,itm_orc_shield_a, itm_orc_shield_b,itm_dunland_javelin,],attr_evil_tier_1,wp_tier_1,knows_common|knows_ironflesh_2|knows_power_strike_1|knows_power_throw_1|knows_shield_1|knows_athletics_3|knows_looting_1|knows_tracking_1|knows_pathfinding_2|knows_spotting_1|knows_wound_treatment_1|knows_persuasion_1,dunland_face1,dunland_face2]," calcext:value-type="string">
            <text:p>["i1_dun_wildman","Dunnish_Wildman","Dunnish_Wildmen",tf_dunland| tf_randomize_face| tfg_armor| tfg_boots,0,0,fac_dunland,[itm_gundabad_helm_a, itm_dun_helm_b_bad,itm_dun_helm_d_bad,itm_dunland_tunic_1_bad, itm_dunland_tunic_2_bad, itm_dunland_fur_1_bad, itm_dunland_fur_2_bad,itm_dunland_wolfboots,itm_wood_club,itm_orc_slasher,itm_orc_axe,itm_dunland_spear,itm_dunnish_axe_bad,itm_orc_shield_a, itm_orc_shield_b,itm_dunland_javelin,],attr_evil_tier_1,wp_tier_1,knows_common|knows_ironflesh_2|knows_power_strike_1|knows_power_throw_1|knows_shield_1|knows_athletics_3|knows_looting_1|knows_tracking_1|knows_pathfinding_2|knows_spotting_1|knows_wound_treatment_1|knows_persuasion_1,dunland_face1,dunland_face2],</text:p>
          </table:table-cell>
          <table:table-cell table:number-columns-repeated="16362"/>
        </table:table-row>
        <table:table-row table:style-name="ro1">
          <table:table-cell table:style-name="ce6" table:formula="of:=IF(AND([.B280]&lt;&gt;&quot;&quot;;[.C280]&lt;&gt;&quot;&quot;);CONCATENATE([Variables.$I$1];[Variables.$I$7];[.B280];[Variables.$I$7];[Variables.$I$6];[Variables.$I$7];[.C280];[Variables.$I$7];[Variables.$I$6];[Variables.$I$7];[.D280];[Variables.$I$7];[Variables.$I$6];[.E280];[Variables.$I$6];[.F280];[Variables.$I$6];[.G280];[Variables.$I$6];[.H280];[Variables.$I$6];[Variables.$I$1];[.I280];[.J280];[.K280];[.L280];[.M280];[.N280];[.O280];[Variables.$I$2];[Variables.$I$6];[.P280];[Variables.$I$6];[.Q280];[Variables.$I$6];[.R280];[Variables.$I$6];[.S280];[Variables.$I$6];[.T280];IF([.U280]&lt;&gt;&quot;&quot;;CONCATENATE([Variables.$I$6];[.U280]);&quot;&quot;);[Variables.$I$2];[Variables.$I$6]);IF([.B280]&lt;&gt;&quot;&quot;;CONCATENATE(&quot;#&quot;;[.B280]);&quot;&quot;))" office:value-type="string" office:string-value="[&quot;i2_dun_warrior&quot;,&quot;Dunnish_Warrior&quot;,&quot;Dunnish_Warriors&quot;,tf_dunland| tf_randomize_face| tfg_armor| tfg_boots| tfg_polearm,0,0,fac_dunland,[itm_gundabad_helm_a, itm_gundabad_helm_b, itm_dun_helm_b,itm_dun_helm_d,itm_dunland_tunic_1, itm_dunland_tunic_2, itm_dunland_fur_1,itm_dunland_fur_2,itm_dunland_wolfboots,itm_dunnish_axe,itm_wood_club,itm_dunland_spear, itm_dunnish_war_axe_bad,itm_orc_shield_b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" calcext:value-type="string">
            <text:p>["i2_dun_warrior","Dunnish_Warrior","Dunnish_Warriors",tf_dunland| tf_randomize_face| tfg_armor| tfg_boots| tfg_polearm,0,0,fac_dunland,[itm_gundabad_helm_a, itm_gundabad_helm_b, itm_dun_helm_b,itm_dun_helm_d,itm_dunland_tunic_1, itm_dunland_tunic_2, itm_dunland_fur_1,itm_dunland_fur_2,itm_dunland_wolfboots,itm_dunnish_axe,itm_wood_club,itm_dunland_spear, itm_dunnish_war_axe_bad,itm_orc_shield_b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</text:p>
          </table:table-cell>
          <table:table-cell table:style-name="ce7" office:value-type="string" calcext:value-type="string">
            <text:p>i2_dun_warrior</text:p>
          </table:table-cell>
          <table:table-cell table:style-name="ce7" office:value-type="string" calcext:value-type="string">
            <text:p>Dunnish_Warrior</text:p>
          </table:table-cell>
          <table:table-cell table:style-name="ce7" office:value-type="string" calcext:value-type="string">
            <text:p>Dunnish_Warriors</text:p>
          </table:table-cell>
          <table:table-cell table:style-name="ce8" office:value-type="string" calcext:value-type="string">
            <text:p>tf_dunland| tf_randomize_face| tfg_armor| tfg_boots| 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unland</text:p>
          </table:table-cell>
          <table:table-cell table:style-name="ce11" office:value-type="string" calcext:value-type="string">
            <text:p>itm_gundabad_helm_a, itm_gundabad_helm_b, itm_dun_helm_b,itm_dun_helm_d,</text:p>
          </table:table-cell>
          <table:table-cell table:style-name="ce11" office:value-type="string" calcext:value-type="string">
            <text:p>itm_dunland_tunic_1, itm_dunland_tunic_2, itm_dunland_fur_1,itm_dunland_fur_2,</text:p>
          </table:table-cell>
          <table:table-cell table:style-name="ce11"/>
          <table:table-cell table:style-name="ce11" office:value-type="string" calcext:value-type="string">
            <text:p>itm_dunland_wolfboots,</text:p>
          </table:table-cell>
          <table:table-cell table:style-name="ce11" office:value-type="string" calcext:value-type="string">
            <text:p>itm_dunnish_axe,itm_wood_club,itm_dunland_spear, itm_dunnish_war_axe_bad,</text:p>
          </table:table-cell>
          <table:table-cell table:style-name="ce11" office:value-type="string" calcext:value-type="string">
            <text:p>itm_orc_shield_b,itm_dun_shield_b,itm_dunland_javelin,itm_dunland_javelin,</text:p>
          </table:table-cell>
          <table:table-cell table:style-name="ce11"/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2|knows_power_strike_1|knows_power_throw_2|knows_shield_2|knows_athletics_4|knows_looting_1|knows_tracking_1|knows_pathfinding_2|knows_spotting_1|knows_wound_treatment_1|knows_persuasion_1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6" table:formula="of:=IF(AND([.B280]&lt;&gt;&quot;&quot;;[.C280]&lt;&gt;&quot;&quot;);CONCATENATE([Variables.$I$1];[Variables.$I$7];[.B280];[Variables.$I$7];[Variables.$I$6];[Variables.$I$7];[.C280];[Variables.$I$7];[Variables.$I$6];[Variables.$I$7];[.D280];[Variables.$I$7];[Variables.$I$6];[.E280];[Variables.$I$6];[.F280];[Variables.$I$6];[.G280];[Variables.$I$6];[.H280];[Variables.$I$6];[Variables.$I$1];[.I280];[.J280];[.K280];[.L280];[.M280];[.N280];[.O280];[Variables.$I$2];[Variables.$I$6];[.P280];[Variables.$I$6];[.Q280];[Variables.$I$6];[.R280];[Variables.$I$6];[.S280];[Variables.$I$6];[.T280];IF([.U280]&lt;&gt;&quot;&quot;;CONCATENATE([Variables.$I$6];[.U280]);&quot;&quot;);[Variables.$I$2];[Variables.$I$6]);IF([.B280]&lt;&gt;&quot;&quot;;CONCATENATE(&quot;#&quot;;[.B280]);&quot;&quot;))" office:value-type="string" office:string-value="[&quot;i2_dun_warrior&quot;,&quot;Dunnish_Warrior&quot;,&quot;Dunnish_Warriors&quot;,tf_dunland| tf_randomize_face| tfg_armor| tfg_boots| tfg_polearm,0,0,fac_dunland,[itm_gundabad_helm_a, itm_gundabad_helm_b, itm_dun_helm_b,itm_dun_helm_d,itm_dunland_tunic_1, itm_dunland_tunic_2, itm_dunland_fur_1,itm_dunland_fur_2,itm_dunland_wolfboots,itm_dunnish_axe,itm_wood_club,itm_dunland_spear, itm_dunnish_war_axe_bad,itm_orc_shield_b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" calcext:value-type="string">
            <text:p>["i2_dun_warrior","Dunnish_Warrior","Dunnish_Warriors",tf_dunland| tf_randomize_face| tfg_armor| tfg_boots| tfg_polearm,0,0,fac_dunland,[itm_gundabad_helm_a, itm_gundabad_helm_b, itm_dun_helm_b,itm_dun_helm_d,itm_dunland_tunic_1, itm_dunland_tunic_2, itm_dunland_fur_1,itm_dunland_fur_2,itm_dunland_wolfboots,itm_dunnish_axe,itm_wood_club,itm_dunland_spear, itm_dunnish_war_axe_bad,itm_orc_shield_b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</text:p>
          </table:table-cell>
          <table:table-cell table:number-columns-repeated="16362"/>
        </table:table-row>
        <table:table-row table:style-name="ro1">
          <table:table-cell table:style-name="ce6" table:formula="of:=IF(AND([.B281]&lt;&gt;&quot;&quot;;[.C281]&lt;&gt;&quot;&quot;);CONCATENATE([Variables.$I$1];[Variables.$I$7];[.B281];[Variables.$I$7];[Variables.$I$6];[Variables.$I$7];[.C281];[Variables.$I$7];[Variables.$I$6];[Variables.$I$7];[.D281];[Variables.$I$7];[Variables.$I$6];[.E281];[Variables.$I$6];[.F281];[Variables.$I$6];[.G281];[Variables.$I$6];[.H281];[Variables.$I$6];[Variables.$I$1];[.I281];[.J281];[.K281];[.L281];[.M281];[.N281];[.O281];[Variables.$I$2];[Variables.$I$6];[.P281];[Variables.$I$6];[.Q281];[Variables.$I$6];[.R281];[Variables.$I$6];[.S281];[Variables.$I$6];[.T281];IF([.U281]&lt;&gt;&quot;&quot;;CONCATENATE([Variables.$I$6];[.U281]);&quot;&quot;);[Variables.$I$2];[Variables.$I$6]);IF([.B281]&lt;&gt;&quot;&quot;;CONCATENATE(&quot;#&quot;;[.B281]);&quot;&quot;))" office:value-type="string" office:string-value="[&quot;i3_dun_pikeman&quot;,&quot;Dunnish_Pikeman&quot;,&quot;Dunnish_Pikemen&quot;,tf_dunland| tf_randomize_face| tfg_armor| tfg_boots,0,0,fac_dunland,[itm_gundabad_helm_b, itm_dun_helm_b, itm_dun_helm_c_bad,itm_dun_helm_d,itm_dunland_tunic_1_good, itm_dunland_tunic_2_good, itm_dunland_fur_1_good, itm_dunland_fur_2_good,itm_leather_gloves,itm_dunland_wolfboots,itm_dunnish_pike,itm_orc_shield_b,itm_orc_shield_c,itm_dun_shield_b,],attr_evil_tier_3,wp_tier_3,knows_common|knows_athletics_5|knows_shield_2|knows_power_strike_2|knows_ironflesh_4,dunland_face1,dunland_face2]," calcext:value-type="string">
            <text:p>["i3_dun_pikeman","Dunnish_Pikeman","Dunnish_Pikemen",tf_dunland| tf_randomize_face| tfg_armor| tfg_boots,0,0,fac_dunland,[itm_gundabad_helm_b, itm_dun_helm_b, itm_dun_helm_c_bad,itm_dun_helm_d,itm_dunland_tunic_1_good, itm_dunland_tunic_2_good, itm_dunland_fur_1_good, itm_dunland_fur_2_good,itm_leather_gloves,itm_dunland_wolfboots,itm_dunnish_pike,itm_orc_shield_b,itm_orc_shield_c,itm_dun_shield_b,],attr_evil_tier_3,wp_tier_3,knows_common|knows_athletics_5|knows_shield_2|knows_power_strike_2|knows_ironflesh_4,dunland_face1,dunland_face2],</text:p>
          </table:table-cell>
          <table:table-cell table:style-name="ce7" office:value-type="string" calcext:value-type="string">
            <text:p>i3_dun_pikeman</text:p>
          </table:table-cell>
          <table:table-cell table:style-name="ce7" office:value-type="string" calcext:value-type="string">
            <text:p>Dunnish_Pikeman</text:p>
          </table:table-cell>
          <table:table-cell table:style-name="ce7" office:value-type="string" calcext:value-type="string">
            <text:p>Dunnish_Pike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unland</text:p>
          </table:table-cell>
          <table:table-cell table:style-name="ce11" office:value-type="string" calcext:value-type="string">
            <text:p>itm_gundabad_helm_b, itm_dun_helm_b, itm_dun_helm_c_bad,itm_dun_helm_d,</text:p>
          </table:table-cell>
          <table:table-cell table:style-name="ce11" office:value-type="string" calcext:value-type="string">
            <text:p>itm_dunland_tunic_1_good, itm_dunland_tunic_2_good, itm_dunland_fur_1_good, itm_dunland_fur_2_good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dunland_wolfboots,</text:p>
          </table:table-cell>
          <table:table-cell table:style-name="ce11" office:value-type="string" calcext:value-type="string">
            <text:p>itm_dunnish_pike,</text:p>
          </table:table-cell>
          <table:table-cell table:style-name="ce11" office:value-type="string" calcext:value-type="string">
            <text:p>itm_orc_shield_b,itm_orc_shield_c,itm_dun_shield_b,</text:p>
          </table:table-cell>
          <table:table-cell table:style-name="ce11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5|knows_shield_2|knows_power_strike_2|knows_ironflesh_4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6" table:formula="of:=IF(AND([.B281]&lt;&gt;&quot;&quot;;[.C281]&lt;&gt;&quot;&quot;);CONCATENATE([Variables.$I$1];[Variables.$I$7];[.B281];[Variables.$I$7];[Variables.$I$6];[Variables.$I$7];[.C281];[Variables.$I$7];[Variables.$I$6];[Variables.$I$7];[.D281];[Variables.$I$7];[Variables.$I$6];[.E281];[Variables.$I$6];[.F281];[Variables.$I$6];[.G281];[Variables.$I$6];[.H281];[Variables.$I$6];[Variables.$I$1];[.I281];[.J281];[.K281];[.L281];[.M281];[.N281];[.O281];[Variables.$I$2];[Variables.$I$6];[.P281];[Variables.$I$6];[.Q281];[Variables.$I$6];[.R281];[Variables.$I$6];[.S281];[Variables.$I$6];[.T281];IF([.U281]&lt;&gt;&quot;&quot;;CONCATENATE([Variables.$I$6];[.U281]);&quot;&quot;);[Variables.$I$2];[Variables.$I$6]);IF([.B281]&lt;&gt;&quot;&quot;;CONCATENATE(&quot;#&quot;;[.B281]);&quot;&quot;))" office:value-type="string" office:string-value="[&quot;i3_dun_pikeman&quot;,&quot;Dunnish_Pikeman&quot;,&quot;Dunnish_Pikemen&quot;,tf_dunland| tf_randomize_face| tfg_armor| tfg_boots,0,0,fac_dunland,[itm_gundabad_helm_b, itm_dun_helm_b, itm_dun_helm_c_bad,itm_dun_helm_d,itm_dunland_tunic_1_good, itm_dunland_tunic_2_good, itm_dunland_fur_1_good, itm_dunland_fur_2_good,itm_leather_gloves,itm_dunland_wolfboots,itm_dunnish_pike,itm_orc_shield_b,itm_orc_shield_c,itm_dun_shield_b,],attr_evil_tier_3,wp_tier_3,knows_common|knows_athletics_5|knows_shield_2|knows_power_strike_2|knows_ironflesh_4,dunland_face1,dunland_face2]," calcext:value-type="string">
            <text:p>["i3_dun_pikeman","Dunnish_Pikeman","Dunnish_Pikemen",tf_dunland| tf_randomize_face| tfg_armor| tfg_boots,0,0,fac_dunland,[itm_gundabad_helm_b, itm_dun_helm_b, itm_dun_helm_c_bad,itm_dun_helm_d,itm_dunland_tunic_1_good, itm_dunland_tunic_2_good, itm_dunland_fur_1_good, itm_dunland_fur_2_good,itm_leather_gloves,itm_dunland_wolfboots,itm_dunnish_pike,itm_orc_shield_b,itm_orc_shield_c,itm_dun_shield_b,],attr_evil_tier_3,wp_tier_3,knows_common|knows_athletics_5|knows_shield_2|knows_power_strike_2|knows_ironflesh_4,dunland_face1,dunland_face2],</text:p>
          </table:table-cell>
          <table:table-cell table:number-columns-repeated="16362"/>
        </table:table-row>
        <table:table-row table:style-name="ro1">
          <table:table-cell table:style-name="ce6" table:formula="of:=IF(AND([.B282]&lt;&gt;&quot;&quot;;[.C282]&lt;&gt;&quot;&quot;);CONCATENATE([Variables.$I$1];[Variables.$I$7];[.B282];[Variables.$I$7];[Variables.$I$6];[Variables.$I$7];[.C282];[Variables.$I$7];[Variables.$I$6];[Variables.$I$7];[.D282];[Variables.$I$7];[Variables.$I$6];[.E282];[Variables.$I$6];[.F282];[Variables.$I$6];[.G282];[Variables.$I$6];[.H282];[Variables.$I$6];[Variables.$I$1];[.I282];[.J282];[.K282];[.L282];[.M282];[.N282];[.O282];[Variables.$I$2];[Variables.$I$6];[.P282];[Variables.$I$6];[.Q282];[Variables.$I$6];[.R282];[Variables.$I$6];[.S282];[Variables.$I$6];[.T282];IF([.U282]&lt;&gt;&quot;&quot;;CONCATENATE([Variables.$I$6];[.U282]);&quot;&quot;);[Variables.$I$2];[Variables.$I$6]);IF([.B282]&lt;&gt;&quot;&quot;;CONCATENATE(&quot;#&quot;;[.B282]);&quot;&quot;))" office:value-type="string" office:string-value="[&quot;i4_dun_vet_pikeman&quot;,&quot;Dunnish_Veteran_Pikeman&quot;,&quot;Dunnish_Veteran_Pikemen&quot;,tf_dunland| tf_randomize_face| tfg_armor| tfg_helm| tfg_boots,0,0,fac_dunland,[itm_dun_helm_b_good, itm_dun_helm_c_good,itm_dun_helm_d_good,itm_dunland_mail_1, itm_dunland_mail_2,itm_leather_gloves,itm_fur_gloves_reward,itm_dunland_wolfboots,itm_leather_boots_dark_bad,itm_dunnish_pike,itm_dun_shield_b,],attr_evil_tier_4,wp_tier_4,knows_common|knows_athletics_6|knows_shield_3|knows_power_strike_3|knows_ironflesh_6,dunland_face1,dunland_face2]," calcext:value-type="string">
            <text:p>["i4_dun_vet_pikeman","Dunnish_Veteran_Pikeman","Dunnish_Veteran_Pikemen",tf_dunland| tf_randomize_face| tfg_armor| tfg_helm| tfg_boots,0,0,fac_dunland,[itm_dun_helm_b_good, itm_dun_helm_c_good,itm_dun_helm_d_good,itm_dunland_mail_1, itm_dunland_mail_2,itm_leather_gloves,itm_fur_gloves_reward,itm_dunland_wolfboots,itm_leather_boots_dark_bad,itm_dunnish_pike,itm_dun_shield_b,],attr_evil_tier_4,wp_tier_4,knows_common|knows_athletics_6|knows_shield_3|knows_power_strike_3|knows_ironflesh_6,dunland_face1,dunland_face2],</text:p>
          </table:table-cell>
          <table:table-cell table:style-name="ce7" office:value-type="string" calcext:value-type="string">
            <text:p>i4_dun_vet_pikeman</text:p>
          </table:table-cell>
          <table:table-cell table:style-name="ce7" office:value-type="string" calcext:value-type="string">
            <text:p>Dunnish_Veteran_Pikeman</text:p>
          </table:table-cell>
          <table:table-cell table:style-name="ce7" office:value-type="string" calcext:value-type="string">
            <text:p>Dunnish_Veteran_Pikemen</text:p>
          </table:table-cell>
          <table:table-cell table:style-name="ce8" office:value-type="string" calcext:value-type="string">
            <text:p>tf_dunland| tf_randomize_face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unland</text:p>
          </table:table-cell>
          <table:table-cell table:style-name="ce11" office:value-type="string" calcext:value-type="string">
            <text:p>itm_dun_helm_b_good, itm_dun_helm_c_good,itm_dun_helm_d_good,</text:p>
          </table:table-cell>
          <table:table-cell table:style-name="ce11" office:value-type="string" calcext:value-type="string">
            <text:p>itm_dunland_mail_1, itm_dunland_mail_2,</text:p>
          </table:table-cell>
          <table:table-cell table:style-name="ce11" office:value-type="string" calcext:value-type="string">
            <text:p>itm_leather_gloves,itm_fur_gloves_reward,</text:p>
          </table:table-cell>
          <table:table-cell table:style-name="ce11" office:value-type="string" calcext:value-type="string">
            <text:p>itm_dunland_wolfboots,itm_leather_boots_dark_bad,</text:p>
          </table:table-cell>
          <table:table-cell table:style-name="ce11" office:value-type="string" calcext:value-type="string">
            <text:p>itm_dunnish_pike,</text:p>
          </table:table-cell>
          <table:table-cell table:style-name="ce11" office:value-type="string" calcext:value-type="string">
            <text:p>itm_dun_shield_b,</text:p>
          </table:table-cell>
          <table:table-cell table:style-name="ce11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6|knows_shield_3|knows_power_strike_3|knows_ironflesh_6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6" table:formula="of:=IF(AND([.B282]&lt;&gt;&quot;&quot;;[.C282]&lt;&gt;&quot;&quot;);CONCATENATE([Variables.$I$1];[Variables.$I$7];[.B282];[Variables.$I$7];[Variables.$I$6];[Variables.$I$7];[.C282];[Variables.$I$7];[Variables.$I$6];[Variables.$I$7];[.D282];[Variables.$I$7];[Variables.$I$6];[.E282];[Variables.$I$6];[.F282];[Variables.$I$6];[.G282];[Variables.$I$6];[.H282];[Variables.$I$6];[Variables.$I$1];[.I282];[.J282];[.K282];[.L282];[.M282];[.N282];[.O282];[Variables.$I$2];[Variables.$I$6];[.P282];[Variables.$I$6];[.Q282];[Variables.$I$6];[.R282];[Variables.$I$6];[.S282];[Variables.$I$6];[.T282];IF([.U282]&lt;&gt;&quot;&quot;;CONCATENATE([Variables.$I$6];[.U282]);&quot;&quot;);[Variables.$I$2];[Variables.$I$6]);IF([.B282]&lt;&gt;&quot;&quot;;CONCATENATE(&quot;#&quot;;[.B282]);&quot;&quot;))" office:value-type="string" office:string-value="[&quot;i4_dun_vet_pikeman&quot;,&quot;Dunnish_Veteran_Pikeman&quot;,&quot;Dunnish_Veteran_Pikemen&quot;,tf_dunland| tf_randomize_face| tfg_armor| tfg_helm| tfg_boots,0,0,fac_dunland,[itm_dun_helm_b_good, itm_dun_helm_c_good,itm_dun_helm_d_good,itm_dunland_mail_1, itm_dunland_mail_2,itm_leather_gloves,itm_fur_gloves_reward,itm_dunland_wolfboots,itm_leather_boots_dark_bad,itm_dunnish_pike,itm_dun_shield_b,],attr_evil_tier_4,wp_tier_4,knows_common|knows_athletics_6|knows_shield_3|knows_power_strike_3|knows_ironflesh_6,dunland_face1,dunland_face2]," calcext:value-type="string">
            <text:p>["i4_dun_vet_pikeman","Dunnish_Veteran_Pikeman","Dunnish_Veteran_Pikemen",tf_dunland| tf_randomize_face| tfg_armor| tfg_helm| tfg_boots,0,0,fac_dunland,[itm_dun_helm_b_good, itm_dun_helm_c_good,itm_dun_helm_d_good,itm_dunland_mail_1, itm_dunland_mail_2,itm_leather_gloves,itm_fur_gloves_reward,itm_dunland_wolfboots,itm_leather_boots_dark_bad,itm_dunnish_pike,itm_dun_shield_b,],attr_evil_tier_4,wp_tier_4,knows_common|knows_athletics_6|knows_shield_3|knows_power_strike_3|knows_ironflesh_6,dunland_face1,dunland_face2],</text:p>
          </table:table-cell>
          <table:table-cell table:number-columns-repeated="16362"/>
        </table:table-row>
        <table:table-row table:style-name="ro1">
          <table:table-cell table:style-name="ce6" table:formula="of:=IF(AND([.B283]&lt;&gt;&quot;&quot;;[.C283]&lt;&gt;&quot;&quot;);CONCATENATE([Variables.$I$1];[Variables.$I$7];[.B283];[Variables.$I$7];[Variables.$I$6];[Variables.$I$7];[.C283];[Variables.$I$7];[Variables.$I$6];[Variables.$I$7];[.D283];[Variables.$I$7];[Variables.$I$6];[.E283];[Variables.$I$6];[.F283];[Variables.$I$6];[.G283];[Variables.$I$6];[.H283];[Variables.$I$6];[Variables.$I$1];[.I283];[.J283];[.K283];[.L283];[.M283];[.N283];[.O283];[Variables.$I$2];[Variables.$I$6];[.P283];[Variables.$I$6];[.Q283];[Variables.$I$6];[.R283];[Variables.$I$6];[.S283];[Variables.$I$6];[.T283];IF([.U283]&lt;&gt;&quot;&quot;;CONCATENATE([Variables.$I$6];[.U283]);&quot;&quot;);[Variables.$I$2];[Variables.$I$6]);IF([.B283]&lt;&gt;&quot;&quot;;CONCATENATE(&quot;#&quot;;[.B283]);&quot;&quot;))" office:value-type="string" office:string-value="[&quot;ac4_dun_crebain_rider&quot;,&quot;Dunnish_Crebain_Rider&quot;,&quot;Dunnish_Crebain_Riders&quot;,tf_dunland| tf_randomize_face| tf_mounted| tfg_armor| tfg_horse| tfg_boots| tfg_ranged,0,0,fac_dunland,[itm_dun_helm_c,itm_dunland_fur_1_good, itm_dunland_fur_2_good,itm_dunland_wolfboots,itm_dunland_javelin_big,itm_dunland_javelin_big,itm_twohand_wood_club,itm_dunland_spear,itm_dunnish_long_axe_bad,itm_orc_shield_b, itm_dun_shield_a,itm_saddle_horse],attr_evil_tier_4,wp_tier_3,knows_common|knows_ironflesh_1|knows_power_throw_3|knows_athletics_2|knows_riding_4|knows_horse_archery_3,dunland_face1,dunland_face2]," calcext:value-type="string">
            <text:p>["ac4_dun_crebain_rider","Dunnish_Crebain_Rider","Dunnish_Crebain_Riders",tf_dunland| tf_randomize_face| tf_mounted| tfg_armor| tfg_horse| tfg_boots| tfg_ranged,0,0,fac_dunland,[itm_dun_helm_c,itm_dunland_fur_1_good, itm_dunland_fur_2_good,itm_dunland_wolfboots,itm_dunland_javelin_big,itm_dunland_javelin_big,itm_twohand_wood_club,itm_dunland_spear,itm_dunnish_long_axe_bad,itm_orc_shield_b, itm_dun_shield_a,itm_saddle_horse],attr_evil_tier_4,wp_tier_3,knows_common|knows_ironflesh_1|knows_power_throw_3|knows_athletics_2|knows_riding_4|knows_horse_archery_3,dunland_face1,dunland_face2],</text:p>
          </table:table-cell>
          <table:table-cell table:style-name="ce7" office:value-type="string" calcext:value-type="string">
            <text:p>ac4_dun_crebain_rider</text:p>
          </table:table-cell>
          <table:table-cell table:style-name="ce7" office:value-type="string" calcext:value-type="string">
            <text:p>Dunnish_Crebain_Rider</text:p>
          </table:table-cell>
          <table:table-cell table:style-name="ce7" office:value-type="string" calcext:value-type="string">
            <text:p>Dunnish_Crebain_Riders</text:p>
          </table:table-cell>
          <table:table-cell table:style-name="ce8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unland</text:p>
          </table:table-cell>
          <table:table-cell table:style-name="ce11" office:value-type="string" calcext:value-type="string">
            <text:p>itm_dun_helm_c,</text:p>
          </table:table-cell>
          <table:table-cell table:style-name="ce11" office:value-type="string" calcext:value-type="string">
            <text:p>itm_dunland_fur_1_good, itm_dunland_fur_2_good,</text:p>
          </table:table-cell>
          <table:table-cell table:style-name="ce11"/>
          <table:table-cell table:style-name="ce11" office:value-type="string" calcext:value-type="string">
            <text:p>itm_dunland_wolfboots,</text:p>
          </table:table-cell>
          <table:table-cell table:style-name="ce11" office:value-type="string" calcext:value-type="string">
            <text:p>itm_dunland_javelin_big,itm_dunland_javelin_big,itm_twohand_wood_club,itm_dunland_spear,itm_dunnish_long_axe_bad,</text:p>
          </table:table-cell>
          <table:table-cell table:style-name="ce11" office:value-type="string" calcext:value-type="string">
            <text:p>itm_orc_shield_b, itm_dun_shield_a,</text:p>
          </table:table-cell>
          <table:table-cell table:style-name="ce11" office:value-type="string" calcext:value-type="string">
            <text:p>itm_saddle_horse</text:p>
          </table:table-cell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3</text:p>
          </table:table-cell>
          <table:table-cell table:style-name="ce13" office:value-type="string" calcext:value-type="string">
            <text:p>knows_common|knows_ironflesh_1|knows_power_throw_3|knows_athletics_2|knows_riding_4|knows_horse_archery_3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6" table:formula="of:=IF(AND([.B283]&lt;&gt;&quot;&quot;;[.C283]&lt;&gt;&quot;&quot;);CONCATENATE([Variables.$I$1];[Variables.$I$7];[.B283];[Variables.$I$7];[Variables.$I$6];[Variables.$I$7];[.C283];[Variables.$I$7];[Variables.$I$6];[Variables.$I$7];[.D283];[Variables.$I$7];[Variables.$I$6];[.E283];[Variables.$I$6];[.F283];[Variables.$I$6];[.G283];[Variables.$I$6];[.H283];[Variables.$I$6];[Variables.$I$1];[.I283];[.J283];[.K283];[.L283];[.M283];[.N283];[.O283];[Variables.$I$2];[Variables.$I$6];[.P283];[Variables.$I$6];[.Q283];[Variables.$I$6];[.R283];[Variables.$I$6];[.S283];[Variables.$I$6];[.T283];IF([.U283]&lt;&gt;&quot;&quot;;CONCATENATE([Variables.$I$6];[.U283]);&quot;&quot;);[Variables.$I$2];[Variables.$I$6]);IF([.B283]&lt;&gt;&quot;&quot;;CONCATENATE(&quot;#&quot;;[.B283]);&quot;&quot;))" office:value-type="string" office:string-value="[&quot;ac4_dun_crebain_rider&quot;,&quot;Dunnish_Crebain_Rider&quot;,&quot;Dunnish_Crebain_Riders&quot;,tf_dunland| tf_randomize_face| tf_mounted| tfg_armor| tfg_horse| tfg_boots| tfg_ranged,0,0,fac_dunland,[itm_dun_helm_c,itm_dunland_fur_1_good, itm_dunland_fur_2_good,itm_dunland_wolfboots,itm_dunland_javelin_big,itm_dunland_javelin_big,itm_twohand_wood_club,itm_dunland_spear,itm_dunnish_long_axe_bad,itm_orc_shield_b, itm_dun_shield_a,itm_saddle_horse],attr_evil_tier_4,wp_tier_3,knows_common|knows_ironflesh_1|knows_power_throw_3|knows_athletics_2|knows_riding_4|knows_horse_archery_3,dunland_face1,dunland_face2]," calcext:value-type="string">
            <text:p>["ac4_dun_crebain_rider","Dunnish_Crebain_Rider","Dunnish_Crebain_Riders",tf_dunland| tf_randomize_face| tf_mounted| tfg_armor| tfg_horse| tfg_boots| tfg_ranged,0,0,fac_dunland,[itm_dun_helm_c,itm_dunland_fur_1_good, itm_dunland_fur_2_good,itm_dunland_wolfboots,itm_dunland_javelin_big,itm_dunland_javelin_big,itm_twohand_wood_club,itm_dunland_spear,itm_dunnish_long_axe_bad,itm_orc_shield_b, itm_dun_shield_a,itm_saddle_horse],attr_evil_tier_4,wp_tier_3,knows_common|knows_ironflesh_1|knows_power_throw_3|knows_athletics_2|knows_riding_4|knows_horse_archery_3,dunland_face1,dunland_face2],</text:p>
          </table:table-cell>
          <table:table-cell table:number-columns-repeated="16362"/>
        </table:table-row>
        <table:table-row table:style-name="ro1">
          <table:table-cell table:style-name="ce6" table:formula="of:=IF(AND([.B284]&lt;&gt;&quot;&quot;;[.C284]&lt;&gt;&quot;&quot;);CONCATENATE([Variables.$I$1];[Variables.$I$7];[.B284];[Variables.$I$7];[Variables.$I$6];[Variables.$I$7];[.C284];[Variables.$I$7];[Variables.$I$6];[Variables.$I$7];[.D284];[Variables.$I$7];[Variables.$I$6];[.E284];[Variables.$I$6];[.F284];[Variables.$I$6];[.G284];[Variables.$I$6];[.H284];[Variables.$I$6];[Variables.$I$1];[.I284];[.J284];[.K284];[.L284];[.M284];[.N284];[.O284];[Variables.$I$2];[Variables.$I$6];[.P284];[Variables.$I$6];[.Q284];[Variables.$I$6];[.R284];[Variables.$I$6];[.S284];[Variables.$I$6];[.T284];IF([.U284]&lt;&gt;&quot;&quot;;CONCATENATE([Variables.$I$6];[.U284]);&quot;&quot;);[Variables.$I$2];[Variables.$I$6]);IF([.B284]&lt;&gt;&quot;&quot;;CONCATENATE(&quot;#&quot;;[.B284]);&quot;&quot;))" office:value-type="string" office:string-value="[&quot;i3_dun_vet_warrior&quot;,&quot;Dunnish_Veteran_Warrior&quot;,&quot;Dunnish_Veteran_Warriors&quot;,tf_dunland| tf_randomize_face| tfg_shield| tfg_armor| tfg_boots| tfg_ranged,0,0,fac_dunland,[itm_gundabad_helm_b, itm_dun_helm_b, itm_dun_helm_c_bad,itm_dun_helm_d,itm_dunland_tunic_1_good, itm_dunland_tunic_2_good, itm_dunland_fur_1_good, itm_dunland_fur_2_good,itm_leather_gloves,itm_dunland_wolfboots,itm_leather_boots_dark_bad,itm_dunnish_axe_heavy,itm_dunnish_war_axe,itm_dunland_javelin,itm_dunland_javelin,itm_dunland_javelin,itm_dunnish_long_axe_bad,itm_dun_shield_a,itm_dun_shield_b,],attr_evil_tier_3,wp_tier_3,knows_common|knows_athletics_4|knows_shield_2|knows_power_strike_2|knows_ironflesh_1|knows_power_throw_3,dunland_face1,dunland_face2]," calcext:value-type="string">
            <text:p>["i3_dun_vet_warrior","Dunnish_Veteran_Warrior","Dunnish_Veteran_Warriors",tf_dunland| tf_randomize_face| tfg_shield| tfg_armor| tfg_boots| tfg_ranged,0,0,fac_dunland,[itm_gundabad_helm_b, itm_dun_helm_b, itm_dun_helm_c_bad,itm_dun_helm_d,itm_dunland_tunic_1_good, itm_dunland_tunic_2_good, itm_dunland_fur_1_good, itm_dunland_fur_2_good,itm_leather_gloves,itm_dunland_wolfboots,itm_leather_boots_dark_bad,itm_dunnish_axe_heavy,itm_dunnish_war_axe,itm_dunland_javelin,itm_dunland_javelin,itm_dunland_javelin,itm_dunnish_long_axe_bad,itm_dun_shield_a,itm_dun_shield_b,],attr_evil_tier_3,wp_tier_3,knows_common|knows_athletics_4|knows_shield_2|knows_power_strike_2|knows_ironflesh_1|knows_power_throw_3,dunland_face1,dunland_face2],</text:p>
          </table:table-cell>
          <table:table-cell table:style-name="ce7" office:value-type="string" calcext:value-type="string">
            <text:p>i3_dun_vet_warrior</text:p>
          </table:table-cell>
          <table:table-cell table:style-name="ce7" office:value-type="string" calcext:value-type="string">
            <text:p>Dunnish_Veteran_Warrior</text:p>
          </table:table-cell>
          <table:table-cell table:style-name="ce7" office:value-type="string" calcext:value-type="string">
            <text:p>Dunnish_Veteran_Warrior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unland</text:p>
          </table:table-cell>
          <table:table-cell table:style-name="ce11" office:value-type="string" calcext:value-type="string">
            <text:p>itm_gundabad_helm_b, itm_dun_helm_b, itm_dun_helm_c_bad,itm_dun_helm_d,</text:p>
          </table:table-cell>
          <table:table-cell table:style-name="ce11" office:value-type="string" calcext:value-type="string">
            <text:p>itm_dunland_tunic_1_good, itm_dunland_tunic_2_good, itm_dunland_fur_1_good, itm_dunland_fur_2_good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dunland_wolfboots,itm_leather_boots_dark_bad,</text:p>
          </table:table-cell>
          <table:table-cell table:style-name="ce11" office:value-type="string" calcext:value-type="string">
            <text:p>itm_dunnish_axe_heavy,itm_dunnish_war_axe,itm_dunland_javelin,itm_dunland_javelin,itm_dunland_javelin,itm_dunnish_long_axe_bad,</text:p>
          </table:table-cell>
          <table:table-cell table:style-name="ce11" office:value-type="string" calcext:value-type="string">
            <text:p>itm_dun_shield_a,itm_dun_shield_b,</text:p>
          </table:table-cell>
          <table:table-cell table:style-name="ce11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4|knows_shield_2|knows_power_strike_2|knows_ironflesh_1|knows_power_throw_3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6" table:formula="of:=IF(AND([.B284]&lt;&gt;&quot;&quot;;[.C284]&lt;&gt;&quot;&quot;);CONCATENATE([Variables.$I$1];[Variables.$I$7];[.B284];[Variables.$I$7];[Variables.$I$6];[Variables.$I$7];[.C284];[Variables.$I$7];[Variables.$I$6];[Variables.$I$7];[.D284];[Variables.$I$7];[Variables.$I$6];[.E284];[Variables.$I$6];[.F284];[Variables.$I$6];[.G284];[Variables.$I$6];[.H284];[Variables.$I$6];[Variables.$I$1];[.I284];[.J284];[.K284];[.L284];[.M284];[.N284];[.O284];[Variables.$I$2];[Variables.$I$6];[.P284];[Variables.$I$6];[.Q284];[Variables.$I$6];[.R284];[Variables.$I$6];[.S284];[Variables.$I$6];[.T284];IF([.U284]&lt;&gt;&quot;&quot;;CONCATENATE([Variables.$I$6];[.U284]);&quot;&quot;);[Variables.$I$2];[Variables.$I$6]);IF([.B284]&lt;&gt;&quot;&quot;;CONCATENATE(&quot;#&quot;;[.B284]);&quot;&quot;))" office:value-type="string" office:string-value="[&quot;i3_dun_vet_warrior&quot;,&quot;Dunnish_Veteran_Warrior&quot;,&quot;Dunnish_Veteran_Warriors&quot;,tf_dunland| tf_randomize_face| tfg_shield| tfg_armor| tfg_boots| tfg_ranged,0,0,fac_dunland,[itm_gundabad_helm_b, itm_dun_helm_b, itm_dun_helm_c_bad,itm_dun_helm_d,itm_dunland_tunic_1_good, itm_dunland_tunic_2_good, itm_dunland_fur_1_good, itm_dunland_fur_2_good,itm_leather_gloves,itm_dunland_wolfboots,itm_leather_boots_dark_bad,itm_dunnish_axe_heavy,itm_dunnish_war_axe,itm_dunland_javelin,itm_dunland_javelin,itm_dunland_javelin,itm_dunnish_long_axe_bad,itm_dun_shield_a,itm_dun_shield_b,],attr_evil_tier_3,wp_tier_3,knows_common|knows_athletics_4|knows_shield_2|knows_power_strike_2|knows_ironflesh_1|knows_power_throw_3,dunland_face1,dunland_face2]," calcext:value-type="string">
            <text:p>["i3_dun_vet_warrior","Dunnish_Veteran_Warrior","Dunnish_Veteran_Warriors",tf_dunland| tf_randomize_face| tfg_shield| tfg_armor| tfg_boots| tfg_ranged,0,0,fac_dunland,[itm_gundabad_helm_b, itm_dun_helm_b, itm_dun_helm_c_bad,itm_dun_helm_d,itm_dunland_tunic_1_good, itm_dunland_tunic_2_good, itm_dunland_fur_1_good, itm_dunland_fur_2_good,itm_leather_gloves,itm_dunland_wolfboots,itm_leather_boots_dark_bad,itm_dunnish_axe_heavy,itm_dunnish_war_axe,itm_dunland_javelin,itm_dunland_javelin,itm_dunland_javelin,itm_dunnish_long_axe_bad,itm_dun_shield_a,itm_dun_shield_b,],attr_evil_tier_3,wp_tier_3,knows_common|knows_athletics_4|knows_shield_2|knows_power_strike_2|knows_ironflesh_1|knows_power_throw_3,dunland_face1,dunland_face2],</text:p>
          </table:table-cell>
          <table:table-cell table:number-columns-repeated="16362"/>
        </table:table-row>
        <table:table-row table:style-name="ro1">
          <table:table-cell table:style-name="ce6" table:formula="of:=IF(AND([.B285]&lt;&gt;&quot;&quot;;[.C285]&lt;&gt;&quot;&quot;);CONCATENATE([Variables.$I$1];[Variables.$I$7];[.B285];[Variables.$I$7];[Variables.$I$6];[Variables.$I$7];[.C285];[Variables.$I$7];[Variables.$I$6];[Variables.$I$7];[.D285];[Variables.$I$7];[Variables.$I$6];[.E285];[Variables.$I$6];[.F285];[Variables.$I$6];[.G285];[Variables.$I$6];[.H285];[Variables.$I$6];[Variables.$I$1];[.I285];[.J285];[.K285];[.L285];[.M285];[.N285];[.O285];[Variables.$I$2];[Variables.$I$6];[.P285];[Variables.$I$6];[.Q285];[Variables.$I$6];[.R285];[Variables.$I$6];[.S285];[Variables.$I$6];[.T285];IF([.U285]&lt;&gt;&quot;&quot;;CONCATENATE([Variables.$I$6];[.U285]);&quot;&quot;);[Variables.$I$2];[Variables.$I$6]);IF([.B285]&lt;&gt;&quot;&quot;;CONCATENATE(&quot;#&quot;;[.B285]);&quot;&quot;))" office:value-type="string" office:string-value="[&quot;i4_dun_wolf_warrior&quot;,&quot;Dunnish_Wolf_Warrior&quot;,&quot;Dunnish_Wolf_Warriors&quot;,tf_dunland| tf_randomize_face| tfg_shield| tfg_armor| tfg_helm| tfg_boots| tfg_ranged,0,0,fac_dunland,[itm_dun_helm_a_bad,itm_dunland_mail_1_bad, itm_dunland_mail_2_bad,itm_leather_gloves,itm_dunland_wolfboots,itm_leather_boots_dark,itm_dunnish_axe_heavy,itm_dunnish_war_axe,itm_dun_shortsword,itm_dunland_javelin,itm_dunland_javelin,itm_dunland_javelin,itm_dunnish_long_axe,itm_dun_shield_a,],attr_evil_tier_4,wp_tier_4,knows_common|knows_athletics_5|knows_shield_3|knows_power_strike_3|knows_ironflesh_4|knows_power_throw_4,dunland_face1,dunland_face2]," calcext:value-type="string">
            <text:p>["i4_dun_wolf_warrior","Dunnish_Wolf_Warrior","Dunnish_Wolf_Warriors",tf_dunland| tf_randomize_face| tfg_shield| tfg_armor| tfg_helm| tfg_boots| tfg_ranged,0,0,fac_dunland,[itm_dun_helm_a_bad,itm_dunland_mail_1_bad, itm_dunland_mail_2_bad,itm_leather_gloves,itm_dunland_wolfboots,itm_leather_boots_dark,itm_dunnish_axe_heavy,itm_dunnish_war_axe,itm_dun_shortsword,itm_dunland_javelin,itm_dunland_javelin,itm_dunland_javelin,itm_dunnish_long_axe,itm_dun_shield_a,],attr_evil_tier_4,wp_tier_4,knows_common|knows_athletics_5|knows_shield_3|knows_power_strike_3|knows_ironflesh_4|knows_power_throw_4,dunland_face1,dunland_face2],</text:p>
          </table:table-cell>
          <table:table-cell table:style-name="ce7" office:value-type="string" calcext:value-type="string">
            <text:p>i4_dun_wolf_warrior</text:p>
          </table:table-cell>
          <table:table-cell table:style-name="ce7" office:value-type="string" calcext:value-type="string">
            <text:p>Dunnish_Wolf_Warrior</text:p>
          </table:table-cell>
          <table:table-cell table:style-name="ce7" office:value-type="string" calcext:value-type="string">
            <text:p>Dunnish_Wolf_Warriors</text:p>
          </table:table-cell>
          <table:table-cell table:style-name="ce8" office:value-type="string" calcext:value-type="string">
            <text:p>tf_dunland| tf_randomize_face| tfg_shield| tfg_armor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unland</text:p>
          </table:table-cell>
          <table:table-cell table:style-name="ce11" office:value-type="string" calcext:value-type="string">
            <text:p>itm_dun_helm_a_bad,</text:p>
          </table:table-cell>
          <table:table-cell table:style-name="ce11" office:value-type="string" calcext:value-type="string">
            <text:p>itm_dunland_mail_1_bad, itm_dunland_mail_2_bad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dunland_wolfboots,itm_leather_boots_dark,</text:p>
          </table:table-cell>
          <table:table-cell table:style-name="ce11" office:value-type="string" calcext:value-type="string">
            <text:p>itm_dunnish_axe_heavy,itm_dunnish_war_axe,itm_dun_shortsword,itm_dunland_javelin,itm_dunland_javelin,itm_dunland_javelin,itm_dunnish_long_axe,</text:p>
          </table:table-cell>
          <table:table-cell table:style-name="ce11" office:value-type="string" calcext:value-type="string">
            <text:p>itm_dun_shield_a,</text:p>
          </table:table-cell>
          <table:table-cell table:style-name="ce11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5|knows_shield_3|knows_power_strike_3|knows_ironflesh_4|knows_power_throw_4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6" table:formula="of:=IF(AND([.B285]&lt;&gt;&quot;&quot;;[.C285]&lt;&gt;&quot;&quot;);CONCATENATE([Variables.$I$1];[Variables.$I$7];[.B285];[Variables.$I$7];[Variables.$I$6];[Variables.$I$7];[.C285];[Variables.$I$7];[Variables.$I$6];[Variables.$I$7];[.D285];[Variables.$I$7];[Variables.$I$6];[.E285];[Variables.$I$6];[.F285];[Variables.$I$6];[.G285];[Variables.$I$6];[.H285];[Variables.$I$6];[Variables.$I$1];[.I285];[.J285];[.K285];[.L285];[.M285];[.N285];[.O285];[Variables.$I$2];[Variables.$I$6];[.P285];[Variables.$I$6];[.Q285];[Variables.$I$6];[.R285];[Variables.$I$6];[.S285];[Variables.$I$6];[.T285];IF([.U285]&lt;&gt;&quot;&quot;;CONCATENATE([Variables.$I$6];[.U285]);&quot;&quot;);[Variables.$I$2];[Variables.$I$6]);IF([.B285]&lt;&gt;&quot;&quot;;CONCATENATE(&quot;#&quot;;[.B285]);&quot;&quot;))" office:value-type="string" office:string-value="[&quot;i4_dun_wolf_warrior&quot;,&quot;Dunnish_Wolf_Warrior&quot;,&quot;Dunnish_Wolf_Warriors&quot;,tf_dunland| tf_randomize_face| tfg_shield| tfg_armor| tfg_helm| tfg_boots| tfg_ranged,0,0,fac_dunland,[itm_dun_helm_a_bad,itm_dunland_mail_1_bad, itm_dunland_mail_2_bad,itm_leather_gloves,itm_dunland_wolfboots,itm_leather_boots_dark,itm_dunnish_axe_heavy,itm_dunnish_war_axe,itm_dun_shortsword,itm_dunland_javelin,itm_dunland_javelin,itm_dunland_javelin,itm_dunnish_long_axe,itm_dun_shield_a,],attr_evil_tier_4,wp_tier_4,knows_common|knows_athletics_5|knows_shield_3|knows_power_strike_3|knows_ironflesh_4|knows_power_throw_4,dunland_face1,dunland_face2]," calcext:value-type="string">
            <text:p>["i4_dun_wolf_warrior","Dunnish_Wolf_Warrior","Dunnish_Wolf_Warriors",tf_dunland| tf_randomize_face| tfg_shield| tfg_armor| tfg_helm| tfg_boots| tfg_ranged,0,0,fac_dunland,[itm_dun_helm_a_bad,itm_dunland_mail_1_bad, itm_dunland_mail_2_bad,itm_leather_gloves,itm_dunland_wolfboots,itm_leather_boots_dark,itm_dunnish_axe_heavy,itm_dunnish_war_axe,itm_dun_shortsword,itm_dunland_javelin,itm_dunland_javelin,itm_dunland_javelin,itm_dunnish_long_axe,itm_dun_shield_a,],attr_evil_tier_4,wp_tier_4,knows_common|knows_athletics_5|knows_shield_3|knows_power_strike_3|knows_ironflesh_4|knows_power_throw_4,dunland_face1,dunland_face2],</text:p>
          </table:table-cell>
          <table:table-cell table:number-columns-repeated="16362"/>
        </table:table-row>
        <table:table-row table:style-name="ro1">
          <table:table-cell table:style-name="ce6" table:formula="of:=IF(AND([.B286]&lt;&gt;&quot;&quot;;[.C286]&lt;&gt;&quot;&quot;);CONCATENATE([Variables.$I$1];[Variables.$I$7];[.B286];[Variables.$I$7];[Variables.$I$6];[Variables.$I$7];[.C286];[Variables.$I$7];[Variables.$I$6];[Variables.$I$7];[.D286];[Variables.$I$7];[Variables.$I$6];[.E286];[Variables.$I$6];[.F286];[Variables.$I$6];[.G286];[Variables.$I$6];[.H286];[Variables.$I$6];[Variables.$I$1];[.I286];[.J286];[.K286];[.L286];[.M286];[.N286];[.O286];[Variables.$I$2];[Variables.$I$6];[.P286];[Variables.$I$6];[.Q286];[Variables.$I$6];[.R286];[Variables.$I$6];[.S286];[Variables.$I$6];[.T286];IF([.U286]&lt;&gt;&quot;&quot;;CONCATENATE([Variables.$I$6];[.U286]);&quot;&quot;);[Variables.$I$2];[Variables.$I$6]);IF([.B286]&lt;&gt;&quot;&quot;;CONCATENATE(&quot;#&quot;;[.B286]);&quot;&quot;))" office:value-type="string" office:string-value="[&quot;i5_dun_wolf_guard&quot;,&quot;Dunnish_Wolf_Guard&quot;,&quot;Dunnish_Wolf_Guards&quot;,tf_dunland| tf_randomize_face| tfg_shield| tfg_armor| tfg_helm| tfg_boots,0,0,fac_dunland,[itm_dun_helm_a_good,itm_dunland_mail_1_good, itm_dunland_mail_2_good,itm_leather_gloves,itm_fur_gloves_reward,itm_dunland_wolfboots,itm_leather_boots_dark,itm_dunnish_war_axe_heavy,itm_dun_berserker,itm_dunnish_long_axe_heavy,itm_dun_shield_a,],attr_evil_tier_5,wp_tier_5,knows_common|knows_athletics_6|knows_shield_5|knows_power_strike_4|knows_ironflesh_6,dunland_face1,dunland_face2]," calcext:value-type="string">
            <text:p>["i5_dun_wolf_guard","Dunnish_Wolf_Guard","Dunnish_Wolf_Guards",tf_dunland| tf_randomize_face| tfg_shield| tfg_armor| tfg_helm| tfg_boots,0,0,fac_dunland,[itm_dun_helm_a_good,itm_dunland_mail_1_good, itm_dunland_mail_2_good,itm_leather_gloves,itm_fur_gloves_reward,itm_dunland_wolfboots,itm_leather_boots_dark,itm_dunnish_war_axe_heavy,itm_dun_berserker,itm_dunnish_long_axe_heavy,itm_dun_shield_a,],attr_evil_tier_5,wp_tier_5,knows_common|knows_athletics_6|knows_shield_5|knows_power_strike_4|knows_ironflesh_6,dunland_face1,dunland_face2],</text:p>
          </table:table-cell>
          <table:table-cell table:style-name="ce7" office:value-type="string" calcext:value-type="string">
            <text:p>i5_dun_wolf_guard</text:p>
          </table:table-cell>
          <table:table-cell table:style-name="ce7" office:value-type="string" calcext:value-type="string">
            <text:p>Dunnish_Wolf_Guard</text:p>
          </table:table-cell>
          <table:table-cell table:style-name="ce7" office:value-type="string" calcext:value-type="string">
            <text:p>Dunnish_Wolf_Guard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unland</text:p>
          </table:table-cell>
          <table:table-cell table:style-name="ce11" office:value-type="string" calcext:value-type="string">
            <text:p>itm_dun_helm_a_good,</text:p>
          </table:table-cell>
          <table:table-cell table:style-name="ce11" office:value-type="string" calcext:value-type="string">
            <text:p>itm_dunland_mail_1_good, itm_dunland_mail_2_good,</text:p>
          </table:table-cell>
          <table:table-cell table:style-name="ce11" office:value-type="string" calcext:value-type="string">
            <text:p>itm_leather_gloves,itm_fur_gloves_reward,</text:p>
          </table:table-cell>
          <table:table-cell table:style-name="ce11" office:value-type="string" calcext:value-type="string">
            <text:p>itm_dunland_wolfboots,itm_leather_boots_dark,</text:p>
          </table:table-cell>
          <table:table-cell table:style-name="ce11" office:value-type="string" calcext:value-type="string">
            <text:p>itm_dunnish_war_axe_heavy,itm_dun_berserker,itm_dunnish_long_axe_heavy,</text:p>
          </table:table-cell>
          <table:table-cell table:style-name="ce11" office:value-type="string" calcext:value-type="string">
            <text:p>itm_dun_shield_a,</text:p>
          </table:table-cell>
          <table:table-cell table:style-name="ce11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6|knows_shield_5|knows_power_strike_4|knows_ironflesh_6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6" table:formula="of:=IF(AND([.B286]&lt;&gt;&quot;&quot;;[.C286]&lt;&gt;&quot;&quot;);CONCATENATE([Variables.$I$1];[Variables.$I$7];[.B286];[Variables.$I$7];[Variables.$I$6];[Variables.$I$7];[.C286];[Variables.$I$7];[Variables.$I$6];[Variables.$I$7];[.D286];[Variables.$I$7];[Variables.$I$6];[.E286];[Variables.$I$6];[.F286];[Variables.$I$6];[.G286];[Variables.$I$6];[.H286];[Variables.$I$6];[Variables.$I$1];[.I286];[.J286];[.K286];[.L286];[.M286];[.N286];[.O286];[Variables.$I$2];[Variables.$I$6];[.P286];[Variables.$I$6];[.Q286];[Variables.$I$6];[.R286];[Variables.$I$6];[.S286];[Variables.$I$6];[.T286];IF([.U286]&lt;&gt;&quot;&quot;;CONCATENATE([Variables.$I$6];[.U286]);&quot;&quot;);[Variables.$I$2];[Variables.$I$6]);IF([.B286]&lt;&gt;&quot;&quot;;CONCATENATE(&quot;#&quot;;[.B286]);&quot;&quot;))" office:value-type="string" office:string-value="[&quot;i5_dun_wolf_guard&quot;,&quot;Dunnish_Wolf_Guard&quot;,&quot;Dunnish_Wolf_Guards&quot;,tf_dunland| tf_randomize_face| tfg_shield| tfg_armor| tfg_helm| tfg_boots,0,0,fac_dunland,[itm_dun_helm_a_good,itm_dunland_mail_1_good, itm_dunland_mail_2_good,itm_leather_gloves,itm_fur_gloves_reward,itm_dunland_wolfboots,itm_leather_boots_dark,itm_dunnish_war_axe_heavy,itm_dun_berserker,itm_dunnish_long_axe_heavy,itm_dun_shield_a,],attr_evil_tier_5,wp_tier_5,knows_common|knows_athletics_6|knows_shield_5|knows_power_strike_4|knows_ironflesh_6,dunland_face1,dunland_face2]," calcext:value-type="string">
            <text:p>["i5_dun_wolf_guard","Dunnish_Wolf_Guard","Dunnish_Wolf_Guards",tf_dunland| tf_randomize_face| tfg_shield| tfg_armor| tfg_helm| tfg_boots,0,0,fac_dunland,[itm_dun_helm_a_good,itm_dunland_mail_1_good, itm_dunland_mail_2_good,itm_leather_gloves,itm_fur_gloves_reward,itm_dunland_wolfboots,itm_leather_boots_dark,itm_dunnish_war_axe_heavy,itm_dun_berserker,itm_dunnish_long_axe_heavy,itm_dun_shield_a,],attr_evil_tier_5,wp_tier_5,knows_common|knows_athletics_6|knows_shield_5|knows_power_strike_4|knows_ironflesh_6,dunland_face1,dunland_face2],</text:p>
          </table:table-cell>
          <table:table-cell table:number-columns-repeated="16362"/>
        </table:table-row>
        <table:table-row table:style-name="ro1">
          <table:table-cell table:style-name="ce6" table:formula="of:=IF(AND([.B287]&lt;&gt;&quot;&quot;;[.C287]&lt;&gt;&quot;&quot;);CONCATENATE([Variables.$I$1];[Variables.$I$7];[.B287];[Variables.$I$7];[Variables.$I$6];[Variables.$I$7];[.C287];[Variables.$I$7];[Variables.$I$6];[Variables.$I$7];[.D287];[Variables.$I$7];[Variables.$I$6];[.E287];[Variables.$I$6];[.F287];[Variables.$I$6];[.G287];[Variables.$I$6];[.H287];[Variables.$I$6];[Variables.$I$1];[.I287];[.J287];[.K287];[.L287];[.M287];[.N287];[.O287];[Variables.$I$2];[Variables.$I$6];[.P287];[Variables.$I$6];[.Q287];[Variables.$I$6];[.R287];[Variables.$I$6];[.S287];[Variables.$I$6];[.T287];IF([.U287]&lt;&gt;&quot;&quot;;CONCATENATE([Variables.$I$6];[.U287]);&quot;&quot;);[Variables.$I$2];[Variables.$I$6]);IF([.B287]&lt;&gt;&quot;&quot;;CONCATENATE(&quot;#&quot;;[.B287]);&quot;&quot;))" office:value-type="string" office:string-value="[&quot;ac5_dun_raven_rider&quot;,&quot;Dunnish_Night_Raven&quot;,&quot;Dunnish_Night_Ravens&quot;,tf_dunland| tf_randomize_face| tf_mounted| tfg_shield| tfg_armor| tfg_horse| tfg_helm| tfg_boots| tfg_ranged,0,0,fac_dunland,[itm_dun_helm_c, itm_dun_helm_b,itm_dunland_mail_1, itm_dunland_mail_2,itm_fur_gloves_reward,itm_splinted_greaves,itm_leather_boots_dark,itm_dun_berserker_bad,itm_dunland_javelin_big,itm_dunland_javelin_big,itm_dunnish_antler_axe,itm_dunnish_long_axe,itm_dunland_spear,itm_dun_shield_a,itm_hunter,itm_marker_night_troop,],attr_evil_tier_5,wp_tier_5,knows_common|knows_ironflesh_3|knows_riding_5|knows_shield_2|knows_power_strike_3|knows_power_throw_6|knows_horse_archery_6,dunland_face1,dunland_face2]," calcext:value-type="string">
            <text:p>["ac5_dun_raven_rider","Dunnish_Night_Raven","Dunnish_Night_Ravens",tf_dunland| tf_randomize_face| tf_mounted| tfg_shield| tfg_armor| tfg_horse| tfg_helm| tfg_boots| tfg_ranged,0,0,fac_dunland,[itm_dun_helm_c, itm_dun_helm_b,itm_dunland_mail_1, itm_dunland_mail_2,itm_fur_gloves_reward,itm_splinted_greaves,itm_leather_boots_dark,itm_dun_berserker_bad,itm_dunland_javelin_big,itm_dunland_javelin_big,itm_dunnish_antler_axe,itm_dunnish_long_axe,itm_dunland_spear,itm_dun_shield_a,itm_hunter,itm_marker_night_troop,],attr_evil_tier_5,wp_tier_5,knows_common|knows_ironflesh_3|knows_riding_5|knows_shield_2|knows_power_strike_3|knows_power_throw_6|knows_horse_archery_6,dunland_face1,dunland_face2],</text:p>
          </table:table-cell>
          <table:table-cell table:style-name="ce7" office:value-type="string" calcext:value-type="string">
            <text:p>ac5_dun_raven_rider</text:p>
          </table:table-cell>
          <table:table-cell table:style-name="ce7" office:value-type="string" calcext:value-type="string">
            <text:p>Dunnish_Night_Raven</text:p>
          </table:table-cell>
          <table:table-cell table:style-name="ce7" office:value-type="string" calcext:value-type="string">
            <text:p>Dunnish_Night_Ravens</text:p>
          </table:table-cell>
          <table:table-cell table:style-name="ce8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unland</text:p>
          </table:table-cell>
          <table:table-cell table:style-name="ce11" office:value-type="string" calcext:value-type="string">
            <text:p>itm_dun_helm_c, itm_dun_helm_b,</text:p>
          </table:table-cell>
          <table:table-cell table:style-name="ce11" office:value-type="string" calcext:value-type="string">
            <text:p>itm_dunland_mail_1, itm_dunland_mail_2,</text:p>
          </table:table-cell>
          <table:table-cell table:style-name="ce11" office:value-type="string" calcext:value-type="string">
            <text:p>itm_fur_gloves_reward,</text:p>
          </table:table-cell>
          <table:table-cell table:style-name="ce11" office:value-type="string" calcext:value-type="string">
            <text:p>itm_splinted_greaves,itm_leather_boots_dark,</text:p>
          </table:table-cell>
          <table:table-cell table:style-name="ce11" office:value-type="string" calcext:value-type="string">
            <text:p>itm_dun_berserker_bad,itm_dunland_javelin_big,itm_dunland_javelin_big,itm_dunnish_antler_axe,itm_dunnish_long_axe,itm_dunland_spear,</text:p>
          </table:table-cell>
          <table:table-cell table:style-name="ce11" office:value-type="string" calcext:value-type="string">
            <text:p>itm_dun_shield_a,</text:p>
          </table:table-cell>
          <table:table-cell table:style-name="ce11" office:value-type="string" calcext:value-type="string">
            <text:p>itm_hunter,itm_marker_night_troop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ironflesh_3|knows_riding_5|knows_shield_2|knows_power_strike_3|knows_power_throw_6|knows_horse_archery_6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6" table:formula="of:=IF(AND([.B287]&lt;&gt;&quot;&quot;;[.C287]&lt;&gt;&quot;&quot;);CONCATENATE([Variables.$I$1];[Variables.$I$7];[.B287];[Variables.$I$7];[Variables.$I$6];[Variables.$I$7];[.C287];[Variables.$I$7];[Variables.$I$6];[Variables.$I$7];[.D287];[Variables.$I$7];[Variables.$I$6];[.E287];[Variables.$I$6];[.F287];[Variables.$I$6];[.G287];[Variables.$I$6];[.H287];[Variables.$I$6];[Variables.$I$1];[.I287];[.J287];[.K287];[.L287];[.M287];[.N287];[.O287];[Variables.$I$2];[Variables.$I$6];[.P287];[Variables.$I$6];[.Q287];[Variables.$I$6];[.R287];[Variables.$I$6];[.S287];[Variables.$I$6];[.T287];IF([.U287]&lt;&gt;&quot;&quot;;CONCATENATE([Variables.$I$6];[.U287]);&quot;&quot;);[Variables.$I$2];[Variables.$I$6]);IF([.B287]&lt;&gt;&quot;&quot;;CONCATENATE(&quot;#&quot;;[.B287]);&quot;&quot;))" office:value-type="string" office:string-value="[&quot;ac5_dun_raven_rider&quot;,&quot;Dunnish_Night_Raven&quot;,&quot;Dunnish_Night_Ravens&quot;,tf_dunland| tf_randomize_face| tf_mounted| tfg_shield| tfg_armor| tfg_horse| tfg_helm| tfg_boots| tfg_ranged,0,0,fac_dunland,[itm_dun_helm_c, itm_dun_helm_b,itm_dunland_mail_1, itm_dunland_mail_2,itm_fur_gloves_reward,itm_splinted_greaves,itm_leather_boots_dark,itm_dun_berserker_bad,itm_dunland_javelin_big,itm_dunland_javelin_big,itm_dunnish_antler_axe,itm_dunnish_long_axe,itm_dunland_spear,itm_dun_shield_a,itm_hunter,itm_marker_night_troop,],attr_evil_tier_5,wp_tier_5,knows_common|knows_ironflesh_3|knows_riding_5|knows_shield_2|knows_power_strike_3|knows_power_throw_6|knows_horse_archery_6,dunland_face1,dunland_face2]," calcext:value-type="string">
            <text:p>["ac5_dun_raven_rider","Dunnish_Night_Raven","Dunnish_Night_Ravens",tf_dunland| tf_randomize_face| tf_mounted| tfg_shield| tfg_armor| tfg_horse| tfg_helm| tfg_boots| tfg_ranged,0,0,fac_dunland,[itm_dun_helm_c, itm_dun_helm_b,itm_dunland_mail_1, itm_dunland_mail_2,itm_fur_gloves_reward,itm_splinted_greaves,itm_leather_boots_dark,itm_dun_berserker_bad,itm_dunland_javelin_big,itm_dunland_javelin_big,itm_dunnish_antler_axe,itm_dunnish_long_axe,itm_dunland_spear,itm_dun_shield_a,itm_hunter,itm_marker_night_troop,],attr_evil_tier_5,wp_tier_5,knows_common|knows_ironflesh_3|knows_riding_5|knows_shield_2|knows_power_strike_3|knows_power_throw_6|knows_horse_archery_6,dunland_face1,dunland_face2],</text:p>
          </table:table-cell>
          <table:table-cell table:number-columns-repeated="16362"/>
        </table:table-row>
        <table:table-row table:style-name="ro1">
          <table:table-cell table:formula="of:=IF(AND([.B288]&lt;&gt;&quot;&quot;;[.C288]&lt;&gt;&quot;&quot;);CONCATENATE([Variables.$I$1];[Variables.$I$7];[.B288];[Variables.$I$7];[Variables.$I$6];[Variables.$I$7];[.C288];[Variables.$I$7];[Variables.$I$6];[Variables.$I$7];[.D288];[Variables.$I$7];[Variables.$I$6];[.E288];[Variables.$I$6];[.F288];[Variables.$I$6];[.G288];[Variables.$I$6];[.H288];[Variables.$I$6];[Variables.$I$1];[.I288];[.J288];[.K288];[.L288];[.M288];[.N288];[.O288];[Variables.$I$2];[Variables.$I$6];[.P288];[Variables.$I$6];[.Q288];[Variables.$I$6];[.R288];[Variables.$I$6];[.S288];[Variables.$I$6];[.T288];IF([.U288]&lt;&gt;&quot;&quot;;CONCATENATE([Variables.$I$6];[.U288]);&quot;&quot;);[Variables.$I$2];[Variables.$I$6]);IF([.B288]&lt;&gt;&quot;&quot;;CONCATENATE(&quot;#&quot;;[.B288]);&quot;&quot;))">
            <text:p/>
          </table:table-cell>
          <table:table-cell table:style-name="ce5"/>
          <table:table-cell table:style-name="ce6" table:number-columns-repeated="19"/>
          <table:table-cell table:style-name="ce36" table:formula="of:=IF(AND([.B288]&lt;&gt;&quot;&quot;;[.C288]&lt;&gt;&quot;&quot;);CONCATENATE([Variables.$I$1];[Variables.$I$7];[.B288];[Variables.$I$7];[Variables.$I$6];[Variables.$I$7];[.C288];[Variables.$I$7];[Variables.$I$6];[Variables.$I$7];[.D288];[Variables.$I$7];[Variables.$I$6];[.E288];[Variables.$I$6];[.F288];[Variables.$I$6];[.G288];[Variables.$I$6];[.H288];[Variables.$I$6];[Variables.$I$1];[.I288];[.J288];[.K288];[.L288];[.M288];[.N288];[.O288];[Variables.$I$2];[Variables.$I$6];[.P288];[Variables.$I$6];[.Q288];[Variables.$I$6];[.R288];[Variables.$I$6];[.S288];[Variables.$I$6];[.T288];IF([.U288]&lt;&gt;&quot;&quot;;CONCATENATE([Variables.$I$6];[.U288]);&quot;&quot;);[Variables.$I$2];[Variables.$I$6]);IF([.B288]&lt;&gt;&quot;&quot;;CONCATENATE(&quot;#&quot;;[.B288]);&quot;&quot;))">
            <text:p/>
          </table:table-cell>
          <table:table-cell table:number-columns-repeated="16362"/>
        </table:table-row>
        <table:table-row table:style-name="ro1">
          <table:table-cell table:style-name="ce6" table:formula="of:=IF(AND([.B289]&lt;&gt;&quot;&quot;;[.C289]&lt;&gt;&quot;&quot;);CONCATENATE([Variables.$I$1];[Variables.$I$7];[.B289];[Variables.$I$7];[Variables.$I$6];[Variables.$I$7];[.C289];[Variables.$I$7];[Variables.$I$6];[Variables.$I$7];[.D289];[Variables.$I$7];[Variables.$I$6];[.E289];[Variables.$I$6];[.F289];[Variables.$I$6];[.G289];[Variables.$I$6];[.H289];[Variables.$I$6];[Variables.$I$1];[.I289];[.J289];[.K289];[.L289];[.M289];[.N289];[.O289];[Variables.$I$2];[Variables.$I$6];[.P289];[Variables.$I$6];[.Q289];[Variables.$I$6];[.R289];[Variables.$I$6];[.S289];[Variables.$I$6];[.T289];IF([.U289]&lt;&gt;&quot;&quot;;CONCATENATE([Variables.$I$6];[.U289]);&quot;&quot;);[Variables.$I$2];[Variables.$I$6]);IF([.B289]&lt;&gt;&quot;&quot;;CONCATENATE(&quot;#&quot;;[.B289]);&quot;&quot;))" office:value-type="string" office:string-value="[&quot;i6_dun_retainer&quot;,&quot;Dunnish_Retainer&quot;,&quot;Dunnish_Retainers&quot;,tf_dunland| tf_randomize_face| tfg_armor| tfg_shield| tfg_helm| tfg_boots,0,0,fac_dunland,[itm_dun_helm_a_good,itm_dun_helm_c,itm_dunland_chieftain, itm_dunland_mail_2_good, itm_dunland_mail_2_good,itm_evil_gauntlets_a_good,itm_orc_mittens,itm_splinted_greaves,itm_leather_boots_dark,itm_dunnish_antler_axe, itm_dun_berserker_heavy, itm_dunnish_long_axe_heavy,itm_dun_shield_a,itm_marker_hp_shield,itm_marker_scares_horses,itm_marker_scares_wargs,],attr_evil_tier_6,wp_tier_6,knows_common|knows_athletics_5|knows_shield_5|knows_power_strike_6|knows_ironflesh_8|knows_power_throw_7,dunland_face1,dunland_face2]," calcext:value-type="string">
            <text:p>["i6_dun_retainer","Dunnish_Retainer","Dunnish_Retainers",tf_dunland| tf_randomize_face| tfg_armor| tfg_shield| tfg_helm| tfg_boots,0,0,fac_dunland,[itm_dun_helm_a_good,itm_dun_helm_c,itm_dunland_chieftain, itm_dunland_mail_2_good, itm_dunland_mail_2_good,itm_evil_gauntlets_a_good,itm_orc_mittens,itm_splinted_greaves,itm_leather_boots_dark,itm_dunnish_antler_axe, itm_dun_berserker_heavy, itm_dunnish_long_axe_heavy,itm_dun_shield_a,itm_marker_hp_shield,itm_marker_scares_horses,itm_marker_scares_wargs,],attr_evil_tier_6,wp_tier_6,knows_common|knows_athletics_5|knows_shield_5|knows_power_strike_6|knows_ironflesh_8|knows_power_throw_7,dunland_face1,dunland_face2],</text:p>
          </table:table-cell>
          <table:table-cell table:style-name="ce7" office:value-type="string" calcext:value-type="string">
            <text:p>i6_dun_retainer</text:p>
          </table:table-cell>
          <table:table-cell table:style-name="ce7" office:value-type="string" calcext:value-type="string">
            <text:p>Dunnish_Retainer</text:p>
          </table:table-cell>
          <table:table-cell table:style-name="ce7" office:value-type="string" calcext:value-type="string">
            <text:p>Dunnish_Retainers</text:p>
          </table:table-cell>
          <table:table-cell table:style-name="ce8" office:value-type="string" calcext:value-type="string">
            <text:p>tf_dunland| tf_randomize_face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unland</text:p>
          </table:table-cell>
          <table:table-cell table:style-name="ce11" office:value-type="string" calcext:value-type="string">
            <text:p>itm_dun_helm_a_good,itm_dun_helm_c,</text:p>
          </table:table-cell>
          <table:table-cell table:style-name="ce11" office:value-type="string" calcext:value-type="string">
            <text:p>itm_dunland_chieftain, itm_dunland_mail_2_good, itm_dunland_mail_2_good,</text:p>
          </table:table-cell>
          <table:table-cell table:style-name="ce11" office:value-type="string" calcext:value-type="string">
            <text:p>itm_evil_gauntlets_a_good,itm_orc_mittens,</text:p>
          </table:table-cell>
          <table:table-cell table:style-name="ce11" office:value-type="string" calcext:value-type="string">
            <text:p>itm_splinted_greaves,itm_leather_boots_dark,</text:p>
          </table:table-cell>
          <table:table-cell table:style-name="ce11" office:value-type="string" calcext:value-type="string">
            <text:p>itm_dunnish_antler_axe, itm_dun_berserker_heavy, itm_dunnish_long_axe_heavy,</text:p>
          </table:table-cell>
          <table:table-cell table:style-name="ce11" office:value-type="string" calcext:value-type="string">
            <text:p>itm_dun_shield_a,</text:p>
          </table:table-cell>
          <table:table-cell table:style-name="ce11" office:value-type="string" calcext:value-type="string">
            <text:p>itm_marker_hp_shield,itm_marker_scares_horses,itm_marker_scares_wargs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5|knows_shield_5|knows_power_strike_6|knows_ironflesh_8|knows_power_throw_7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6" table:formula="of:=IF(AND([.B289]&lt;&gt;&quot;&quot;;[.C289]&lt;&gt;&quot;&quot;);CONCATENATE([Variables.$I$1];[Variables.$I$7];[.B289];[Variables.$I$7];[Variables.$I$6];[Variables.$I$7];[.C289];[Variables.$I$7];[Variables.$I$6];[Variables.$I$7];[.D289];[Variables.$I$7];[Variables.$I$6];[.E289];[Variables.$I$6];[.F289];[Variables.$I$6];[.G289];[Variables.$I$6];[.H289];[Variables.$I$6];[Variables.$I$1];[.I289];[.J289];[.K289];[.L289];[.M289];[.N289];[.O289];[Variables.$I$2];[Variables.$I$6];[.P289];[Variables.$I$6];[.Q289];[Variables.$I$6];[.R289];[Variables.$I$6];[.S289];[Variables.$I$6];[.T289];IF([.U289]&lt;&gt;&quot;&quot;;CONCATENATE([Variables.$I$6];[.U289]);&quot;&quot;);[Variables.$I$2];[Variables.$I$6]);IF([.B289]&lt;&gt;&quot;&quot;;CONCATENATE(&quot;#&quot;;[.B289]);&quot;&quot;))" office:value-type="string" office:string-value="[&quot;i6_dun_retainer&quot;,&quot;Dunnish_Retainer&quot;,&quot;Dunnish_Retainers&quot;,tf_dunland| tf_randomize_face| tfg_armor| tfg_shield| tfg_helm| tfg_boots,0,0,fac_dunland,[itm_dun_helm_a_good,itm_dun_helm_c,itm_dunland_chieftain, itm_dunland_mail_2_good, itm_dunland_mail_2_good,itm_evil_gauntlets_a_good,itm_orc_mittens,itm_splinted_greaves,itm_leather_boots_dark,itm_dunnish_antler_axe, itm_dun_berserker_heavy, itm_dunnish_long_axe_heavy,itm_dun_shield_a,itm_marker_hp_shield,itm_marker_scares_horses,itm_marker_scares_wargs,],attr_evil_tier_6,wp_tier_6,knows_common|knows_athletics_5|knows_shield_5|knows_power_strike_6|knows_ironflesh_8|knows_power_throw_7,dunland_face1,dunland_face2]," calcext:value-type="string">
            <text:p>["i6_dun_retainer","Dunnish_Retainer","Dunnish_Retainers",tf_dunland| tf_randomize_face| tfg_armor| tfg_shield| tfg_helm| tfg_boots,0,0,fac_dunland,[itm_dun_helm_a_good,itm_dun_helm_c,itm_dunland_chieftain, itm_dunland_mail_2_good, itm_dunland_mail_2_good,itm_evil_gauntlets_a_good,itm_orc_mittens,itm_splinted_greaves,itm_leather_boots_dark,itm_dunnish_antler_axe, itm_dun_berserker_heavy, itm_dunnish_long_axe_heavy,itm_dun_shield_a,itm_marker_hp_shield,itm_marker_scares_horses,itm_marker_scares_wargs,],attr_evil_tier_6,wp_tier_6,knows_common|knows_athletics_5|knows_shield_5|knows_power_strike_6|knows_ironflesh_8|knows_power_throw_7,dunland_face1,dunland_face2],</text:p>
          </table:table-cell>
          <table:table-cell table:number-columns-repeated="16362"/>
        </table:table-row>
        <table:table-row table:style-name="ro1">
          <table:table-cell table:style-name="ce6" table:formula="of:=IF(AND([.B290]&lt;&gt;&quot;&quot;;[.C290]&lt;&gt;&quot;&quot;);CONCATENATE([Variables.$I$1];[Variables.$I$7];[.B290];[Variables.$I$7];[Variables.$I$6];[Variables.$I$7];[.C290];[Variables.$I$7];[Variables.$I$6];[Variables.$I$7];[.D290];[Variables.$I$7];[Variables.$I$6];[.E290];[Variables.$I$6];[.F290];[Variables.$I$6];[.G290];[Variables.$I$6];[.H290];[Variables.$I$6];[Variables.$I$1];[.I290];[.J290];[.K290];[.L290];[.M290];[.N290];[.O290];[Variables.$I$2];[Variables.$I$6];[.P290];[Variables.$I$6];[.Q290];[Variables.$I$6];[.R290];[Variables.$I$6];[.S290];[Variables.$I$6];[.T290];IF([.U290]&lt;&gt;&quot;&quot;;CONCATENATE([Variables.$I$6];[.U290]);&quot;&quot;);[Variables.$I$2];[Variables.$I$6]);IF([.B290]&lt;&gt;&quot;&quot;;CONCATENATE(&quot;#&quot;;[.B290]);&quot;&quot;))" office:value-type="string" office:string-value="[&quot;a5_dun_night_wolf&quot;,&quot;Dunnish_Night_Wolf&quot;,&quot;Dunnish_Night_Wolfs&quot;,tf_dunland| tf_randomize_face| tfg_shield| tfg_armor| tfg_boots| tfg_ranged,0,0,fac_dunland,[itm_dun_helm_a, itm_wilderness_cowl,itm_dunland_mail_1, itm_dunland_chieftain_bad,itm_fur_gloves_reward,itm_dunland_wolfboots,itm_leather_boots_dark,itm_dunnish_axe_heavy,itm_dunnish_war_axe,itm_dunland_javelin,itm_dunland_javelin,itm_dunland_javelin,itm_dunland_javelin,itm_dunland_javelin,itm_dun_shield_a,itm_marker_night_troop,],attr_evil_tier_5,wp_tier_5,knows_common|knows_athletics_7|knows_shield_3|knows_power_strike_3|knows_ironflesh_2|knows_power_throw_7,dunland_face1,dunland_face2]," calcext:value-type="string">
            <text:p>["a5_dun_night_wolf","Dunnish_Night_Wolf","Dunnish_Night_Wolfs",tf_dunland| tf_randomize_face| tfg_shield| tfg_armor| tfg_boots| tfg_ranged,0,0,fac_dunland,[itm_dun_helm_a, itm_wilderness_cowl,itm_dunland_mail_1, itm_dunland_chieftain_bad,itm_fur_gloves_reward,itm_dunland_wolfboots,itm_leather_boots_dark,itm_dunnish_axe_heavy,itm_dunnish_war_axe,itm_dunland_javelin,itm_dunland_javelin,itm_dunland_javelin,itm_dunland_javelin,itm_dunland_javelin,itm_dun_shield_a,itm_marker_night_troop,],attr_evil_tier_5,wp_tier_5,knows_common|knows_athletics_7|knows_shield_3|knows_power_strike_3|knows_ironflesh_2|knows_power_throw_7,dunland_face1,dunland_face2],</text:p>
          </table:table-cell>
          <table:table-cell table:style-name="ce7" office:value-type="string" calcext:value-type="string">
            <text:p>a5_dun_night_wolf</text:p>
          </table:table-cell>
          <table:table-cell table:style-name="ce7" office:value-type="string" calcext:value-type="string">
            <text:p>Dunnish_Night_Wolf</text:p>
          </table:table-cell>
          <table:table-cell table:style-name="ce7" office:value-type="string" calcext:value-type="string">
            <text:p>Dunnish_Night_Wolf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unland</text:p>
          </table:table-cell>
          <table:table-cell table:style-name="ce11" office:value-type="string" calcext:value-type="string">
            <text:p>itm_dun_helm_a, itm_wilderness_cowl,</text:p>
          </table:table-cell>
          <table:table-cell table:style-name="ce11" office:value-type="string" calcext:value-type="string">
            <text:p>itm_dunland_mail_1, itm_dunland_chieftain_bad,</text:p>
          </table:table-cell>
          <table:table-cell table:style-name="ce11" office:value-type="string" calcext:value-type="string">
            <text:p>itm_fur_gloves_reward,</text:p>
          </table:table-cell>
          <table:table-cell table:style-name="ce11" office:value-type="string" calcext:value-type="string">
            <text:p>itm_dunland_wolfboots,itm_leather_boots_dark,</text:p>
          </table:table-cell>
          <table:table-cell table:style-name="ce11" office:value-type="string" calcext:value-type="string">
            <text:p>itm_dunnish_axe_heavy,itm_dunnish_war_axe,itm_dunland_javelin,itm_dunland_javelin,itm_dunland_javelin,itm_dunland_javelin,itm_dunland_javelin,</text:p>
          </table:table-cell>
          <table:table-cell table:style-name="ce11" office:value-type="string" calcext:value-type="string">
            <text:p>itm_dun_shield_a,</text:p>
          </table:table-cell>
          <table:table-cell table:style-name="ce11" office:value-type="string" calcext:value-type="string">
            <text:p>itm_marker_night_troop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7|knows_shield_3|knows_power_strike_3|knows_ironflesh_2|knows_power_throw_7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6" table:formula="of:=IF(AND([.B290]&lt;&gt;&quot;&quot;;[.C290]&lt;&gt;&quot;&quot;);CONCATENATE([Variables.$I$1];[Variables.$I$7];[.B290];[Variables.$I$7];[Variables.$I$6];[Variables.$I$7];[.C290];[Variables.$I$7];[Variables.$I$6];[Variables.$I$7];[.D290];[Variables.$I$7];[Variables.$I$6];[.E290];[Variables.$I$6];[.F290];[Variables.$I$6];[.G290];[Variables.$I$6];[.H290];[Variables.$I$6];[Variables.$I$1];[.I290];[.J290];[.K290];[.L290];[.M290];[.N290];[.O290];[Variables.$I$2];[Variables.$I$6];[.P290];[Variables.$I$6];[.Q290];[Variables.$I$6];[.R290];[Variables.$I$6];[.S290];[Variables.$I$6];[.T290];IF([.U290]&lt;&gt;&quot;&quot;;CONCATENATE([Variables.$I$6];[.U290]);&quot;&quot;);[Variables.$I$2];[Variables.$I$6]);IF([.B290]&lt;&gt;&quot;&quot;;CONCATENATE(&quot;#&quot;;[.B290]);&quot;&quot;))" office:value-type="string" office:string-value="[&quot;a5_dun_night_wolf&quot;,&quot;Dunnish_Night_Wolf&quot;,&quot;Dunnish_Night_Wolfs&quot;,tf_dunland| tf_randomize_face| tfg_shield| tfg_armor| tfg_boots| tfg_ranged,0,0,fac_dunland,[itm_dun_helm_a, itm_wilderness_cowl,itm_dunland_mail_1, itm_dunland_chieftain_bad,itm_fur_gloves_reward,itm_dunland_wolfboots,itm_leather_boots_dark,itm_dunnish_axe_heavy,itm_dunnish_war_axe,itm_dunland_javelin,itm_dunland_javelin,itm_dunland_javelin,itm_dunland_javelin,itm_dunland_javelin,itm_dun_shield_a,itm_marker_night_troop,],attr_evil_tier_5,wp_tier_5,knows_common|knows_athletics_7|knows_shield_3|knows_power_strike_3|knows_ironflesh_2|knows_power_throw_7,dunland_face1,dunland_face2]," calcext:value-type="string">
            <text:p>["a5_dun_night_wolf","Dunnish_Night_Wolf","Dunnish_Night_Wolfs",tf_dunland| tf_randomize_face| tfg_shield| tfg_armor| tfg_boots| tfg_ranged,0,0,fac_dunland,[itm_dun_helm_a, itm_wilderness_cowl,itm_dunland_mail_1, itm_dunland_chieftain_bad,itm_fur_gloves_reward,itm_dunland_wolfboots,itm_leather_boots_dark,itm_dunnish_axe_heavy,itm_dunnish_war_axe,itm_dunland_javelin,itm_dunland_javelin,itm_dunland_javelin,itm_dunland_javelin,itm_dunland_javelin,itm_dun_shield_a,itm_marker_night_troop,],attr_evil_tier_5,wp_tier_5,knows_common|knows_athletics_7|knows_shield_3|knows_power_strike_3|knows_ironflesh_2|knows_power_throw_7,dunland_face1,dunland_face2],</text:p>
          </table:table-cell>
          <table:table-cell table:number-columns-repeated="16362"/>
        </table:table-row>
        <table:table-row table:style-name="ro1">
          <table:table-cell table:formula="of:=IF(AND([.B291]&lt;&gt;&quot;&quot;;[.C291]&lt;&gt;&quot;&quot;);CONCATENATE([Variables.$I$1];[Variables.$I$7];[.B291];[Variables.$I$7];[Variables.$I$6];[Variables.$I$7];[.C291];[Variables.$I$7];[Variables.$I$6];[Variables.$I$7];[.D291];[Variables.$I$7];[Variables.$I$6];[.E291];[Variables.$I$6];[.F291];[Variables.$I$6];[.G291];[Variables.$I$6];[.H291];[Variables.$I$6];[Variables.$I$1];[.I291];[.J291];[.K291];[.L291];[.M291];[.N291];[.O291];[Variables.$I$2];[Variables.$I$6];[.P291];[Variables.$I$6];[.Q291];[Variables.$I$6];[.R291];[Variables.$I$6];[.S291];[Variables.$I$6];[.T291];IF([.U291]&lt;&gt;&quot;&quot;;CONCATENATE([Variables.$I$6];[.U291]);&quot;&quot;);[Variables.$I$2];[Variables.$I$6]);IF([.B291]&lt;&gt;&quot;&quot;;CONCATENATE(&quot;#&quot;;[.B291]);&quot;&quot;))">
            <text:p/>
          </table:table-cell>
          <table:table-cell table:style-name="ce6" table:number-columns-repeated="21"/>
          <table:table-cell table:number-columns-repeated="16362"/>
        </table:table-row>
        <table:table-row table:style-name="ro1">
          <table:table-cell table:style-name="ce6" table:formula="of:=IF(AND([.B292]&lt;&gt;&quot;&quot;;[.C292]&lt;&gt;&quot;&quot;);CONCATENATE([Variables.$I$1];[Variables.$I$7];[.B292];[Variables.$I$7];[Variables.$I$6];[Variables.$I$7];[.C292];[Variables.$I$7];[Variables.$I$6];[Variables.$I$7];[.D292];[Variables.$I$7];[Variables.$I$6];[.E292];[Variables.$I$6];[.F292];[Variables.$I$6];[.G292];[Variables.$I$6];[.H292];[Variables.$I$6];[Variables.$I$1];[.I292];[.J292];[.K292];[.L292];[.M292];[.N292];[.O292];[Variables.$I$2];[Variables.$I$6];[.P292];[Variables.$I$6];[.Q292];[Variables.$I$6];[.R292];[Variables.$I$6];[.S292];[Variables.$I$6];[.T292];IF([.U292]&lt;&gt;&quot;&quot;;CONCATENATE([Variables.$I$6];[.U292]);&quot;&quot;);[Variables.$I$2];[Variables.$I$6]);IF([.B292]&lt;&gt;&quot;&quot;;CONCATENATE(&quot;#&quot;;[.B292]);&quot;&quot;))" office:value-type="string" office:string-value="#KHAND" calcext:value-type="string">
            <text:p>#KHAND</text:p>
          </table:table-cell>
          <table:table-cell table:style-name="ce5" office:value-type="string" calcext:value-type="string">
            <text:p>KHAND</text:p>
          </table:table-cell>
          <table:table-cell table:style-name="ce6" table:number-columns-repeated="19"/>
          <table:table-cell table:style-name="ce6" table:formula="of:=IF(AND([.B292]&lt;&gt;&quot;&quot;;[.C292]&lt;&gt;&quot;&quot;);CONCATENATE([Variables.$I$1];[Variables.$I$7];[.B292];[Variables.$I$7];[Variables.$I$6];[Variables.$I$7];[.C292];[Variables.$I$7];[Variables.$I$6];[Variables.$I$7];[.D292];[Variables.$I$7];[Variables.$I$6];[.E292];[Variables.$I$6];[.F292];[Variables.$I$6];[.G292];[Variables.$I$6];[.H292];[Variables.$I$6];[Variables.$I$1];[.I292];[.J292];[.K292];[.L292];[.M292];[.N292];[.O292];[Variables.$I$2];[Variables.$I$6];[.P292];[Variables.$I$6];[.Q292];[Variables.$I$6];[.R292];[Variables.$I$6];[.S292];[Variables.$I$6];[.T292];IF([.U292]&lt;&gt;&quot;&quot;;CONCATENATE([Variables.$I$6];[.U292]);&quot;&quot;);[Variables.$I$2];[Variables.$I$6]);IF([.B292]&lt;&gt;&quot;&quot;;CONCATENATE(&quot;#&quot;;[.B292]);&quot;&quot;))" office:value-type="string" office:string-value="#KHAND" calcext:value-type="string">
            <text:p>#KHAND</text:p>
          </table:table-cell>
          <table:table-cell table:number-columns-repeated="16362"/>
        </table:table-row>
        <table:table-row table:style-name="ro1">
          <table:table-cell table:style-name="ce6" table:formula="of:=IF(AND([.B293]&lt;&gt;&quot;&quot;;[.C293]&lt;&gt;&quot;&quot;);CONCATENATE([Variables.$I$1];[Variables.$I$7];[.B293];[Variables.$I$7];[Variables.$I$6];[Variables.$I$7];[.C293];[Variables.$I$7];[Variables.$I$6];[Variables.$I$7];[.D293];[Variables.$I$7];[Variables.$I$6];[.E293];[Variables.$I$6];[.F293];[Variables.$I$6];[.G293];[Variables.$I$6];[.H293];[Variables.$I$6];[Variables.$I$1];[.I293];[.J293];[.K293];[.L293];[.M293];[.N293];[.O293];[Variables.$I$2];[Variables.$I$6];[.P293];[Variables.$I$6];[.Q293];[Variables.$I$6];[.R293];[Variables.$I$6];[.S293];[Variables.$I$6];[.T293];IF([.U293]&lt;&gt;&quot;&quot;;CONCATENATE([Variables.$I$6];[.U293]);&quot;&quot;);[Variables.$I$2];[Variables.$I$6]);IF([.B293]&lt;&gt;&quot;&quot;;CONCATENATE(&quot;#&quot;;[.B293]);&quot;&quot;))" office:value-type="string" office:string-value="[&quot;i1_khand_bondsman&quot;,&quot;Khand_Bondsman&quot;,&quot;Khand_Bondsmen&quot;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" calcext:value-type="string">
            <text:p>["i1_khand_bondsman","Khand_Bondsman","Khand_Bondsmen"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</text:p>
          </table:table-cell>
          <table:table-cell table:style-name="ce7" office:value-type="string" calcext:value-type="string">
            <text:p>i1_khand_bondsman</text:p>
          </table:table-cell>
          <table:table-cell table:style-name="ce7" office:value-type="string" calcext:value-type="string">
            <text:p>Khand_Bondsman</text:p>
          </table:table-cell>
          <table:table-cell table:style-name="ce7" office:value-type="string" calcext:value-type="string">
            <text:p>Khand_Bondsmen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khand</text:p>
          </table:table-cell>
          <table:table-cell table:style-name="ce31"/>
          <table:table-cell table:style-name="ce11" office:value-type="string" calcext:value-type="string">
            <text:p>itm_khand_light_bad,</text:p>
          </table:table-cell>
          <table:table-cell table:style-name="ce11" table:number-columns-repeated="2"/>
          <table:table-cell table:style-name="ce11" office:value-type="string" calcext:value-type="string">
            <text:p>itm_spear,itm_khand_mace1,itm_shortened_spear,itm_khand_pitsword,</text:p>
          </table:table-cell>
          <table:table-cell table:style-name="ce11" table:number-columns-repeated="2"/>
          <table:table-cell table:style-name="ce12" office:value-type="string" calcext:value-type="string">
            <text:p>attr_evil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power_strike_2|knows_weapon_master_1|knows_athletics_2|knows_trainer_1|knows_tactics_1|knows_spotting_1|knows_inventory_management_1|knows_surgery_1|knows_first_aid_1|knows_prisoner_management_2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B293]&lt;&gt;&quot;&quot;;[.C293]&lt;&gt;&quot;&quot;);CONCATENATE([Variables.$I$1];[Variables.$I$7];[.B293];[Variables.$I$7];[Variables.$I$6];[Variables.$I$7];[.C293];[Variables.$I$7];[Variables.$I$6];[Variables.$I$7];[.D293];[Variables.$I$7];[Variables.$I$6];[.E293];[Variables.$I$6];[.F293];[Variables.$I$6];[.G293];[Variables.$I$6];[.H293];[Variables.$I$6];[Variables.$I$1];[.I293];[.J293];[.K293];[.L293];[.M293];[.N293];[.O293];[Variables.$I$2];[Variables.$I$6];[.P293];[Variables.$I$6];[.Q293];[Variables.$I$6];[.R293];[Variables.$I$6];[.S293];[Variables.$I$6];[.T293];IF([.U293]&lt;&gt;&quot;&quot;;CONCATENATE([Variables.$I$6];[.U293]);&quot;&quot;);[Variables.$I$2];[Variables.$I$6]);IF([.B293]&lt;&gt;&quot;&quot;;CONCATENATE(&quot;#&quot;;[.B293]);&quot;&quot;))" office:value-type="string" office:string-value="[&quot;i1_khand_bondsman&quot;,&quot;Khand_Bondsman&quot;,&quot;Khand_Bondsmen&quot;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" calcext:value-type="string">
            <text:p>["i1_khand_bondsman","Khand_Bondsman","Khand_Bondsmen"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16362"/>
        </table:table-row>
        <table:table-row table:style-name="ro1">
          <table:table-cell table:style-name="ce6" table:formula="of:=IF(AND([.B294]&lt;&gt;&quot;&quot;;[.C294]&lt;&gt;&quot;&quot;);CONCATENATE([Variables.$I$1];[Variables.$I$7];[.B294];[Variables.$I$7];[Variables.$I$6];[Variables.$I$7];[.C294];[Variables.$I$7];[Variables.$I$6];[Variables.$I$7];[.D294];[Variables.$I$7];[Variables.$I$6];[.E294];[Variables.$I$6];[.F294];[Variables.$I$6];[.G294];[Variables.$I$6];[.H294];[Variables.$I$6];[Variables.$I$1];[.I294];[.J294];[.K294];[.L294];[.M294];[.N294];[.O294];[Variables.$I$2];[Variables.$I$6];[.P294];[Variables.$I$6];[.Q294];[Variables.$I$6];[.R294];[Variables.$I$6];[.S294];[Variables.$I$6];[.T294];IF([.U294]&lt;&gt;&quot;&quot;;CONCATENATE([Variables.$I$6];[.U294]);&quot;&quot;);[Variables.$I$2];[Variables.$I$6]);IF([.B294]&lt;&gt;&quot;&quot;;CONCATENATE(&quot;#&quot;;[.B294]);&quot;&quot;))" office:value-type="string" office:string-value="[&quot;i2_khand_pit_dog&quot;,&quot;Khand_Pit_Dog&quot;,&quot;Khand_Pit_Dogs&quot;,tf_evil_man| tfg_armor,0,0,fac_khand,[itm_khand_helm_mask,itm_khand_inf_helm_a_bad,itm_khand_light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" calcext:value-type="string">
            <text:p>["i2_khand_pit_dog","Khand_Pit_Dog","Khand_Pit_Dogs",tf_evil_man| tfg_armor,0,0,fac_khand,[itm_khand_helm_mask,itm_khand_inf_helm_a_bad,itm_khand_light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</text:p>
          </table:table-cell>
          <table:table-cell table:style-name="ce7" office:value-type="string" calcext:value-type="string">
            <text:p>i2_khand_pit_dog</text:p>
          </table:table-cell>
          <table:table-cell table:style-name="ce7" office:value-type="string" calcext:value-type="string">
            <text:p>Khand_Pit_Dog</text:p>
          </table:table-cell>
          <table:table-cell table:style-name="ce7" office:value-type="string" calcext:value-type="string">
            <text:p>Khand_Pit_Dogs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khand</text:p>
          </table:table-cell>
          <table:table-cell table:style-name="ce11" office:value-type="string" calcext:value-type="string">
            <text:p>itm_khand_helm_mask,itm_khand_inf_helm_a_bad,</text:p>
          </table:table-cell>
          <table:table-cell table:style-name="ce11" office:value-type="string" calcext:value-type="string">
            <text:p>itm_khand_light,</text:p>
          </table:table-cell>
          <table:table-cell table:style-name="ce11"/>
          <table:table-cell table:style-name="ce11" office:value-type="string" calcext:value-type="string">
            <text:p>itm_leather_boots_dark_bad,</text:p>
          </table:table-cell>
          <table:table-cell table:style-name="ce11" office:value-type="string" calcext:value-type="string">
            <text:p>itm_khand_voulge,itm_spear,itm_khand_tulwar,itm_khand_pitsword,</text:p>
          </table:table-cell>
          <table:table-cell table:style-name="ce11" table:number-columns-repeated="2"/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power_strike_2|knows_weapon_master_2|knows_shield_1|knows_athletics_2|knows_trainer_1|knows_tactics_1|knows_spotting_1|knows_inventory_management_1|knows_surgery_1|knows_first_aid_1|knows_prisoner_management_2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B294]&lt;&gt;&quot;&quot;;[.C294]&lt;&gt;&quot;&quot;);CONCATENATE([Variables.$I$1];[Variables.$I$7];[.B294];[Variables.$I$7];[Variables.$I$6];[Variables.$I$7];[.C294];[Variables.$I$7];[Variables.$I$6];[Variables.$I$7];[.D294];[Variables.$I$7];[Variables.$I$6];[.E294];[Variables.$I$6];[.F294];[Variables.$I$6];[.G294];[Variables.$I$6];[.H294];[Variables.$I$6];[Variables.$I$1];[.I294];[.J294];[.K294];[.L294];[.M294];[.N294];[.O294];[Variables.$I$2];[Variables.$I$6];[.P294];[Variables.$I$6];[.Q294];[Variables.$I$6];[.R294];[Variables.$I$6];[.S294];[Variables.$I$6];[.T294];IF([.U294]&lt;&gt;&quot;&quot;;CONCATENATE([Variables.$I$6];[.U294]);&quot;&quot;);[Variables.$I$2];[Variables.$I$6]);IF([.B294]&lt;&gt;&quot;&quot;;CONCATENATE(&quot;#&quot;;[.B294]);&quot;&quot;))" office:value-type="string" office:string-value="[&quot;i2_khand_pit_dog&quot;,&quot;Khand_Pit_Dog&quot;,&quot;Khand_Pit_Dogs&quot;,tf_evil_man| tfg_armor,0,0,fac_khand,[itm_khand_helm_mask,itm_khand_inf_helm_a_bad,itm_khand_light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" calcext:value-type="string">
            <text:p>["i2_khand_pit_dog","Khand_Pit_Dog","Khand_Pit_Dogs",tf_evil_man| tfg_armor,0,0,fac_khand,[itm_khand_helm_mask,itm_khand_inf_helm_a_bad,itm_khand_light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16362"/>
        </table:table-row>
        <table:table-row table:style-name="ro1">
          <table:table-cell table:style-name="ce6" table:formula="of:=IF(AND([.B295]&lt;&gt;&quot;&quot;;[.C295]&lt;&gt;&quot;&quot;);CONCATENATE([Variables.$I$1];[Variables.$I$7];[.B295];[Variables.$I$7];[Variables.$I$6];[Variables.$I$7];[.C295];[Variables.$I$7];[Variables.$I$6];[Variables.$I$7];[.D295];[Variables.$I$7];[Variables.$I$6];[.E295];[Variables.$I$6];[.F295];[Variables.$I$6];[.G295];[Variables.$I$6];[.H295];[Variables.$I$6];[Variables.$I$1];[.I295];[.J295];[.K295];[.L295];[.M295];[.N295];[.O295];[Variables.$I$2];[Variables.$I$6];[.P295];[Variables.$I$6];[.Q295];[Variables.$I$6];[.R295];[Variables.$I$6];[.S295];[Variables.$I$6];[.T295];IF([.U295]&lt;&gt;&quot;&quot;;CONCATENATE([Variables.$I$6];[.U295]);&quot;&quot;);[Variables.$I$2];[Variables.$I$6]);IF([.B295]&lt;&gt;&quot;&quot;;CONCATENATE(&quot;#&quot;;[.B295]);&quot;&quot;))" office:value-type="string" office:string-value="[&quot;i3_khand_warrior&quot;,&quot;Khand_Warrior&quot;,&quot;Khand_Warriors&quot;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" calcext:value-type="string">
            <text:p>["i3_khand_warrior","Khand_Warrior","Khand_Warriors"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</text:p>
          </table:table-cell>
          <table:table-cell table:style-name="ce7" office:value-type="string" calcext:value-type="string">
            <text:p>i3_khand_warrior</text:p>
          </table:table-cell>
          <table:table-cell table:style-name="ce7" office:value-type="string" calcext:value-type="string">
            <text:p>Khand_Warrior</text:p>
          </table:table-cell>
          <table:table-cell table:style-name="ce7" office:value-type="string" calcext:value-type="string">
            <text:p>Khand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khand</text:p>
          </table:table-cell>
          <table:table-cell table:style-name="ce11" office:value-type="string" calcext:value-type="string">
            <text:p>itm_khand_inf_helm_a,itm_khand_inf_helm_b,</text:p>
          </table:table-cell>
          <table:table-cell table:style-name="ce11" office:value-type="string" calcext:value-type="string">
            <text:p>itm_khand_light_lam,itm_khand_foot_lam_bad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leather_boots_dark_bad,</text:p>
          </table:table-cell>
          <table:table-cell table:style-name="ce11" office:value-type="string" calcext:value-type="string">
            <text:p>itm_khand_axe_winged,itm_khand_tulwar,itm_khand_voulge,</text:p>
          </table:table-cell>
          <table:table-cell table:style-name="ce11" table:number-columns-repeated="2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2|knows_power_strike_3|knows_ironflesh_2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B295]&lt;&gt;&quot;&quot;;[.C295]&lt;&gt;&quot;&quot;);CONCATENATE([Variables.$I$1];[Variables.$I$7];[.B295];[Variables.$I$7];[Variables.$I$6];[Variables.$I$7];[.C295];[Variables.$I$7];[Variables.$I$6];[Variables.$I$7];[.D295];[Variables.$I$7];[Variables.$I$6];[.E295];[Variables.$I$6];[.F295];[Variables.$I$6];[.G295];[Variables.$I$6];[.H295];[Variables.$I$6];[Variables.$I$1];[.I295];[.J295];[.K295];[.L295];[.M295];[.N295];[.O295];[Variables.$I$2];[Variables.$I$6];[.P295];[Variables.$I$6];[.Q295];[Variables.$I$6];[.R295];[Variables.$I$6];[.S295];[Variables.$I$6];[.T295];IF([.U295]&lt;&gt;&quot;&quot;;CONCATENATE([Variables.$I$6];[.U295]);&quot;&quot;);[Variables.$I$2];[Variables.$I$6]);IF([.B295]&lt;&gt;&quot;&quot;;CONCATENATE(&quot;#&quot;;[.B295]);&quot;&quot;))" office:value-type="string" office:string-value="[&quot;i3_khand_warrior&quot;,&quot;Khand_Warrior&quot;,&quot;Khand_Warriors&quot;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" calcext:value-type="string">
            <text:p>["i3_khand_warrior","Khand_Warrior","Khand_Warriors"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</text:p>
          </table:table-cell>
          <table:table-cell table:number-columns-repeated="16362"/>
        </table:table-row>
        <table:table-row table:style-name="ro1">
          <table:table-cell table:style-name="ce6" table:formula="of:=IF(AND([.B296]&lt;&gt;&quot;&quot;;[.C296]&lt;&gt;&quot;&quot;);CONCATENATE([Variables.$I$1];[Variables.$I$7];[.B296];[Variables.$I$7];[Variables.$I$6];[Variables.$I$7];[.C296];[Variables.$I$7];[Variables.$I$6];[Variables.$I$7];[.D296];[Variables.$I$7];[Variables.$I$6];[.E296];[Variables.$I$6];[.F296];[Variables.$I$6];[.G296];[Variables.$I$6];[.H296];[Variables.$I$6];[Variables.$I$1];[.I296];[.J296];[.K296];[.L296];[.M296];[.N296];[.O296];[Variables.$I$2];[Variables.$I$6];[.P296];[Variables.$I$6];[.Q296];[Variables.$I$6];[.R296];[Variables.$I$6];[.S296];[Variables.$I$6];[.T296];IF([.U296]&lt;&gt;&quot;&quot;;CONCATENATE([Variables.$I$6];[.U296]);&quot;&quot;);[Variables.$I$2];[Variables.$I$6]);IF([.B296]&lt;&gt;&quot;&quot;;CONCATENATE(&quot;#&quot;;[.B296]);&quot;&quot;))" office:value-type="string" office:string-value="[&quot;i4_khand_vet_warrior&quot;,&quot;Khand_Veteran_Warrior&quot;,&quot;Khand_Veteran_Warriors&quot;,tf_evil_man| tfg_armor| tfg_helm| tfg_boots,0,0,fac_khand,[itm_khand_inf_helm_b_good, itm_khand_inf_helm_c1, itm_khand_inf_helm_c2,itm_khand_foot_lam,itm_khand_light_lam_good,itm_mail_mittens,itm_splinted_greaves,itm_khand_axe_winged,itm_khand_tulwar, itm_khand_2h_tulwar,itm_khand_throwing_axe,],attr_evil_tier_4,wp_tier_4,knows_common|knows_athletics_2|knows_power_throw_4|knows_power_strike_4|knows_ironflesh_3,khand_man1,khand_man2]," calcext:value-type="string">
            <text:p>["i4_khand_vet_warrior","Khand_Veteran_Warrior","Khand_Veteran_Warriors",tf_evil_man| tfg_armor| tfg_helm| tfg_boots,0,0,fac_khand,[itm_khand_inf_helm_b_good, itm_khand_inf_helm_c1, itm_khand_inf_helm_c2,itm_khand_foot_lam,itm_khand_light_lam_good,itm_mail_mittens,itm_splinted_greaves,itm_khand_axe_winged,itm_khand_tulwar, itm_khand_2h_tulwar,itm_khand_throwing_axe,],attr_evil_tier_4,wp_tier_4,knows_common|knows_athletics_2|knows_power_throw_4|knows_power_strike_4|knows_ironflesh_3,khand_man1,khand_man2],</text:p>
          </table:table-cell>
          <table:table-cell table:style-name="ce7" office:value-type="string" calcext:value-type="string">
            <text:p>i4_khand_vet_warrior</text:p>
          </table:table-cell>
          <table:table-cell table:style-name="ce7" office:value-type="string" calcext:value-type="string">
            <text:p>Khand_Veteran_Warrior</text:p>
          </table:table-cell>
          <table:table-cell table:style-name="ce7" office:value-type="string" calcext:value-type="string">
            <text:p>Khand_Veteran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khand</text:p>
          </table:table-cell>
          <table:table-cell table:style-name="ce11" office:value-type="string" calcext:value-type="string">
            <text:p>itm_khand_inf_helm_b_good, itm_khand_inf_helm_c1, itm_khand_inf_helm_c2,</text:p>
          </table:table-cell>
          <table:table-cell table:style-name="ce11" office:value-type="string" calcext:value-type="string">
            <text:p>itm_khand_foot_lam,itm_khand_light_lam_good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splinted_greaves,</text:p>
          </table:table-cell>
          <table:table-cell table:style-name="ce11" office:value-type="string" calcext:value-type="string">
            <text:p>itm_khand_axe_winged,itm_khand_tulwar, itm_khand_2h_tulwar,</text:p>
          </table:table-cell>
          <table:table-cell table:style-name="ce11" office:value-type="string" calcext:value-type="string">
            <text:p>itm_khand_throwing_axe,</text:p>
          </table:table-cell>
          <table:table-cell table:style-name="ce11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2|knows_power_throw_4|knows_power_strike_4|knows_ironflesh_3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B296]&lt;&gt;&quot;&quot;;[.C296]&lt;&gt;&quot;&quot;);CONCATENATE([Variables.$I$1];[Variables.$I$7];[.B296];[Variables.$I$7];[Variables.$I$6];[Variables.$I$7];[.C296];[Variables.$I$7];[Variables.$I$6];[Variables.$I$7];[.D296];[Variables.$I$7];[Variables.$I$6];[.E296];[Variables.$I$6];[.F296];[Variables.$I$6];[.G296];[Variables.$I$6];[.H296];[Variables.$I$6];[Variables.$I$1];[.I296];[.J296];[.K296];[.L296];[.M296];[.N296];[.O296];[Variables.$I$2];[Variables.$I$6];[.P296];[Variables.$I$6];[.Q296];[Variables.$I$6];[.R296];[Variables.$I$6];[.S296];[Variables.$I$6];[.T296];IF([.U296]&lt;&gt;&quot;&quot;;CONCATENATE([Variables.$I$6];[.U296]);&quot;&quot;);[Variables.$I$2];[Variables.$I$6]);IF([.B296]&lt;&gt;&quot;&quot;;CONCATENATE(&quot;#&quot;;[.B296]);&quot;&quot;))" office:value-type="string" office:string-value="[&quot;i4_khand_vet_warrior&quot;,&quot;Khand_Veteran_Warrior&quot;,&quot;Khand_Veteran_Warriors&quot;,tf_evil_man| tfg_armor| tfg_helm| tfg_boots,0,0,fac_khand,[itm_khand_inf_helm_b_good, itm_khand_inf_helm_c1, itm_khand_inf_helm_c2,itm_khand_foot_lam,itm_khand_light_lam_good,itm_mail_mittens,itm_splinted_greaves,itm_khand_axe_winged,itm_khand_tulwar, itm_khand_2h_tulwar,itm_khand_throwing_axe,],attr_evil_tier_4,wp_tier_4,knows_common|knows_athletics_2|knows_power_throw_4|knows_power_strike_4|knows_ironflesh_3,khand_man1,khand_man2]," calcext:value-type="string">
            <text:p>["i4_khand_vet_warrior","Khand_Veteran_Warrior","Khand_Veteran_Warriors",tf_evil_man| tfg_armor| tfg_helm| tfg_boots,0,0,fac_khand,[itm_khand_inf_helm_b_good, itm_khand_inf_helm_c1, itm_khand_inf_helm_c2,itm_khand_foot_lam,itm_khand_light_lam_good,itm_mail_mittens,itm_splinted_greaves,itm_khand_axe_winged,itm_khand_tulwar, itm_khand_2h_tulwar,itm_khand_throwing_axe,],attr_evil_tier_4,wp_tier_4,knows_common|knows_athletics_2|knows_power_throw_4|knows_power_strike_4|knows_ironflesh_3,khand_man1,khand_man2],</text:p>
          </table:table-cell>
          <table:table-cell table:number-columns-repeated="16362"/>
        </table:table-row>
        <table:table-row table:style-name="ro1">
          <table:table-cell table:style-name="ce6" table:formula="of:=IF(AND([.B297]&lt;&gt;&quot;&quot;;[.C297]&lt;&gt;&quot;&quot;);CONCATENATE([Variables.$I$1];[Variables.$I$7];[.B297];[Variables.$I$7];[Variables.$I$6];[Variables.$I$7];[.C297];[Variables.$I$7];[Variables.$I$6];[Variables.$I$7];[.D297];[Variables.$I$7];[Variables.$I$6];[.E297];[Variables.$I$6];[.F297];[Variables.$I$6];[.G297];[Variables.$I$6];[.H297];[Variables.$I$6];[Variables.$I$1];[.I297];[.J297];[.K297];[.L297];[.M297];[.N297];[.O297];[Variables.$I$2];[Variables.$I$6];[.P297];[Variables.$I$6];[.Q297];[Variables.$I$6];[.R297];[Variables.$I$6];[.S297];[Variables.$I$6];[.T297];IF([.U297]&lt;&gt;&quot;&quot;;CONCATENATE([Variables.$I$6];[.U297]);&quot;&quot;);[Variables.$I$2];[Variables.$I$6]);IF([.B297]&lt;&gt;&quot;&quot;;CONCATENATE(&quot;#&quot;;[.B297]);&quot;&quot;))" office:value-type="string" office:string-value="[&quot;i5_khand_war_master&quot;,&quot;Variag_War_Master&quot;,&quot;Variag_War_Masters&quot;,tf_evil_man| tfg_armor| tfg_helm| tfg_boots,0,0,fac_khand,[itm_khand_inf_helm_c1_good, itm_khand_inf_helm_c2_good,itm_khand_foot_lam_good,itm_khand_mail_good,itm_mail_mittens,itm_splinted_greaves,itm_khand_axe_great,itm_khand_2h_tulwar,itm_khand_throwing_axe,],attr_evil_tier_5,wp_tier_5,knows_common|knows_athletics_2|knows_power_throw_5|knows_power_strike_5|knows_ironflesh_4,khand_man1,khand_man2]," calcext:value-type="string">
            <text:p>["i5_khand_war_master","Variag_War_Master","Variag_War_Masters",tf_evil_man| tfg_armor| tfg_helm| tfg_boots,0,0,fac_khand,[itm_khand_inf_helm_c1_good, itm_khand_inf_helm_c2_good,itm_khand_foot_lam_good,itm_khand_mail_good,itm_mail_mittens,itm_splinted_greaves,itm_khand_axe_great,itm_khand_2h_tulwar,itm_khand_throwing_axe,],attr_evil_tier_5,wp_tier_5,knows_common|knows_athletics_2|knows_power_throw_5|knows_power_strike_5|knows_ironflesh_4,khand_man1,khand_man2],</text:p>
          </table:table-cell>
          <table:table-cell table:style-name="ce7" office:value-type="string" calcext:value-type="string">
            <text:p>i5_khand_war_master</text:p>
          </table:table-cell>
          <table:table-cell table:style-name="ce7" office:value-type="string" calcext:value-type="string">
            <text:p>Variag_War_Master</text:p>
          </table:table-cell>
          <table:table-cell table:style-name="ce7" office:value-type="string" calcext:value-type="string">
            <text:p>Variag_War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khand</text:p>
          </table:table-cell>
          <table:table-cell table:style-name="ce11" office:value-type="string" calcext:value-type="string">
            <text:p>itm_khand_inf_helm_c1_good, itm_khand_inf_helm_c2_good,</text:p>
          </table:table-cell>
          <table:table-cell table:style-name="ce11" office:value-type="string" calcext:value-type="string">
            <text:p>itm_khand_foot_lam_good,itm_khand_mail_good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splinted_greaves,</text:p>
          </table:table-cell>
          <table:table-cell table:style-name="ce11" office:value-type="string" calcext:value-type="string">
            <text:p>itm_khand_axe_great,itm_khand_2h_tulwar,</text:p>
          </table:table-cell>
          <table:table-cell table:style-name="ce11" office:value-type="string" calcext:value-type="string">
            <text:p>itm_khand_throwing_axe,</text:p>
          </table:table-cell>
          <table:table-cell table:style-name="ce11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2|knows_power_throw_5|knows_power_strike_5|knows_ironflesh_4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B297]&lt;&gt;&quot;&quot;;[.C297]&lt;&gt;&quot;&quot;);CONCATENATE([Variables.$I$1];[Variables.$I$7];[.B297];[Variables.$I$7];[Variables.$I$6];[Variables.$I$7];[.C297];[Variables.$I$7];[Variables.$I$6];[Variables.$I$7];[.D297];[Variables.$I$7];[Variables.$I$6];[.E297];[Variables.$I$6];[.F297];[Variables.$I$6];[.G297];[Variables.$I$6];[.H297];[Variables.$I$6];[Variables.$I$1];[.I297];[.J297];[.K297];[.L297];[.M297];[.N297];[.O297];[Variables.$I$2];[Variables.$I$6];[.P297];[Variables.$I$6];[.Q297];[Variables.$I$6];[.R297];[Variables.$I$6];[.S297];[Variables.$I$6];[.T297];IF([.U297]&lt;&gt;&quot;&quot;;CONCATENATE([Variables.$I$6];[.U297]);&quot;&quot;);[Variables.$I$2];[Variables.$I$6]);IF([.B297]&lt;&gt;&quot;&quot;;CONCATENATE(&quot;#&quot;;[.B297]);&quot;&quot;))" office:value-type="string" office:string-value="[&quot;i5_khand_war_master&quot;,&quot;Variag_War_Master&quot;,&quot;Variag_War_Masters&quot;,tf_evil_man| tfg_armor| tfg_helm| tfg_boots,0,0,fac_khand,[itm_khand_inf_helm_c1_good, itm_khand_inf_helm_c2_good,itm_khand_foot_lam_good,itm_khand_mail_good,itm_mail_mittens,itm_splinted_greaves,itm_khand_axe_great,itm_khand_2h_tulwar,itm_khand_throwing_axe,],attr_evil_tier_5,wp_tier_5,knows_common|knows_athletics_2|knows_power_throw_5|knows_power_strike_5|knows_ironflesh_4,khand_man1,khand_man2]," calcext:value-type="string">
            <text:p>["i5_khand_war_master","Variag_War_Master","Variag_War_Masters",tf_evil_man| tfg_armor| tfg_helm| tfg_boots,0,0,fac_khand,[itm_khand_inf_helm_c1_good, itm_khand_inf_helm_c2_good,itm_khand_foot_lam_good,itm_khand_mail_good,itm_mail_mittens,itm_splinted_greaves,itm_khand_axe_great,itm_khand_2h_tulwar,itm_khand_throwing_axe,],attr_evil_tier_5,wp_tier_5,knows_common|knows_athletics_2|knows_power_throw_5|knows_power_strike_5|knows_ironflesh_4,khand_man1,khand_man2],</text:p>
          </table:table-cell>
          <table:table-cell table:number-columns-repeated="16362"/>
        </table:table-row>
        <table:table-row table:style-name="ro1">
          <table:table-cell table:style-name="ce6" table:formula="of:=IF(AND([.B298]&lt;&gt;&quot;&quot;;[.C298]&lt;&gt;&quot;&quot;);CONCATENATE([Variables.$I$1];[Variables.$I$7];[.B298];[Variables.$I$7];[Variables.$I$6];[Variables.$I$7];[.C298];[Variables.$I$7];[Variables.$I$6];[Variables.$I$7];[.D298];[Variables.$I$7];[Variables.$I$6];[.E298];[Variables.$I$6];[.F298];[Variables.$I$6];[.G298];[Variables.$I$6];[.H298];[Variables.$I$6];[Variables.$I$1];[.I298];[.J298];[.K298];[.L298];[.M298];[.N298];[.O298];[Variables.$I$2];[Variables.$I$6];[.P298];[Variables.$I$6];[.Q298];[Variables.$I$6];[.R298];[Variables.$I$6];[.S298];[Variables.$I$6];[.T298];IF([.U298]&lt;&gt;&quot;&quot;;CONCATENATE([Variables.$I$6];[.U298]);&quot;&quot;);[Variables.$I$2];[Variables.$I$6]);IF([.B298]&lt;&gt;&quot;&quot;;CONCATENATE(&quot;#&quot;;[.B298]);&quot;&quot;))" office:value-type="string" office:string-value="[&quot;c2_khand_pony_rider&quot;,&quot;Khand_Pony_Rider&quot;,&quot;Khand_Pony_Riders&quot;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" calcext:value-type="string">
            <text:p>["c2_khand_pony_rider","Khand_Pony_Rider","Khand_Pony_Riders"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</text:p>
          </table:table-cell>
          <table:table-cell table:style-name="ce7" office:value-type="string" calcext:value-type="string">
            <text:p>c2_khand_pony_rider</text:p>
          </table:table-cell>
          <table:table-cell table:style-name="ce7" office:value-type="string" calcext:value-type="string">
            <text:p>Khand_Pony_Rider</text:p>
          </table:table-cell>
          <table:table-cell table:style-name="ce7" office:value-type="string" calcext:value-type="string">
            <text:p>Khand_Pony_Riders</text:p>
          </table:table-cell>
          <table:table-cell table:style-name="ce8" office:value-type="string" calcext:value-type="string">
            <text:p>tf_evil_m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khand</text:p>
          </table:table-cell>
          <table:table-cell table:style-name="ce11" office:value-type="string" calcext:value-type="string">
            <text:p>itm_khand_inf_helm_a_bad, itm_khand_inf_helm_b_bad, itm_khand_cav_helm_a_bad,</text:p>
          </table:table-cell>
          <table:table-cell table:style-name="ce11" office:value-type="string" calcext:value-type="string">
            <text:p>itm_khand_light,itm_khand_light_lam,</text:p>
          </table:table-cell>
          <table:table-cell table:style-name="ce11"/>
          <table:table-cell table:style-name="ce11" office:value-type="string" calcext:value-type="string">
            <text:p>itm_leather_boots_dark_bad,</text:p>
          </table:table-cell>
          <table:table-cell table:style-name="ce11" office:value-type="string" calcext:value-type="string">
            <text:p>itm_khand_tulwar,itm_khand_mace1,</text:p>
          </table:table-cell>
          <table:table-cell table:style-name="ce30"/>
          <table:table-cell table:style-name="ce11" office:value-type="string" calcext:value-type="string">
            <text:p>itm_steppe_horse,</text:p>
          </table:table-cell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power_strike_1|knows_power_throw_1|knows_weapon_master_1|knows_shield_1|knows_riding_2|knows_horse_archery_1|knows_trainer_1|knows_tactics_1|knows_spotting_1|knows_inventory_management_1|knows_surgery_1|knows_first_aid_1|knows_prisoner_management_2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B298]&lt;&gt;&quot;&quot;;[.C298]&lt;&gt;&quot;&quot;);CONCATENATE([Variables.$I$1];[Variables.$I$7];[.B298];[Variables.$I$7];[Variables.$I$6];[Variables.$I$7];[.C298];[Variables.$I$7];[Variables.$I$6];[Variables.$I$7];[.D298];[Variables.$I$7];[Variables.$I$6];[.E298];[Variables.$I$6];[.F298];[Variables.$I$6];[.G298];[Variables.$I$6];[.H298];[Variables.$I$6];[Variables.$I$1];[.I298];[.J298];[.K298];[.L298];[.M298];[.N298];[.O298];[Variables.$I$2];[Variables.$I$6];[.P298];[Variables.$I$6];[.Q298];[Variables.$I$6];[.R298];[Variables.$I$6];[.S298];[Variables.$I$6];[.T298];IF([.U298]&lt;&gt;&quot;&quot;;CONCATENATE([Variables.$I$6];[.U298]);&quot;&quot;);[Variables.$I$2];[Variables.$I$6]);IF([.B298]&lt;&gt;&quot;&quot;;CONCATENATE(&quot;#&quot;;[.B298]);&quot;&quot;))" office:value-type="string" office:string-value="[&quot;c2_khand_pony_rider&quot;,&quot;Khand_Pony_Rider&quot;,&quot;Khand_Pony_Riders&quot;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" calcext:value-type="string">
            <text:p>["c2_khand_pony_rider","Khand_Pony_Rider","Khand_Pony_Riders"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</text:p>
          </table:table-cell>
          <table:table-cell table:number-columns-repeated="16362"/>
        </table:table-row>
        <table:table-row table:style-name="ro1">
          <table:table-cell table:style-name="ce6" table:formula="of:=IF(AND([.B299]&lt;&gt;&quot;&quot;;[.C299]&lt;&gt;&quot;&quot;);CONCATENATE([Variables.$I$1];[Variables.$I$7];[.B299];[Variables.$I$7];[Variables.$I$6];[Variables.$I$7];[.C299];[Variables.$I$7];[Variables.$I$6];[Variables.$I$7];[.D299];[Variables.$I$7];[Variables.$I$6];[.E299];[Variables.$I$6];[.F299];[Variables.$I$6];[.G299];[Variables.$I$6];[.H299];[Variables.$I$6];[Variables.$I$1];[.I299];[.J299];[.K299];[.L299];[.M299];[.N299];[.O299];[Variables.$I$2];[Variables.$I$6];[.P299];[Variables.$I$6];[.Q299];[Variables.$I$6];[.R299];[Variables.$I$6];[.S299];[Variables.$I$6];[.T299];IF([.U299]&lt;&gt;&quot;&quot;;CONCATENATE([Variables.$I$6];[.U299]);&quot;&quot;);[Variables.$I$2];[Variables.$I$6]);IF([.B299]&lt;&gt;&quot;&quot;;CONCATENATE(&quot;#&quot;;[.B299]);&quot;&quot;))" office:value-type="string" office:string-value="[&quot;c3_khand_horseman&quot;,&quot;Khand_Horseman&quot;,&quot;Khand_Horsemen&quot;,tf_evil_man| tf_mounted|tfg_shield| tfg_armor| tfg_horse| tfg_boots,0,0,fac_khand,[itm_khand_inf_helm_a,itm_khand_inf_helm_a_good, itm_khand_cav_helm_a,itm_khand_med_lam_bad,itm_khand_mail_bad,itm_leather_gloves,itm_leather_boots_dark,itm_khand_tulwar,itm_khand_mace1,itm_easterling_round_horseman,itm_steppe_horse,],attr_evil_tier_3,wp_tier_3,knows_common|knows_riding_3|knows_shield_1|knows_power_strike_2,khand_man1,khand_man2]," calcext:value-type="string">
            <text:p>["c3_khand_horseman","Khand_Horseman","Khand_Horsemen",tf_evil_man| tf_mounted|tfg_shield| tfg_armor| tfg_horse| tfg_boots,0,0,fac_khand,[itm_khand_inf_helm_a,itm_khand_inf_helm_a_good, itm_khand_cav_helm_a,itm_khand_med_lam_bad,itm_khand_mail_bad,itm_leather_gloves,itm_leather_boots_dark,itm_khand_tulwar,itm_khand_mace1,itm_easterling_round_horseman,itm_steppe_horse,],attr_evil_tier_3,wp_tier_3,knows_common|knows_riding_3|knows_shield_1|knows_power_strike_2,khand_man1,khand_man2],</text:p>
          </table:table-cell>
          <table:table-cell table:style-name="ce7" office:value-type="string" calcext:value-type="string">
            <text:p>c3_khand_horseman</text:p>
          </table:table-cell>
          <table:table-cell table:style-name="ce7" office:value-type="string" calcext:value-type="string">
            <text:p>Khand_Horseman</text:p>
          </table:table-cell>
          <table:table-cell table:style-name="ce7" office:value-type="string" calcext:value-type="string">
            <text:p>Khand_Horsemen</text:p>
          </table:table-cell>
          <table:table-cell table:style-name="ce8" office:value-type="string" calcext:value-type="string">
            <text:p>tf_evil_man| tf_mounted|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khand</text:p>
          </table:table-cell>
          <table:table-cell table:style-name="ce11" office:value-type="string" calcext:value-type="string">
            <text:p>itm_khand_inf_helm_a,itm_khand_inf_helm_a_good, itm_khand_cav_helm_a,</text:p>
          </table:table-cell>
          <table:table-cell table:style-name="ce11" office:value-type="string" calcext:value-type="string">
            <text:p>itm_khand_med_lam_bad,itm_khand_mail_bad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leather_boots_dark,</text:p>
          </table:table-cell>
          <table:table-cell table:style-name="ce11" office:value-type="string" calcext:value-type="string">
            <text:p>itm_khand_tulwar,itm_khand_mace1,</text:p>
          </table:table-cell>
          <table:table-cell table:style-name="ce11" office:value-type="string" calcext:value-type="string">
            <text:p>itm_easterling_round_horseman,</text:p>
          </table:table-cell>
          <table:table-cell table:style-name="ce11" office:value-type="string" calcext:value-type="string">
            <text:p>itm_steppe_horse,</text:p>
          </table:table-cell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riding_3|knows_shield_1|knows_power_strike_2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B299]&lt;&gt;&quot;&quot;;[.C299]&lt;&gt;&quot;&quot;);CONCATENATE([Variables.$I$1];[Variables.$I$7];[.B299];[Variables.$I$7];[Variables.$I$6];[Variables.$I$7];[.C299];[Variables.$I$7];[Variables.$I$6];[Variables.$I$7];[.D299];[Variables.$I$7];[Variables.$I$6];[.E299];[Variables.$I$6];[.F299];[Variables.$I$6];[.G299];[Variables.$I$6];[.H299];[Variables.$I$6];[Variables.$I$1];[.I299];[.J299];[.K299];[.L299];[.M299];[.N299];[.O299];[Variables.$I$2];[Variables.$I$6];[.P299];[Variables.$I$6];[.Q299];[Variables.$I$6];[.R299];[Variables.$I$6];[.S299];[Variables.$I$6];[.T299];IF([.U299]&lt;&gt;&quot;&quot;;CONCATENATE([Variables.$I$6];[.U299]);&quot;&quot;);[Variables.$I$2];[Variables.$I$6]);IF([.B299]&lt;&gt;&quot;&quot;;CONCATENATE(&quot;#&quot;;[.B299]);&quot;&quot;))" office:value-type="string" office:string-value="[&quot;c3_khand_horseman&quot;,&quot;Khand_Horseman&quot;,&quot;Khand_Horsemen&quot;,tf_evil_man| tf_mounted|tfg_shield| tfg_armor| tfg_horse| tfg_boots,0,0,fac_khand,[itm_khand_inf_helm_a,itm_khand_inf_helm_a_good, itm_khand_cav_helm_a,itm_khand_med_lam_bad,itm_khand_mail_bad,itm_leather_gloves,itm_leather_boots_dark,itm_khand_tulwar,itm_khand_mace1,itm_easterling_round_horseman,itm_steppe_horse,],attr_evil_tier_3,wp_tier_3,knows_common|knows_riding_3|knows_shield_1|knows_power_strike_2,khand_man1,khand_man2]," calcext:value-type="string">
            <text:p>["c3_khand_horseman","Khand_Horseman","Khand_Horsemen",tf_evil_man| tf_mounted|tfg_shield| tfg_armor| tfg_horse| tfg_boots,0,0,fac_khand,[itm_khand_inf_helm_a,itm_khand_inf_helm_a_good, itm_khand_cav_helm_a,itm_khand_med_lam_bad,itm_khand_mail_bad,itm_leather_gloves,itm_leather_boots_dark,itm_khand_tulwar,itm_khand_mace1,itm_easterling_round_horseman,itm_steppe_horse,],attr_evil_tier_3,wp_tier_3,knows_common|knows_riding_3|knows_shield_1|knows_power_strike_2,khand_man1,khand_man2],</text:p>
          </table:table-cell>
          <table:table-cell table:number-columns-repeated="16362"/>
        </table:table-row>
        <table:table-row table:style-name="ro1">
          <table:table-cell table:style-name="ce6" table:formula="of:=IF(AND([.B300]&lt;&gt;&quot;&quot;;[.C300]&lt;&gt;&quot;&quot;);CONCATENATE([Variables.$I$1];[Variables.$I$7];[.B300];[Variables.$I$7];[Variables.$I$6];[Variables.$I$7];[.C300];[Variables.$I$7];[Variables.$I$6];[Variables.$I$7];[.D300];[Variables.$I$7];[Variables.$I$6];[.E300];[Variables.$I$6];[.F300];[Variables.$I$6];[.G300];[Variables.$I$6];[.H300];[Variables.$I$6];[Variables.$I$1];[.I300];[.J300];[.K300];[.L300];[.M300];[.N300];[.O300];[Variables.$I$2];[Variables.$I$6];[.P300];[Variables.$I$6];[.Q300];[Variables.$I$6];[.R300];[Variables.$I$6];[.S300];[Variables.$I$6];[.T300];IF([.U300]&lt;&gt;&quot;&quot;;CONCATENATE([Variables.$I$6];[.U300]);&quot;&quot;);[Variables.$I$2];[Variables.$I$6]);IF([.B300]&lt;&gt;&quot;&quot;;CONCATENATE(&quot;#&quot;;[.B300]);&quot;&quot;))" office:value-type="string" office:string-value="[&quot;c4_khand_heavy_horseman&quot;,&quot;Khand_Heavy_Horseman&quot;,&quot;Khand_Heavy_Horsemen&quot;,tf_evil_man| tf_mounted| tfg_shield| tfg_armor| tfg_helm| tfg_horse| tfg_boots,0,0,fac_khand,[itm_khand_inf_helm_a_good, itm_khand_cav_helm_a,itm_khand_med_lam, itm_khand_mail, itm_khand_heavy_lam_bad,itm_mail_mittens,itm_splinted_greaves,itm_khand_tulwar,itm_khand_mace1,itm_khand_mace2,itm_easterling_round_horseman,itm_variag_kataphrakt,],attr_evil_tier_4,wp_tier_4,knows_common|knows_riding_5|knows_shield_3|knows_power_strike_2|knows_ironflesh_2,khand_man1,khand_man2]," calcext:value-type="string">
            <text:p>["c4_khand_heavy_horseman","Khand_Heavy_Horseman","Khand_Heavy_Horsemen",tf_evil_man| tf_mounted| tfg_shield| tfg_armor| tfg_helm| tfg_horse| tfg_boots,0,0,fac_khand,[itm_khand_inf_helm_a_good, itm_khand_cav_helm_a,itm_khand_med_lam, itm_khand_mail, itm_khand_heavy_lam_bad,itm_mail_mittens,itm_splinted_greaves,itm_khand_tulwar,itm_khand_mace1,itm_khand_mace2,itm_easterling_round_horseman,itm_variag_kataphrakt,],attr_evil_tier_4,wp_tier_4,knows_common|knows_riding_5|knows_shield_3|knows_power_strike_2|knows_ironflesh_2,khand_man1,khand_man2],</text:p>
          </table:table-cell>
          <table:table-cell table:style-name="ce7" office:value-type="string" calcext:value-type="string">
            <text:p>c4_khand_heavy_horseman</text:p>
          </table:table-cell>
          <table:table-cell table:style-name="ce7" office:value-type="string" calcext:value-type="string">
            <text:p>Khand_Heavy_Horseman</text:p>
          </table:table-cell>
          <table:table-cell table:style-name="ce7" office:value-type="string" calcext:value-type="string">
            <text:p>Khand_Heavy_Horsemen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khand</text:p>
          </table:table-cell>
          <table:table-cell table:style-name="ce11" office:value-type="string" calcext:value-type="string">
            <text:p>itm_khand_inf_helm_a_good, itm_khand_cav_helm_a,</text:p>
          </table:table-cell>
          <table:table-cell table:style-name="ce11" office:value-type="string" calcext:value-type="string">
            <text:p>itm_khand_med_lam, itm_khand_mail, itm_khand_heavy_lam_bad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splinted_greaves,</text:p>
          </table:table-cell>
          <table:table-cell table:style-name="ce11" office:value-type="string" calcext:value-type="string">
            <text:p>itm_khand_tulwar,itm_khand_mace1,itm_khand_mace2,</text:p>
          </table:table-cell>
          <table:table-cell table:style-name="ce11" office:value-type="string" calcext:value-type="string">
            <text:p>itm_easterling_round_horseman,</text:p>
          </table:table-cell>
          <table:table-cell table:style-name="ce11" office:value-type="string" calcext:value-type="string">
            <text:p>itm_variag_kataphrakt,</text:p>
          </table:table-cell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riding_5|knows_shield_3|knows_power_strike_2|knows_ironflesh_2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B300]&lt;&gt;&quot;&quot;;[.C300]&lt;&gt;&quot;&quot;);CONCATENATE([Variables.$I$1];[Variables.$I$7];[.B300];[Variables.$I$7];[Variables.$I$6];[Variables.$I$7];[.C300];[Variables.$I$7];[Variables.$I$6];[Variables.$I$7];[.D300];[Variables.$I$7];[Variables.$I$6];[.E300];[Variables.$I$6];[.F300];[Variables.$I$6];[.G300];[Variables.$I$6];[.H300];[Variables.$I$6];[Variables.$I$1];[.I300];[.J300];[.K300];[.L300];[.M300];[.N300];[.O300];[Variables.$I$2];[Variables.$I$6];[.P300];[Variables.$I$6];[.Q300];[Variables.$I$6];[.R300];[Variables.$I$6];[.S300];[Variables.$I$6];[.T300];IF([.U300]&lt;&gt;&quot;&quot;;CONCATENATE([Variables.$I$6];[.U300]);&quot;&quot;);[Variables.$I$2];[Variables.$I$6]);IF([.B300]&lt;&gt;&quot;&quot;;CONCATENATE(&quot;#&quot;;[.B300]);&quot;&quot;))" office:value-type="string" office:string-value="[&quot;c4_khand_heavy_horseman&quot;,&quot;Khand_Heavy_Horseman&quot;,&quot;Khand_Heavy_Horsemen&quot;,tf_evil_man| tf_mounted| tfg_shield| tfg_armor| tfg_helm| tfg_horse| tfg_boots,0,0,fac_khand,[itm_khand_inf_helm_a_good, itm_khand_cav_helm_a,itm_khand_med_lam, itm_khand_mail, itm_khand_heavy_lam_bad,itm_mail_mittens,itm_splinted_greaves,itm_khand_tulwar,itm_khand_mace1,itm_khand_mace2,itm_easterling_round_horseman,itm_variag_kataphrakt,],attr_evil_tier_4,wp_tier_4,knows_common|knows_riding_5|knows_shield_3|knows_power_strike_2|knows_ironflesh_2,khand_man1,khand_man2]," calcext:value-type="string">
            <text:p>["c4_khand_heavy_horseman","Khand_Heavy_Horseman","Khand_Heavy_Horsemen",tf_evil_man| tf_mounted| tfg_shield| tfg_armor| tfg_helm| tfg_horse| tfg_boots,0,0,fac_khand,[itm_khand_inf_helm_a_good, itm_khand_cav_helm_a,itm_khand_med_lam, itm_khand_mail, itm_khand_heavy_lam_bad,itm_mail_mittens,itm_splinted_greaves,itm_khand_tulwar,itm_khand_mace1,itm_khand_mace2,itm_easterling_round_horseman,itm_variag_kataphrakt,],attr_evil_tier_4,wp_tier_4,knows_common|knows_riding_5|knows_shield_3|knows_power_strike_2|knows_ironflesh_2,khand_man1,khand_man2],</text:p>
          </table:table-cell>
          <table:table-cell table:number-columns-repeated="16362"/>
        </table:table-row>
        <table:table-row table:style-name="ro1">
          <table:table-cell table:style-name="ce6" table:formula="of:=IF(AND([.B301]&lt;&gt;&quot;&quot;;[.C301]&lt;&gt;&quot;&quot;);CONCATENATE([Variables.$I$1];[Variables.$I$7];[.B301];[Variables.$I$7];[Variables.$I$6];[Variables.$I$7];[.C301];[Variables.$I$7];[Variables.$I$6];[Variables.$I$7];[.D301];[Variables.$I$7];[Variables.$I$6];[.E301];[Variables.$I$6];[.F301];[Variables.$I$6];[.G301];[Variables.$I$6];[.H301];[Variables.$I$6];[Variables.$I$1];[.I301];[.J301];[.K301];[.L301];[.M301];[.N301];[.O301];[Variables.$I$2];[Variables.$I$6];[.P301];[Variables.$I$6];[.Q301];[Variables.$I$6];[.R301];[Variables.$I$6];[.S301];[Variables.$I$6];[.T301];IF([.U301]&lt;&gt;&quot;&quot;;CONCATENATE([Variables.$I$6];[.U301]);&quot;&quot;);[Variables.$I$2];[Variables.$I$6]);IF([.B301]&lt;&gt;&quot;&quot;;CONCATENATE(&quot;#&quot;;[.B301]);&quot;&quot;))" office:value-type="string" office:string-value="[&quot;c5_khand_kataphrakt&quot;,&quot;Variag_Ironclad&quot;,&quot;Variag_Ironclads&quot;,tf_evil_man| tf_mounted| tfg_shield| tfg_armor| tfg_helm| tfg_horse| tfg_boots,0,0,fac_khand,[itm_khand_inf_helm_a_good, itm_khand_cav_helm_a_good,itm_khand_med_lam_good, itm_khand_mail_good,itm_khand_heavy_lam_bad,itm_mail_mittens,itm_splinted_greaves_good,itm_khand_mace1, itm_khand_mace2,itm_easterling_round_horseman,itm_variag_kataphrakt,],attr_evil_tier_5,wp_tier_5,knows_common|knows_ironflesh_4|knows_power_strike_4|knows_shield_3|knows_riding_5,khand_man1,khand_man2]," calcext:value-type="string">
            <text:p>["c5_khand_kataphrakt","Variag_Ironclad","Variag_Ironclads",tf_evil_man| tf_mounted| tfg_shield| tfg_armor| tfg_helm| tfg_horse| tfg_boots,0,0,fac_khand,[itm_khand_inf_helm_a_good, itm_khand_cav_helm_a_good,itm_khand_med_lam_good, itm_khand_mail_good,itm_khand_heavy_lam_bad,itm_mail_mittens,itm_splinted_greaves_good,itm_khand_mace1, itm_khand_mace2,itm_easterling_round_horseman,itm_variag_kataphrakt,],attr_evil_tier_5,wp_tier_5,knows_common|knows_ironflesh_4|knows_power_strike_4|knows_shield_3|knows_riding_5,khand_man1,khand_man2],</text:p>
          </table:table-cell>
          <table:table-cell table:style-name="ce7" office:value-type="string" calcext:value-type="string">
            <text:p>c5_khand_kataphrakt</text:p>
          </table:table-cell>
          <table:table-cell table:style-name="ce7" office:value-type="string" calcext:value-type="string">
            <text:p>Variag_Ironclad</text:p>
          </table:table-cell>
          <table:table-cell table:style-name="ce7" office:value-type="string" calcext:value-type="string">
            <text:p>Variag_Ironclads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khand</text:p>
          </table:table-cell>
          <table:table-cell table:style-name="ce11" office:value-type="string" calcext:value-type="string">
            <text:p>itm_khand_inf_helm_a_good, itm_khand_cav_helm_a_good,</text:p>
          </table:table-cell>
          <table:table-cell table:style-name="ce11" office:value-type="string" calcext:value-type="string">
            <text:p>itm_khand_med_lam_good, itm_khand_mail_good,itm_khand_heavy_lam_bad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splinted_greaves_good,</text:p>
          </table:table-cell>
          <table:table-cell table:style-name="ce11" office:value-type="string" calcext:value-type="string">
            <text:p>itm_khand_mace1, itm_khand_mace2,</text:p>
          </table:table-cell>
          <table:table-cell table:style-name="ce11" office:value-type="string" calcext:value-type="string">
            <text:p>itm_easterling_round_horseman,</text:p>
          </table:table-cell>
          <table:table-cell table:style-name="ce11" office:value-type="string" calcext:value-type="string">
            <text:p>itm_variag_kataphrakt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ironflesh_4|knows_power_strike_4|knows_shield_3|knows_riding_5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B301]&lt;&gt;&quot;&quot;;[.C301]&lt;&gt;&quot;&quot;);CONCATENATE([Variables.$I$1];[Variables.$I$7];[.B301];[Variables.$I$7];[Variables.$I$6];[Variables.$I$7];[.C301];[Variables.$I$7];[Variables.$I$6];[Variables.$I$7];[.D301];[Variables.$I$7];[Variables.$I$6];[.E301];[Variables.$I$6];[.F301];[Variables.$I$6];[.G301];[Variables.$I$6];[.H301];[Variables.$I$6];[Variables.$I$1];[.I301];[.J301];[.K301];[.L301];[.M301];[.N301];[.O301];[Variables.$I$2];[Variables.$I$6];[.P301];[Variables.$I$6];[.Q301];[Variables.$I$6];[.R301];[Variables.$I$6];[.S301];[Variables.$I$6];[.T301];IF([.U301]&lt;&gt;&quot;&quot;;CONCATENATE([Variables.$I$6];[.U301]);&quot;&quot;);[Variables.$I$2];[Variables.$I$6]);IF([.B301]&lt;&gt;&quot;&quot;;CONCATENATE(&quot;#&quot;;[.B301]);&quot;&quot;))" office:value-type="string" office:string-value="[&quot;c5_khand_kataphrakt&quot;,&quot;Variag_Ironclad&quot;,&quot;Variag_Ironclads&quot;,tf_evil_man| tf_mounted| tfg_shield| tfg_armor| tfg_helm| tfg_horse| tfg_boots,0,0,fac_khand,[itm_khand_inf_helm_a_good, itm_khand_cav_helm_a_good,itm_khand_med_lam_good, itm_khand_mail_good,itm_khand_heavy_lam_bad,itm_mail_mittens,itm_splinted_greaves_good,itm_khand_mace1, itm_khand_mace2,itm_easterling_round_horseman,itm_variag_kataphrakt,],attr_evil_tier_5,wp_tier_5,knows_common|knows_ironflesh_4|knows_power_strike_4|knows_shield_3|knows_riding_5,khand_man1,khand_man2]," calcext:value-type="string">
            <text:p>["c5_khand_kataphrakt","Variag_Ironclad","Variag_Ironclads",tf_evil_man| tf_mounted| tfg_shield| tfg_armor| tfg_helm| tfg_horse| tfg_boots,0,0,fac_khand,[itm_khand_inf_helm_a_good, itm_khand_cav_helm_a_good,itm_khand_med_lam_good, itm_khand_mail_good,itm_khand_heavy_lam_bad,itm_mail_mittens,itm_splinted_greaves_good,itm_khand_mace1, itm_khand_mace2,itm_easterling_round_horseman,itm_variag_kataphrakt,],attr_evil_tier_5,wp_tier_5,knows_common|knows_ironflesh_4|knows_power_strike_4|knows_shield_3|knows_riding_5,khand_man1,khand_man2],</text:p>
          </table:table-cell>
          <table:table-cell table:number-columns-repeated="16362"/>
        </table:table-row>
        <table:table-row table:style-name="ro1">
          <table:table-cell table:style-name="ce6" table:formula="of:=IF(AND([.B302]&lt;&gt;&quot;&quot;;[.C302]&lt;&gt;&quot;&quot;);CONCATENATE([Variables.$I$1];[Variables.$I$7];[.B302];[Variables.$I$7];[Variables.$I$6];[Variables.$I$7];[.C302];[Variables.$I$7];[Variables.$I$6];[Variables.$I$7];[.D302];[Variables.$I$7];[Variables.$I$6];[.E302];[Variables.$I$6];[.F302];[Variables.$I$6];[.G302];[Variables.$I$6];[.H302];[Variables.$I$6];[Variables.$I$1];[.I302];[.J302];[.K302];[.L302];[.M302];[.N302];[.O302];[Variables.$I$2];[Variables.$I$6];[.P302];[Variables.$I$6];[.Q302];[Variables.$I$6];[.R302];[Variables.$I$6];[.S302];[Variables.$I$6];[.T302];IF([.U302]&lt;&gt;&quot;&quot;;CONCATENATE([Variables.$I$6];[.U302]);&quot;&quot;);[Variables.$I$2];[Variables.$I$6]);IF([.B302]&lt;&gt;&quot;&quot;;CONCATENATE(&quot;#&quot;;[.B302]);&quot;&quot;))" office:value-type="string" office:string-value="[&quot;c5_khand_lance_kataphrakt&quot;,&quot;Variag_Lancer&quot;,&quot;Variag_Lancers&quot;,tf_evil_man| tf_mounted| tfg_gloves| tfg_shield| tfg_armor| tfg_helm| tfg_horse| tfg_boots  |tfg_polearm,0,0,fac_khand,[itm_khand_cav_helm_c,itm_khand_heavy_lam,itm_mail_mittens,itm_splinted_greaves_good,itm_khand_tulwar,itm_khand_lance,itm_variag_kataphrakt,],attr_evil_tier_5,wp_tier_5,knows_common|knows_ironflesh_4|knows_power_strike_4|knows_riding_7,khand_man1,khand_man2]," calcext:value-type="string">
            <text:p>["c5_khand_lance_kataphrakt","Variag_Lancer","Variag_Lancers",tf_evil_man| tf_mounted| tfg_gloves| tfg_shield| tfg_armor| tfg_helm| tfg_horse| tfg_boots <text:s/>|tfg_polearm,0,0,fac_khand,[itm_khand_cav_helm_c,itm_khand_heavy_lam,itm_mail_mittens,itm_splinted_greaves_good,itm_khand_tulwar,itm_khand_lance,itm_variag_kataphrakt,],attr_evil_tier_5,wp_tier_5,knows_common|knows_ironflesh_4|knows_power_strike_4|knows_riding_7,khand_man1,khand_man2],</text:p>
          </table:table-cell>
          <table:table-cell table:style-name="ce7" office:value-type="string" calcext:value-type="string">
            <text:p>c5_khand_lance_kataphrakt</text:p>
          </table:table-cell>
          <table:table-cell table:style-name="ce7" office:value-type="string" calcext:value-type="string">
            <text:p>Variag_Lancer</text:p>
          </table:table-cell>
          <table:table-cell table:style-name="ce7" office:value-type="string" calcext:value-type="string">
            <text:p>Variag_Lancers</text:p>
          </table:table-cell>
          <table:table-cell table:style-name="ce8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khand</text:p>
          </table:table-cell>
          <table:table-cell table:style-name="ce11" office:value-type="string" calcext:value-type="string">
            <text:p>itm_khand_cav_helm_c,</text:p>
          </table:table-cell>
          <table:table-cell table:style-name="ce11" office:value-type="string" calcext:value-type="string">
            <text:p>itm_khand_heavy_lam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splinted_greaves_good,</text:p>
          </table:table-cell>
          <table:table-cell table:style-name="ce11" office:value-type="string" calcext:value-type="string">
            <text:p>itm_khand_tulwar,itm_khand_lance,</text:p>
          </table:table-cell>
          <table:table-cell table:style-name="ce11"/>
          <table:table-cell table:style-name="ce11" office:value-type="string" calcext:value-type="string">
            <text:p>itm_variag_kataphrakt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ironflesh_4|knows_power_strike_4|knows_riding_7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B302]&lt;&gt;&quot;&quot;;[.C302]&lt;&gt;&quot;&quot;);CONCATENATE([Variables.$I$1];[Variables.$I$7];[.B302];[Variables.$I$7];[Variables.$I$6];[Variables.$I$7];[.C302];[Variables.$I$7];[Variables.$I$6];[Variables.$I$7];[.D302];[Variables.$I$7];[Variables.$I$6];[.E302];[Variables.$I$6];[.F302];[Variables.$I$6];[.G302];[Variables.$I$6];[.H302];[Variables.$I$6];[Variables.$I$1];[.I302];[.J302];[.K302];[.L302];[.M302];[.N302];[.O302];[Variables.$I$2];[Variables.$I$6];[.P302];[Variables.$I$6];[.Q302];[Variables.$I$6];[.R302];[Variables.$I$6];[.S302];[Variables.$I$6];[.T302];IF([.U302]&lt;&gt;&quot;&quot;;CONCATENATE([Variables.$I$6];[.U302]);&quot;&quot;);[Variables.$I$2];[Variables.$I$6]);IF([.B302]&lt;&gt;&quot;&quot;;CONCATENATE(&quot;#&quot;;[.B302]);&quot;&quot;))" office:value-type="string" office:string-value="[&quot;c5_khand_lance_kataphrakt&quot;,&quot;Variag_Lancer&quot;,&quot;Variag_Lancers&quot;,tf_evil_man| tf_mounted| tfg_gloves| tfg_shield| tfg_armor| tfg_helm| tfg_horse| tfg_boots  |tfg_polearm,0,0,fac_khand,[itm_khand_cav_helm_c,itm_khand_heavy_lam,itm_mail_mittens,itm_splinted_greaves_good,itm_khand_tulwar,itm_khand_lance,itm_variag_kataphrakt,],attr_evil_tier_5,wp_tier_5,knows_common|knows_ironflesh_4|knows_power_strike_4|knows_riding_7,khand_man1,khand_man2]," calcext:value-type="string">
            <text:p>["c5_khand_lance_kataphrakt","Variag_Lancer","Variag_Lancers",tf_evil_man| tf_mounted| tfg_gloves| tfg_shield| tfg_armor| tfg_helm| tfg_horse| tfg_boots <text:s/>|tfg_polearm,0,0,fac_khand,[itm_khand_cav_helm_c,itm_khand_heavy_lam,itm_mail_mittens,itm_splinted_greaves_good,itm_khand_tulwar,itm_khand_lance,itm_variag_kataphrakt,],attr_evil_tier_5,wp_tier_5,knows_common|knows_ironflesh_4|knows_power_strike_4|knows_riding_7,khand_man1,khand_man2],</text:p>
          </table:table-cell>
          <table:table-cell table:number-columns-repeated="16362"/>
        </table:table-row>
        <table:table-row table:style-name="ro1">
          <table:table-cell table:style-name="ce6" table:formula="of:=IF(AND([.B303]&lt;&gt;&quot;&quot;;[.C303]&lt;&gt;&quot;&quot;);CONCATENATE([Variables.$I$1];[Variables.$I$7];[.B303];[Variables.$I$7];[Variables.$I$6];[Variables.$I$7];[.C303];[Variables.$I$7];[Variables.$I$6];[Variables.$I$7];[.D303];[Variables.$I$7];[Variables.$I$6];[.E303];[Variables.$I$6];[.F303];[Variables.$I$6];[.G303];[Variables.$I$6];[.H303];[Variables.$I$6];[Variables.$I$1];[.I303];[.J303];[.K303];[.L303];[.M303];[.N303];[.O303];[Variables.$I$2];[Variables.$I$6];[.P303];[Variables.$I$6];[.Q303];[Variables.$I$6];[.R303];[Variables.$I$6];[.S303];[Variables.$I$6];[.T303];IF([.U303]&lt;&gt;&quot;&quot;;CONCATENATE([Variables.$I$6];[.U303]);&quot;&quot;);[Variables.$I$2];[Variables.$I$6]);IF([.B303]&lt;&gt;&quot;&quot;;CONCATENATE(&quot;#&quot;;[.B303]);&quot;&quot;))" office:value-type="string" office:string-value="[&quot;i4_khand_halberdier&quot;,&quot;Khand_Glaiveman&quot;,&quot;Khand_Glaivemen&quot;,tf_evil_man| tfg_armor| tfg_helm| tfg_boots,0,0,fac_khand,[itm_khand_inf_helm_b, itm_khand_inf_helm_d,itm_khand_foot_lam,itm_khand_light_lam_good,itm_mail_mittens,itm_splinted_greaves,itm_khand_voulge,itm_khand_halberd,],attr_evil_tier_4,wp_tier_4,knows_common|knows_athletics_2|knows_power_strike_3|knows_ironflesh_2,khand_man1,khand_man2]," calcext:value-type="string">
            <text:p>["i4_khand_halberdier","Khand_Glaiveman","Khand_Glaivemen",tf_evil_man| tfg_armor| tfg_helm| tfg_boots,0,0,fac_khand,[itm_khand_inf_helm_b, itm_khand_inf_helm_d,itm_khand_foot_lam,itm_khand_light_lam_good,itm_mail_mittens,itm_splinted_greaves,itm_khand_voulge,itm_khand_halberd,],attr_evil_tier_4,wp_tier_4,knows_common|knows_athletics_2|knows_power_strike_3|knows_ironflesh_2,khand_man1,khand_man2],</text:p>
          </table:table-cell>
          <table:table-cell table:style-name="ce7" office:value-type="string" calcext:value-type="string">
            <text:p>i4_khand_halberdier</text:p>
          </table:table-cell>
          <table:table-cell table:style-name="ce7" office:value-type="string" calcext:value-type="string">
            <text:p>Khand_Glaiveman</text:p>
          </table:table-cell>
          <table:table-cell table:style-name="ce7" office:value-type="string" calcext:value-type="string">
            <text:p>Khand_Glaivemen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khand</text:p>
          </table:table-cell>
          <table:table-cell table:style-name="ce11" office:value-type="string" calcext:value-type="string">
            <text:p>itm_khand_inf_helm_b, itm_khand_inf_helm_d,</text:p>
          </table:table-cell>
          <table:table-cell table:style-name="ce11" office:value-type="string" calcext:value-type="string">
            <text:p>itm_khand_foot_lam,itm_khand_light_lam_good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splinted_greaves,</text:p>
          </table:table-cell>
          <table:table-cell table:style-name="ce11" office:value-type="string" calcext:value-type="string">
            <text:p>itm_khand_voulge,itm_khand_halberd,</text:p>
          </table:table-cell>
          <table:table-cell table:style-name="ce11" table:number-columns-repeated="2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2|knows_power_strike_3|knows_ironflesh_2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B303]&lt;&gt;&quot;&quot;;[.C303]&lt;&gt;&quot;&quot;);CONCATENATE([Variables.$I$1];[Variables.$I$7];[.B303];[Variables.$I$7];[Variables.$I$6];[Variables.$I$7];[.C303];[Variables.$I$7];[Variables.$I$6];[Variables.$I$7];[.D303];[Variables.$I$7];[Variables.$I$6];[.E303];[Variables.$I$6];[.F303];[Variables.$I$6];[.G303];[Variables.$I$6];[.H303];[Variables.$I$6];[Variables.$I$1];[.I303];[.J303];[.K303];[.L303];[.M303];[.N303];[.O303];[Variables.$I$2];[Variables.$I$6];[.P303];[Variables.$I$6];[.Q303];[Variables.$I$6];[.R303];[Variables.$I$6];[.S303];[Variables.$I$6];[.T303];IF([.U303]&lt;&gt;&quot;&quot;;CONCATENATE([Variables.$I$6];[.U303]);&quot;&quot;);[Variables.$I$2];[Variables.$I$6]);IF([.B303]&lt;&gt;&quot;&quot;;CONCATENATE(&quot;#&quot;;[.B303]);&quot;&quot;))" office:value-type="string" office:string-value="[&quot;i4_khand_halberdier&quot;,&quot;Khand_Glaiveman&quot;,&quot;Khand_Glaivemen&quot;,tf_evil_man| tfg_armor| tfg_helm| tfg_boots,0,0,fac_khand,[itm_khand_inf_helm_b, itm_khand_inf_helm_d,itm_khand_foot_lam,itm_khand_light_lam_good,itm_mail_mittens,itm_splinted_greaves,itm_khand_voulge,itm_khand_halberd,],attr_evil_tier_4,wp_tier_4,knows_common|knows_athletics_2|knows_power_strike_3|knows_ironflesh_2,khand_man1,khand_man2]," calcext:value-type="string">
            <text:p>["i4_khand_halberdier","Khand_Glaiveman","Khand_Glaivemen",tf_evil_man| tfg_armor| tfg_helm| tfg_boots,0,0,fac_khand,[itm_khand_inf_helm_b, itm_khand_inf_helm_d,itm_khand_foot_lam,itm_khand_light_lam_good,itm_mail_mittens,itm_splinted_greaves,itm_khand_voulge,itm_khand_halberd,],attr_evil_tier_4,wp_tier_4,knows_common|knows_athletics_2|knows_power_strike_3|knows_ironflesh_2,khand_man1,khand_man2],</text:p>
          </table:table-cell>
          <table:table-cell table:number-columns-repeated="16362"/>
        </table:table-row>
        <table:table-row table:style-name="ro1">
          <table:table-cell table:style-name="ce6" table:formula="of:=IF(AND([.B304]&lt;&gt;&quot;&quot;;[.C304]&lt;&gt;&quot;&quot;);CONCATENATE([Variables.$I$1];[Variables.$I$7];[.B304];[Variables.$I$7];[Variables.$I$6];[Variables.$I$7];[.C304];[Variables.$I$7];[Variables.$I$6];[Variables.$I$7];[.D304];[Variables.$I$7];[Variables.$I$6];[.E304];[Variables.$I$6];[.F304];[Variables.$I$6];[.G304];[Variables.$I$6];[.H304];[Variables.$I$6];[Variables.$I$1];[.I304];[.J304];[.K304];[.L304];[.M304];[.N304];[.O304];[Variables.$I$2];[Variables.$I$6];[.P304];[Variables.$I$6];[.Q304];[Variables.$I$6];[.R304];[Variables.$I$6];[.S304];[Variables.$I$6];[.T304];IF([.U304]&lt;&gt;&quot;&quot;;CONCATENATE([Variables.$I$6];[.U304]);&quot;&quot;);[Variables.$I$2];[Variables.$I$6]);IF([.B304]&lt;&gt;&quot;&quot;;CONCATENATE(&quot;#&quot;;[.B304]);&quot;&quot;))" office:value-type="string" office:string-value="[&quot;i5_khand_halberd_master&quot;,&quot;Variag_Halberd_Master&quot;,&quot;Variag_Halberd_Masters&quot;,tf_evil_man| tfg_armor| tfg_helm| tfg_boots,0,0,fac_khand,[itm_khand_inf_helm_b_good,itm_khand_inf_helm_d_good,itm_khand_foot_lam_good,itm_khand_mail_good,itm_mail_mittens,itm_splinted_greaves_good,itm_khand_halberd,],attr_evil_tier_5,wp_tier_5,knows_common|knows_athletics_2|knows_power_strike_4|knows_ironflesh_3,khand_man1,khand_man2]," calcext:value-type="string">
            <text:p>["i5_khand_halberd_master","Variag_Halberd_Master","Variag_Halberd_Masters",tf_evil_man| tfg_armor| tfg_helm| tfg_boots,0,0,fac_khand,[itm_khand_inf_helm_b_good,itm_khand_inf_helm_d_good,itm_khand_foot_lam_good,itm_khand_mail_good,itm_mail_mittens,itm_splinted_greaves_good,itm_khand_halberd,],attr_evil_tier_5,wp_tier_5,knows_common|knows_athletics_2|knows_power_strike_4|knows_ironflesh_3,khand_man1,khand_man2],</text:p>
          </table:table-cell>
          <table:table-cell table:style-name="ce7" office:value-type="string" calcext:value-type="string">
            <text:p>i5_khand_halberd_master</text:p>
          </table:table-cell>
          <table:table-cell table:style-name="ce7" office:value-type="string" calcext:value-type="string">
            <text:p>Variag_Halberd_Master</text:p>
          </table:table-cell>
          <table:table-cell table:style-name="ce7" office:value-type="string" calcext:value-type="string">
            <text:p>Variag_Halberd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khand</text:p>
          </table:table-cell>
          <table:table-cell table:style-name="ce11" office:value-type="string" calcext:value-type="string">
            <text:p>itm_khand_inf_helm_b_good,itm_khand_inf_helm_d_good,</text:p>
          </table:table-cell>
          <table:table-cell table:style-name="ce11" office:value-type="string" calcext:value-type="string">
            <text:p>itm_khand_foot_lam_good,itm_khand_mail_good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splinted_greaves_good,</text:p>
          </table:table-cell>
          <table:table-cell table:style-name="ce11" office:value-type="string" calcext:value-type="string">
            <text:p>itm_khand_halberd,</text:p>
          </table:table-cell>
          <table:table-cell table:style-name="ce11" table:number-columns-repeated="2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2|knows_power_strike_4|knows_ironflesh_3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B304]&lt;&gt;&quot;&quot;;[.C304]&lt;&gt;&quot;&quot;);CONCATENATE([Variables.$I$1];[Variables.$I$7];[.B304];[Variables.$I$7];[Variables.$I$6];[Variables.$I$7];[.C304];[Variables.$I$7];[Variables.$I$6];[Variables.$I$7];[.D304];[Variables.$I$7];[Variables.$I$6];[.E304];[Variables.$I$6];[.F304];[Variables.$I$6];[.G304];[Variables.$I$6];[.H304];[Variables.$I$6];[Variables.$I$1];[.I304];[.J304];[.K304];[.L304];[.M304];[.N304];[.O304];[Variables.$I$2];[Variables.$I$6];[.P304];[Variables.$I$6];[.Q304];[Variables.$I$6];[.R304];[Variables.$I$6];[.S304];[Variables.$I$6];[.T304];IF([.U304]&lt;&gt;&quot;&quot;;CONCATENATE([Variables.$I$6];[.U304]);&quot;&quot;);[Variables.$I$2];[Variables.$I$6]);IF([.B304]&lt;&gt;&quot;&quot;;CONCATENATE(&quot;#&quot;;[.B304]);&quot;&quot;))" office:value-type="string" office:string-value="[&quot;i5_khand_halberd_master&quot;,&quot;Variag_Halberd_Master&quot;,&quot;Variag_Halberd_Masters&quot;,tf_evil_man| tfg_armor| tfg_helm| tfg_boots,0,0,fac_khand,[itm_khand_inf_helm_b_good,itm_khand_inf_helm_d_good,itm_khand_foot_lam_good,itm_khand_mail_good,itm_mail_mittens,itm_splinted_greaves_good,itm_khand_halberd,],attr_evil_tier_5,wp_tier_5,knows_common|knows_athletics_2|knows_power_strike_4|knows_ironflesh_3,khand_man1,khand_man2]," calcext:value-type="string">
            <text:p>["i5_khand_halberd_master","Variag_Halberd_Master","Variag_Halberd_Masters",tf_evil_man| tfg_armor| tfg_helm| tfg_boots,0,0,fac_khand,[itm_khand_inf_helm_b_good,itm_khand_inf_helm_d_good,itm_khand_foot_lam_good,itm_khand_mail_good,itm_mail_mittens,itm_splinted_greaves_good,itm_khand_halberd,],attr_evil_tier_5,wp_tier_5,knows_common|knows_athletics_2|knows_power_strike_4|knows_ironflesh_3,khand_man1,khand_man2],</text:p>
          </table:table-cell>
          <table:table-cell table:number-columns-repeated="16362"/>
        </table:table-row>
        <table:table-row table:style-name="ro1">
          <table:table-cell table:style-name="ce6" table:formula="of:=IF(AND([.B305]&lt;&gt;&quot;&quot;;[.C305]&lt;&gt;&quot;&quot;);CONCATENATE([Variables.$I$1];[Variables.$I$7];[.B305];[Variables.$I$7];[Variables.$I$6];[Variables.$I$7];[.C305];[Variables.$I$7];[Variables.$I$6];[Variables.$I$7];[.D305];[Variables.$I$7];[Variables.$I$6];[.E305];[Variables.$I$6];[.F305];[Variables.$I$6];[.G305];[Variables.$I$6];[.H305];[Variables.$I$6];[Variables.$I$1];[.I305];[.J305];[.K305];[.L305];[.M305];[.N305];[.O305];[Variables.$I$2];[Variables.$I$6];[.P305];[Variables.$I$6];[.Q305];[Variables.$I$6];[.R305];[Variables.$I$6];[.S305];[Variables.$I$6];[.T305];IF([.U305]&lt;&gt;&quot;&quot;;CONCATENATE([Variables.$I$6];[.U305]);&quot;&quot;);[Variables.$I$2];[Variables.$I$6]);IF([.B305]&lt;&gt;&quot;&quot;;CONCATENATE(&quot;#&quot;;[.B305]);&quot;&quot;))" office:value-type="string" office:string-value="[&quot;i3_khand_pitfighter&quot;,&quot;Khand_Pit_Fighter&quot;,&quot;Khand_Pit_Fighters&quot;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" calcext:value-type="string">
            <text:p>["i3_khand_pitfighter","Khand_Pit_Fighter","Khand_Pit_Fighters"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</text:p>
          </table:table-cell>
          <table:table-cell table:style-name="ce7" office:value-type="string" calcext:value-type="string">
            <text:p>i3_khand_pitfighter</text:p>
          </table:table-cell>
          <table:table-cell table:style-name="ce7" office:value-type="string" calcext:value-type="string">
            <text:p>Khand_Pit_Fighter</text:p>
          </table:table-cell>
          <table:table-cell table:style-name="ce7" office:value-type="string" calcext:value-type="string">
            <text:p>Khand_Pit_Fighter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khand</text:p>
          </table:table-cell>
          <table:table-cell table:style-name="ce31" office:value-type="string" calcext:value-type="string">
            <text:p>itm_khand_helm_mask,</text:p>
          </table:table-cell>
          <table:table-cell table:style-name="ce11" office:value-type="string" calcext:value-type="string">
            <text:p>itm_khand_light,</text:p>
          </table:table-cell>
          <table:table-cell table:style-name="ce11"/>
          <table:table-cell table:style-name="ce11" office:value-type="string" calcext:value-type="string">
            <text:p>itm_leather_boots_dark_bad,</text:p>
          </table:table-cell>
          <table:table-cell table:style-name="ce11" office:value-type="string" calcext:value-type="string">
            <text:p>itm_javelin,</text:p>
          </table:table-cell>
          <table:table-cell table:style-name="ce11" office:value-type="string" calcext:value-type="string">
            <text:p>itm_khand_tulwar,itm_khand_pitsword,itm_shortened_spear,itm_variag_gladiator_shield,</text:p>
          </table:table-cell>
          <table:table-cell table:style-name="ce11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4|knows_shield_2|knows_power_throw_2|knows_power_strike_3|knows_ironflesh_3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B305]&lt;&gt;&quot;&quot;;[.C305]&lt;&gt;&quot;&quot;);CONCATENATE([Variables.$I$1];[Variables.$I$7];[.B305];[Variables.$I$7];[Variables.$I$6];[Variables.$I$7];[.C305];[Variables.$I$7];[Variables.$I$6];[Variables.$I$7];[.D305];[Variables.$I$7];[Variables.$I$6];[.E305];[Variables.$I$6];[.F305];[Variables.$I$6];[.G305];[Variables.$I$6];[.H305];[Variables.$I$6];[Variables.$I$1];[.I305];[.J305];[.K305];[.L305];[.M305];[.N305];[.O305];[Variables.$I$2];[Variables.$I$6];[.P305];[Variables.$I$6];[.Q305];[Variables.$I$6];[.R305];[Variables.$I$6];[.S305];[Variables.$I$6];[.T305];IF([.U305]&lt;&gt;&quot;&quot;;CONCATENATE([Variables.$I$6];[.U305]);&quot;&quot;);[Variables.$I$2];[Variables.$I$6]);IF([.B305]&lt;&gt;&quot;&quot;;CONCATENATE(&quot;#&quot;;[.B305]);&quot;&quot;))" office:value-type="string" office:string-value="[&quot;i3_khand_pitfighter&quot;,&quot;Khand_Pit_Fighter&quot;,&quot;Khand_Pit_Fighters&quot;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" calcext:value-type="string">
            <text:p>["i3_khand_pitfighter","Khand_Pit_Fighter","Khand_Pit_Fighters"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</text:p>
          </table:table-cell>
          <table:table-cell table:number-columns-repeated="16362"/>
        </table:table-row>
        <table:table-row table:style-name="ro1">
          <table:table-cell table:style-name="ce6" table:formula="of:=IF(AND([.B306]&lt;&gt;&quot;&quot;;[.C306]&lt;&gt;&quot;&quot;);CONCATENATE([Variables.$I$1];[Variables.$I$7];[.B306];[Variables.$I$7];[Variables.$I$6];[Variables.$I$7];[.C306];[Variables.$I$7];[Variables.$I$6];[Variables.$I$7];[.D306];[Variables.$I$7];[Variables.$I$6];[.E306];[Variables.$I$6];[.F306];[Variables.$I$6];[.G306];[Variables.$I$6];[.H306];[Variables.$I$6];[Variables.$I$1];[.I306];[.J306];[.K306];[.L306];[.M306];[.N306];[.O306];[Variables.$I$2];[Variables.$I$6];[.P306];[Variables.$I$6];[.Q306];[Variables.$I$6];[.R306];[Variables.$I$6];[.S306];[Variables.$I$6];[.T306];IF([.U306]&lt;&gt;&quot;&quot;;CONCATENATE([Variables.$I$6];[.U306]);&quot;&quot;);[Variables.$I$2];[Variables.$I$6]);IF([.B306]&lt;&gt;&quot;&quot;;CONCATENATE(&quot;#&quot;;[.B306]);&quot;&quot;))" office:value-type="string" office:string-value="[&quot;i4_khand_pit_champion&quot;,&quot;Khand_Pit_Champion&quot;,&quot;Khand_Pit_Champions&quot;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" calcext:value-type="string">
            <text:p>["i4_khand_pit_champion","Khand_Pit_Champion","Khand_Pit_Champions"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</text:p>
          </table:table-cell>
          <table:table-cell table:style-name="ce7" office:value-type="string" calcext:value-type="string">
            <text:p>i4_khand_pit_champion</text:p>
          </table:table-cell>
          <table:table-cell table:style-name="ce7" office:value-type="string" calcext:value-type="string">
            <text:p>Khand_Pit_Champion</text:p>
          </table:table-cell>
          <table:table-cell table:style-name="ce7" office:value-type="string" calcext:value-type="string">
            <text:p>Khand_Pit_Champion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khand</text:p>
          </table:table-cell>
          <table:table-cell table:style-name="ce11" office:value-type="string" calcext:value-type="string">
            <text:p>itm_khand_helm_mask_good,</text:p>
          </table:table-cell>
          <table:table-cell table:style-name="ce11" office:value-type="string" calcext:value-type="string">
            <text:p>itm_khand_light,itm_khand_light_good,</text:p>
          </table:table-cell>
          <table:table-cell table:style-name="ce11"/>
          <table:table-cell table:style-name="ce11" office:value-type="string" calcext:value-type="string">
            <text:p>itm_leather_boots_dark_bad,</text:p>
          </table:table-cell>
          <table:table-cell table:style-name="ce11" office:value-type="string" calcext:value-type="string">
            <text:p>itm_javelin,</text:p>
          </table:table-cell>
          <table:table-cell table:style-name="ce11" office:value-type="string" calcext:value-type="string">
            <text:p>itm_khand_tulwar,itm_khand_pitsword,itm_shortened_spear,itm_easterling_hawk_shield,itm_variag_gladiator_shield,</text:p>
          </table:table-cell>
          <table:table-cell table:style-name="ce11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5|knows_shield_3|knows_power_throw_2|knows_power_strike_4|knows_ironflesh_4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B306]&lt;&gt;&quot;&quot;;[.C306]&lt;&gt;&quot;&quot;);CONCATENATE([Variables.$I$1];[Variables.$I$7];[.B306];[Variables.$I$7];[Variables.$I$6];[Variables.$I$7];[.C306];[Variables.$I$7];[Variables.$I$6];[Variables.$I$7];[.D306];[Variables.$I$7];[Variables.$I$6];[.E306];[Variables.$I$6];[.F306];[Variables.$I$6];[.G306];[Variables.$I$6];[.H306];[Variables.$I$6];[Variables.$I$1];[.I306];[.J306];[.K306];[.L306];[.M306];[.N306];[.O306];[Variables.$I$2];[Variables.$I$6];[.P306];[Variables.$I$6];[.Q306];[Variables.$I$6];[.R306];[Variables.$I$6];[.S306];[Variables.$I$6];[.T306];IF([.U306]&lt;&gt;&quot;&quot;;CONCATENATE([Variables.$I$6];[.U306]);&quot;&quot;);[Variables.$I$2];[Variables.$I$6]);IF([.B306]&lt;&gt;&quot;&quot;;CONCATENATE(&quot;#&quot;;[.B306]);&quot;&quot;))" office:value-type="string" office:string-value="[&quot;i4_khand_pit_champion&quot;,&quot;Khand_Pit_Champion&quot;,&quot;Khand_Pit_Champions&quot;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" calcext:value-type="string">
            <text:p>["i4_khand_pit_champion","Khand_Pit_Champion","Khand_Pit_Champions"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</text:p>
          </table:table-cell>
          <table:table-cell table:number-columns-repeated="16362"/>
        </table:table-row>
        <table:table-row table:style-name="ro1">
          <table:table-cell table:style-name="ce6" table:formula="of:=IF(AND([.B307]&lt;&gt;&quot;&quot;;[.C307]&lt;&gt;&quot;&quot;);CONCATENATE([Variables.$I$1];[Variables.$I$7];[.B307];[Variables.$I$7];[Variables.$I$6];[Variables.$I$7];[.C307];[Variables.$I$7];[Variables.$I$6];[Variables.$I$7];[.D307];[Variables.$I$7];[Variables.$I$6];[.E307];[Variables.$I$6];[.F307];[Variables.$I$6];[.G307];[Variables.$I$6];[.H307];[Variables.$I$6];[Variables.$I$1];[.I307];[.J307];[.K307];[.L307];[.M307];[.N307];[.O307];[Variables.$I$2];[Variables.$I$6];[.P307];[Variables.$I$6];[.Q307];[Variables.$I$6];[.R307];[Variables.$I$6];[.S307];[Variables.$I$6];[.T307];IF([.U307]&lt;&gt;&quot;&quot;;CONCATENATE([Variables.$I$6];[.U307]);&quot;&quot;);[Variables.$I$2];[Variables.$I$6]);IF([.B307]&lt;&gt;&quot;&quot;;CONCATENATE(&quot;#&quot;;[.B307]);&quot;&quot;))" office:value-type="string" office:string-value="[&quot;i5_khand_pit_master&quot;,&quot;Variag_Master_of_the_Pits&quot;,&quot;Variag_Masters_of_the_Pits&quot;,tf_evil_man| tfg_ranged| tfg_shield| tfg_armor| tfg_helm| tfg_boots,0,0,fac_khand,[itm_khand_helm_mask_good,itm_khand_light,itm_khand_light_good,itm_leather_boots_dark_bad,itm_javelin,itm_khand_tulwar,itm_khand_pitsword,itm_khand_trident,itm_easterling_hawk_shield,itm_marker_berserker,],attr_evil_tier_5,wp_tier_5,knows_common|knows_athletics_6|knows_shield_4|knows_power_throw_4|knows_power_strike_5|knows_ironflesh_6,khand_man1,khand_man2]," calcext:value-type="string">
            <text:p>["i5_khand_pit_master","Variag_Master_of_the_Pits","Variag_Masters_of_the_Pits",tf_evil_man| tfg_ranged| tfg_shield| tfg_armor| tfg_helm| tfg_boots,0,0,fac_khand,[itm_khand_helm_mask_good,itm_khand_light,itm_khand_light_good,itm_leather_boots_dark_bad,itm_javelin,itm_khand_tulwar,itm_khand_pitsword,itm_khand_trident,itm_easterling_hawk_shield,itm_marker_berserker,],attr_evil_tier_5,wp_tier_5,knows_common|knows_athletics_6|knows_shield_4|knows_power_throw_4|knows_power_strike_5|knows_ironflesh_6,khand_man1,khand_man2],</text:p>
          </table:table-cell>
          <table:table-cell table:style-name="ce7" office:value-type="string" calcext:value-type="string">
            <text:p>i5_khand_pit_master</text:p>
          </table:table-cell>
          <table:table-cell table:style-name="ce7" office:value-type="string" calcext:value-type="string">
            <text:p>Variag_Master_of_the_Pits</text:p>
          </table:table-cell>
          <table:table-cell table:style-name="ce7" office:value-type="string" calcext:value-type="string">
            <text:p>Variag_Masters_of_the_Pit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khand</text:p>
          </table:table-cell>
          <table:table-cell table:style-name="ce11" office:value-type="string" calcext:value-type="string">
            <text:p>itm_khand_helm_mask_good,</text:p>
          </table:table-cell>
          <table:table-cell table:style-name="ce11" office:value-type="string" calcext:value-type="string">
            <text:p>itm_khand_light,itm_khand_light_good,</text:p>
          </table:table-cell>
          <table:table-cell table:style-name="ce11"/>
          <table:table-cell table:style-name="ce11" office:value-type="string" calcext:value-type="string">
            <text:p>itm_leather_boots_dark_bad,</text:p>
          </table:table-cell>
          <table:table-cell table:style-name="ce11" office:value-type="string" calcext:value-type="string">
            <text:p>itm_javelin,</text:p>
          </table:table-cell>
          <table:table-cell table:style-name="ce11" office:value-type="string" calcext:value-type="string">
            <text:p>itm_khand_tulwar,itm_khand_pitsword,itm_khand_trident,itm_easterling_hawk_shield,</text:p>
          </table:table-cell>
          <table:table-cell table:style-name="ce11" office:value-type="string" calcext:value-type="string">
            <text:p>itm_marker_berserker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6|knows_shield_4|knows_power_throw_4|knows_power_strike_5|knows_ironflesh_6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B307]&lt;&gt;&quot;&quot;;[.C307]&lt;&gt;&quot;&quot;);CONCATENATE([Variables.$I$1];[Variables.$I$7];[.B307];[Variables.$I$7];[Variables.$I$6];[Variables.$I$7];[.C307];[Variables.$I$7];[Variables.$I$6];[Variables.$I$7];[.D307];[Variables.$I$7];[Variables.$I$6];[.E307];[Variables.$I$6];[.F307];[Variables.$I$6];[.G307];[Variables.$I$6];[.H307];[Variables.$I$6];[Variables.$I$1];[.I307];[.J307];[.K307];[.L307];[.M307];[.N307];[.O307];[Variables.$I$2];[Variables.$I$6];[.P307];[Variables.$I$6];[.Q307];[Variables.$I$6];[.R307];[Variables.$I$6];[.S307];[Variables.$I$6];[.T307];IF([.U307]&lt;&gt;&quot;&quot;;CONCATENATE([Variables.$I$6];[.U307]);&quot;&quot;);[Variables.$I$2];[Variables.$I$6]);IF([.B307]&lt;&gt;&quot;&quot;;CONCATENATE(&quot;#&quot;;[.B307]);&quot;&quot;))" office:value-type="string" office:string-value="[&quot;i5_khand_pit_master&quot;,&quot;Variag_Master_of_the_Pits&quot;,&quot;Variag_Masters_of_the_Pits&quot;,tf_evil_man| tfg_ranged| tfg_shield| tfg_armor| tfg_helm| tfg_boots,0,0,fac_khand,[itm_khand_helm_mask_good,itm_khand_light,itm_khand_light_good,itm_leather_boots_dark_bad,itm_javelin,itm_khand_tulwar,itm_khand_pitsword,itm_khand_trident,itm_easterling_hawk_shield,itm_marker_berserker,],attr_evil_tier_5,wp_tier_5,knows_common|knows_athletics_6|knows_shield_4|knows_power_throw_4|knows_power_strike_5|knows_ironflesh_6,khand_man1,khand_man2]," calcext:value-type="string">
            <text:p>["i5_khand_pit_master","Variag_Master_of_the_Pits","Variag_Masters_of_the_Pits",tf_evil_man| tfg_ranged| tfg_shield| tfg_armor| tfg_helm| tfg_boots,0,0,fac_khand,[itm_khand_helm_mask_good,itm_khand_light,itm_khand_light_good,itm_leather_boots_dark_bad,itm_javelin,itm_khand_tulwar,itm_khand_pitsword,itm_khand_trident,itm_easterling_hawk_shield,itm_marker_berserker,],attr_evil_tier_5,wp_tier_5,knows_common|knows_athletics_6|knows_shield_4|knows_power_throw_4|knows_power_strike_5|knows_ironflesh_6,khand_man1,khand_man2],</text:p>
          </table:table-cell>
          <table:table-cell table:number-columns-repeated="16362"/>
        </table:table-row>
        <table:table-row table:style-name="ro1">
          <table:table-cell table:style-name="ce6" table:formula="of:=IF(AND([.B308]&lt;&gt;&quot;&quot;;[.C308]&lt;&gt;&quot;&quot;);CONCATENATE([Variables.$I$1];[Variables.$I$7];[.B308];[Variables.$I$7];[Variables.$I$6];[Variables.$I$7];[.C308];[Variables.$I$7];[Variables.$I$6];[Variables.$I$7];[.D308];[Variables.$I$7];[Variables.$I$6];[.E308];[Variables.$I$6];[.F308];[Variables.$I$6];[.G308];[Variables.$I$6];[.H308];[Variables.$I$6];[Variables.$I$1];[.I308];[.J308];[.K308];[.L308];[.M308];[.N308];[.O308];[Variables.$I$2];[Variables.$I$6];[.P308];[Variables.$I$6];[.Q308];[Variables.$I$6];[.R308];[Variables.$I$6];[.S308];[Variables.$I$6];[.T308];IF([.U308]&lt;&gt;&quot;&quot;;CONCATENATE([Variables.$I$6];[.U308]);&quot;&quot;);[Variables.$I$2];[Variables.$I$6]);IF([.B308]&lt;&gt;&quot;&quot;;CONCATENATE(&quot;#&quot;;[.B308]);&quot;&quot;))" office:value-type="string" office:string-value="[&quot;ac3_khand_skirmisher&quot;,&quot;Khand_Skirmisher&quot;,&quot;Khand_Skirmishers&quot;,tf_evil_man| tfg_ranged| tf_mounted| tfg_shield| tfg_armor| tfg_helm| tfg_horse| tfg_boots,0,0,fac_khand,[itm_khand_inf_helm_a_bad, itm_khand_inf_helm_b_bad, itm_khand_cav_helm_a_bad,itm_khand_light,itm_khand_light_lam,itm_leather_boots_dark,itm_javelin_big,itm_javelin_big,itm_khand_tulwar,itm_steppe_horse,],attr_evil_tier_3,wp_tier_3,knows_common|knows_horse_archery_4|knows_riding_2|knows_power_throw_2|knows_power_strike_1,khand_man1,khand_man2]," calcext:value-type="string">
            <text:p>["ac3_khand_skirmisher","Khand_Skirmisher","Khand_Skirmishers",tf_evil_man| tfg_ranged| tf_mounted| tfg_shield| tfg_armor| tfg_helm| tfg_horse| tfg_boots,0,0,fac_khand,[itm_khand_inf_helm_a_bad, itm_khand_inf_helm_b_bad, itm_khand_cav_helm_a_bad,itm_khand_light,itm_khand_light_lam,itm_leather_boots_dark,itm_javelin_big,itm_javelin_big,itm_khand_tulwar,itm_steppe_horse,],attr_evil_tier_3,wp_tier_3,knows_common|knows_horse_archery_4|knows_riding_2|knows_power_throw_2|knows_power_strike_1,khand_man1,khand_man2],</text:p>
          </table:table-cell>
          <table:table-cell table:style-name="ce7" office:value-type="string" calcext:value-type="string">
            <text:p>ac3_khand_skirmisher</text:p>
          </table:table-cell>
          <table:table-cell table:style-name="ce7" office:value-type="string" calcext:value-type="string">
            <text:p>Khand_Skirmisher</text:p>
          </table:table-cell>
          <table:table-cell table:style-name="ce7" office:value-type="string" calcext:value-type="string">
            <text:p>Khand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khand</text:p>
          </table:table-cell>
          <table:table-cell table:style-name="ce11" office:value-type="string" calcext:value-type="string">
            <text:p>itm_khand_inf_helm_a_bad, itm_khand_inf_helm_b_bad, itm_khand_cav_helm_a_bad,</text:p>
          </table:table-cell>
          <table:table-cell table:style-name="ce11" office:value-type="string" calcext:value-type="string">
            <text:p>itm_khand_light,itm_khand_light_lam,</text:p>
          </table:table-cell>
          <table:table-cell table:style-name="ce11"/>
          <table:table-cell table:style-name="ce11" office:value-type="string" calcext:value-type="string">
            <text:p>itm_leather_boots_dark,</text:p>
          </table:table-cell>
          <table:table-cell table:style-name="ce11" office:value-type="string" calcext:value-type="string">
            <text:p>itm_javelin_big,itm_javelin_big,</text:p>
          </table:table-cell>
          <table:table-cell table:style-name="ce11" office:value-type="string" calcext:value-type="string">
            <text:p>itm_khand_tulwar,</text:p>
          </table:table-cell>
          <table:table-cell table:style-name="ce11" office:value-type="string" calcext:value-type="string">
            <text:p>itm_steppe_horse,</text:p>
          </table:table-cell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horse_archery_4|knows_riding_2|knows_power_throw_2|knows_power_strike_1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B308]&lt;&gt;&quot;&quot;;[.C308]&lt;&gt;&quot;&quot;);CONCATENATE([Variables.$I$1];[Variables.$I$7];[.B308];[Variables.$I$7];[Variables.$I$6];[Variables.$I$7];[.C308];[Variables.$I$7];[Variables.$I$6];[Variables.$I$7];[.D308];[Variables.$I$7];[Variables.$I$6];[.E308];[Variables.$I$6];[.F308];[Variables.$I$6];[.G308];[Variables.$I$6];[.H308];[Variables.$I$6];[Variables.$I$1];[.I308];[.J308];[.K308];[.L308];[.M308];[.N308];[.O308];[Variables.$I$2];[Variables.$I$6];[.P308];[Variables.$I$6];[.Q308];[Variables.$I$6];[.R308];[Variables.$I$6];[.S308];[Variables.$I$6];[.T308];IF([.U308]&lt;&gt;&quot;&quot;;CONCATENATE([Variables.$I$6];[.U308]);&quot;&quot;);[Variables.$I$2];[Variables.$I$6]);IF([.B308]&lt;&gt;&quot;&quot;;CONCATENATE(&quot;#&quot;;[.B308]);&quot;&quot;))" office:value-type="string" office:string-value="[&quot;ac3_khand_skirmisher&quot;,&quot;Khand_Skirmisher&quot;,&quot;Khand_Skirmishers&quot;,tf_evil_man| tfg_ranged| tf_mounted| tfg_shield| tfg_armor| tfg_helm| tfg_horse| tfg_boots,0,0,fac_khand,[itm_khand_inf_helm_a_bad, itm_khand_inf_helm_b_bad, itm_khand_cav_helm_a_bad,itm_khand_light,itm_khand_light_lam,itm_leather_boots_dark,itm_javelin_big,itm_javelin_big,itm_khand_tulwar,itm_steppe_horse,],attr_evil_tier_3,wp_tier_3,knows_common|knows_horse_archery_4|knows_riding_2|knows_power_throw_2|knows_power_strike_1,khand_man1,khand_man2]," calcext:value-type="string">
            <text:p>["ac3_khand_skirmisher","Khand_Skirmisher","Khand_Skirmishers",tf_evil_man| tfg_ranged| tf_mounted| tfg_shield| tfg_armor| tfg_helm| tfg_horse| tfg_boots,0,0,fac_khand,[itm_khand_inf_helm_a_bad, itm_khand_inf_helm_b_bad, itm_khand_cav_helm_a_bad,itm_khand_light,itm_khand_light_lam,itm_leather_boots_dark,itm_javelin_big,itm_javelin_big,itm_khand_tulwar,itm_steppe_horse,],attr_evil_tier_3,wp_tier_3,knows_common|knows_horse_archery_4|knows_riding_2|knows_power_throw_2|knows_power_strike_1,khand_man1,khand_man2],</text:p>
          </table:table-cell>
          <table:table-cell table:number-columns-repeated="16362"/>
        </table:table-row>
        <table:table-row table:style-name="ro1">
          <table:table-cell table:style-name="ce6" table:formula="of:=IF(AND([.B309]&lt;&gt;&quot;&quot;;[.C309]&lt;&gt;&quot;&quot;);CONCATENATE([Variables.$I$1];[Variables.$I$7];[.B309];[Variables.$I$7];[Variables.$I$6];[Variables.$I$7];[.C309];[Variables.$I$7];[Variables.$I$6];[Variables.$I$7];[.D309];[Variables.$I$7];[Variables.$I$6];[.E309];[Variables.$I$6];[.F309];[Variables.$I$6];[.G309];[Variables.$I$6];[.H309];[Variables.$I$6];[Variables.$I$1];[.I309];[.J309];[.K309];[.L309];[.M309];[.N309];[.O309];[Variables.$I$2];[Variables.$I$6];[.P309];[Variables.$I$6];[.Q309];[Variables.$I$6];[.R309];[Variables.$I$6];[.S309];[Variables.$I$6];[.T309];IF([.U309]&lt;&gt;&quot;&quot;;CONCATENATE([Variables.$I$6];[.U309]);&quot;&quot;);[Variables.$I$2];[Variables.$I$6]);IF([.B309]&lt;&gt;&quot;&quot;;CONCATENATE(&quot;#&quot;;[.B309]);&quot;&quot;))" office:value-type="string" office:string-value="[&quot;ac4_khand_vet_skirmisher&quot;,&quot;Khand_Veteran_Skirmisher&quot;,&quot;Khand_Veteran_Skirmishers&quot;,tf_evil_man| tfg_ranged| tf_mounted| tfg_shield| tfg_armor| tfg_helm| tfg_horse| tfg_boots,0,0,fac_khand,[itm_khand_inf_helm_a, itm_khand_cav_helm_b,itm_khand_med_lam_bad,itm_khand_mail_bad,itm_leather_gloves,itm_splinted_greaves,itm_leather_boots_dark,itm_javelin_big,itm_javelin_big,itm_khand_tulwar,itm_easterling_round_horseman,itm_steppe_horse,],attr_evil_tier_4,wp_tier_4,knows_common|knows_horse_archery_5|knows_riding_5|knows_shield_3|knows_power_throw_3|knows_power_strike_2|knows_ironflesh_2,khand_man1,khand_man2]," calcext:value-type="string">
            <text:p>["ac4_khand_vet_skirmisher","Khand_Veteran_Skirmisher","Khand_Veteran_Skirmishers",tf_evil_man| tfg_ranged| tf_mounted| tfg_shield| tfg_armor| tfg_helm| tfg_horse| tfg_boots,0,0,fac_khand,[itm_khand_inf_helm_a, itm_khand_cav_helm_b,itm_khand_med_lam_bad,itm_khand_mail_bad,itm_leather_gloves,itm_splinted_greaves,itm_leather_boots_dark,itm_javelin_big,itm_javelin_big,itm_khand_tulwar,itm_easterling_round_horseman,itm_steppe_horse,],attr_evil_tier_4,wp_tier_4,knows_common|knows_horse_archery_5|knows_riding_5|knows_shield_3|knows_power_throw_3|knows_power_strike_2|knows_ironflesh_2,khand_man1,khand_man2],</text:p>
          </table:table-cell>
          <table:table-cell table:style-name="ce7" office:value-type="string" calcext:value-type="string">
            <text:p>ac4_khand_vet_skirmisher</text:p>
          </table:table-cell>
          <table:table-cell table:style-name="ce7" office:value-type="string" calcext:value-type="string">
            <text:p>Khand_Veteran_Skirmisher</text:p>
          </table:table-cell>
          <table:table-cell table:style-name="ce7" office:value-type="string" calcext:value-type="string">
            <text:p>Khand_Veteran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khand</text:p>
          </table:table-cell>
          <table:table-cell table:style-name="ce11" office:value-type="string" calcext:value-type="string">
            <text:p>itm_khand_inf_helm_a, itm_khand_cav_helm_b,</text:p>
          </table:table-cell>
          <table:table-cell table:style-name="ce11" office:value-type="string" calcext:value-type="string">
            <text:p>itm_khand_med_lam_bad,itm_khand_mail_bad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splinted_greaves,itm_leather_boots_dark,</text:p>
          </table:table-cell>
          <table:table-cell table:style-name="ce11" office:value-type="string" calcext:value-type="string">
            <text:p>itm_javelin_big,itm_javelin_big,</text:p>
          </table:table-cell>
          <table:table-cell table:style-name="ce11" office:value-type="string" calcext:value-type="string">
            <text:p>itm_khand_tulwar,itm_easterling_round_horseman,</text:p>
          </table:table-cell>
          <table:table-cell table:style-name="ce11" office:value-type="string" calcext:value-type="string">
            <text:p>itm_steppe_horse,</text:p>
          </table:table-cell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horse_archery_5|knows_riding_5|knows_shield_3|knows_power_throw_3|knows_power_strike_2|knows_ironflesh_2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B309]&lt;&gt;&quot;&quot;;[.C309]&lt;&gt;&quot;&quot;);CONCATENATE([Variables.$I$1];[Variables.$I$7];[.B309];[Variables.$I$7];[Variables.$I$6];[Variables.$I$7];[.C309];[Variables.$I$7];[Variables.$I$6];[Variables.$I$7];[.D309];[Variables.$I$7];[Variables.$I$6];[.E309];[Variables.$I$6];[.F309];[Variables.$I$6];[.G309];[Variables.$I$6];[.H309];[Variables.$I$6];[Variables.$I$1];[.I309];[.J309];[.K309];[.L309];[.M309];[.N309];[.O309];[Variables.$I$2];[Variables.$I$6];[.P309];[Variables.$I$6];[.Q309];[Variables.$I$6];[.R309];[Variables.$I$6];[.S309];[Variables.$I$6];[.T309];IF([.U309]&lt;&gt;&quot;&quot;;CONCATENATE([Variables.$I$6];[.U309]);&quot;&quot;);[Variables.$I$2];[Variables.$I$6]);IF([.B309]&lt;&gt;&quot;&quot;;CONCATENATE(&quot;#&quot;;[.B309]);&quot;&quot;))" office:value-type="string" office:string-value="[&quot;ac4_khand_vet_skirmisher&quot;,&quot;Khand_Veteran_Skirmisher&quot;,&quot;Khand_Veteran_Skirmishers&quot;,tf_evil_man| tfg_ranged| tf_mounted| tfg_shield| tfg_armor| tfg_helm| tfg_horse| tfg_boots,0,0,fac_khand,[itm_khand_inf_helm_a, itm_khand_cav_helm_b,itm_khand_med_lam_bad,itm_khand_mail_bad,itm_leather_gloves,itm_splinted_greaves,itm_leather_boots_dark,itm_javelin_big,itm_javelin_big,itm_khand_tulwar,itm_easterling_round_horseman,itm_steppe_horse,],attr_evil_tier_4,wp_tier_4,knows_common|knows_horse_archery_5|knows_riding_5|knows_shield_3|knows_power_throw_3|knows_power_strike_2|knows_ironflesh_2,khand_man1,khand_man2]," calcext:value-type="string">
            <text:p>["ac4_khand_vet_skirmisher","Khand_Veteran_Skirmisher","Khand_Veteran_Skirmishers",tf_evil_man| tfg_ranged| tf_mounted| tfg_shield| tfg_armor| tfg_helm| tfg_horse| tfg_boots,0,0,fac_khand,[itm_khand_inf_helm_a, itm_khand_cav_helm_b,itm_khand_med_lam_bad,itm_khand_mail_bad,itm_leather_gloves,itm_splinted_greaves,itm_leather_boots_dark,itm_javelin_big,itm_javelin_big,itm_khand_tulwar,itm_easterling_round_horseman,itm_steppe_horse,],attr_evil_tier_4,wp_tier_4,knows_common|knows_horse_archery_5|knows_riding_5|knows_shield_3|knows_power_throw_3|knows_power_strike_2|knows_ironflesh_2,khand_man1,khand_man2],</text:p>
          </table:table-cell>
          <table:table-cell table:number-columns-repeated="16362"/>
        </table:table-row>
        <table:table-row table:style-name="ro1">
          <table:table-cell table:style-name="ce6" table:formula="of:=IF(AND([.B310]&lt;&gt;&quot;&quot;;[.C310]&lt;&gt;&quot;&quot;);CONCATENATE([Variables.$I$1];[Variables.$I$7];[.B310];[Variables.$I$7];[Variables.$I$6];[Variables.$I$7];[.C310];[Variables.$I$7];[Variables.$I$6];[Variables.$I$7];[.D310];[Variables.$I$7];[Variables.$I$6];[.E310];[Variables.$I$6];[.F310];[Variables.$I$6];[.G310];[Variables.$I$6];[.H310];[Variables.$I$6];[Variables.$I$1];[.I310];[.J310];[.K310];[.L310];[.M310];[.N310];[.O310];[Variables.$I$2];[Variables.$I$6];[.P310];[Variables.$I$6];[.Q310];[Variables.$I$6];[.R310];[Variables.$I$6];[.S310];[Variables.$I$6];[.T310];IF([.U310]&lt;&gt;&quot;&quot;;CONCATENATE([Variables.$I$6];[.U310]);&quot;&quot;);[Variables.$I$2];[Variables.$I$6]);IF([.B310]&lt;&gt;&quot;&quot;;CONCATENATE(&quot;#&quot;;[.B310]);&quot;&quot;))" office:value-type="string" office:string-value="[&quot;ac5_khand_heavy_skirmisher&quot;,&quot;Variag_Heavy_Skirmisher&quot;,&quot;Variag_Heavy_Skirmishers&quot;,tf_evil_man| tfg_ranged| tf_mounted| tfg_shield| tfg_armor| tfg_helm| tfg_horse| tfg_boots,0,0,fac_khand,[itm_khand_cav_helm_b_good,itm_khand_med_lam, itm_khand_mail, itm_khand_heavy_lam_bad,itm_leather_gloves,itm_splinted_greaves,itm_javelin_big,itm_javelin_big,itm_khand_tulwar,itm_easterling_round_horseman,itm_variag_kataphrakt,],attr_evil_tier_5,wp_tier_5,knows_common|knows_ironflesh_2|knows_power_strike_3|knows_power_throw_5|knows_shield_3|knows_riding_7|knows_horse_archery_6,khand_man1,khand_man2]," calcext:value-type="string">
            <text:p>["ac5_khand_heavy_skirmisher","Variag_Heavy_Skirmisher","Variag_Heavy_Skirmishers",tf_evil_man| tfg_ranged| tf_mounted| tfg_shield| tfg_armor| tfg_helm| tfg_horse| tfg_boots,0,0,fac_khand,[itm_khand_cav_helm_b_good,itm_khand_med_lam, itm_khand_mail, itm_khand_heavy_lam_bad,itm_leather_gloves,itm_splinted_greaves,itm_javelin_big,itm_javelin_big,itm_khand_tulwar,itm_easterling_round_horseman,itm_variag_kataphrakt,],attr_evil_tier_5,wp_tier_5,knows_common|knows_ironflesh_2|knows_power_strike_3|knows_power_throw_5|knows_shield_3|knows_riding_7|knows_horse_archery_6,khand_man1,khand_man2],</text:p>
          </table:table-cell>
          <table:table-cell table:style-name="ce7" office:value-type="string" calcext:value-type="string">
            <text:p>ac5_khand_heavy_skirmisher</text:p>
          </table:table-cell>
          <table:table-cell table:style-name="ce7" office:value-type="string" calcext:value-type="string">
            <text:p>Variag_Heavy_Skirmisher</text:p>
          </table:table-cell>
          <table:table-cell table:style-name="ce7" office:value-type="string" calcext:value-type="string">
            <text:p>Variag_Heavy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khand</text:p>
          </table:table-cell>
          <table:table-cell table:style-name="ce11" office:value-type="string" calcext:value-type="string">
            <text:p>itm_khand_cav_helm_b_good,</text:p>
          </table:table-cell>
          <table:table-cell table:style-name="ce11" office:value-type="string" calcext:value-type="string">
            <text:p>itm_khand_med_lam, itm_khand_mail, itm_khand_heavy_lam_bad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splinted_greaves,</text:p>
          </table:table-cell>
          <table:table-cell table:style-name="ce11" office:value-type="string" calcext:value-type="string">
            <text:p>itm_javelin_big,itm_javelin_big,</text:p>
          </table:table-cell>
          <table:table-cell table:style-name="ce11" office:value-type="string" calcext:value-type="string">
            <text:p>itm_khand_tulwar,itm_easterling_round_horseman,</text:p>
          </table:table-cell>
          <table:table-cell table:style-name="ce11" office:value-type="string" calcext:value-type="string">
            <text:p>itm_variag_kataphrakt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ironflesh_2|knows_power_strike_3|knows_power_throw_5|knows_shield_3|knows_riding_7|knows_horse_archery_6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B310]&lt;&gt;&quot;&quot;;[.C310]&lt;&gt;&quot;&quot;);CONCATENATE([Variables.$I$1];[Variables.$I$7];[.B310];[Variables.$I$7];[Variables.$I$6];[Variables.$I$7];[.C310];[Variables.$I$7];[Variables.$I$6];[Variables.$I$7];[.D310];[Variables.$I$7];[Variables.$I$6];[.E310];[Variables.$I$6];[.F310];[Variables.$I$6];[.G310];[Variables.$I$6];[.H310];[Variables.$I$6];[Variables.$I$1];[.I310];[.J310];[.K310];[.L310];[.M310];[.N310];[.O310];[Variables.$I$2];[Variables.$I$6];[.P310];[Variables.$I$6];[.Q310];[Variables.$I$6];[.R310];[Variables.$I$6];[.S310];[Variables.$I$6];[.T310];IF([.U310]&lt;&gt;&quot;&quot;;CONCATENATE([Variables.$I$6];[.U310]);&quot;&quot;);[Variables.$I$2];[Variables.$I$6]);IF([.B310]&lt;&gt;&quot;&quot;;CONCATENATE(&quot;#&quot;;[.B310]);&quot;&quot;))" office:value-type="string" office:string-value="[&quot;ac5_khand_heavy_skirmisher&quot;,&quot;Variag_Heavy_Skirmisher&quot;,&quot;Variag_Heavy_Skirmishers&quot;,tf_evil_man| tfg_ranged| tf_mounted| tfg_shield| tfg_armor| tfg_helm| tfg_horse| tfg_boots,0,0,fac_khand,[itm_khand_cav_helm_b_good,itm_khand_med_lam, itm_khand_mail, itm_khand_heavy_lam_bad,itm_leather_gloves,itm_splinted_greaves,itm_javelin_big,itm_javelin_big,itm_khand_tulwar,itm_easterling_round_horseman,itm_variag_kataphrakt,],attr_evil_tier_5,wp_tier_5,knows_common|knows_ironflesh_2|knows_power_strike_3|knows_power_throw_5|knows_shield_3|knows_riding_7|knows_horse_archery_6,khand_man1,khand_man2]," calcext:value-type="string">
            <text:p>["ac5_khand_heavy_skirmisher","Variag_Heavy_Skirmisher","Variag_Heavy_Skirmishers",tf_evil_man| tfg_ranged| tf_mounted| tfg_shield| tfg_armor| tfg_helm| tfg_horse| tfg_boots,0,0,fac_khand,[itm_khand_cav_helm_b_good,itm_khand_med_lam, itm_khand_mail, itm_khand_heavy_lam_bad,itm_leather_gloves,itm_splinted_greaves,itm_javelin_big,itm_javelin_big,itm_khand_tulwar,itm_easterling_round_horseman,itm_variag_kataphrakt,],attr_evil_tier_5,wp_tier_5,knows_common|knows_ironflesh_2|knows_power_strike_3|knows_power_throw_5|knows_shield_3|knows_riding_7|knows_horse_archery_6,khand_man1,khand_man2],</text:p>
          </table:table-cell>
          <table:table-cell table:number-columns-repeated="16362"/>
        </table:table-row>
        <table:table-row table:style-name="ro1">
          <table:table-cell table:formula="of:=IF(AND([.B311]&lt;&gt;&quot;&quot;;[.C311]&lt;&gt;&quot;&quot;);CONCATENATE([Variables.$I$1];[Variables.$I$7];[.B311];[Variables.$I$7];[Variables.$I$6];[Variables.$I$7];[.C311];[Variables.$I$7];[Variables.$I$6];[Variables.$I$7];[.D311];[Variables.$I$7];[Variables.$I$6];[.E311];[Variables.$I$6];[.F311];[Variables.$I$6];[.G311];[Variables.$I$6];[.H311];[Variables.$I$6];[Variables.$I$1];[.I311];[.J311];[.K311];[.L311];[.M311];[.N311];[.O311];[Variables.$I$2];[Variables.$I$6];[.P311];[Variables.$I$6];[.Q311];[Variables.$I$6];[.R311];[Variables.$I$6];[.S311];[Variables.$I$6];[.T311];IF([.U311]&lt;&gt;&quot;&quot;;CONCATENATE([Variables.$I$6];[.U311]);&quot;&quot;);[Variables.$I$2];[Variables.$I$6]);IF([.B311]&lt;&gt;&quot;&quot;;CONCATENATE(&quot;#&quot;;[.B311]);&quot;&quot;))">
            <text:p/>
          </table:table-cell>
          <table:table-cell table:style-name="ce6" table:number-columns-repeated="20"/>
          <table:table-cell table:style-name="ce36" table:formula="of:=IF(AND([.B311]&lt;&gt;&quot;&quot;;[.C311]&lt;&gt;&quot;&quot;);CONCATENATE([Variables.$I$1];[Variables.$I$7];[.B311];[Variables.$I$7];[Variables.$I$6];[Variables.$I$7];[.C311];[Variables.$I$7];[Variables.$I$6];[Variables.$I$7];[.D311];[Variables.$I$7];[Variables.$I$6];[.E311];[Variables.$I$6];[.F311];[Variables.$I$6];[.G311];[Variables.$I$6];[.H311];[Variables.$I$6];[Variables.$I$1];[.I311];[.J311];[.K311];[.L311];[.M311];[.N311];[.O311];[Variables.$I$2];[Variables.$I$6];[.P311];[Variables.$I$6];[.Q311];[Variables.$I$6];[.R311];[Variables.$I$6];[.S311];[Variables.$I$6];[.T311];IF([.U311]&lt;&gt;&quot;&quot;;CONCATENATE([Variables.$I$6];[.U311]);&quot;&quot;);[Variables.$I$2];[Variables.$I$6]);IF([.B311]&lt;&gt;&quot;&quot;;CONCATENATE(&quot;#&quot;;[.B311]);&quot;&quot;))">
            <text:p/>
          </table:table-cell>
          <table:table-cell table:number-columns-repeated="16362"/>
        </table:table-row>
        <table:table-row table:style-name="ro1">
          <table:table-cell table:style-name="ce6" table:formula="of:=IF(AND([.B312]&lt;&gt;&quot;&quot;;[.C312]&lt;&gt;&quot;&quot;);CONCATENATE([Variables.$I$1];[Variables.$I$7];[.B312];[Variables.$I$7];[Variables.$I$6];[Variables.$I$7];[.C312];[Variables.$I$7];[Variables.$I$6];[Variables.$I$7];[.D312];[Variables.$I$7];[Variables.$I$6];[.E312];[Variables.$I$6];[.F312];[Variables.$I$6];[.G312];[Variables.$I$6];[.H312];[Variables.$I$6];[Variables.$I$1];[.I312];[.J312];[.K312];[.L312];[.M312];[.N312];[.O312];[Variables.$I$2];[Variables.$I$6];[.P312];[Variables.$I$6];[.Q312];[Variables.$I$6];[.R312];[Variables.$I$6];[.S312];[Variables.$I$6];[.T312];IF([.U312]&lt;&gt;&quot;&quot;;CONCATENATE([Variables.$I$6];[.U312]);&quot;&quot;);[Variables.$I$2];[Variables.$I$6]);IF([.B312]&lt;&gt;&quot;&quot;;CONCATENATE(&quot;#&quot;;[.B312]);&quot;&quot;))" office:value-type="string" office:string-value="#UMBAR #CORSAIRS" calcext:value-type="string">
            <text:p>#UMBAR #CORSAIRS</text:p>
          </table:table-cell>
          <table:table-cell table:style-name="ce5" office:value-type="string" calcext:value-type="string">
            <text:p>UMBAR #CORSAIRS</text:p>
          </table:table-cell>
          <table:table-cell table:style-name="ce6" table:number-columns-repeated="19"/>
          <table:table-cell table:style-name="ce6" table:formula="of:=IF(AND([.B312]&lt;&gt;&quot;&quot;;[.C312]&lt;&gt;&quot;&quot;);CONCATENATE([Variables.$I$1];[Variables.$I$7];[.B312];[Variables.$I$7];[Variables.$I$6];[Variables.$I$7];[.C312];[Variables.$I$7];[Variables.$I$6];[Variables.$I$7];[.D312];[Variables.$I$7];[Variables.$I$6];[.E312];[Variables.$I$6];[.F312];[Variables.$I$6];[.G312];[Variables.$I$6];[.H312];[Variables.$I$6];[Variables.$I$1];[.I312];[.J312];[.K312];[.L312];[.M312];[.N312];[.O312];[Variables.$I$2];[Variables.$I$6];[.P312];[Variables.$I$6];[.Q312];[Variables.$I$6];[.R312];[Variables.$I$6];[.S312];[Variables.$I$6];[.T312];IF([.U312]&lt;&gt;&quot;&quot;;CONCATENATE([Variables.$I$6];[.U312]);&quot;&quot;);[Variables.$I$2];[Variables.$I$6]);IF([.B312]&lt;&gt;&quot;&quot;;CONCATENATE(&quot;#&quot;;[.B312]);&quot;&quot;))" office:value-type="string" office:string-value="#UMBAR #CORSAIRS" calcext:value-type="string">
            <text:p>#UMBAR #CORSAIRS</text:p>
          </table:table-cell>
          <table:table-cell table:number-columns-repeated="16362"/>
        </table:table-row>
        <table:table-row table:style-name="ro1">
          <table:table-cell table:style-name="ce6" table:formula="of:=IF(AND([.B313]&lt;&gt;&quot;&quot;;[.C313]&lt;&gt;&quot;&quot;);CONCATENATE([Variables.$I$1];[Variables.$I$7];[.B313];[Variables.$I$7];[Variables.$I$6];[Variables.$I$7];[.C313];[Variables.$I$7];[Variables.$I$6];[Variables.$I$7];[.D313];[Variables.$I$7];[Variables.$I$6];[.E313];[Variables.$I$6];[.F313];[Variables.$I$6];[.G313];[Variables.$I$6];[.H313];[Variables.$I$6];[Variables.$I$1];[.I313];[.J313];[.K313];[.L313];[.M313];[.N313];[.O313];[Variables.$I$2];[Variables.$I$6];[.P313];[Variables.$I$6];[.Q313];[Variables.$I$6];[.R313];[Variables.$I$6];[.S313];[Variables.$I$6];[.T313];IF([.U313]&lt;&gt;&quot;&quot;;CONCATENATE([Variables.$I$6];[.U313]);&quot;&quot;);[Variables.$I$2];[Variables.$I$6]);IF([.B313]&lt;&gt;&quot;&quot;;CONCATENATE(&quot;#&quot;;[.B313]);&quot;&quot;))" office:value-type="string" office:string-value="[&quot;i1_corsair_youth&quot;,&quot;Umbar_Sailor&quot;,&quot;Umbar_Sailors&quot;,tfg_armor,0,0,fac_umbar,[itm_hood_black,itm_umb_armor_a_bad, itm_umb_armor_a, itm_umb_armor_a_cloak,itm_umb_armor_b_bad,itm_corsair_boots,itm_leather_boots_dark_bad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" calcext:value-type="string">
            <text:p>["i1_corsair_youth","Umbar_Sailor","Umbar_Sailors",tfg_armor,0,0,fac_umbar,[itm_hood_black,itm_umb_armor_a_bad, itm_umb_armor_a, itm_umb_armor_a_cloak,itm_umb_armor_b_bad,itm_corsair_boots,itm_leather_boots_dark_bad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</text:p>
          </table:table-cell>
          <table:table-cell table:style-name="ce7" office:value-type="string" calcext:value-type="string">
            <text:p>i1_corsair_youth</text:p>
          </table:table-cell>
          <table:table-cell table:style-name="ce7" office:value-type="string" calcext:value-type="string">
            <text:p>Umbar_Sailor</text:p>
          </table:table-cell>
          <table:table-cell table:style-name="ce7" office:value-type="string" calcext:value-type="string">
            <text:p>Umbar_Sail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umbar</text:p>
          </table:table-cell>
          <table:table-cell table:style-name="ce11" office:value-type="string" calcext:value-type="string">
            <text:p>itm_hood_black,</text:p>
          </table:table-cell>
          <table:table-cell table:style-name="ce11" office:value-type="string" calcext:value-type="string">
            <text:p>itm_umb_armor_a_bad, itm_umb_armor_a, itm_umb_armor_a_cloak,itm_umb_armor_b_bad,</text:p>
          </table:table-cell>
          <table:table-cell table:style-name="ce11"/>
          <table:table-cell table:style-name="ce11" office:value-type="string" calcext:value-type="string">
            <text:p>itm_corsair_boots,itm_leather_boots_dark_bad,</text:p>
          </table:table-cell>
          <table:table-cell table:style-name="ce11" office:value-type="string" calcext:value-type="string">
            <text:p>itm_shortened_spear,itm_corsair_sword,</text:p>
          </table:table-cell>
          <table:table-cell table:style-name="ce11" table:number-columns-repeated="2"/>
          <table:table-cell table:style-name="ce12" office:value-type="string" calcext:value-type="string">
            <text:p>attr_evil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power_throw_1|knows_power_draw_1|knows_weapon_master_1|knows_athletics_2|knows_looting_2|knows_tactics_2|knows_spotting_1|knows_inventory_management_1|knows_prisoner_management_1|knows_trade_1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B313]&lt;&gt;&quot;&quot;;[.C313]&lt;&gt;&quot;&quot;);CONCATENATE([Variables.$I$1];[Variables.$I$7];[.B313];[Variables.$I$7];[Variables.$I$6];[Variables.$I$7];[.C313];[Variables.$I$7];[Variables.$I$6];[Variables.$I$7];[.D313];[Variables.$I$7];[Variables.$I$6];[.E313];[Variables.$I$6];[.F313];[Variables.$I$6];[.G313];[Variables.$I$6];[.H313];[Variables.$I$6];[Variables.$I$1];[.I313];[.J313];[.K313];[.L313];[.M313];[.N313];[.O313];[Variables.$I$2];[Variables.$I$6];[.P313];[Variables.$I$6];[.Q313];[Variables.$I$6];[.R313];[Variables.$I$6];[.S313];[Variables.$I$6];[.T313];IF([.U313]&lt;&gt;&quot;&quot;;CONCATENATE([Variables.$I$6];[.U313]);&quot;&quot;);[Variables.$I$2];[Variables.$I$6]);IF([.B313]&lt;&gt;&quot;&quot;;CONCATENATE(&quot;#&quot;;[.B313]);&quot;&quot;))" office:value-type="string" office:string-value="[&quot;i1_corsair_youth&quot;,&quot;Umbar_Sailor&quot;,&quot;Umbar_Sailors&quot;,tfg_armor,0,0,fac_umbar,[itm_hood_black,itm_umb_armor_a_bad, itm_umb_armor_a, itm_umb_armor_a_cloak,itm_umb_armor_b_bad,itm_corsair_boots,itm_leather_boots_dark_bad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" calcext:value-type="string">
            <text:p>["i1_corsair_youth","Umbar_Sailor","Umbar_Sailors",tfg_armor,0,0,fac_umbar,[itm_hood_black,itm_umb_armor_a_bad, itm_umb_armor_a, itm_umb_armor_a_cloak,itm_umb_armor_b_bad,itm_corsair_boots,itm_leather_boots_dark_bad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</text:p>
          </table:table-cell>
          <table:table-cell table:number-columns-repeated="16362"/>
        </table:table-row>
        <table:table-row table:style-name="ro1">
          <table:table-cell table:style-name="ce6" table:formula="of:=IF(AND([.B314]&lt;&gt;&quot;&quot;;[.C314]&lt;&gt;&quot;&quot;);CONCATENATE([Variables.$I$1];[Variables.$I$7];[.B314];[Variables.$I$7];[Variables.$I$6];[Variables.$I$7];[.C314];[Variables.$I$7];[Variables.$I$6];[Variables.$I$7];[.D314];[Variables.$I$7];[Variables.$I$6];[.E314];[Variables.$I$6];[.F314];[Variables.$I$6];[.G314];[Variables.$I$6];[.H314];[Variables.$I$6];[Variables.$I$1];[.I314];[.J314];[.K314];[.L314];[.M314];[.N314];[.O314];[Variables.$I$2];[Variables.$I$6];[.P314];[Variables.$I$6];[.Q314];[Variables.$I$6];[.R314];[Variables.$I$6];[.S314];[Variables.$I$6];[.T314];IF([.U314]&lt;&gt;&quot;&quot;;CONCATENATE([Variables.$I$6];[.U314]);&quot;&quot;);[Variables.$I$2];[Variables.$I$6]);IF([.B314]&lt;&gt;&quot;&quot;;CONCATENATE(&quot;#&quot;;[.B314]);&quot;&quot;))" office:value-type="string" office:string-value="[&quot;i2_corsair_warrior&quot;,&quot;Umbar_Warrior&quot;,&quot;Umbar_Warriors&quot;,tfg_armor,0,0,fac_umbar,[itm_hood_black,itm_umb_helm_d,itm_umb_armor_a_good, itm_umb_armor_a_cloak,itm_umb_armor_b,itm_umb_armor_b_cloak,itm_corsair_boots,itm_leather_boots_dark_bad,itm_shortened_spear,itm_corsair_sword,itm_umbar_rapier,itm_umb_shield_b_bad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" calcext:value-type="string">
            <text:p>["i2_corsair_warrior","Umbar_Warrior","Umbar_Warriors",tfg_armor,0,0,fac_umbar,[itm_hood_black,itm_umb_helm_d,itm_umb_armor_a_good, itm_umb_armor_a_cloak,itm_umb_armor_b,itm_umb_armor_b_cloak,itm_corsair_boots,itm_leather_boots_dark_bad,itm_shortened_spear,itm_corsair_sword,itm_umbar_rapier,itm_umb_shield_b_bad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</text:p>
          </table:table-cell>
          <table:table-cell table:style-name="ce7" office:value-type="string" calcext:value-type="string">
            <text:p>i2_corsair_warrior</text:p>
          </table:table-cell>
          <table:table-cell table:style-name="ce7" office:value-type="string" calcext:value-type="string">
            <text:p>Umbar_Warrior</text:p>
          </table:table-cell>
          <table:table-cell table:style-name="ce7" office:value-type="string" calcext:value-type="string">
            <text:p>Umbar_Warri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umbar</text:p>
          </table:table-cell>
          <table:table-cell table:style-name="ce11" office:value-type="string" calcext:value-type="string">
            <text:p>itm_hood_black,itm_umb_helm_d,</text:p>
          </table:table-cell>
          <table:table-cell table:style-name="ce11" office:value-type="string" calcext:value-type="string">
            <text:p>itm_umb_armor_a_good, itm_umb_armor_a_cloak,itm_umb_armor_b,itm_umb_armor_b_cloak,</text:p>
          </table:table-cell>
          <table:table-cell table:style-name="ce11"/>
          <table:table-cell table:style-name="ce11" office:value-type="string" calcext:value-type="string">
            <text:p>itm_corsair_boots,itm_leather_boots_dark_bad,</text:p>
          </table:table-cell>
          <table:table-cell table:style-name="ce11" office:value-type="string" calcext:value-type="string">
            <text:p>itm_shortened_spear,itm_corsair_sword,itm_umbar_rapier,</text:p>
          </table:table-cell>
          <table:table-cell table:style-name="ce11" office:value-type="string" calcext:value-type="string">
            <text:p>itm_umb_shield_b_bad,</text:p>
          </table:table-cell>
          <table:table-cell table:style-name="ce11"/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power_strike_1|knows_power_throw_1|knows_power_draw_1|knows_weapon_master_1|knows_shield_1|knows_athletics_3|knows_looting_2|knows_tactics_2|knows_spotting_1|knows_inventory_management_1|knows_prisoner_management_1|knows_trade_1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B314]&lt;&gt;&quot;&quot;;[.C314]&lt;&gt;&quot;&quot;);CONCATENATE([Variables.$I$1];[Variables.$I$7];[.B314];[Variables.$I$7];[Variables.$I$6];[Variables.$I$7];[.C314];[Variables.$I$7];[Variables.$I$6];[Variables.$I$7];[.D314];[Variables.$I$7];[Variables.$I$6];[.E314];[Variables.$I$6];[.F314];[Variables.$I$6];[.G314];[Variables.$I$6];[.H314];[Variables.$I$6];[Variables.$I$1];[.I314];[.J314];[.K314];[.L314];[.M314];[.N314];[.O314];[Variables.$I$2];[Variables.$I$6];[.P314];[Variables.$I$6];[.Q314];[Variables.$I$6];[.R314];[Variables.$I$6];[.S314];[Variables.$I$6];[.T314];IF([.U314]&lt;&gt;&quot;&quot;;CONCATENATE([Variables.$I$6];[.U314]);&quot;&quot;);[Variables.$I$2];[Variables.$I$6]);IF([.B314]&lt;&gt;&quot;&quot;;CONCATENATE(&quot;#&quot;;[.B314]);&quot;&quot;))" office:value-type="string" office:string-value="[&quot;i2_corsair_warrior&quot;,&quot;Umbar_Warrior&quot;,&quot;Umbar_Warriors&quot;,tfg_armor,0,0,fac_umbar,[itm_hood_black,itm_umb_helm_d,itm_umb_armor_a_good, itm_umb_armor_a_cloak,itm_umb_armor_b,itm_umb_armor_b_cloak,itm_corsair_boots,itm_leather_boots_dark_bad,itm_shortened_spear,itm_corsair_sword,itm_umbar_rapier,itm_umb_shield_b_bad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" calcext:value-type="string">
            <text:p>["i2_corsair_warrior","Umbar_Warrior","Umbar_Warriors",tfg_armor,0,0,fac_umbar,[itm_hood_black,itm_umb_helm_d,itm_umb_armor_a_good, itm_umb_armor_a_cloak,itm_umb_armor_b,itm_umb_armor_b_cloak,itm_corsair_boots,itm_leather_boots_dark_bad,itm_shortened_spear,itm_corsair_sword,itm_umbar_rapier,itm_umb_shield_b_bad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</text:p>
          </table:table-cell>
          <table:table-cell table:number-columns-repeated="16362"/>
        </table:table-row>
        <table:table-row table:style-name="ro1">
          <table:table-cell table:style-name="ce6" table:formula="of:=IF(AND([.B315]&lt;&gt;&quot;&quot;;[.C315]&lt;&gt;&quot;&quot;);CONCATENATE([Variables.$I$1];[Variables.$I$7];[.B315];[Variables.$I$7];[Variables.$I$6];[Variables.$I$7];[.C315];[Variables.$I$7];[Variables.$I$6];[Variables.$I$7];[.D315];[Variables.$I$7];[Variables.$I$6];[.E315];[Variables.$I$6];[.F315];[Variables.$I$6];[.G315];[Variables.$I$6];[.H315];[Variables.$I$6];[Variables.$I$1];[.I315];[.J315];[.K315];[.L315];[.M315];[.N315];[.O315];[Variables.$I$2];[Variables.$I$6];[.P315];[Variables.$I$6];[.Q315];[Variables.$I$6];[.R315];[Variables.$I$6];[.S315];[Variables.$I$6];[.T315];IF([.U315]&lt;&gt;&quot;&quot;;CONCATENATE([Variables.$I$6];[.U315]);&quot;&quot;);[Variables.$I$2];[Variables.$I$6]);IF([.B315]&lt;&gt;&quot;&quot;;CONCATENATE(&quot;#&quot;;[.B315]);&quot;&quot;))" office:value-type="string" office:string-value="[&quot;i3_corsair_spearman&quot;,&quot;Spearman_of_Umbar&quot;,&quot;Spearmen_of_Umbar&quot;,tfg_armor| tfg_helm| tfg_boots,0,0,fac_umbar,[itm_umb_helm_d,itm_umb_helm_c,itm_umb_armor_b_good, itm_umb_armor_c, itm_umb_armor_c_bad,itm_corsair_boots,itm_leather_boots_dark_bad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c,itm_umb_armor_b_good, itm_umb_armor_c, itm_umb_armor_c_bad,itm_corsair_boots,itm_leather_boots_dark_bad,itm_shortened_spear,itm_umb_shield_a,],attr_evil_tier_3,wp_tier_3,knows_common|knows_athletics_2|knows_shield_2|knows_power_strike_2,bandit_face1,bandit_face2],</text:p>
          </table:table-cell>
          <table:table-cell table:style-name="ce7" office:value-type="string" calcext:value-type="string">
            <text:p>i3_corsair_spearman</text:p>
          </table:table-cell>
          <table:table-cell table:style-name="ce7" office:value-type="string" calcext:value-type="string">
            <text:p>Spearman_of_Umbar</text:p>
          </table:table-cell>
          <table:table-cell table:style-name="ce7" office:value-type="string" calcext:value-type="string">
            <text:p>Spearmen_of_Umbar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umbar</text:p>
          </table:table-cell>
          <table:table-cell table:style-name="ce11" office:value-type="string" calcext:value-type="string">
            <text:p>itm_umb_helm_d,itm_umb_helm_c,</text:p>
          </table:table-cell>
          <table:table-cell table:style-name="ce11" office:value-type="string" calcext:value-type="string">
            <text:p>itm_umb_armor_b_good, itm_umb_armor_c, itm_umb_armor_c_bad,</text:p>
          </table:table-cell>
          <table:table-cell table:style-name="ce11"/>
          <table:table-cell table:style-name="ce11" office:value-type="string" calcext:value-type="string">
            <text:p>itm_corsair_boots,itm_leather_boots_dark_bad,</text:p>
          </table:table-cell>
          <table:table-cell table:style-name="ce11" office:value-type="string" calcext:value-type="string">
            <text:p>itm_shortened_spear,</text:p>
          </table:table-cell>
          <table:table-cell table:style-name="ce11" office:value-type="string" calcext:value-type="string">
            <text:p>itm_umb_shield_a,</text:p>
          </table:table-cell>
          <table:table-cell table:style-name="ce11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2|knows_shield_2|knows_power_strike_2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B315]&lt;&gt;&quot;&quot;;[.C315]&lt;&gt;&quot;&quot;);CONCATENATE([Variables.$I$1];[Variables.$I$7];[.B315];[Variables.$I$7];[Variables.$I$6];[Variables.$I$7];[.C315];[Variables.$I$7];[Variables.$I$6];[Variables.$I$7];[.D315];[Variables.$I$7];[Variables.$I$6];[.E315];[Variables.$I$6];[.F315];[Variables.$I$6];[.G315];[Variables.$I$6];[.H315];[Variables.$I$6];[Variables.$I$1];[.I315];[.J315];[.K315];[.L315];[.M315];[.N315];[.O315];[Variables.$I$2];[Variables.$I$6];[.P315];[Variables.$I$6];[.Q315];[Variables.$I$6];[.R315];[Variables.$I$6];[.S315];[Variables.$I$6];[.T315];IF([.U315]&lt;&gt;&quot;&quot;;CONCATENATE([Variables.$I$6];[.U315]);&quot;&quot;);[Variables.$I$2];[Variables.$I$6]);IF([.B315]&lt;&gt;&quot;&quot;;CONCATENATE(&quot;#&quot;;[.B315]);&quot;&quot;))" office:value-type="string" office:string-value="[&quot;i3_corsair_spearman&quot;,&quot;Spearman_of_Umbar&quot;,&quot;Spearmen_of_Umbar&quot;,tfg_armor| tfg_helm| tfg_boots,0,0,fac_umbar,[itm_umb_helm_d,itm_umb_helm_c,itm_umb_armor_b_good, itm_umb_armor_c, itm_umb_armor_c_bad,itm_corsair_boots,itm_leather_boots_dark_bad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c,itm_umb_armor_b_good, itm_umb_armor_c, itm_umb_armor_c_bad,itm_corsair_boots,itm_leather_boots_dark_bad,itm_shortened_spear,itm_umb_shield_a,],attr_evil_tier_3,wp_tier_3,knows_common|knows_athletics_2|knows_shield_2|knows_power_strike_2,bandit_face1,bandit_face2],</text:p>
          </table:table-cell>
          <table:table-cell table:number-columns-repeated="16362"/>
        </table:table-row>
        <table:table-row table:style-name="ro1">
          <table:table-cell table:style-name="ce6" table:formula="of:=IF(AND([.B316]&lt;&gt;&quot;&quot;;[.C316]&lt;&gt;&quot;&quot;);CONCATENATE([Variables.$I$1];[Variables.$I$7];[.B316];[Variables.$I$7];[Variables.$I$6];[Variables.$I$7];[.C316];[Variables.$I$7];[Variables.$I$6];[Variables.$I$7];[.D316];[Variables.$I$7];[Variables.$I$6];[.E316];[Variables.$I$6];[.F316];[Variables.$I$6];[.G316];[Variables.$I$6];[.H316];[Variables.$I$6];[Variables.$I$1];[.I316];[.J316];[.K316];[.L316];[.M316];[.N316];[.O316];[Variables.$I$2];[Variables.$I$6];[.P316];[Variables.$I$6];[.Q316];[Variables.$I$6];[.R316];[Variables.$I$6];[.S316];[Variables.$I$6];[.T316];IF([.U316]&lt;&gt;&quot;&quot;;CONCATENATE([Variables.$I$6];[.U316]);&quot;&quot;);[Variables.$I$2];[Variables.$I$6]);IF([.B316]&lt;&gt;&quot;&quot;;CONCATENATE(&quot;#&quot;;[.B316]);&quot;&quot;))" office:value-type="string" office:string-value="[&quot;i4_corsair_raider&quot;,&quot;Corsair_Raider&quot;,&quot;Corsair_Raiders&quot;,tfg_armor| tfg_boots,0,0,fac_umbar,[itm_hood_black,itm_umb_armor_a_good,itm_umb_armor_a_lordly,itm_umb_armor_b_good, itm_umb_armor_b_cloak,itm_corsair_boots,itm_umbar_rapier,itm_corsair_harpoon,itm_corsair_harpoon,itm_umb_shield_b_bad, itm_umb_shield_b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hood_black,itm_umb_armor_a_good,itm_umb_armor_a_lordly,itm_umb_armor_b_good, itm_umb_armor_b_cloak,itm_corsair_boots,itm_umbar_rapier,itm_corsair_harpoon,itm_corsair_harpoon,itm_umb_shield_b_bad, itm_umb_shield_b,],attr_evil_tier_4,wp_tier_4,knows_common|knows_athletics_6|knows_shield_2|knows_power_throw_3|knows_power_strike_3,bandit_face1,bandit_face2],</text:p>
          </table:table-cell>
          <table:table-cell table:style-name="ce7" office:value-type="string" calcext:value-type="string">
            <text:p>i4_corsair_raider</text:p>
          </table:table-cell>
          <table:table-cell table:style-name="ce7" office:value-type="string" calcext:value-type="string">
            <text:p>Corsair_Raider</text:p>
          </table:table-cell>
          <table:table-cell table:style-name="ce7" office:value-type="string" calcext:value-type="string">
            <text:p>Corsair_Raid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umbar</text:p>
          </table:table-cell>
          <table:table-cell table:style-name="ce11" office:value-type="string" calcext:value-type="string">
            <text:p>itm_hood_black,</text:p>
          </table:table-cell>
          <table:table-cell table:style-name="ce11" office:value-type="string" calcext:value-type="string">
            <text:p>itm_umb_armor_a_good,itm_umb_armor_a_lordly,itm_umb_armor_b_good, itm_umb_armor_b_cloak,</text:p>
          </table:table-cell>
          <table:table-cell table:style-name="ce11"/>
          <table:table-cell table:style-name="ce11" office:value-type="string" calcext:value-type="string">
            <text:p>itm_corsair_boots,</text:p>
          </table:table-cell>
          <table:table-cell table:style-name="ce11" office:value-type="string" calcext:value-type="string">
            <text:p>itm_umbar_rapier,itm_corsair_harpoon,itm_corsair_harpoon,</text:p>
          </table:table-cell>
          <table:table-cell table:style-name="ce11" office:value-type="string" calcext:value-type="string">
            <text:p>itm_umb_shield_b_bad, itm_umb_shield_b,</text:p>
          </table:table-cell>
          <table:table-cell table:style-name="ce11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6|knows_shield_2|knows_power_throw_3|knows_power_strike_3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B316]&lt;&gt;&quot;&quot;;[.C316]&lt;&gt;&quot;&quot;);CONCATENATE([Variables.$I$1];[Variables.$I$7];[.B316];[Variables.$I$7];[Variables.$I$6];[Variables.$I$7];[.C316];[Variables.$I$7];[Variables.$I$6];[Variables.$I$7];[.D316];[Variables.$I$7];[Variables.$I$6];[.E316];[Variables.$I$6];[.F316];[Variables.$I$6];[.G316];[Variables.$I$6];[.H316];[Variables.$I$6];[Variables.$I$1];[.I316];[.J316];[.K316];[.L316];[.M316];[.N316];[.O316];[Variables.$I$2];[Variables.$I$6];[.P316];[Variables.$I$6];[.Q316];[Variables.$I$6];[.R316];[Variables.$I$6];[.S316];[Variables.$I$6];[.T316];IF([.U316]&lt;&gt;&quot;&quot;;CONCATENATE([Variables.$I$6];[.U316]);&quot;&quot;);[Variables.$I$2];[Variables.$I$6]);IF([.B316]&lt;&gt;&quot;&quot;;CONCATENATE(&quot;#&quot;;[.B316]);&quot;&quot;))" office:value-type="string" office:string-value="[&quot;i4_corsair_raider&quot;,&quot;Corsair_Raider&quot;,&quot;Corsair_Raiders&quot;,tfg_armor| tfg_boots,0,0,fac_umbar,[itm_hood_black,itm_umb_armor_a_good,itm_umb_armor_a_lordly,itm_umb_armor_b_good, itm_umb_armor_b_cloak,itm_corsair_boots,itm_umbar_rapier,itm_corsair_harpoon,itm_corsair_harpoon,itm_umb_shield_b_bad, itm_umb_shield_b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hood_black,itm_umb_armor_a_good,itm_umb_armor_a_lordly,itm_umb_armor_b_good, itm_umb_armor_b_cloak,itm_corsair_boots,itm_umbar_rapier,itm_corsair_harpoon,itm_corsair_harpoon,itm_umb_shield_b_bad, itm_umb_shield_b,],attr_evil_tier_4,wp_tier_4,knows_common|knows_athletics_6|knows_shield_2|knows_power_throw_3|knows_power_strike_3,bandit_face1,bandit_face2],</text:p>
          </table:table-cell>
          <table:table-cell table:number-columns-repeated="16362"/>
        </table:table-row>
        <table:table-row table:style-name="ro1">
          <table:table-cell table:style-name="ce6" table:formula="of:=IF(AND([.B317]&lt;&gt;&quot;&quot;;[.C317]&lt;&gt;&quot;&quot;);CONCATENATE([Variables.$I$1];[Variables.$I$7];[.B317];[Variables.$I$7];[Variables.$I$6];[Variables.$I$7];[.C317];[Variables.$I$7];[Variables.$I$6];[Variables.$I$7];[.D317];[Variables.$I$7];[Variables.$I$6];[.E317];[Variables.$I$6];[.F317];[Variables.$I$6];[.G317];[Variables.$I$6];[.H317];[Variables.$I$6];[Variables.$I$1];[.I317];[.J317];[.K317];[.L317];[.M317];[.N317];[.O317];[Variables.$I$2];[Variables.$I$6];[.P317];[Variables.$I$6];[.Q317];[Variables.$I$6];[.R317];[Variables.$I$6];[.S317];[Variables.$I$6];[.T317];IF([.U317]&lt;&gt;&quot;&quot;;CONCATENATE([Variables.$I$6];[.U317]);&quot;&quot;);[Variables.$I$2];[Variables.$I$6]);IF([.B317]&lt;&gt;&quot;&quot;;CONCATENATE(&quot;#&quot;;[.B317]);&quot;&quot;))" office:value-type="string" office:string-value="[&quot;i5_corsair_night_raider&quot;,&quot;Corsair_Night_Raider&quot;,&quot;Corsair_Night_Raiders&quot;,tfg_armor| tfg_helm| tfg_boots,0,0,fac_umbar,[itm_hood_black_good,itm_umb_armor_d, itm_umb_armor_d_cloak,itm_umb_armor_c_lordly,itm_leather_gloves,itm_corsair_boots,itm_umbar_rapier,itm_corsair_harpoon,itm_corsair_harpoon,itm_umb_shield_b,itm_marker_night_troop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hood_black_good,itm_umb_armor_d, itm_umb_armor_d_cloak,itm_umb_armor_c_lordly,itm_leather_gloves,itm_corsair_boots,itm_umbar_rapier,itm_corsair_harpoon,itm_corsair_harpoon,itm_umb_shield_b,itm_marker_night_troop,],attr_evil_tier_5,wp_tier_5,knows_common|knows_athletics_8|knows_shield_4|knows_power_strike_4|knows_ironflesh_3|knows_power_throw_5,bandit_face1,bandit_face2],</text:p>
          </table:table-cell>
          <table:table-cell table:style-name="ce7" office:value-type="string" calcext:value-type="string">
            <text:p>i5_corsair_night_raider</text:p>
          </table:table-cell>
          <table:table-cell table:style-name="ce7" office:value-type="string" calcext:value-type="string">
            <text:p>Corsair_Night_Raider</text:p>
          </table:table-cell>
          <table:table-cell table:style-name="ce7" office:value-type="string" calcext:value-type="string">
            <text:p>Corsair_Night_Raiders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umbar</text:p>
          </table:table-cell>
          <table:table-cell table:style-name="ce11" office:value-type="string" calcext:value-type="string">
            <text:p>itm_hood_black_good,</text:p>
          </table:table-cell>
          <table:table-cell table:style-name="ce11" office:value-type="string" calcext:value-type="string">
            <text:p>itm_umb_armor_d, itm_umb_armor_d_cloak,itm_umb_armor_c_lordly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corsair_boots,</text:p>
          </table:table-cell>
          <table:table-cell table:style-name="ce11" office:value-type="string" calcext:value-type="string">
            <text:p>itm_umbar_rapier,itm_corsair_harpoon,itm_corsair_harpoon,</text:p>
          </table:table-cell>
          <table:table-cell table:style-name="ce11" office:value-type="string" calcext:value-type="string">
            <text:p>itm_umb_shield_b,</text:p>
          </table:table-cell>
          <table:table-cell table:style-name="ce11" office:value-type="string" calcext:value-type="string">
            <text:p>itm_marker_night_troop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8|knows_shield_4|knows_power_strike_4|knows_ironflesh_3|knows_power_throw_5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B317]&lt;&gt;&quot;&quot;;[.C317]&lt;&gt;&quot;&quot;);CONCATENATE([Variables.$I$1];[Variables.$I$7];[.B317];[Variables.$I$7];[Variables.$I$6];[Variables.$I$7];[.C317];[Variables.$I$7];[Variables.$I$6];[Variables.$I$7];[.D317];[Variables.$I$7];[Variables.$I$6];[.E317];[Variables.$I$6];[.F317];[Variables.$I$6];[.G317];[Variables.$I$6];[.H317];[Variables.$I$6];[Variables.$I$1];[.I317];[.J317];[.K317];[.L317];[.M317];[.N317];[.O317];[Variables.$I$2];[Variables.$I$6];[.P317];[Variables.$I$6];[.Q317];[Variables.$I$6];[.R317];[Variables.$I$6];[.S317];[Variables.$I$6];[.T317];IF([.U317]&lt;&gt;&quot;&quot;;CONCATENATE([Variables.$I$6];[.U317]);&quot;&quot;);[Variables.$I$2];[Variables.$I$6]);IF([.B317]&lt;&gt;&quot;&quot;;CONCATENATE(&quot;#&quot;;[.B317]);&quot;&quot;))" office:value-type="string" office:string-value="[&quot;i5_corsair_night_raider&quot;,&quot;Corsair_Night_Raider&quot;,&quot;Corsair_Night_Raiders&quot;,tfg_armor| tfg_helm| tfg_boots,0,0,fac_umbar,[itm_hood_black_good,itm_umb_armor_d, itm_umb_armor_d_cloak,itm_umb_armor_c_lordly,itm_leather_gloves,itm_corsair_boots,itm_umbar_rapier,itm_corsair_harpoon,itm_corsair_harpoon,itm_umb_shield_b,itm_marker_night_troop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hood_black_good,itm_umb_armor_d, itm_umb_armor_d_cloak,itm_umb_armor_c_lordly,itm_leather_gloves,itm_corsair_boots,itm_umbar_rapier,itm_corsair_harpoon,itm_corsair_harpoon,itm_umb_shield_b,itm_marker_night_troop,],attr_evil_tier_5,wp_tier_5,knows_common|knows_athletics_8|knows_shield_4|knows_power_strike_4|knows_ironflesh_3|knows_power_throw_5,bandit_face1,bandit_face2],</text:p>
          </table:table-cell>
          <table:table-cell table:number-columns-repeated="16362"/>
        </table:table-row>
        <table:table-row table:style-name="ro1">
          <table:table-cell table:style-name="ce6" table:formula="of:=IF(AND([.B318]&lt;&gt;&quot;&quot;;[.C318]&lt;&gt;&quot;&quot;);CONCATENATE([Variables.$I$1];[Variables.$I$7];[.B318];[Variables.$I$7];[Variables.$I$6];[Variables.$I$7];[.C318];[Variables.$I$7];[Variables.$I$6];[Variables.$I$7];[.D318];[Variables.$I$7];[Variables.$I$6];[.E318];[Variables.$I$6];[.F318];[Variables.$I$6];[.G318];[Variables.$I$6];[.H318];[Variables.$I$6];[Variables.$I$1];[.I318];[.J318];[.K318];[.L318];[.M318];[.N318];[.O318];[Variables.$I$2];[Variables.$I$6];[.P318];[Variables.$I$6];[.Q318];[Variables.$I$6];[.R318];[Variables.$I$6];[.S318];[Variables.$I$6];[.T318];IF([.U318]&lt;&gt;&quot;&quot;;CONCATENATE([Variables.$I$6];[.U318]);&quot;&quot;);[Variables.$I$2];[Variables.$I$6]);IF([.B318]&lt;&gt;&quot;&quot;;CONCATENATE(&quot;#&quot;;[.B318]);&quot;&quot;))" office:value-type="string" office:string-value="[&quot;a2_corsair_marine&quot;,&quot;Umbar_Marine&quot;,&quot;Umbar_Marines&quot;,tfg_ranged| tfg_armor,0,0,fac_umbar,[itm_hood_black,itm_umb_armor_a_bad, itm_umb_armor_a, itm_umb_armor_a_cloak,itm_umb_armor_b_bad,itm_corsair_boots,itm_short_bow, itm_regular_bow,itm_corsair_arrows,itm_corsair_throwing_dagger,itm_corsair_sword,itm_umb_shield_b_bad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" calcext:value-type="string">
            <text:p>["a2_corsair_marine","Umbar_Marine","Umbar_Marines",tfg_ranged| tfg_armor,0,0,fac_umbar,[itm_hood_black,itm_umb_armor_a_bad, itm_umb_armor_a, itm_umb_armor_a_cloak,itm_umb_armor_b_bad,itm_corsair_boots,itm_short_bow, itm_regular_bow,itm_corsair_arrows,itm_corsair_throwing_dagger,itm_corsair_sword,itm_umb_shield_b_bad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</text:p>
          </table:table-cell>
          <table:table-cell table:style-name="ce7" office:value-type="string" calcext:value-type="string">
            <text:p>a2_corsair_marine</text:p>
          </table:table-cell>
          <table:table-cell table:style-name="ce7" office:value-type="string" calcext:value-type="string">
            <text:p>Umbar_Marine</text:p>
          </table:table-cell>
          <table:table-cell table:style-name="ce7" office:value-type="string" calcext:value-type="string">
            <text:p>Umbar_Marines</text:p>
          </table:table-cell>
          <table:table-cell table:style-name="ce8" office:value-type="string" calcext:value-type="string">
            <text:p>tfg_rang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umbar</text:p>
          </table:table-cell>
          <table:table-cell table:style-name="ce11" office:value-type="string" calcext:value-type="string">
            <text:p>itm_hood_black,</text:p>
          </table:table-cell>
          <table:table-cell table:style-name="ce11" office:value-type="string" calcext:value-type="string">
            <text:p>itm_umb_armor_a_bad, itm_umb_armor_a, itm_umb_armor_a_cloak,itm_umb_armor_b_bad,</text:p>
          </table:table-cell>
          <table:table-cell table:style-name="ce11"/>
          <table:table-cell table:style-name="ce11" office:value-type="string" calcext:value-type="string">
            <text:p>itm_corsair_boots,</text:p>
          </table:table-cell>
          <table:table-cell table:style-name="ce11" office:value-type="string" calcext:value-type="string">
            <text:p>itm_short_bow, itm_regular_bow,itm_corsair_arrows,itm_corsair_throwing_dagger,</text:p>
          </table:table-cell>
          <table:table-cell table:style-name="ce30" office:value-type="string" calcext:value-type="string">
            <text:p>itm_corsair_sword,itm_umb_shield_b_bad,</text:p>
          </table:table-cell>
          <table:table-cell table:style-name="ce11"/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bow_2</text:p>
          </table:table-cell>
          <table:table-cell table:style-name="ce13" office:value-type="string" calcext:value-type="string">
            <text:p>knows_common|knows_ironflesh_1|knows_power_throw_1|knows_power_draw_2|knows_weapon_master_1|knows_athletics_3|knows_looting_2|knows_tactics_2|knows_spotting_1|knows_inventory_management_1|knows_prisoner_management_1|knows_trade_1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B318]&lt;&gt;&quot;&quot;;[.C318]&lt;&gt;&quot;&quot;);CONCATENATE([Variables.$I$1];[Variables.$I$7];[.B318];[Variables.$I$7];[Variables.$I$6];[Variables.$I$7];[.C318];[Variables.$I$7];[Variables.$I$6];[Variables.$I$7];[.D318];[Variables.$I$7];[Variables.$I$6];[.E318];[Variables.$I$6];[.F318];[Variables.$I$6];[.G318];[Variables.$I$6];[.H318];[Variables.$I$6];[Variables.$I$1];[.I318];[.J318];[.K318];[.L318];[.M318];[.N318];[.O318];[Variables.$I$2];[Variables.$I$6];[.P318];[Variables.$I$6];[.Q318];[Variables.$I$6];[.R318];[Variables.$I$6];[.S318];[Variables.$I$6];[.T318];IF([.U318]&lt;&gt;&quot;&quot;;CONCATENATE([Variables.$I$6];[.U318]);&quot;&quot;);[Variables.$I$2];[Variables.$I$6]);IF([.B318]&lt;&gt;&quot;&quot;;CONCATENATE(&quot;#&quot;;[.B318]);&quot;&quot;))" office:value-type="string" office:string-value="[&quot;a2_corsair_marine&quot;,&quot;Umbar_Marine&quot;,&quot;Umbar_Marines&quot;,tfg_ranged| tfg_armor,0,0,fac_umbar,[itm_hood_black,itm_umb_armor_a_bad, itm_umb_armor_a, itm_umb_armor_a_cloak,itm_umb_armor_b_bad,itm_corsair_boots,itm_short_bow, itm_regular_bow,itm_corsair_arrows,itm_corsair_throwing_dagger,itm_corsair_sword,itm_umb_shield_b_bad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" calcext:value-type="string">
            <text:p>["a2_corsair_marine","Umbar_Marine","Umbar_Marines",tfg_ranged| tfg_armor,0,0,fac_umbar,[itm_hood_black,itm_umb_armor_a_bad, itm_umb_armor_a, itm_umb_armor_a_cloak,itm_umb_armor_b_bad,itm_corsair_boots,itm_short_bow, itm_regular_bow,itm_corsair_arrows,itm_corsair_throwing_dagger,itm_corsair_sword,itm_umb_shield_b_bad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</text:p>
          </table:table-cell>
          <table:table-cell table:number-columns-repeated="16362"/>
        </table:table-row>
        <table:table-row table:style-name="ro1">
          <table:table-cell table:style-name="ce6" table:formula="of:=IF(AND([.B319]&lt;&gt;&quot;&quot;;[.C319]&lt;&gt;&quot;&quot;);CONCATENATE([Variables.$I$1];[Variables.$I$7];[.B319];[Variables.$I$7];[Variables.$I$6];[Variables.$I$7];[.C319];[Variables.$I$7];[Variables.$I$6];[Variables.$I$7];[.D319];[Variables.$I$7];[Variables.$I$6];[.E319];[Variables.$I$6];[.F319];[Variables.$I$6];[.G319];[Variables.$I$6];[.H319];[Variables.$I$6];[Variables.$I$1];[.I319];[.J319];[.K319];[.L319];[.M319];[.N319];[.O319];[Variables.$I$2];[Variables.$I$6];[.P319];[Variables.$I$6];[.Q319];[Variables.$I$6];[.R319];[Variables.$I$6];[.S319];[Variables.$I$6];[.T319];IF([.U319]&lt;&gt;&quot;&quot;;CONCATENATE([Variables.$I$6];[.U319]);&quot;&quot;);[Variables.$I$2];[Variables.$I$6]);IF([.B319]&lt;&gt;&quot;&quot;;CONCATENATE(&quot;#&quot;;[.B319]);&quot;&quot;))" office:value-type="string" office:string-value="[&quot;a3_corsair_marksman&quot;,&quot;Marksman_of_Umbar&quot;,&quot;Marksmen_of_Umbar&quot;,tfg_ranged| tfg_armor| tfg_boots,0,0,fac_umbar,[itm_umb_helm_d,itm_umb_helm_c,itm_umb_armor_b, itm_umb_armor_b_cloak, itm_umb_armor_a_good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d,itm_umb_helm_c,itm_umb_armor_b, itm_umb_armor_b_cloak, itm_umb_armor_a_good,itm_corsair_boots,itm_regular_bow,itm_corsair_arrows,itm_corsair_sword,],attr_evil_tier_3,wp_tier_bow_3,knows_common|knows_athletics_3|knows_power_draw_2|knows_ironflesh_1,bandit_face1,bandit_face2],</text:p>
          </table:table-cell>
          <table:table-cell table:style-name="ce7" office:value-type="string" calcext:value-type="string">
            <text:p>a3_corsair_marksman</text:p>
          </table:table-cell>
          <table:table-cell table:style-name="ce7" office:value-type="string" calcext:value-type="string">
            <text:p>Marksman_of_Umbar</text:p>
          </table:table-cell>
          <table:table-cell table:style-name="ce7" office:value-type="string" calcext:value-type="string">
            <text:p>Marksmen_of_Umbar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umbar</text:p>
          </table:table-cell>
          <table:table-cell table:style-name="ce11" office:value-type="string" calcext:value-type="string">
            <text:p>itm_umb_helm_d,itm_umb_helm_c,</text:p>
          </table:table-cell>
          <table:table-cell table:style-name="ce11" office:value-type="string" calcext:value-type="string">
            <text:p>itm_umb_armor_b, itm_umb_armor_b_cloak, itm_umb_armor_a_good,</text:p>
          </table:table-cell>
          <table:table-cell table:style-name="ce11"/>
          <table:table-cell table:style-name="ce11" office:value-type="string" calcext:value-type="string">
            <text:p>itm_corsair_boots,</text:p>
          </table:table-cell>
          <table:table-cell table:style-name="ce11" office:value-type="string" calcext:value-type="string">
            <text:p>itm_regular_bow,itm_corsair_arrows,</text:p>
          </table:table-cell>
          <table:table-cell table:style-name="ce11" office:value-type="string" calcext:value-type="string">
            <text:p>itm_corsair_sword,</text:p>
          </table:table-cell>
          <table:table-cell table:style-name="ce11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bow_3</text:p>
          </table:table-cell>
          <table:table-cell table:style-name="ce12" office:value-type="string" calcext:value-type="string">
            <text:p>knows_common|knows_athletics_3|knows_power_draw_2|knows_ironflesh_1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B319]&lt;&gt;&quot;&quot;;[.C319]&lt;&gt;&quot;&quot;);CONCATENATE([Variables.$I$1];[Variables.$I$7];[.B319];[Variables.$I$7];[Variables.$I$6];[Variables.$I$7];[.C319];[Variables.$I$7];[Variables.$I$6];[Variables.$I$7];[.D319];[Variables.$I$7];[Variables.$I$6];[.E319];[Variables.$I$6];[.F319];[Variables.$I$6];[.G319];[Variables.$I$6];[.H319];[Variables.$I$6];[Variables.$I$1];[.I319];[.J319];[.K319];[.L319];[.M319];[.N319];[.O319];[Variables.$I$2];[Variables.$I$6];[.P319];[Variables.$I$6];[.Q319];[Variables.$I$6];[.R319];[Variables.$I$6];[.S319];[Variables.$I$6];[.T319];IF([.U319]&lt;&gt;&quot;&quot;;CONCATENATE([Variables.$I$6];[.U319]);&quot;&quot;);[Variables.$I$2];[Variables.$I$6]);IF([.B319]&lt;&gt;&quot;&quot;;CONCATENATE(&quot;#&quot;;[.B319]);&quot;&quot;))" office:value-type="string" office:string-value="[&quot;a3_corsair_marksman&quot;,&quot;Marksman_of_Umbar&quot;,&quot;Marksmen_of_Umbar&quot;,tfg_ranged| tfg_armor| tfg_boots,0,0,fac_umbar,[itm_umb_helm_d,itm_umb_helm_c,itm_umb_armor_b, itm_umb_armor_b_cloak, itm_umb_armor_a_good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d,itm_umb_helm_c,itm_umb_armor_b, itm_umb_armor_b_cloak, itm_umb_armor_a_good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16362"/>
        </table:table-row>
        <table:table-row table:style-name="ro1">
          <table:table-cell table:style-name="ce6" table:formula="of:=IF(AND([.B320]&lt;&gt;&quot;&quot;;[.C320]&lt;&gt;&quot;&quot;);CONCATENATE([Variables.$I$1];[Variables.$I$7];[.B320];[Variables.$I$7];[Variables.$I$6];[Variables.$I$7];[.C320];[Variables.$I$7];[Variables.$I$6];[Variables.$I$7];[.D320];[Variables.$I$7];[Variables.$I$6];[.E320];[Variables.$I$6];[.F320];[Variables.$I$6];[.G320];[Variables.$I$6];[.H320];[Variables.$I$6];[Variables.$I$1];[.I320];[.J320];[.K320];[.L320];[.M320];[.N320];[.O320];[Variables.$I$2];[Variables.$I$6];[.P320];[Variables.$I$6];[.Q320];[Variables.$I$6];[.R320];[Variables.$I$6];[.S320];[Variables.$I$6];[.T320];IF([.U320]&lt;&gt;&quot;&quot;;CONCATENATE([Variables.$I$6];[.U320]);&quot;&quot;);[Variables.$I$2];[Variables.$I$6]);IF([.B320]&lt;&gt;&quot;&quot;;CONCATENATE(&quot;#&quot;;[.B320]);&quot;&quot;))" office:value-type="string" office:string-value="[&quot;a4_corsair_veteran_marksman&quot;,&quot;Veteran_Marksman_of_Umbar&quot;,&quot;Veteran_Marksmen_of_Umbar&quot;,tfg_ranged| tfg_armor| tfg_helm| tfg_boots,0,0,fac_umbar,[itm_umb_helm_d,itm_umb_helm_c,itm_umb_armor_b_good, itm_umb_armor_c_bad,itm_umb_armor_d_bad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d,itm_umb_helm_c,itm_umb_armor_b_good, itm_umb_armor_c_bad,itm_umb_armor_d_bad,itm_corsair_boots,itm_corsair_bow,itm_corsair_arrows,itm_umbar_cutlass,],attr_evil_tier_4,wp_tier_bow_4,knows_common|knows_athletics_4|knows_power_draw_4|knows_ironflesh_1,bandit_face1,bandit_face2],</text:p>
          </table:table-cell>
          <table:table-cell table:style-name="ce7" office:value-type="string" calcext:value-type="string">
            <text:p>a4_corsair_veteran_marksman</text:p>
          </table:table-cell>
          <table:table-cell table:style-name="ce7" office:value-type="string" calcext:value-type="string">
            <text:p>Veteran_Marksman_of_Umbar</text:p>
          </table:table-cell>
          <table:table-cell table:style-name="ce7" office:value-type="string" calcext:value-type="string">
            <text:p>Veteran_Marksmen_of_Umba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umbar</text:p>
          </table:table-cell>
          <table:table-cell table:style-name="ce11" office:value-type="string" calcext:value-type="string">
            <text:p>itm_umb_helm_d,itm_umb_helm_c,</text:p>
          </table:table-cell>
          <table:table-cell table:style-name="ce11" office:value-type="string" calcext:value-type="string">
            <text:p>itm_umb_armor_b_good, itm_umb_armor_c_bad,itm_umb_armor_d_bad,</text:p>
          </table:table-cell>
          <table:table-cell table:style-name="ce11"/>
          <table:table-cell table:style-name="ce11" office:value-type="string" calcext:value-type="string">
            <text:p>itm_corsair_boots,</text:p>
          </table:table-cell>
          <table:table-cell table:style-name="ce11" office:value-type="string" calcext:value-type="string">
            <text:p>itm_corsair_bow,itm_corsair_arrows,</text:p>
          </table:table-cell>
          <table:table-cell table:style-name="ce11" office:value-type="string" calcext:value-type="string">
            <text:p>itm_umbar_cutlass,</text:p>
          </table:table-cell>
          <table:table-cell table:style-name="ce11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bow_4</text:p>
          </table:table-cell>
          <table:table-cell table:style-name="ce12" office:value-type="string" calcext:value-type="string">
            <text:p>knows_common|knows_athletics_4|knows_power_draw_4|knows_ironflesh_1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B320]&lt;&gt;&quot;&quot;;[.C320]&lt;&gt;&quot;&quot;);CONCATENATE([Variables.$I$1];[Variables.$I$7];[.B320];[Variables.$I$7];[Variables.$I$6];[Variables.$I$7];[.C320];[Variables.$I$7];[Variables.$I$6];[Variables.$I$7];[.D320];[Variables.$I$7];[Variables.$I$6];[.E320];[Variables.$I$6];[.F320];[Variables.$I$6];[.G320];[Variables.$I$6];[.H320];[Variables.$I$6];[Variables.$I$1];[.I320];[.J320];[.K320];[.L320];[.M320];[.N320];[.O320];[Variables.$I$2];[Variables.$I$6];[.P320];[Variables.$I$6];[.Q320];[Variables.$I$6];[.R320];[Variables.$I$6];[.S320];[Variables.$I$6];[.T320];IF([.U320]&lt;&gt;&quot;&quot;;CONCATENATE([Variables.$I$6];[.U320]);&quot;&quot;);[Variables.$I$2];[Variables.$I$6]);IF([.B320]&lt;&gt;&quot;&quot;;CONCATENATE(&quot;#&quot;;[.B320]);&quot;&quot;))" office:value-type="string" office:string-value="[&quot;a4_corsair_veteran_marksman&quot;,&quot;Veteran_Marksman_of_Umbar&quot;,&quot;Veteran_Marksmen_of_Umbar&quot;,tfg_ranged| tfg_armor| tfg_helm| tfg_boots,0,0,fac_umbar,[itm_umb_helm_d,itm_umb_helm_c,itm_umb_armor_b_good, itm_umb_armor_c_bad,itm_umb_armor_d_bad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d,itm_umb_helm_c,itm_umb_armor_b_good, itm_umb_armor_c_bad,itm_umb_armor_d_bad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16362"/>
        </table:table-row>
        <table:table-row table:style-name="ro1">
          <table:table-cell table:style-name="ce6" table:formula="of:=IF(AND([.B321]&lt;&gt;&quot;&quot;;[.C321]&lt;&gt;&quot;&quot;);CONCATENATE([Variables.$I$1];[Variables.$I$7];[.B321];[Variables.$I$7];[Variables.$I$6];[Variables.$I$7];[.C321];[Variables.$I$7];[Variables.$I$6];[Variables.$I$7];[.D321];[Variables.$I$7];[Variables.$I$6];[.E321];[Variables.$I$6];[.F321];[Variables.$I$6];[.G321];[Variables.$I$6];[.H321];[Variables.$I$6];[Variables.$I$1];[.I321];[.J321];[.K321];[.L321];[.M321];[.N321];[.O321];[Variables.$I$2];[Variables.$I$6];[.P321];[Variables.$I$6];[.Q321];[Variables.$I$6];[.R321];[Variables.$I$6];[.S321];[Variables.$I$6];[.T321];IF([.U321]&lt;&gt;&quot;&quot;;CONCATENATE([Variables.$I$6];[.U321]);&quot;&quot;);[Variables.$I$2];[Variables.$I$6]);IF([.B321]&lt;&gt;&quot;&quot;;CONCATENATE(&quot;#&quot;;[.B321]);&quot;&quot;))" office:value-type="string" office:string-value="[&quot;a5_corsair_master_marksman&quot;,&quot;Corsair_Master_Marksman&quot;,&quot;Corsair_Master_Marksmen&quot;,tfg_ranged| tfg_armor| tfg_helm| tfg_boots,0,0,fac_umbar,[itm_umb_helm_c_good,itm_umb_armor_c, itm_umb_armor_d, itm_umb_armor_c_cloak, itm_umb_armor_d_cloak,itm_leather_gloves,itm_corsair_boots,itm_corsair_bow,itm_corsair_arrows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_good,itm_umb_armor_c, itm_umb_armor_d, itm_umb_armor_c_cloak, itm_umb_armor_d_cloak,itm_leather_gloves,itm_corsair_boots,itm_corsair_bow,itm_corsair_arrows,itm_corsair_arrows,itm_umbar_cutlass,],attr_evil_tier_5,wp_tier_bow_5,knows_common|knows_athletics_6|knows_power_draw_5|knows_ironflesh_2,bandit_face1,bandit_face2],</text:p>
          </table:table-cell>
          <table:table-cell table:style-name="ce7" office:value-type="string" calcext:value-type="string">
            <text:p>a5_corsair_master_marksman</text:p>
          </table:table-cell>
          <table:table-cell table:style-name="ce7" office:value-type="string" calcext:value-type="string">
            <text:p>Corsair_Master_Marksman</text:p>
          </table:table-cell>
          <table:table-cell table:style-name="ce7" office:value-type="string" calcext:value-type="string">
            <text:p>Corsair_Master_Marksmen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umbar</text:p>
          </table:table-cell>
          <table:table-cell table:style-name="ce11" office:value-type="string" calcext:value-type="string">
            <text:p>itm_umb_helm_c_good,</text:p>
          </table:table-cell>
          <table:table-cell table:style-name="ce11" office:value-type="string" calcext:value-type="string">
            <text:p>itm_umb_armor_c, itm_umb_armor_d, itm_umb_armor_c_cloak, itm_umb_armor_d_cloak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corsair_boots,</text:p>
          </table:table-cell>
          <table:table-cell table:style-name="ce11" office:value-type="string" calcext:value-type="string">
            <text:p>itm_corsair_bow,itm_corsair_arrows,itm_corsair_arrows,</text:p>
          </table:table-cell>
          <table:table-cell table:style-name="ce11" office:value-type="string" calcext:value-type="string">
            <text:p>itm_umbar_cutlass,</text:p>
          </table:table-cell>
          <table:table-cell table:style-name="ce11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bow_5</text:p>
          </table:table-cell>
          <table:table-cell table:style-name="ce12" office:value-type="string" calcext:value-type="string">
            <text:p>knows_common|knows_athletics_6|knows_power_draw_5|knows_ironflesh_2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B321]&lt;&gt;&quot;&quot;;[.C321]&lt;&gt;&quot;&quot;);CONCATENATE([Variables.$I$1];[Variables.$I$7];[.B321];[Variables.$I$7];[Variables.$I$6];[Variables.$I$7];[.C321];[Variables.$I$7];[Variables.$I$6];[Variables.$I$7];[.D321];[Variables.$I$7];[Variables.$I$6];[.E321];[Variables.$I$6];[.F321];[Variables.$I$6];[.G321];[Variables.$I$6];[.H321];[Variables.$I$6];[Variables.$I$1];[.I321];[.J321];[.K321];[.L321];[.M321];[.N321];[.O321];[Variables.$I$2];[Variables.$I$6];[.P321];[Variables.$I$6];[.Q321];[Variables.$I$6];[.R321];[Variables.$I$6];[.S321];[Variables.$I$6];[.T321];IF([.U321]&lt;&gt;&quot;&quot;;CONCATENATE([Variables.$I$6];[.U321]);&quot;&quot;);[Variables.$I$2];[Variables.$I$6]);IF([.B321]&lt;&gt;&quot;&quot;;CONCATENATE(&quot;#&quot;;[.B321]);&quot;&quot;))" office:value-type="string" office:string-value="[&quot;a5_corsair_master_marksman&quot;,&quot;Corsair_Master_Marksman&quot;,&quot;Corsair_Master_Marksmen&quot;,tfg_ranged| tfg_armor| tfg_helm| tfg_boots,0,0,fac_umbar,[itm_umb_helm_c_good,itm_umb_armor_c, itm_umb_armor_d, itm_umb_armor_c_cloak, itm_umb_armor_d_cloak,itm_leather_gloves,itm_corsair_boots,itm_corsair_bow,itm_corsair_arrows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_good,itm_umb_armor_c, itm_umb_armor_d, itm_umb_armor_c_cloak, itm_umb_armor_d_cloak,itm_leather_gloves,itm_corsair_boots,itm_corsair_bow,itm_corsair_arrows,itm_corsair_arrows,itm_umbar_cutlass,],attr_evil_tier_5,wp_tier_bow_5,knows_common|knows_athletics_6|knows_power_draw_5|knows_ironflesh_2,bandit_face1,bandit_face2],</text:p>
          </table:table-cell>
          <table:table-cell table:number-columns-repeated="16362"/>
        </table:table-row>
        <table:table-row table:style-name="ro1">
          <table:table-cell table:style-name="ce6" table:formula="of:=IF(AND([.B322]&lt;&gt;&quot;&quot;;[.C322]&lt;&gt;&quot;&quot;);CONCATENATE([Variables.$I$1];[Variables.$I$7];[.B322];[Variables.$I$7];[Variables.$I$6];[Variables.$I$7];[.C322];[Variables.$I$7];[Variables.$I$6];[Variables.$I$7];[.D322];[Variables.$I$7];[Variables.$I$6];[.E322];[Variables.$I$6];[.F322];[Variables.$I$6];[.G322];[Variables.$I$6];[.H322];[Variables.$I$6];[Variables.$I$1];[.I322];[.J322];[.K322];[.L322];[.M322];[.N322];[.O322];[Variables.$I$2];[Variables.$I$6];[.P322];[Variables.$I$6];[.Q322];[Variables.$I$6];[.R322];[Variables.$I$6];[.S322];[Variables.$I$6];[.T322];IF([.U322]&lt;&gt;&quot;&quot;;CONCATENATE([Variables.$I$6];[.U322]);&quot;&quot;);[Variables.$I$2];[Variables.$I$6]);IF([.B322]&lt;&gt;&quot;&quot;;CONCATENATE(&quot;#&quot;;[.B322]);&quot;&quot;))" office:value-type="string" office:string-value="[&quot;i3_corsair_swordsman&quot;,&quot;Swordsman_of_Umbar&quot;,&quot;Swordsmen_of_Umbar&quot;,tfg_armor| tfg_helm| tfg_boots|tfg_shield,0,0,fac_umbar,[itm_umb_helm_d,itm_umb_helm_c,itm_umb_armor_b_good, itm_umb_armor_c, itm_umb_armor_d_bad,  itm_umb_armor_c_cloak,itm_corsair_boots,itm_leather_boots_dark,itm_umbar_cutlass,itm_umbar_rapier,itm_umb_shield_b_bad, itm_umb_shield_b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c,itm_umb_armor_b_good, itm_umb_armor_c, itm_umb_armor_d_bad, <text:s/>itm_umb_armor_c_cloak,itm_corsair_boots,itm_leather_boots_dark,itm_umbar_cutlass,itm_umbar_rapier,itm_umb_shield_b_bad, itm_umb_shield_b,],attr_evil_tier_3,wp_tier_3,knows_common|knows_athletics_3|knows_shield_2|knows_power_strike_2,bandit_face1,bandit_face2],</text:p>
          </table:table-cell>
          <table:table-cell table:style-name="ce7" office:value-type="string" calcext:value-type="string">
            <text:p>i3_corsair_swordsman</text:p>
          </table:table-cell>
          <table:table-cell table:style-name="ce7" office:value-type="string" calcext:value-type="string">
            <text:p>Swordsman_of_Umbar</text:p>
          </table:table-cell>
          <table:table-cell table:style-name="ce7" office:value-type="string" calcext:value-type="string">
            <text:p>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umbar</text:p>
          </table:table-cell>
          <table:table-cell table:style-name="ce11" office:value-type="string" calcext:value-type="string">
            <text:p>itm_umb_helm_d,itm_umb_helm_c,</text:p>
          </table:table-cell>
          <table:table-cell table:style-name="ce11" office:value-type="string" calcext:value-type="string">
            <text:p>itm_umb_armor_b_good, itm_umb_armor_c, itm_umb_armor_d_bad, <text:s/>itm_umb_armor_c_cloak,</text:p>
          </table:table-cell>
          <table:table-cell table:style-name="ce11"/>
          <table:table-cell table:style-name="ce11" office:value-type="string" calcext:value-type="string">
            <text:p>itm_corsair_boots,itm_leather_boots_dark,</text:p>
          </table:table-cell>
          <table:table-cell table:style-name="ce11" office:value-type="string" calcext:value-type="string">
            <text:p>itm_umbar_cutlass,itm_umbar_rapier,</text:p>
          </table:table-cell>
          <table:table-cell table:style-name="ce11" office:value-type="string" calcext:value-type="string">
            <text:p>itm_umb_shield_b_bad, itm_umb_shield_b,</text:p>
          </table:table-cell>
          <table:table-cell table:style-name="ce11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3|knows_shield_2|knows_power_strike_2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B322]&lt;&gt;&quot;&quot;;[.C322]&lt;&gt;&quot;&quot;);CONCATENATE([Variables.$I$1];[Variables.$I$7];[.B322];[Variables.$I$7];[Variables.$I$6];[Variables.$I$7];[.C322];[Variables.$I$7];[Variables.$I$6];[Variables.$I$7];[.D322];[Variables.$I$7];[Variables.$I$6];[.E322];[Variables.$I$6];[.F322];[Variables.$I$6];[.G322];[Variables.$I$6];[.H322];[Variables.$I$6];[Variables.$I$1];[.I322];[.J322];[.K322];[.L322];[.M322];[.N322];[.O322];[Variables.$I$2];[Variables.$I$6];[.P322];[Variables.$I$6];[.Q322];[Variables.$I$6];[.R322];[Variables.$I$6];[.S322];[Variables.$I$6];[.T322];IF([.U322]&lt;&gt;&quot;&quot;;CONCATENATE([Variables.$I$6];[.U322]);&quot;&quot;);[Variables.$I$2];[Variables.$I$6]);IF([.B322]&lt;&gt;&quot;&quot;;CONCATENATE(&quot;#&quot;;[.B322]);&quot;&quot;))" office:value-type="string" office:string-value="[&quot;i3_corsair_swordsman&quot;,&quot;Swordsman_of_Umbar&quot;,&quot;Swordsmen_of_Umbar&quot;,tfg_armor| tfg_helm| tfg_boots|tfg_shield,0,0,fac_umbar,[itm_umb_helm_d,itm_umb_helm_c,itm_umb_armor_b_good, itm_umb_armor_c, itm_umb_armor_d_bad,  itm_umb_armor_c_cloak,itm_corsair_boots,itm_leather_boots_dark,itm_umbar_cutlass,itm_umbar_rapier,itm_umb_shield_b_bad, itm_umb_shield_b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c,itm_umb_armor_b_good, itm_umb_armor_c, itm_umb_armor_d_bad, <text:s/>itm_umb_armor_c_cloak,itm_corsair_boots,itm_leather_boots_dark,itm_umbar_cutlass,itm_umbar_rapier,itm_umb_shield_b_bad, itm_umb_shield_b,],attr_evil_tier_3,wp_tier_3,knows_common|knows_athletics_3|knows_shield_2|knows_power_strike_2,bandit_face1,bandit_face2],</text:p>
          </table:table-cell>
          <table:table-cell table:number-columns-repeated="16362"/>
        </table:table-row>
        <table:table-row table:style-name="ro1">
          <table:table-cell table:style-name="ce6" table:formula="of:=IF(AND([.B323]&lt;&gt;&quot;&quot;;[.C323]&lt;&gt;&quot;&quot;);CONCATENATE([Variables.$I$1];[Variables.$I$7];[.B323];[Variables.$I$7];[Variables.$I$6];[Variables.$I$7];[.C323];[Variables.$I$7];[Variables.$I$6];[Variables.$I$7];[.D323];[Variables.$I$7];[Variables.$I$6];[.E323];[Variables.$I$6];[.F323];[Variables.$I$6];[.G323];[Variables.$I$6];[.H323];[Variables.$I$6];[Variables.$I$1];[.I323];[.J323];[.K323];[.L323];[.M323];[.N323];[.O323];[Variables.$I$2];[Variables.$I$6];[.P323];[Variables.$I$6];[.Q323];[Variables.$I$6];[.R323];[Variables.$I$6];[.S323];[Variables.$I$6];[.T323];IF([.U323]&lt;&gt;&quot;&quot;;CONCATENATE([Variables.$I$6];[.U323]);&quot;&quot;);[Variables.$I$2];[Variables.$I$6]);IF([.B323]&lt;&gt;&quot;&quot;;CONCATENATE(&quot;#&quot;;[.B323]);&quot;&quot;))" office:value-type="string" office:string-value="[&quot;i4_corsair_veteran_swordsman&quot;,&quot;Veteran_Swordsman_of_Umbar&quot;,&quot;Veteran_Swordsmen_of_Umbar&quot;,tfg_armor| tfg_helm| tfg_boots|tfg_shield,0,0,fac_umbar,[itm_umb_helm_b,itm_umb_armor_c_good, itm_umb_armor_e_bad, itm_umb_armor_d, itm_umb_armor_d_cloak,itm_leather_gloves,itm_corsair_boots,itm_leather_boots_dark,itm_umbar_cutlass,itm_umb_shield_b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b,itm_umb_armor_c_good, itm_umb_armor_e_bad, itm_umb_armor_d, itm_umb_armor_d_cloak,itm_leather_gloves,itm_corsair_boots,itm_leather_boots_dark,itm_umbar_cutlass,itm_umb_shield_b,],attr_evil_tier_4,wp_tier_4,knows_common|knows_athletics_4|knows_shield_2|knows_power_throw_1|knows_power_strike_3,bandit_face1,bandit_face2],</text:p>
          </table:table-cell>
          <table:table-cell table:style-name="ce7" office:value-type="string" calcext:value-type="string">
            <text:p>i4_corsair_veteran_swordsman</text:p>
          </table:table-cell>
          <table:table-cell table:style-name="ce7" office:value-type="string" calcext:value-type="string">
            <text:p>Veteran_Swordsman_of_Umbar</text:p>
          </table:table-cell>
          <table:table-cell table:style-name="ce7" office:value-type="string" calcext:value-type="string">
            <text:p>Veteran_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umbar</text:p>
          </table:table-cell>
          <table:table-cell table:style-name="ce11" office:value-type="string" calcext:value-type="string">
            <text:p>itm_umb_helm_b,</text:p>
          </table:table-cell>
          <table:table-cell table:style-name="ce11" office:value-type="string" calcext:value-type="string">
            <text:p>itm_umb_armor_c_good, itm_umb_armor_e_bad, itm_umb_armor_d, itm_umb_armor_d_cloak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corsair_boots,itm_leather_boots_dark,</text:p>
          </table:table-cell>
          <table:table-cell table:style-name="ce11" office:value-type="string" calcext:value-type="string">
            <text:p>itm_umbar_cutlass,</text:p>
          </table:table-cell>
          <table:table-cell table:style-name="ce11" office:value-type="string" calcext:value-type="string">
            <text:p>itm_umb_shield_b,</text:p>
          </table:table-cell>
          <table:table-cell table:style-name="ce11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4|knows_shield_2|knows_power_throw_1|knows_power_strike_3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B323]&lt;&gt;&quot;&quot;;[.C323]&lt;&gt;&quot;&quot;);CONCATENATE([Variables.$I$1];[Variables.$I$7];[.B323];[Variables.$I$7];[Variables.$I$6];[Variables.$I$7];[.C323];[Variables.$I$7];[Variables.$I$6];[Variables.$I$7];[.D323];[Variables.$I$7];[Variables.$I$6];[.E323];[Variables.$I$6];[.F323];[Variables.$I$6];[.G323];[Variables.$I$6];[.H323];[Variables.$I$6];[Variables.$I$1];[.I323];[.J323];[.K323];[.L323];[.M323];[.N323];[.O323];[Variables.$I$2];[Variables.$I$6];[.P323];[Variables.$I$6];[.Q323];[Variables.$I$6];[.R323];[Variables.$I$6];[.S323];[Variables.$I$6];[.T323];IF([.U323]&lt;&gt;&quot;&quot;;CONCATENATE([Variables.$I$6];[.U323]);&quot;&quot;);[Variables.$I$2];[Variables.$I$6]);IF([.B323]&lt;&gt;&quot;&quot;;CONCATENATE(&quot;#&quot;;[.B323]);&quot;&quot;))" office:value-type="string" office:string-value="[&quot;i4_corsair_veteran_swordsman&quot;,&quot;Veteran_Swordsman_of_Umbar&quot;,&quot;Veteran_Swordsmen_of_Umbar&quot;,tfg_armor| tfg_helm| tfg_boots|tfg_shield,0,0,fac_umbar,[itm_umb_helm_b,itm_umb_armor_c_good, itm_umb_armor_e_bad, itm_umb_armor_d, itm_umb_armor_d_cloak,itm_leather_gloves,itm_corsair_boots,itm_leather_boots_dark,itm_umbar_cutlass,itm_umb_shield_b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b,itm_umb_armor_c_good, itm_umb_armor_e_bad, itm_umb_armor_d, itm_umb_armor_d_cloak,itm_leather_gloves,itm_corsair_boots,itm_leather_boots_dark,itm_umbar_cutlass,itm_umb_shield_b,],attr_evil_tier_4,wp_tier_4,knows_common|knows_athletics_4|knows_shield_2|knows_power_throw_1|knows_power_strike_3,bandit_face1,bandit_face2],</text:p>
          </table:table-cell>
          <table:table-cell table:number-columns-repeated="16362"/>
        </table:table-row>
        <table:table-row table:style-name="ro1">
          <table:table-cell table:style-name="ce6" table:formula="of:=IF(AND([.B324]&lt;&gt;&quot;&quot;;[.C324]&lt;&gt;&quot;&quot;);CONCATENATE([Variables.$I$1];[Variables.$I$7];[.B324];[Variables.$I$7];[Variables.$I$6];[Variables.$I$7];[.C324];[Variables.$I$7];[Variables.$I$6];[Variables.$I$7];[.D324];[Variables.$I$7];[Variables.$I$6];[.E324];[Variables.$I$6];[.F324];[Variables.$I$6];[.G324];[Variables.$I$6];[.H324];[Variables.$I$6];[Variables.$I$1];[.I324];[.J324];[.K324];[.L324];[.M324];[.N324];[.O324];[Variables.$I$2];[Variables.$I$6];[.P324];[Variables.$I$6];[.Q324];[Variables.$I$6];[.R324];[Variables.$I$6];[.S324];[Variables.$I$6];[.T324];IF([.U324]&lt;&gt;&quot;&quot;;CONCATENATE([Variables.$I$6];[.U324]);&quot;&quot;);[Variables.$I$2];[Variables.$I$6]);IF([.B324]&lt;&gt;&quot;&quot;;CONCATENATE(&quot;#&quot;;[.B324]);&quot;&quot;))" office:value-type="string" office:string-value="[&quot;i5_corsair_master_swordsman&quot;,&quot;Corsair_Swordmaster&quot;,&quot;Corsair_Swordmasters&quot;,tfg_gloves| tfg_armor| tfg_helm| tfg_boots|tfg_shield,0,0,fac_umbar,[itm_umb_helm_b_good,itm_umb_armor_f_bad,itm_umb_armor_e_good, itm_umb_armor_f, itm_umb_armor_f_cloak,itm_leather_gloves,itm_corsair_boots,itm_kraken,itm_umb_shield_b_goo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b_good,itm_umb_armor_f_bad,itm_umb_armor_e_good, itm_umb_armor_f, itm_umb_armor_f_cloak,itm_leather_gloves,itm_corsair_boots,itm_kraken,itm_umb_shield_b_good,],attr_evil_tier_5,wp_tier_5,knows_common|knows_athletics_6|knows_shield_2|knows_power_throw_2|knows_power_strike_4|knows_ironflesh_3,bandit_face1,bandit_face2],</text:p>
          </table:table-cell>
          <table:table-cell table:style-name="ce7" office:value-type="string" calcext:value-type="string">
            <text:p>i5_corsair_master_swordsman</text:p>
          </table:table-cell>
          <table:table-cell table:style-name="ce7" office:value-type="string" calcext:value-type="string">
            <text:p>Corsair_Swordmaster</text:p>
          </table:table-cell>
          <table:table-cell table:style-name="ce7" office:value-type="string" calcext:value-type="string">
            <text:p>Corsair_Swordmasters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umbar</text:p>
          </table:table-cell>
          <table:table-cell table:style-name="ce11" office:value-type="string" calcext:value-type="string">
            <text:p>itm_umb_helm_b_good,</text:p>
          </table:table-cell>
          <table:table-cell table:style-name="ce11" office:value-type="string" calcext:value-type="string">
            <text:p>itm_umb_armor_f_bad,itm_umb_armor_e_good, itm_umb_armor_f, itm_umb_armor_f_cloak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corsair_boots,</text:p>
          </table:table-cell>
          <table:table-cell table:style-name="ce11" office:value-type="string" calcext:value-type="string">
            <text:p>itm_kraken,</text:p>
          </table:table-cell>
          <table:table-cell table:style-name="ce11" office:value-type="string" calcext:value-type="string">
            <text:p>itm_umb_shield_b_good,</text:p>
          </table:table-cell>
          <table:table-cell table:style-name="ce11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6|knows_shield_2|knows_power_throw_2|knows_power_strike_4|knows_ironflesh_3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B324]&lt;&gt;&quot;&quot;;[.C324]&lt;&gt;&quot;&quot;);CONCATENATE([Variables.$I$1];[Variables.$I$7];[.B324];[Variables.$I$7];[Variables.$I$6];[Variables.$I$7];[.C324];[Variables.$I$7];[Variables.$I$6];[Variables.$I$7];[.D324];[Variables.$I$7];[Variables.$I$6];[.E324];[Variables.$I$6];[.F324];[Variables.$I$6];[.G324];[Variables.$I$6];[.H324];[Variables.$I$6];[Variables.$I$1];[.I324];[.J324];[.K324];[.L324];[.M324];[.N324];[.O324];[Variables.$I$2];[Variables.$I$6];[.P324];[Variables.$I$6];[.Q324];[Variables.$I$6];[.R324];[Variables.$I$6];[.S324];[Variables.$I$6];[.T324];IF([.U324]&lt;&gt;&quot;&quot;;CONCATENATE([Variables.$I$6];[.U324]);&quot;&quot;);[Variables.$I$2];[Variables.$I$6]);IF([.B324]&lt;&gt;&quot;&quot;;CONCATENATE(&quot;#&quot;;[.B324]);&quot;&quot;))" office:value-type="string" office:string-value="[&quot;i5_corsair_master_swordsman&quot;,&quot;Corsair_Swordmaster&quot;,&quot;Corsair_Swordmasters&quot;,tfg_gloves| tfg_armor| tfg_helm| tfg_boots|tfg_shield,0,0,fac_umbar,[itm_umb_helm_b_good,itm_umb_armor_f_bad,itm_umb_armor_e_good, itm_umb_armor_f, itm_umb_armor_f_cloak,itm_leather_gloves,itm_corsair_boots,itm_kraken,itm_umb_shield_b_goo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b_good,itm_umb_armor_f_bad,itm_umb_armor_e_good, itm_umb_armor_f, itm_umb_armor_f_cloak,itm_leather_gloves,itm_corsair_boots,itm_kraken,itm_umb_shield_b_good,],attr_evil_tier_5,wp_tier_5,knows_common|knows_athletics_6|knows_shield_2|knows_power_throw_2|knows_power_strike_4|knows_ironflesh_3,bandit_face1,bandit_face2],</text:p>
          </table:table-cell>
          <table:table-cell table:number-columns-repeated="16362"/>
        </table:table-row>
        <table:table-row table:style-name="ro1">
          <table:table-cell table:style-name="ce6" table:formula="of:=IF(AND([.B325]&lt;&gt;&quot;&quot;;[.C325]&lt;&gt;&quot;&quot;);CONCATENATE([Variables.$I$1];[Variables.$I$7];[.B325];[Variables.$I$7];[Variables.$I$6];[Variables.$I$7];[.C325];[Variables.$I$7];[Variables.$I$6];[Variables.$I$7];[.D325];[Variables.$I$7];[Variables.$I$6];[.E325];[Variables.$I$6];[.F325];[Variables.$I$6];[.G325];[Variables.$I$6];[.H325];[Variables.$I$6];[Variables.$I$1];[.I325];[.J325];[.K325];[.L325];[.M325];[.N325];[.O325];[Variables.$I$2];[Variables.$I$6];[.P325];[Variables.$I$6];[.Q325];[Variables.$I$6];[.R325];[Variables.$I$6];[.S325];[Variables.$I$6];[.T325];IF([.U325]&lt;&gt;&quot;&quot;;CONCATENATE([Variables.$I$6];[.U325]);&quot;&quot;);[Variables.$I$2];[Variables.$I$6]);IF([.B325]&lt;&gt;&quot;&quot;;CONCATENATE(&quot;#&quot;;[.B325]);&quot;&quot;))" office:value-type="string" office:string-value="[&quot;i6_corsair_guard&quot;,&quot;Captain's Guard of Umbar&quot;,&quot;Captain's Guards of Umbar&quot;,tfg_gloves| tfg_armor| tfg_helm| tfg_boots|tfg_shield,0,0,fac_umbar,[itm_umb_helm_a_good,itm_umb_helm_b_good,itm_umb_armor_f_lordly,itm_umb_armor_f_good,itm_evil_gauntlets_a_lordly,itm_splinted_greaves_good,itm_kraken,itm_umb_shield_c, itm_corsair_harpoon,itm_marker_hp_shield,],attr_evil_tier_6,wp_tier_6,knows_common|knows_athletics_4|knows_shield_4|knows_power_strike_4|knows_ironflesh_5,bandit_face1,bandit_face2]," calcext:value-type="string">
            <text:p>["i6_corsair_guard","Captain's Guard of Umbar","Captain's Guards of Umbar",tfg_gloves| tfg_armor| tfg_helm| tfg_boots|tfg_shield,0,0,fac_umbar,[itm_umb_helm_a_good,itm_umb_helm_b_good,itm_umb_armor_f_lordly,itm_umb_armor_f_good,itm_evil_gauntlets_a_lordly,itm_splinted_greaves_good,itm_kraken,itm_umb_shield_c, itm_corsair_harpoon,itm_marker_hp_shield,],attr_evil_tier_6,wp_tier_6,knows_common|knows_athletics_4|knows_shield_4|knows_power_strike_4|knows_ironflesh_5,bandit_face1,bandit_face2],</text:p>
          </table:table-cell>
          <table:table-cell table:style-name="ce7" office:value-type="string" calcext:value-type="string">
            <text:p>i6_corsair_guard</text:p>
          </table:table-cell>
          <table:table-cell table:style-name="ce7" office:value-type="string" calcext:value-type="string">
            <text:p>Captain's Guard of Umbar</text:p>
          </table:table-cell>
          <table:table-cell table:style-name="ce7" office:value-type="string" calcext:value-type="string">
            <text:p>Captain's Guards of Umbar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umbar</text:p>
          </table:table-cell>
          <table:table-cell table:style-name="ce11" office:value-type="string" calcext:value-type="string">
            <text:p>itm_umb_helm_a_good,itm_umb_helm_b_good,</text:p>
          </table:table-cell>
          <table:table-cell table:style-name="ce11" office:value-type="string" calcext:value-type="string">
            <text:p>itm_umb_armor_f_lordly,itm_umb_armor_f_good,</text:p>
          </table:table-cell>
          <table:table-cell table:style-name="ce11" office:value-type="string" calcext:value-type="string">
            <text:p>itm_evil_gauntlets_a_lordly,</text:p>
          </table:table-cell>
          <table:table-cell table:style-name="ce11" office:value-type="string" calcext:value-type="string">
            <text:p>itm_splinted_greaves_good,</text:p>
          </table:table-cell>
          <table:table-cell table:style-name="ce11" office:value-type="string" calcext:value-type="string">
            <text:p>itm_kraken,</text:p>
          </table:table-cell>
          <table:table-cell table:style-name="ce11" office:value-type="string" calcext:value-type="string">
            <text:p>itm_umb_shield_c, itm_corsair_harpoon,</text:p>
          </table:table-cell>
          <table:table-cell table:style-name="ce11" office:value-type="string" calcext:value-type="string">
            <text:p>itm_marker_hp_shield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4|knows_shield_4|knows_power_strike_4|knows_ironflesh_5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B325]&lt;&gt;&quot;&quot;;[.C325]&lt;&gt;&quot;&quot;);CONCATENATE([Variables.$I$1];[Variables.$I$7];[.B325];[Variables.$I$7];[Variables.$I$6];[Variables.$I$7];[.C325];[Variables.$I$7];[Variables.$I$6];[Variables.$I$7];[.D325];[Variables.$I$7];[Variables.$I$6];[.E325];[Variables.$I$6];[.F325];[Variables.$I$6];[.G325];[Variables.$I$6];[.H325];[Variables.$I$6];[Variables.$I$1];[.I325];[.J325];[.K325];[.L325];[.M325];[.N325];[.O325];[Variables.$I$2];[Variables.$I$6];[.P325];[Variables.$I$6];[.Q325];[Variables.$I$6];[.R325];[Variables.$I$6];[.S325];[Variables.$I$6];[.T325];IF([.U325]&lt;&gt;&quot;&quot;;CONCATENATE([Variables.$I$6];[.U325]);&quot;&quot;);[Variables.$I$2];[Variables.$I$6]);IF([.B325]&lt;&gt;&quot;&quot;;CONCATENATE(&quot;#&quot;;[.B325]);&quot;&quot;))" office:value-type="string" office:string-value="[&quot;i6_corsair_guard&quot;,&quot;Captain's Guard of Umbar&quot;,&quot;Captain's Guards of Umbar&quot;,tfg_gloves| tfg_armor| tfg_helm| tfg_boots|tfg_shield,0,0,fac_umbar,[itm_umb_helm_a_good,itm_umb_helm_b_good,itm_umb_armor_f_lordly,itm_umb_armor_f_good,itm_evil_gauntlets_a_lordly,itm_splinted_greaves_good,itm_kraken,itm_umb_shield_c, itm_corsair_harpoon,itm_marker_hp_shield,],attr_evil_tier_6,wp_tier_6,knows_common|knows_athletics_4|knows_shield_4|knows_power_strike_4|knows_ironflesh_5,bandit_face1,bandit_face2]," calcext:value-type="string">
            <text:p>["i6_corsair_guard","Captain's Guard of Umbar","Captain's Guards of Umbar",tfg_gloves| tfg_armor| tfg_helm| tfg_boots|tfg_shield,0,0,fac_umbar,[itm_umb_helm_a_good,itm_umb_helm_b_good,itm_umb_armor_f_lordly,itm_umb_armor_f_good,itm_evil_gauntlets_a_lordly,itm_splinted_greaves_good,itm_kraken,itm_umb_shield_c, itm_corsair_harpoon,itm_marker_hp_shield,],attr_evil_tier_6,wp_tier_6,knows_common|knows_athletics_4|knows_shield_4|knows_power_strike_4|knows_ironflesh_5,bandit_face1,bandit_face2],</text:p>
          </table:table-cell>
          <table:table-cell table:number-columns-repeated="16362"/>
        </table:table-row>
        <table:table-row table:style-name="ro1">
          <table:table-cell table:style-name="ce6" table:formula="of:=IF(AND([.B326]&lt;&gt;&quot;&quot;;[.C326]&lt;&gt;&quot;&quot;);CONCATENATE([Variables.$I$1];[Variables.$I$7];[.B326];[Variables.$I$7];[Variables.$I$6];[Variables.$I$7];[.C326];[Variables.$I$7];[Variables.$I$6];[Variables.$I$7];[.D326];[Variables.$I$7];[Variables.$I$6];[.E326];[Variables.$I$6];[.F326];[Variables.$I$6];[.G326];[Variables.$I$6];[.H326];[Variables.$I$6];[Variables.$I$1];[.I326];[.J326];[.K326];[.L326];[.M326];[.N326];[.O326];[Variables.$I$2];[Variables.$I$6];[.P326];[Variables.$I$6];[.Q326];[Variables.$I$6];[.R326];[Variables.$I$6];[.S326];[Variables.$I$6];[.T326];IF([.U326]&lt;&gt;&quot;&quot;;CONCATENATE([Variables.$I$6];[.U326]);&quot;&quot;);[Variables.$I$2];[Variables.$I$6]);IF([.B326]&lt;&gt;&quot;&quot;;CONCATENATE(&quot;#&quot;;[.B326]);&quot;&quot;))" office:value-type="string" office:string-value="[&quot;a5_corsair_master_assassin&quot;,&quot;Corsair_Assassin&quot;,&quot;Corsair_Assassins&quot;,tfg_ranged| tfg_armor| tfg_helm| tfg_boots,0,0,fac_umbar,[itm_hood_black_good,itm_umb_helm_a,itm_umb_armor_d_cloak, itm_umb_armor_d,itm_evil_gauntlets_a,itm_corsair_boots,itm_leather_boots_dark_bad,itm_corsair_bow,itm_corsair_arrows,itm_kraken,itm_umb_shield_b,itm_marker_night_troop,],attr_evil_tier_5,wp_archery(15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hood_black_good,itm_umb_helm_a,itm_umb_armor_d_cloak, itm_umb_armor_d,itm_evil_gauntlets_a,itm_corsair_boots,itm_leather_boots_dark_bad,itm_corsair_bow,itm_corsair_arrows,itm_kraken,itm_umb_shield_b,itm_marker_night_troop,],attr_evil_tier_5,wp_archery(150) | wp_melee(200),knows_common|knows_athletics_8|knows_power_draw_5|knows_power_strike_4|knows_ironflesh_4,bandit_face1,bandit_face2],</text:p>
          </table:table-cell>
          <table:table-cell table:style-name="ce7" office:value-type="string" calcext:value-type="string">
            <text:p>a5_corsair_master_assassin</text:p>
          </table:table-cell>
          <table:table-cell table:style-name="ce7" office:value-type="string" calcext:value-type="string">
            <text:p>Corsair_Assassin</text:p>
          </table:table-cell>
          <table:table-cell table:style-name="ce7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umbar</text:p>
          </table:table-cell>
          <table:table-cell table:style-name="ce11" office:value-type="string" calcext:value-type="string">
            <text:p>itm_hood_black_good,itm_umb_helm_a,</text:p>
          </table:table-cell>
          <table:table-cell table:style-name="ce11" office:value-type="string" calcext:value-type="string">
            <text:p>itm_umb_armor_d_cloak, itm_umb_armor_d,</text:p>
          </table:table-cell>
          <table:table-cell table:style-name="ce11" office:value-type="string" calcext:value-type="string">
            <text:p>itm_evil_gauntlets_a,</text:p>
          </table:table-cell>
          <table:table-cell table:style-name="ce11" office:value-type="string" calcext:value-type="string">
            <text:p>itm_corsair_boots,itm_leather_boots_dark_bad,</text:p>
          </table:table-cell>
          <table:table-cell table:style-name="ce11" office:value-type="string" calcext:value-type="string">
            <text:p>itm_corsair_bow,itm_corsair_arrows,</text:p>
          </table:table-cell>
          <table:table-cell table:style-name="ce11" office:value-type="string" calcext:value-type="string">
            <text:p>itm_kraken,itm_umb_shield_b,</text:p>
          </table:table-cell>
          <table:table-cell table:style-name="ce11" office:value-type="string" calcext:value-type="string">
            <text:p>itm_marker_night_troop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archery(150) | wp_melee(200)</text:p>
          </table:table-cell>
          <table:table-cell table:style-name="ce12" office:value-type="string" calcext:value-type="string">
            <text:p>knows_common|knows_athletics_8|knows_power_draw_5|knows_power_strike_4|knows_ironflesh_4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B326]&lt;&gt;&quot;&quot;;[.C326]&lt;&gt;&quot;&quot;);CONCATENATE([Variables.$I$1];[Variables.$I$7];[.B326];[Variables.$I$7];[Variables.$I$6];[Variables.$I$7];[.C326];[Variables.$I$7];[Variables.$I$6];[Variables.$I$7];[.D326];[Variables.$I$7];[Variables.$I$6];[.E326];[Variables.$I$6];[.F326];[Variables.$I$6];[.G326];[Variables.$I$6];[.H326];[Variables.$I$6];[Variables.$I$1];[.I326];[.J326];[.K326];[.L326];[.M326];[.N326];[.O326];[Variables.$I$2];[Variables.$I$6];[.P326];[Variables.$I$6];[.Q326];[Variables.$I$6];[.R326];[Variables.$I$6];[.S326];[Variables.$I$6];[.T326];IF([.U326]&lt;&gt;&quot;&quot;;CONCATENATE([Variables.$I$6];[.U326]);&quot;&quot;);[Variables.$I$2];[Variables.$I$6]);IF([.B326]&lt;&gt;&quot;&quot;;CONCATENATE(&quot;#&quot;;[.B326]);&quot;&quot;))" office:value-type="string" office:string-value="[&quot;a5_corsair_master_assassin&quot;,&quot;Corsair_Assassin&quot;,&quot;Corsair_Assassins&quot;,tfg_ranged| tfg_armor| tfg_helm| tfg_boots,0,0,fac_umbar,[itm_hood_black_good,itm_umb_helm_a,itm_umb_armor_d_cloak, itm_umb_armor_d,itm_evil_gauntlets_a,itm_corsair_boots,itm_leather_boots_dark_bad,itm_corsair_bow,itm_corsair_arrows,itm_kraken,itm_umb_shield_b,itm_marker_night_troop,],attr_evil_tier_5,wp_archery(15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hood_black_good,itm_umb_helm_a,itm_umb_armor_d_cloak, itm_umb_armor_d,itm_evil_gauntlets_a,itm_corsair_boots,itm_leather_boots_dark_bad,itm_corsair_bow,itm_corsair_arrows,itm_kraken,itm_umb_shield_b,itm_marker_night_troop,],attr_evil_tier_5,wp_archery(150) | wp_melee(200),knows_common|knows_athletics_8|knows_power_draw_5|knows_power_strike_4|knows_ironflesh_4,bandit_face1,bandit_face2],</text:p>
          </table:table-cell>
          <table:table-cell table:number-columns-repeated="16362"/>
        </table:table-row>
        <table:table-row table:style-name="ro1">
          <table:table-cell table:style-name="ce6" table:formula="of:=IF(AND([.B327]&lt;&gt;&quot;&quot;;[.C327]&lt;&gt;&quot;&quot;);CONCATENATE([Variables.$I$1];[Variables.$I$7];[.B327];[Variables.$I$7];[Variables.$I$6];[Variables.$I$7];[.C327];[Variables.$I$7];[Variables.$I$6];[Variables.$I$7];[.D327];[Variables.$I$7];[Variables.$I$6];[.E327];[Variables.$I$6];[.F327];[Variables.$I$6];[.G327];[Variables.$I$6];[.H327];[Variables.$I$6];[Variables.$I$1];[.I327];[.J327];[.K327];[.L327];[.M327];[.N327];[.O327];[Variables.$I$2];[Variables.$I$6];[.P327];[Variables.$I$6];[.Q327];[Variables.$I$6];[.R327];[Variables.$I$6];[.S327];[Variables.$I$6];[.T327];IF([.U327]&lt;&gt;&quot;&quot;;CONCATENATE([Variables.$I$6];[.U327]);&quot;&quot;);[Variables.$I$2];[Variables.$I$6]);IF([.B327]&lt;&gt;&quot;&quot;;CONCATENATE(&quot;#&quot;;[.B327]);&quot;&quot;))" office:value-type="string" office:string-value="[&quot;i4_corsair_veteran_spearman&quot;,&quot;Veteran_Spearman_of_Umbar&quot;,&quot;Veteran_Spearmen_of_Umbar&quot;,tfg_armor| tfg_helm| tfg_boots|tfg_shield,0,0,fac_umbar,[itm_umb_helm_b,itm_umb_armor_d_good,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b,itm_umb_armor_d_good,itm_corsair_boots,itm_umbar_spear,itm_umb_shield_a,],attr_evil_tier_4,wp_tier_4,knows_common|knows_athletics_3|knows_shield_2|knows_power_strike_2,bandit_face1,bandit_face2],</text:p>
          </table:table-cell>
          <table:table-cell table:style-name="ce7" office:value-type="string" calcext:value-type="string">
            <text:p>i4_corsair_veteran_spearman</text:p>
          </table:table-cell>
          <table:table-cell table:style-name="ce7" office:value-type="string" calcext:value-type="string">
            <text:p>Veteran_Spearman_of_Umbar</text:p>
          </table:table-cell>
          <table:table-cell table:style-name="ce7" office:value-type="string" calcext:value-type="string">
            <text:p>Veteran_Spear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umbar</text:p>
          </table:table-cell>
          <table:table-cell table:style-name="ce11" office:value-type="string" calcext:value-type="string">
            <text:p>itm_umb_helm_b,</text:p>
          </table:table-cell>
          <table:table-cell table:style-name="ce11" office:value-type="string" calcext:value-type="string">
            <text:p>itm_umb_armor_d_good,</text:p>
          </table:table-cell>
          <table:table-cell table:style-name="ce11"/>
          <table:table-cell table:style-name="ce11" office:value-type="string" calcext:value-type="string">
            <text:p>itm_corsair_boots,</text:p>
          </table:table-cell>
          <table:table-cell table:style-name="ce11" office:value-type="string" calcext:value-type="string">
            <text:p>itm_umbar_spear,</text:p>
          </table:table-cell>
          <table:table-cell table:style-name="ce11" office:value-type="string" calcext:value-type="string">
            <text:p>itm_umb_shield_a,</text:p>
          </table:table-cell>
          <table:table-cell table:style-name="ce11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3|knows_shield_2|knows_power_strike_2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B327]&lt;&gt;&quot;&quot;;[.C327]&lt;&gt;&quot;&quot;);CONCATENATE([Variables.$I$1];[Variables.$I$7];[.B327];[Variables.$I$7];[Variables.$I$6];[Variables.$I$7];[.C327];[Variables.$I$7];[Variables.$I$6];[Variables.$I$7];[.D327];[Variables.$I$7];[Variables.$I$6];[.E327];[Variables.$I$6];[.F327];[Variables.$I$6];[.G327];[Variables.$I$6];[.H327];[Variables.$I$6];[Variables.$I$1];[.I327];[.J327];[.K327];[.L327];[.M327];[.N327];[.O327];[Variables.$I$2];[Variables.$I$6];[.P327];[Variables.$I$6];[.Q327];[Variables.$I$6];[.R327];[Variables.$I$6];[.S327];[Variables.$I$6];[.T327];IF([.U327]&lt;&gt;&quot;&quot;;CONCATENATE([Variables.$I$6];[.U327]);&quot;&quot;);[Variables.$I$2];[Variables.$I$6]);IF([.B327]&lt;&gt;&quot;&quot;;CONCATENATE(&quot;#&quot;;[.B327]);&quot;&quot;))" office:value-type="string" office:string-value="[&quot;i4_corsair_veteran_spearman&quot;,&quot;Veteran_Spearman_of_Umbar&quot;,&quot;Veteran_Spearmen_of_Umbar&quot;,tfg_armor| tfg_helm| tfg_boots|tfg_shield,0,0,fac_umbar,[itm_umb_helm_b,itm_umb_armor_d_good,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b,itm_umb_armor_d_good,itm_corsair_boots,itm_umbar_spear,itm_umb_shield_a,],attr_evil_tier_4,wp_tier_4,knows_common|knows_athletics_3|knows_shield_2|knows_power_strike_2,bandit_face1,bandit_face2],</text:p>
          </table:table-cell>
          <table:table-cell table:number-columns-repeated="16362"/>
        </table:table-row>
        <table:table-row table:style-name="ro1">
          <table:table-cell table:style-name="ce6" table:formula="of:=IF(AND([.B328]&lt;&gt;&quot;&quot;;[.C328]&lt;&gt;&quot;&quot;);CONCATENATE([Variables.$I$1];[Variables.$I$7];[.B328];[Variables.$I$7];[Variables.$I$6];[Variables.$I$7];[.C328];[Variables.$I$7];[Variables.$I$6];[Variables.$I$7];[.D328];[Variables.$I$7];[Variables.$I$6];[.E328];[Variables.$I$6];[.F328];[Variables.$I$6];[.G328];[Variables.$I$6];[.H328];[Variables.$I$6];[Variables.$I$1];[.I328];[.J328];[.K328];[.L328];[.M328];[.N328];[.O328];[Variables.$I$2];[Variables.$I$6];[.P328];[Variables.$I$6];[.Q328];[Variables.$I$6];[.R328];[Variables.$I$6];[.S328];[Variables.$I$6];[.T328];IF([.U328]&lt;&gt;&quot;&quot;;CONCATENATE([Variables.$I$6];[.U328]);&quot;&quot;);[Variables.$I$2];[Variables.$I$6]);IF([.B328]&lt;&gt;&quot;&quot;;CONCATENATE(&quot;#&quot;;[.B328]);&quot;&quot;))" office:value-type="string" office:string-value="[&quot;i5_corsair_master_spearman&quot;,&quot;Spearmaster_of_Umbar&quot;,&quot;Spearmasters_of_Umbar&quot;,tfg_armor| tfg_helm| tfg_boots|tfg_shield,0,0,fac_umbar,[itm_umb_helm_a,itm_umb_armor_e_good, itm_umb_armor_f,itm_splinted_greaves,itm_umbar_spear,itm_umb_shield_a_good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armor_e_good, itm_umb_armor_f,itm_splinted_greaves,itm_umbar_spear,itm_umb_shield_a_good,],attr_evil_tier_5,wp_tier_5,knows_common|knows_athletics_4|knows_shield_2|knows_power_throw_1|knows_power_strike_3,bandit_face1,bandit_face2],</text:p>
          </table:table-cell>
          <table:table-cell table:style-name="ce7" office:value-type="string" calcext:value-type="string">
            <text:p>i5_corsair_master_spearman</text:p>
          </table:table-cell>
          <table:table-cell table:style-name="ce7" office:value-type="string" calcext:value-type="string">
            <text:p>Spearmaster_of_Umbar</text:p>
          </table:table-cell>
          <table:table-cell table:style-name="ce7" office:value-type="string" calcext:value-type="string">
            <text:p>Spearmasters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umbar</text:p>
          </table:table-cell>
          <table:table-cell table:style-name="ce11" office:value-type="string" calcext:value-type="string">
            <text:p>itm_umb_helm_a,</text:p>
          </table:table-cell>
          <table:table-cell table:style-name="ce11" office:value-type="string" calcext:value-type="string">
            <text:p>itm_umb_armor_e_good, itm_umb_armor_f,</text:p>
          </table:table-cell>
          <table:table-cell table:style-name="ce11"/>
          <table:table-cell table:style-name="ce11" office:value-type="string" calcext:value-type="string">
            <text:p>itm_splinted_greaves,</text:p>
          </table:table-cell>
          <table:table-cell table:style-name="ce11" office:value-type="string" calcext:value-type="string">
            <text:p>itm_umbar_spear,</text:p>
          </table:table-cell>
          <table:table-cell table:style-name="ce11" office:value-type="string" calcext:value-type="string">
            <text:p>itm_umb_shield_a_good,</text:p>
          </table:table-cell>
          <table:table-cell table:style-name="ce11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4|knows_shield_2|knows_power_throw_1|knows_power_strike_3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B328]&lt;&gt;&quot;&quot;;[.C328]&lt;&gt;&quot;&quot;);CONCATENATE([Variables.$I$1];[Variables.$I$7];[.B328];[Variables.$I$7];[Variables.$I$6];[Variables.$I$7];[.C328];[Variables.$I$7];[Variables.$I$6];[Variables.$I$7];[.D328];[Variables.$I$7];[Variables.$I$6];[.E328];[Variables.$I$6];[.F328];[Variables.$I$6];[.G328];[Variables.$I$6];[.H328];[Variables.$I$6];[Variables.$I$1];[.I328];[.J328];[.K328];[.L328];[.M328];[.N328];[.O328];[Variables.$I$2];[Variables.$I$6];[.P328];[Variables.$I$6];[.Q328];[Variables.$I$6];[.R328];[Variables.$I$6];[.S328];[Variables.$I$6];[.T328];IF([.U328]&lt;&gt;&quot;&quot;;CONCATENATE([Variables.$I$6];[.U328]);&quot;&quot;);[Variables.$I$2];[Variables.$I$6]);IF([.B328]&lt;&gt;&quot;&quot;;CONCATENATE(&quot;#&quot;;[.B328]);&quot;&quot;))" office:value-type="string" office:string-value="[&quot;i5_corsair_master_spearman&quot;,&quot;Spearmaster_of_Umbar&quot;,&quot;Spearmasters_of_Umbar&quot;,tfg_armor| tfg_helm| tfg_boots|tfg_shield,0,0,fac_umbar,[itm_umb_helm_a,itm_umb_armor_e_good, itm_umb_armor_f,itm_splinted_greaves,itm_umbar_spear,itm_umb_shield_a_good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armor_e_good, itm_umb_armor_f,itm_splinted_greaves,itm_umbar_spear,itm_umb_shield_a_good,],attr_evil_tier_5,wp_tier_5,knows_common|knows_athletics_4|knows_shield_2|knows_power_throw_1|knows_power_strike_3,bandit_face1,bandit_face2],</text:p>
          </table:table-cell>
          <table:table-cell table:number-columns-repeated="16362"/>
        </table:table-row>
        <table:table-row table:style-name="ro1">
          <table:table-cell table:style-name="ce6" table:formula="of:=IF(AND([.B329]&lt;&gt;&quot;&quot;;[.C329]&lt;&gt;&quot;&quot;);CONCATENATE([Variables.$I$1];[Variables.$I$7];[.B329];[Variables.$I$7];[Variables.$I$6];[Variables.$I$7];[.C329];[Variables.$I$7];[Variables.$I$6];[Variables.$I$7];[.D329];[Variables.$I$7];[Variables.$I$6];[.E329];[Variables.$I$6];[.F329];[Variables.$I$6];[.G329];[Variables.$I$6];[.H329];[Variables.$I$6];[Variables.$I$1];[.I329];[.J329];[.K329];[.L329];[.M329];[.N329];[.O329];[Variables.$I$2];[Variables.$I$6];[.P329];[Variables.$I$6];[.Q329];[Variables.$I$6];[.R329];[Variables.$I$6];[.S329];[Variables.$I$6];[.T329];IF([.U329]&lt;&gt;&quot;&quot;;CONCATENATE([Variables.$I$6];[.U329]);&quot;&quot;);[Variables.$I$2];[Variables.$I$6]);IF([.B329]&lt;&gt;&quot;&quot;;CONCATENATE(&quot;#&quot;;[.B329]);&quot;&quot;))" office:value-type="string" office:string-value="[&quot;i5_corsair_master_pikeman&quot;,&quot;Pikemaster_of_Umbar&quot;,&quot;Pikemasters_of_Umbar&quot;,tfg_gloves| tfg_armor| tfg_helm| tfg_boots,0,0,fac_umbar,[itm_umb_helm_b_good,itm_umb_armor_f_good,itm_evil_gauntlets_a_lordly,itm_splinted_greave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b_good,itm_umb_armor_f_good,itm_evil_gauntlets_a_lordly,itm_splinted_greaves,itm_umbar_pike,],attr_evil_tier_5,wp_tier_5,knows_common|knows_athletics_4|knows_shield_2|knows_power_throw_2|knows_power_strike_6|knows_ironflesh_3,bandit_face1,bandit_face2],</text:p>
          </table:table-cell>
          <table:table-cell table:style-name="ce7" office:value-type="string" calcext:value-type="string">
            <text:p>i5_corsair_master_pikeman</text:p>
          </table:table-cell>
          <table:table-cell table:style-name="ce7" office:value-type="string" calcext:value-type="string">
            <text:p>Pikemaster_of_Umbar</text:p>
          </table:table-cell>
          <table:table-cell table:style-name="ce7" office:value-type="string" calcext:value-type="string">
            <text:p>Pikemasters_of_Umbar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umbar</text:p>
          </table:table-cell>
          <table:table-cell table:style-name="ce11" office:value-type="string" calcext:value-type="string">
            <text:p>itm_umb_helm_b_good,</text:p>
          </table:table-cell>
          <table:table-cell table:style-name="ce11" office:value-type="string" calcext:value-type="string">
            <text:p>itm_umb_armor_f_good,</text:p>
          </table:table-cell>
          <table:table-cell table:style-name="ce11" office:value-type="string" calcext:value-type="string">
            <text:p>itm_evil_gauntlets_a_lordly,</text:p>
          </table:table-cell>
          <table:table-cell table:style-name="ce11" office:value-type="string" calcext:value-type="string">
            <text:p>itm_splinted_greaves,</text:p>
          </table:table-cell>
          <table:table-cell table:style-name="ce11" office:value-type="string" calcext:value-type="string">
            <text:p>itm_umbar_pike,</text:p>
          </table:table-cell>
          <table:table-cell table:style-name="ce11" table:number-columns-repeated="2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4|knows_shield_2|knows_power_throw_2|knows_power_strike_6|knows_ironflesh_3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B329]&lt;&gt;&quot;&quot;;[.C329]&lt;&gt;&quot;&quot;);CONCATENATE([Variables.$I$1];[Variables.$I$7];[.B329];[Variables.$I$7];[Variables.$I$6];[Variables.$I$7];[.C329];[Variables.$I$7];[Variables.$I$6];[Variables.$I$7];[.D329];[Variables.$I$7];[Variables.$I$6];[.E329];[Variables.$I$6];[.F329];[Variables.$I$6];[.G329];[Variables.$I$6];[.H329];[Variables.$I$6];[Variables.$I$1];[.I329];[.J329];[.K329];[.L329];[.M329];[.N329];[.O329];[Variables.$I$2];[Variables.$I$6];[.P329];[Variables.$I$6];[.Q329];[Variables.$I$6];[.R329];[Variables.$I$6];[.S329];[Variables.$I$6];[.T329];IF([.U329]&lt;&gt;&quot;&quot;;CONCATENATE([Variables.$I$6];[.U329]);&quot;&quot;);[Variables.$I$2];[Variables.$I$6]);IF([.B329]&lt;&gt;&quot;&quot;;CONCATENATE(&quot;#&quot;;[.B329]);&quot;&quot;))" office:value-type="string" office:string-value="[&quot;i5_corsair_master_pikeman&quot;,&quot;Pikemaster_of_Umbar&quot;,&quot;Pikemasters_of_Umbar&quot;,tfg_gloves| tfg_armor| tfg_helm| tfg_boots,0,0,fac_umbar,[itm_umb_helm_b_good,itm_umb_armor_f_good,itm_evil_gauntlets_a_lordly,itm_splinted_greave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b_good,itm_umb_armor_f_good,itm_evil_gauntlets_a_lordly,itm_splinted_greaves,itm_umbar_pike,],attr_evil_tier_5,wp_tier_5,knows_common|knows_athletics_4|knows_shield_2|knows_power_throw_2|knows_power_strike_6|knows_ironflesh_3,bandit_face1,bandit_face2],</text:p>
          </table:table-cell>
          <table:table-cell table:number-columns-repeated="16362"/>
        </table:table-row>
        <table:table-row table:style-name="ro1">
          <table:table-cell table:formula="of:=IF(AND([.B330]&lt;&gt;&quot;&quot;;[.C330]&lt;&gt;&quot;&quot;);CONCATENATE([Variables.$I$1];[Variables.$I$7];[.B330];[Variables.$I$7];[Variables.$I$6];[Variables.$I$7];[.C330];[Variables.$I$7];[Variables.$I$6];[Variables.$I$7];[.D330];[Variables.$I$7];[Variables.$I$6];[.E330];[Variables.$I$6];[.F330];[Variables.$I$6];[.G330];[Variables.$I$6];[.H330];[Variables.$I$6];[Variables.$I$1];[.I330];[.J330];[.K330];[.L330];[.M330];[.N330];[.O330];[Variables.$I$2];[Variables.$I$6];[.P330];[Variables.$I$6];[.Q330];[Variables.$I$6];[.R330];[Variables.$I$6];[.S330];[Variables.$I$6];[.T330];IF([.U330]&lt;&gt;&quot;&quot;;CONCATENATE([Variables.$I$6];[.U330]);&quot;&quot;);[Variables.$I$2];[Variables.$I$6]);IF([.B330]&lt;&gt;&quot;&quot;;CONCATENATE(&quot;#&quot;;[.B330]);&quot;&quot;))">
            <text:p/>
          </table:table-cell>
          <table:table-cell table:style-name="ce6" table:number-columns-repeated="20"/>
          <table:table-cell table:style-name="ce36" table:formula="of:=IF(AND([.B330]&lt;&gt;&quot;&quot;;[.C330]&lt;&gt;&quot;&quot;);CONCATENATE([Variables.$I$1];[Variables.$I$7];[.B330];[Variables.$I$7];[Variables.$I$6];[Variables.$I$7];[.C330];[Variables.$I$7];[Variables.$I$6];[Variables.$I$7];[.D330];[Variables.$I$7];[Variables.$I$6];[.E330];[Variables.$I$6];[.F330];[Variables.$I$6];[.G330];[Variables.$I$6];[.H330];[Variables.$I$6];[Variables.$I$1];[.I330];[.J330];[.K330];[.L330];[.M330];[.N330];[.O330];[Variables.$I$2];[Variables.$I$6];[.P330];[Variables.$I$6];[.Q330];[Variables.$I$6];[.R330];[Variables.$I$6];[.S330];[Variables.$I$6];[.T330];IF([.U330]&lt;&gt;&quot;&quot;;CONCATENATE([Variables.$I$6];[.U330]);&quot;&quot;);[Variables.$I$2];[Variables.$I$6]);IF([.B330]&lt;&gt;&quot;&quot;;CONCATENATE(&quot;#&quot;;[.B330]);&quot;&quot;))">
            <text:p/>
          </table:table-cell>
          <table:table-cell table:number-columns-repeated="16362"/>
        </table:table-row>
        <table:table-row table:style-name="ro1">
          <table:table-cell table:style-name="ce6" table:formula="of:=IF(AND([.B331]&lt;&gt;&quot;&quot;;[.C331]&lt;&gt;&quot;&quot;);CONCATENATE([Variables.$I$1];[Variables.$I$7];[.B331];[Variables.$I$7];[Variables.$I$6];[Variables.$I$7];[.C331];[Variables.$I$7];[Variables.$I$6];[Variables.$I$7];[.D331];[Variables.$I$7];[Variables.$I$6];[.E331];[Variables.$I$6];[.F331];[Variables.$I$6];[.G331];[Variables.$I$6];[.H331];[Variables.$I$6];[Variables.$I$1];[.I331];[.J331];[.K331];[.L331];[.M331];[.N331];[.O331];[Variables.$I$2];[Variables.$I$6];[.P331];[Variables.$I$6];[.Q331];[Variables.$I$6];[.R331];[Variables.$I$6];[.S331];[Variables.$I$6];[.T331];IF([.U331]&lt;&gt;&quot;&quot;;CONCATENATE([Variables.$I$6];[.U331]);&quot;&quot;);[Variables.$I$2];[Variables.$I$6]);IF([.B331]&lt;&gt;&quot;&quot;;CONCATENATE(&quot;#&quot;;[.B331]);&quot;&quot;))" office:value-type="string" office:string-value="#ISENGARD Orcs" calcext:value-type="string">
            <text:p>#ISENGARD Orcs</text:p>
          </table:table-cell>
          <table:table-cell table:style-name="ce6" office:value-type="string" calcext:value-type="string">
            <text:p>ISENGARD Orcs</text:p>
          </table:table-cell>
          <table:table-cell table:style-name="ce6" table:number-columns-repeated="19"/>
          <table:table-cell table:number-columns-repeated="16363"/>
        </table:table-row>
        <table:table-row table:style-name="ro1">
          <table:table-cell table:style-name="ce6" table:formula="of:=IF(AND([.B332]&lt;&gt;&quot;&quot;;[.C332]&lt;&gt;&quot;&quot;);CONCATENATE([Variables.$I$1];[Variables.$I$7];[.B332];[Variables.$I$7];[Variables.$I$6];[Variables.$I$7];[.C332];[Variables.$I$7];[Variables.$I$6];[Variables.$I$7];[.D332];[Variables.$I$7];[Variables.$I$6];[.E332];[Variables.$I$6];[.F332];[Variables.$I$6];[.G332];[Variables.$I$6];[.H332];[Variables.$I$6];[Variables.$I$1];[.I332];[.J332];[.K332];[.L332];[.M332];[.N332];[.O332];[Variables.$I$2];[Variables.$I$6];[.P332];[Variables.$I$6];[.Q332];[Variables.$I$6];[.R332];[Variables.$I$6];[.S332];[Variables.$I$6];[.T332];IF([.U332]&lt;&gt;&quot;&quot;;CONCATENATE([Variables.$I$6];[.U332]);&quot;&quot;);[Variables.$I$2];[Variables.$I$6]);IF([.B332]&lt;&gt;&quot;&quot;;CONCATENATE(&quot;#&quot;;[.B332]);&quot;&quot;))" office:value-type="string" office:string-value="[&quot;i1_isen_orc_snaga&quot;,&quot;Orc_Snaga_of_Isengard&quot;,&quot;Orc_Snagas_of_Isengard&quot;,tf_orc| tf_no_capture_alive,0,0,fac_isengard,[itm_orc_coif_bad,itm_orc_coif,itm_orc_skullcap_bad,itm_isen_orc_light_a_bad,itm_isen_orc_light_b_bad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" calcext:value-type="string">
            <text:p>["i1_isen_orc_snaga","Orc_Snaga_of_Isengard","Orc_Snagas_of_Isengard",tf_orc| tf_no_capture_alive,0,0,fac_isengard,[itm_orc_coif_bad,itm_orc_coif,itm_orc_skullcap_bad,itm_isen_orc_light_a_bad,itm_isen_orc_light_b_bad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</text:p>
          </table:table-cell>
          <table:table-cell table:style-name="ce7" office:value-type="string" calcext:value-type="string">
            <text:p>i1_isen_orc_snaga</text:p>
          </table:table-cell>
          <table:table-cell table:style-name="ce7" office:value-type="string" calcext:value-type="string">
            <text:p>Orc_Snaga_of_Isengard</text:p>
          </table:table-cell>
          <table:table-cell table:style-name="ce7" office:value-type="string" calcext:value-type="string">
            <text:p>Orc_Snagas_of_Isengard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sengard</text:p>
          </table:table-cell>
          <table:table-cell table:style-name="ce11" office:value-type="string" calcext:value-type="string">
            <text:p>itm_orc_coif_bad,itm_orc_coif,itm_orc_skullcap_bad,</text:p>
          </table:table-cell>
          <table:table-cell table:style-name="ce11" office:value-type="string" calcext:value-type="string">
            <text:p>itm_isen_orc_light_a_bad,itm_isen_orc_light_b_bad,</text:p>
          </table:table-cell>
          <table:table-cell table:style-name="ce11" table:number-columns-repeated="2"/>
          <table:table-cell table:style-name="ce11" office:value-type="string" calcext:value-type="string">
            <text:p>itm_wood_club,itm_orc_simple_spear,itm_orc_slasher,itm_orc_axe,</text:p>
          </table:table-cell>
          <table:table-cell table:style-name="ce11"/>
          <table:table-cell table:style-name="ce11" office:value-type="string" calcext:value-type="string">
            <text:p>itm_metal_scraps_bad,itm_metal_scraps_medium,itm_metal_scraps_good,</text:p>
          </table:table-cell>
          <table:table-cell table:style-name="ce12" office:value-type="string" calcext:value-type="string">
            <text:p>attr_orc_tier_1</text:p>
          </table:table-cell>
          <table:table-cell table:style-name="ce12" office:value-type="string" calcext:value-type="string">
            <text:p>wp_orc_tier_1</text:p>
          </table:table-cell>
          <table:table-cell table:style-name="ce13" office:value-type="string" calcext:value-type="string">
            <text:p>knows_common|knows_ironflesh_1|knows_power_strike_1|knows_shield_1|knows_athletics_1|knows_riding_1|knows_looting_2|knows_tactics_1|knows_pathfinding_1|knows_wound_treatment_1|knows_surgery_1|knows_prisoner_management_1|knows_trade_1</text:p>
          </table:table-cell>
          <table:table-cell table:style-name="ce14" office:value-type="string" calcext:value-type="string">
            <text:p>orc_face1</text:p>
          </table:table-cell>
          <table:table-cell table:style-name="ce14" office:value-type="string" calcext:value-type="string">
            <text:p>orc_face2</text:p>
          </table:table-cell>
          <table:table-cell table:style-name="ce15"/>
          <table:table-cell table:style-name="ce6" table:formula="of:=IF(AND([.B332]&lt;&gt;&quot;&quot;;[.C332]&lt;&gt;&quot;&quot;);CONCATENATE([Variables.$I$1];[Variables.$I$7];[.B332];[Variables.$I$7];[Variables.$I$6];[Variables.$I$7];[.C332];[Variables.$I$7];[Variables.$I$6];[Variables.$I$7];[.D332];[Variables.$I$7];[Variables.$I$6];[.E332];[Variables.$I$6];[.F332];[Variables.$I$6];[.G332];[Variables.$I$6];[.H332];[Variables.$I$6];[Variables.$I$1];[.I332];[.J332];[.K332];[.L332];[.M332];[.N332];[.O332];[Variables.$I$2];[Variables.$I$6];[.P332];[Variables.$I$6];[.Q332];[Variables.$I$6];[.R332];[Variables.$I$6];[.S332];[Variables.$I$6];[.T332];IF([.U332]&lt;&gt;&quot;&quot;;CONCATENATE([Variables.$I$6];[.U332]);&quot;&quot;);[Variables.$I$2];[Variables.$I$6]);IF([.B332]&lt;&gt;&quot;&quot;;CONCATENATE(&quot;#&quot;;[.B332]);&quot;&quot;))" office:value-type="string" office:string-value="[&quot;i1_isen_orc_snaga&quot;,&quot;Orc_Snaga_of_Isengard&quot;,&quot;Orc_Snagas_of_Isengard&quot;,tf_orc| tf_no_capture_alive,0,0,fac_isengard,[itm_orc_coif_bad,itm_orc_coif,itm_orc_skullcap_bad,itm_isen_orc_light_a_bad,itm_isen_orc_light_b_bad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" calcext:value-type="string">
            <text:p>["i1_isen_orc_snaga","Orc_Snaga_of_Isengard","Orc_Snagas_of_Isengard",tf_orc| tf_no_capture_alive,0,0,fac_isengard,[itm_orc_coif_bad,itm_orc_coif,itm_orc_skullcap_bad,itm_isen_orc_light_a_bad,itm_isen_orc_light_b_bad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</text:p>
          </table:table-cell>
          <table:table-cell table:number-columns-repeated="16362"/>
        </table:table-row>
        <table:table-row table:style-name="ro1">
          <table:table-cell table:style-name="ce6" table:formula="of:=IF(AND([.B333]&lt;&gt;&quot;&quot;;[.C333]&lt;&gt;&quot;&quot;);CONCATENATE([Variables.$I$1];[Variables.$I$7];[.B333];[Variables.$I$7];[Variables.$I$6];[Variables.$I$7];[.C333];[Variables.$I$7];[Variables.$I$6];[Variables.$I$7];[.D333];[Variables.$I$7];[Variables.$I$6];[.E333];[Variables.$I$6];[.F333];[Variables.$I$6];[.G333];[Variables.$I$6];[.H333];[Variables.$I$6];[Variables.$I$1];[.I333];[.J333];[.K333];[.L333];[.M333];[.N333];[.O333];[Variables.$I$2];[Variables.$I$6];[.P333];[Variables.$I$6];[.Q333];[Variables.$I$6];[.R333];[Variables.$I$6];[.S333];[Variables.$I$6];[.T333];IF([.U333]&lt;&gt;&quot;&quot;;CONCATENATE([Variables.$I$6];[.U333]);&quot;&quot;);[Variables.$I$2];[Variables.$I$6]);IF([.B333]&lt;&gt;&quot;&quot;;CONCATENATE(&quot;#&quot;;[.B333]);&quot;&quot;))" office:value-type="string" office:string-value="[&quot;i2_isen_orc&quot;,&quot;Orc_of_Isengard&quot;,&quot;Orcs_of_Isengard&quot;,tf_orc| tfg_armor| tfg_boots| tf_no_capture_alive,0,0,fac_isengard,[itm_isen_orc_helm_a_bad, itm_isen_orc_helm_a,itm_orc_skullcap,itm_orc_coif,itm_isen_orc_light_a,itm_isen_orc_light_b,itm_orc_ragwrap,itm_isengard_spear,itm_orc_simple_spear,itm_orc_bill_bad,itm_orc_bill_bad,itm_orc_slasher,itm_orc_slasher_heavy,itm_orc_slash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" calcext:value-type="string">
            <text:p>["i2_isen_orc","Orc_of_Isengard","Orcs_of_Isengard",tf_orc| tfg_armor| tfg_boots| tf_no_capture_alive,0,0,fac_isengard,[itm_isen_orc_helm_a_bad, itm_isen_orc_helm_a,itm_orc_skullcap,itm_orc_coif,itm_isen_orc_light_a,itm_isen_orc_light_b,itm_orc_ragwrap,itm_isengard_spear,itm_orc_simple_spear,itm_orc_bill_bad,itm_orc_bill_bad,itm_orc_slasher,itm_orc_slasher_heavy,itm_orc_slash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</text:p>
          </table:table-cell>
          <table:table-cell table:style-name="ce7" office:value-type="string" calcext:value-type="string">
            <text:p>i2_isen_orc</text:p>
          </table:table-cell>
          <table:table-cell table:style-name="ce7" office:value-type="string" calcext:value-type="string">
            <text:p>Orc_of_Isengard</text:p>
          </table:table-cell>
          <table:table-cell table:style-name="ce7" office:value-type="string" calcext:value-type="string">
            <text:p>Orcs_of_Isengard</text:p>
          </table:table-cell>
          <table:table-cell table:style-name="ce8" office:value-type="string" calcext:value-type="string">
            <text:p>tf_orc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sengard</text:p>
          </table:table-cell>
          <table:table-cell table:style-name="ce11" office:value-type="string" calcext:value-type="string">
            <text:p>itm_isen_orc_helm_a_bad, itm_isen_orc_helm_a,itm_orc_skullcap,itm_orc_coif,</text:p>
          </table:table-cell>
          <table:table-cell table:style-name="ce11" office:value-type="string" calcext:value-type="string">
            <text:p>itm_isen_orc_light_a,itm_isen_orc_light_b,</text:p>
          </table:table-cell>
          <table:table-cell table:style-name="ce11"/>
          <table:table-cell table:style-name="ce11" office:value-type="string" calcext:value-type="string">
            <text:p>itm_orc_ragwrap,</text:p>
          </table:table-cell>
          <table:table-cell table:style-name="ce11" office:value-type="string" calcext:value-type="string">
            <text:p>itm_isengard_spear,itm_orc_simple_spear,itm_orc_bill_bad,itm_orc_bill_bad,</text:p>
          </table:table-cell>
          <table:table-cell table:style-name="ce11" office:value-type="string" calcext:value-type="string">
            <text:p>itm_orc_slasher,itm_orc_slasher_heavy,itm_orc_slasher,itm_orc_axe,itm_isen_orc_shield_a,</text:p>
          </table:table-cell>
          <table:table-cell table:style-name="ce11"/>
          <table:table-cell table:style-name="ce12" office:value-type="string" calcext:value-type="string">
            <text:p>attr_orc_tier_2</text:p>
          </table:table-cell>
          <table:table-cell table:style-name="ce12" office:value-type="string" calcext:value-type="string">
            <text:p>wp_orc_tier_2</text:p>
          </table:table-cell>
          <table:table-cell table:style-name="ce13" office:value-type="string" calcext:value-type="string">
            <text:p>knows_common|knows_ironflesh_1|knows_power_strike_2|knows_power_throw_1|knows_shield_1|knows_athletics_1|knows_riding_1|knows_looting_2|knows_tactics_1|knows_pathfinding_1|knows_wound_treatment_1|knows_surgery_1|knows_prisoner_management_1|knows_trade_1</text:p>
          </table:table-cell>
          <table:table-cell table:style-name="ce14" office:value-type="string" calcext:value-type="string">
            <text:p>orc_face2</text:p>
          </table:table-cell>
          <table:table-cell table:style-name="ce14" office:value-type="string" calcext:value-type="string">
            <text:p>orc_face3</text:p>
          </table:table-cell>
          <table:table-cell table:style-name="ce15"/>
          <table:table-cell table:style-name="ce6" table:formula="of:=IF(AND([.B333]&lt;&gt;&quot;&quot;;[.C333]&lt;&gt;&quot;&quot;);CONCATENATE([Variables.$I$1];[Variables.$I$7];[.B333];[Variables.$I$7];[Variables.$I$6];[Variables.$I$7];[.C333];[Variables.$I$7];[Variables.$I$6];[Variables.$I$7];[.D333];[Variables.$I$7];[Variables.$I$6];[.E333];[Variables.$I$6];[.F333];[Variables.$I$6];[.G333];[Variables.$I$6];[.H333];[Variables.$I$6];[Variables.$I$1];[.I333];[.J333];[.K333];[.L333];[.M333];[.N333];[.O333];[Variables.$I$2];[Variables.$I$6];[.P333];[Variables.$I$6];[.Q333];[Variables.$I$6];[.R333];[Variables.$I$6];[.S333];[Variables.$I$6];[.T333];IF([.U333]&lt;&gt;&quot;&quot;;CONCATENATE([Variables.$I$6];[.U333]);&quot;&quot;);[Variables.$I$2];[Variables.$I$6]);IF([.B333]&lt;&gt;&quot;&quot;;CONCATENATE(&quot;#&quot;;[.B333]);&quot;&quot;))" office:value-type="string" office:string-value="[&quot;i2_isen_orc&quot;,&quot;Orc_of_Isengard&quot;,&quot;Orcs_of_Isengard&quot;,tf_orc| tfg_armor| tfg_boots| tf_no_capture_alive,0,0,fac_isengard,[itm_isen_orc_helm_a_bad, itm_isen_orc_helm_a,itm_orc_skullcap,itm_orc_coif,itm_isen_orc_light_a,itm_isen_orc_light_b,itm_orc_ragwrap,itm_isengard_spear,itm_orc_simple_spear,itm_orc_bill_bad,itm_orc_bill_bad,itm_orc_slasher,itm_orc_slasher_heavy,itm_orc_slash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" calcext:value-type="string">
            <text:p>["i2_isen_orc","Orc_of_Isengard","Orcs_of_Isengard",tf_orc| tfg_armor| tfg_boots| tf_no_capture_alive,0,0,fac_isengard,[itm_isen_orc_helm_a_bad, itm_isen_orc_helm_a,itm_orc_skullcap,itm_orc_coif,itm_isen_orc_light_a,itm_isen_orc_light_b,itm_orc_ragwrap,itm_isengard_spear,itm_orc_simple_spear,itm_orc_bill_bad,itm_orc_bill_bad,itm_orc_slasher,itm_orc_slasher_heavy,itm_orc_slash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</text:p>
          </table:table-cell>
          <table:table-cell table:number-columns-repeated="16362"/>
        </table:table-row>
        <table:table-row table:style-name="ro1">
          <table:table-cell table:style-name="ce6" table:formula="of:=IF(AND([.B334]&lt;&gt;&quot;&quot;;[.C334]&lt;&gt;&quot;&quot;);CONCATENATE([Variables.$I$1];[Variables.$I$7];[.B334];[Variables.$I$7];[Variables.$I$6];[Variables.$I$7];[.C334];[Variables.$I$7];[Variables.$I$6];[Variables.$I$7];[.D334];[Variables.$I$7];[Variables.$I$6];[.E334];[Variables.$I$6];[.F334];[Variables.$I$6];[.G334];[Variables.$I$6];[.H334];[Variables.$I$6];[Variables.$I$1];[.I334];[.J334];[.K334];[.L334];[.M334];[.N334];[.O334];[Variables.$I$2];[Variables.$I$6];[.P334];[Variables.$I$6];[.Q334];[Variables.$I$6];[.R334];[Variables.$I$6];[.S334];[Variables.$I$6];[.T334];IF([.U334]&lt;&gt;&quot;&quot;;CONCATENATE([Variables.$I$6];[.U334]);&quot;&quot;);[Variables.$I$2];[Variables.$I$6]);IF([.B334]&lt;&gt;&quot;&quot;;CONCATENATE(&quot;#&quot;;[.B334]);&quot;&quot;))" office:value-type="string" office:string-value="[&quot;i3_isen_large_orc&quot;,&quot;Large_Orc_of_Isengard&quot;,&quot;Large_Orcs_of_Isengard&quot;,tf_orc| tfg_armor| tfg_helm| tfg_boots| tf_no_capture_alive,0,0,fac_isengard,[itm_isen_orc_helm_a,itm_orc_coif,itm_isen_orc_pad_a,itm_isen_orc_pad_b,itm_orc_ragwrap,itm_isengard_spear,itm_isengard_spear,itm_orc_simple_spear,itm_orc_bill_bad,itm_orc_slasher_heavy,itm_isengard_sword,itm_orc_axe,itm_isen_orc_shield_a,itm_isen_orc_shield_b,],attr_orc_tier_3,wp_orc_tier_3,knows_common|knows_athletics_2|knows_power_throw_2|knows_power_strike_4,orc_face4,orc_face5]," calcext:value-type="string">
            <text:p>["i3_isen_large_orc","Large_Orc_of_Isengard","Large_Orcs_of_Isengard",tf_orc| tfg_armor| tfg_helm| tfg_boots| tf_no_capture_alive,0,0,fac_isengard,[itm_isen_orc_helm_a,itm_orc_coif,itm_isen_orc_pad_a,itm_isen_orc_pad_b,itm_orc_ragwrap,itm_isengard_spear,itm_isengard_spear,itm_orc_simple_spear,itm_orc_bill_bad,itm_orc_slasher_heavy,itm_isengard_sword,itm_orc_axe,itm_isen_orc_shield_a,itm_isen_orc_shield_b,],attr_orc_tier_3,wp_orc_tier_3,knows_common|knows_athletics_2|knows_power_throw_2|knows_power_strike_4,orc_face4,orc_face5],</text:p>
          </table:table-cell>
          <table:table-cell table:style-name="ce7" office:value-type="string" calcext:value-type="string">
            <text:p>i3_isen_large_orc</text:p>
          </table:table-cell>
          <table:table-cell table:style-name="ce7" office:value-type="string" calcext:value-type="string">
            <text:p>Large_Orc_of_Isengard</text:p>
          </table:table-cell>
          <table:table-cell table:style-name="ce7" office:value-type="string" calcext:value-type="string">
            <text:p>Large_Orcs_of_Isengard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sengard</text:p>
          </table:table-cell>
          <table:table-cell table:style-name="ce11" office:value-type="string" calcext:value-type="string">
            <text:p>itm_isen_orc_helm_a,itm_orc_coif,</text:p>
          </table:table-cell>
          <table:table-cell table:style-name="ce11" office:value-type="string" calcext:value-type="string">
            <text:p>itm_isen_orc_pad_a,itm_isen_orc_pad_b,</text:p>
          </table:table-cell>
          <table:table-cell table:style-name="ce11"/>
          <table:table-cell table:style-name="ce11" office:value-type="string" calcext:value-type="string">
            <text:p>itm_orc_ragwrap,</text:p>
          </table:table-cell>
          <table:table-cell table:style-name="ce11" office:value-type="string" calcext:value-type="string">
            <text:p>itm_isengard_spear,itm_isengard_spear,itm_orc_simple_spear,itm_orc_bill_bad,</text:p>
          </table:table-cell>
          <table:table-cell table:style-name="ce11" office:value-type="string" calcext:value-type="string">
            <text:p>itm_orc_slasher_heavy,itm_isengard_sword,itm_orc_axe,itm_isen_orc_shield_a,itm_isen_orc_shield_b,</text:p>
          </table:table-cell>
          <table:table-cell table:style-name="ce11"/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3</text:p>
          </table:table-cell>
          <table:table-cell table:style-name="ce12" office:value-type="string" calcext:value-type="string">
            <text:p>knows_common|knows_athletics_2|knows_power_throw_2|knows_power_strike_4</text:p>
          </table:table-cell>
          <table:table-cell table:style-name="ce14" office:value-type="string" calcext:value-type="string">
            <text:p>orc_face4</text:p>
          </table:table-cell>
          <table:table-cell table:style-name="ce14" office:value-type="string" calcext:value-type="string">
            <text:p>orc_face5</text:p>
          </table:table-cell>
          <table:table-cell table:style-name="ce15"/>
          <table:table-cell table:style-name="ce6" table:formula="of:=IF(AND([.B334]&lt;&gt;&quot;&quot;;[.C334]&lt;&gt;&quot;&quot;);CONCATENATE([Variables.$I$1];[Variables.$I$7];[.B334];[Variables.$I$7];[Variables.$I$6];[Variables.$I$7];[.C334];[Variables.$I$7];[Variables.$I$6];[Variables.$I$7];[.D334];[Variables.$I$7];[Variables.$I$6];[.E334];[Variables.$I$6];[.F334];[Variables.$I$6];[.G334];[Variables.$I$6];[.H334];[Variables.$I$6];[Variables.$I$1];[.I334];[.J334];[.K334];[.L334];[.M334];[.N334];[.O334];[Variables.$I$2];[Variables.$I$6];[.P334];[Variables.$I$6];[.Q334];[Variables.$I$6];[.R334];[Variables.$I$6];[.S334];[Variables.$I$6];[.T334];IF([.U334]&lt;&gt;&quot;&quot;;CONCATENATE([Variables.$I$6];[.U334]);&quot;&quot;);[Variables.$I$2];[Variables.$I$6]);IF([.B334]&lt;&gt;&quot;&quot;;CONCATENATE(&quot;#&quot;;[.B334]);&quot;&quot;))" office:value-type="string" office:string-value="[&quot;i3_isen_large_orc&quot;,&quot;Large_Orc_of_Isengard&quot;,&quot;Large_Orcs_of_Isengard&quot;,tf_orc| tfg_armor| tfg_helm| tfg_boots| tf_no_capture_alive,0,0,fac_isengard,[itm_isen_orc_helm_a,itm_orc_coif,itm_isen_orc_pad_a,itm_isen_orc_pad_b,itm_orc_ragwrap,itm_isengard_spear,itm_isengard_spear,itm_orc_simple_spear,itm_orc_bill_bad,itm_orc_slasher_heavy,itm_isengard_sword,itm_orc_axe,itm_isen_orc_shield_a,itm_isen_orc_shield_b,],attr_orc_tier_3,wp_orc_tier_3,knows_common|knows_athletics_2|knows_power_throw_2|knows_power_strike_4,orc_face4,orc_face5]," calcext:value-type="string">
            <text:p>["i3_isen_large_orc","Large_Orc_of_Isengard","Large_Orcs_of_Isengard",tf_orc| tfg_armor| tfg_helm| tfg_boots| tf_no_capture_alive,0,0,fac_isengard,[itm_isen_orc_helm_a,itm_orc_coif,itm_isen_orc_pad_a,itm_isen_orc_pad_b,itm_orc_ragwrap,itm_isengard_spear,itm_isengard_spear,itm_orc_simple_spear,itm_orc_bill_bad,itm_orc_slasher_heavy,itm_isengard_sword,itm_orc_axe,itm_isen_orc_shield_a,itm_isen_orc_shield_b,],attr_orc_tier_3,wp_orc_tier_3,knows_common|knows_athletics_2|knows_power_throw_2|knows_power_strike_4,orc_face4,orc_face5],</text:p>
          </table:table-cell>
          <table:table-cell table:number-columns-repeated="16362"/>
        </table:table-row>
        <table:table-row table:style-name="ro1">
          <table:table-cell table:style-name="ce6" table:formula="of:=IF(AND([.B335]&lt;&gt;&quot;&quot;;[.C335]&lt;&gt;&quot;&quot;);CONCATENATE([Variables.$I$1];[Variables.$I$7];[.B335];[Variables.$I$7];[Variables.$I$6];[Variables.$I$7];[.C335];[Variables.$I$7];[Variables.$I$6];[Variables.$I$7];[.D335];[Variables.$I$7];[Variables.$I$6];[.E335];[Variables.$I$6];[.F335];[Variables.$I$6];[.G335];[Variables.$I$6];[.H335];[Variables.$I$6];[Variables.$I$1];[.I335];[.J335];[.K335];[.L335];[.M335];[.N335];[.O335];[Variables.$I$2];[Variables.$I$6];[.P335];[Variables.$I$6];[.Q335];[Variables.$I$6];[.R335];[Variables.$I$6];[.S335];[Variables.$I$6];[.T335];IF([.U335]&lt;&gt;&quot;&quot;;CONCATENATE([Variables.$I$6];[.U335]);&quot;&quot;);[Variables.$I$2];[Variables.$I$6]);IF([.B335]&lt;&gt;&quot;&quot;;CONCATENATE(&quot;#&quot;;[.B335]);&quot;&quot;))" office:value-type="string" office:string-value="[&quot;i4_isen_fell_orc&quot;,&quot;Fell_Orc_of_Isengard&quot;,&quot;Fell_Orcs_of_Isengard&quot;,tf_orc| tfg_armor| tfg_helm| tfg_boots| tfg_gloves| tf_no_capture_alive,0,0,fac_isengard,[itm_isen_orc_helm_a_good,itm_isen_orc_pad_b_good, itm_isen_orc_mail_b,itm_orc_greaves,itm_isengard_spear,itm_isengard_spear,itm_isengard_sword,itm_orc_axe,itm_isen_orc_shield_a,itm_isen_orc_shield_b,],attr_orc_tier_4,wp_orc_tier_4,knows_common|knows_athletics_2|knows_power_throw_3|knows_power_strike_4,orc_face6,orc_face7]," calcext:value-type="string">
            <text:p>["i4_isen_fell_orc","Fell_Orc_of_Isengard","Fell_Orcs_of_Isengard",tf_orc| tfg_armor| tfg_helm| tfg_boots| tfg_gloves| tf_no_capture_alive,0,0,fac_isengard,[itm_isen_orc_helm_a_good,itm_isen_orc_pad_b_good, itm_isen_orc_mail_b,itm_orc_greaves,itm_isengard_spear,itm_isengard_spear,itm_isengard_sword,itm_orc_axe,itm_isen_orc_shield_a,itm_isen_orc_shield_b,],attr_orc_tier_4,wp_orc_tier_4,knows_common|knows_athletics_2|knows_power_throw_3|knows_power_strike_4,orc_face6,orc_face7],</text:p>
          </table:table-cell>
          <table:table-cell table:style-name="ce7" office:value-type="string" calcext:value-type="string">
            <text:p>i4_isen_fell_orc</text:p>
          </table:table-cell>
          <table:table-cell table:style-name="ce7" office:value-type="string" calcext:value-type="string">
            <text:p>Fell_Orc_of_Isengard</text:p>
          </table:table-cell>
          <table:table-cell table:style-name="ce7" office:value-type="string" calcext:value-type="string">
            <text:p>Fell_Orcs_of_Isengard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sengard</text:p>
          </table:table-cell>
          <table:table-cell table:style-name="ce11" office:value-type="string" calcext:value-type="string">
            <text:p>itm_isen_orc_helm_a_good,</text:p>
          </table:table-cell>
          <table:table-cell table:style-name="ce11" office:value-type="string" calcext:value-type="string">
            <text:p>itm_isen_orc_pad_b_good, itm_isen_orc_mail_b,</text:p>
          </table:table-cell>
          <table:table-cell table:style-name="ce11"/>
          <table:table-cell table:style-name="ce11" office:value-type="string" calcext:value-type="string">
            <text:p>itm_orc_greaves,</text:p>
          </table:table-cell>
          <table:table-cell table:style-name="ce11" office:value-type="string" calcext:value-type="string">
            <text:p>itm_isengard_spear,itm_isengard_spear,</text:p>
          </table:table-cell>
          <table:table-cell table:style-name="ce11" office:value-type="string" calcext:value-type="string">
            <text:p>itm_isengard_sword,itm_orc_axe,itm_isen_orc_shield_a,itm_isen_orc_shield_b,</text:p>
          </table:table-cell>
          <table:table-cell table:style-name="ce11"/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athletics_2|knows_power_throw_3|knows_power_strike_4</text:p>
          </table:table-cell>
          <table:table-cell table:style-name="ce14" office:value-type="string" calcext:value-type="string">
            <text:p>orc_face6</text:p>
          </table:table-cell>
          <table:table-cell table:style-name="ce14" office:value-type="string" calcext:value-type="string">
            <text:p>orc_face7</text:p>
          </table:table-cell>
          <table:table-cell table:style-name="ce15"/>
          <table:table-cell table:style-name="ce6" table:formula="of:=IF(AND([.B335]&lt;&gt;&quot;&quot;;[.C335]&lt;&gt;&quot;&quot;);CONCATENATE([Variables.$I$1];[Variables.$I$7];[.B335];[Variables.$I$7];[Variables.$I$6];[Variables.$I$7];[.C335];[Variables.$I$7];[Variables.$I$6];[Variables.$I$7];[.D335];[Variables.$I$7];[Variables.$I$6];[.E335];[Variables.$I$6];[.F335];[Variables.$I$6];[.G335];[Variables.$I$6];[.H335];[Variables.$I$6];[Variables.$I$1];[.I335];[.J335];[.K335];[.L335];[.M335];[.N335];[.O335];[Variables.$I$2];[Variables.$I$6];[.P335];[Variables.$I$6];[.Q335];[Variables.$I$6];[.R335];[Variables.$I$6];[.S335];[Variables.$I$6];[.T335];IF([.U335]&lt;&gt;&quot;&quot;;CONCATENATE([Variables.$I$6];[.U335]);&quot;&quot;);[Variables.$I$2];[Variables.$I$6]);IF([.B335]&lt;&gt;&quot;&quot;;CONCATENATE(&quot;#&quot;;[.B335]);&quot;&quot;))" office:value-type="string" office:string-value="[&quot;i4_isen_fell_orc&quot;,&quot;Fell_Orc_of_Isengard&quot;,&quot;Fell_Orcs_of_Isengard&quot;,tf_orc| tfg_armor| tfg_helm| tfg_boots| tfg_gloves| tf_no_capture_alive,0,0,fac_isengard,[itm_isen_orc_helm_a_good,itm_isen_orc_pad_b_good, itm_isen_orc_mail_b,itm_orc_greaves,itm_isengard_spear,itm_isengard_spear,itm_isengard_sword,itm_orc_axe,itm_isen_orc_shield_a,itm_isen_orc_shield_b,],attr_orc_tier_4,wp_orc_tier_4,knows_common|knows_athletics_2|knows_power_throw_3|knows_power_strike_4,orc_face6,orc_face7]," calcext:value-type="string">
            <text:p>["i4_isen_fell_orc","Fell_Orc_of_Isengard","Fell_Orcs_of_Isengard",tf_orc| tfg_armor| tfg_helm| tfg_boots| tfg_gloves| tf_no_capture_alive,0,0,fac_isengard,[itm_isen_orc_helm_a_good,itm_isen_orc_pad_b_good, itm_isen_orc_mail_b,itm_orc_greaves,itm_isengard_spear,itm_isengard_spear,itm_isengard_sword,itm_orc_axe,itm_isen_orc_shield_a,itm_isen_orc_shield_b,],attr_orc_tier_4,wp_orc_tier_4,knows_common|knows_athletics_2|knows_power_throw_3|knows_power_strike_4,orc_face6,orc_face7],</text:p>
          </table:table-cell>
          <table:table-cell table:number-columns-repeated="16362"/>
        </table:table-row>
        <table:table-row table:style-name="ro1">
          <table:table-cell table:style-name="ce6" table:formula="of:=IF(AND([.B336]&lt;&gt;&quot;&quot;;[.C336]&lt;&gt;&quot;&quot;);CONCATENATE([Variables.$I$1];[Variables.$I$7];[.B336];[Variables.$I$7];[Variables.$I$6];[Variables.$I$7];[.C336];[Variables.$I$7];[Variables.$I$6];[Variables.$I$7];[.D336];[Variables.$I$7];[Variables.$I$6];[.E336];[Variables.$I$6];[.F336];[Variables.$I$6];[.G336];[Variables.$I$6];[.H336];[Variables.$I$6];[Variables.$I$1];[.I336];[.J336];[.K336];[.L336];[.M336];[.N336];[.O336];[Variables.$I$2];[Variables.$I$6];[.P336];[Variables.$I$6];[.Q336];[Variables.$I$6];[.R336];[Variables.$I$6];[.S336];[Variables.$I$6];[.T336];IF([.U336]&lt;&gt;&quot;&quot;;CONCATENATE([Variables.$I$6];[.U336]);&quot;&quot;);[Variables.$I$2];[Variables.$I$6]);IF([.B336]&lt;&gt;&quot;&quot;;CONCATENATE(&quot;#&quot;;[.B336]);&quot;&quot;))" office:value-type="string" office:string-value="[&quot;i3_isen_large_orc_despoiler&quot;,&quot;Large_Orc_Despoiler&quot;,&quot;Large_Orc_Despoilers&quot;,tf_orc|tfg_armor| tfg_helm| tfg_boots| tf_no_capture_alive,0,0,fac_isengard,[itm_isen_orc_helm_a,itm_isen_orc_mail_a_bad,itm_isen_orc_light_b_good,itm_orc_greaves,itm_orc_sledgehammer,itm_isengard_hammer,itm_twohand_wood_club,],attr_orc_tier_3,wp_orc_tier_3,knows_common|knows_athletics_3|knows_power_strike_4,orc_face8,orc_face9]," calcext:value-type="string">
            <text:p>["i3_isen_large_orc_despoiler","Large_Orc_Despoiler","Large_Orc_Despoilers",tf_orc|tfg_armor| tfg_helm| tfg_boots| tf_no_capture_alive,0,0,fac_isengard,[itm_isen_orc_helm_a,itm_isen_orc_mail_a_bad,itm_isen_orc_light_b_good,itm_orc_greaves,itm_orc_sledgehammer,itm_isengard_hammer,itm_twohand_wood_club,],attr_orc_tier_3,wp_orc_tier_3,knows_common|knows_athletics_3|knows_power_strike_4,orc_face8,orc_face9],</text:p>
          </table:table-cell>
          <table:table-cell table:style-name="ce7" office:value-type="string" calcext:value-type="string">
            <text:p>i3_isen_large_orc_despoiler</text:p>
          </table:table-cell>
          <table:table-cell table:style-name="ce7" office:value-type="string" calcext:value-type="string">
            <text:p>Large_Orc_Despoiler</text:p>
          </table:table-cell>
          <table:table-cell table:style-name="ce7" office:value-type="string" calcext:value-type="string">
            <text:p>Large_Orc_Despoilers</text:p>
          </table:table-cell>
          <table:table-cell table:style-name="ce8" office:value-type="string" calcext:value-type="string">
            <text:p>tf_orc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sengard</text:p>
          </table:table-cell>
          <table:table-cell table:style-name="ce11" office:value-type="string" calcext:value-type="string">
            <text:p>itm_isen_orc_helm_a,</text:p>
          </table:table-cell>
          <table:table-cell table:style-name="ce11" office:value-type="string" calcext:value-type="string">
            <text:p>itm_isen_orc_mail_a_bad,itm_isen_orc_light_b_good,</text:p>
          </table:table-cell>
          <table:table-cell table:style-name="ce11"/>
          <table:table-cell table:style-name="ce11" office:value-type="string" calcext:value-type="string">
            <text:p>itm_orc_greaves,</text:p>
          </table:table-cell>
          <table:table-cell table:style-name="ce11" office:value-type="string" calcext:value-type="string">
            <text:p>itm_orc_sledgehammer,itm_isengard_hammer,itm_twohand_wood_club,</text:p>
          </table:table-cell>
          <table:table-cell table:style-name="ce11" table:number-columns-repeated="2"/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3</text:p>
          </table:table-cell>
          <table:table-cell table:style-name="ce12" office:value-type="string" calcext:value-type="string">
            <text:p>knows_common|knows_athletics_3|knows_power_strike_4</text:p>
          </table:table-cell>
          <table:table-cell table:style-name="ce14" office:value-type="string" calcext:value-type="string">
            <text:p>orc_face8</text:p>
          </table:table-cell>
          <table:table-cell table:style-name="ce14" office:value-type="string" calcext:value-type="string">
            <text:p>orc_face9</text:p>
          </table:table-cell>
          <table:table-cell table:style-name="ce15"/>
          <table:table-cell table:style-name="ce6" table:formula="of:=IF(AND([.B336]&lt;&gt;&quot;&quot;;[.C336]&lt;&gt;&quot;&quot;);CONCATENATE([Variables.$I$1];[Variables.$I$7];[.B336];[Variables.$I$7];[Variables.$I$6];[Variables.$I$7];[.C336];[Variables.$I$7];[Variables.$I$6];[Variables.$I$7];[.D336];[Variables.$I$7];[Variables.$I$6];[.E336];[Variables.$I$6];[.F336];[Variables.$I$6];[.G336];[Variables.$I$6];[.H336];[Variables.$I$6];[Variables.$I$1];[.I336];[.J336];[.K336];[.L336];[.M336];[.N336];[.O336];[Variables.$I$2];[Variables.$I$6];[.P336];[Variables.$I$6];[.Q336];[Variables.$I$6];[.R336];[Variables.$I$6];[.S336];[Variables.$I$6];[.T336];IF([.U336]&lt;&gt;&quot;&quot;;CONCATENATE([Variables.$I$6];[.U336]);&quot;&quot;);[Variables.$I$2];[Variables.$I$6]);IF([.B336]&lt;&gt;&quot;&quot;;CONCATENATE(&quot;#&quot;;[.B336]);&quot;&quot;))" office:value-type="string" office:string-value="[&quot;i3_isen_large_orc_despoiler&quot;,&quot;Large_Orc_Despoiler&quot;,&quot;Large_Orc_Despoilers&quot;,tf_orc|tfg_armor| tfg_helm| tfg_boots| tf_no_capture_alive,0,0,fac_isengard,[itm_isen_orc_helm_a,itm_isen_orc_mail_a_bad,itm_isen_orc_light_b_good,itm_orc_greaves,itm_orc_sledgehammer,itm_isengard_hammer,itm_twohand_wood_club,],attr_orc_tier_3,wp_orc_tier_3,knows_common|knows_athletics_3|knows_power_strike_4,orc_face8,orc_face9]," calcext:value-type="string">
            <text:p>["i3_isen_large_orc_despoiler","Large_Orc_Despoiler","Large_Orc_Despoilers",tf_orc|tfg_armor| tfg_helm| tfg_boots| tf_no_capture_alive,0,0,fac_isengard,[itm_isen_orc_helm_a,itm_isen_orc_mail_a_bad,itm_isen_orc_light_b_good,itm_orc_greaves,itm_orc_sledgehammer,itm_isengard_hammer,itm_twohand_wood_club,],attr_orc_tier_3,wp_orc_tier_3,knows_common|knows_athletics_3|knows_power_strike_4,orc_face8,orc_face9],</text:p>
          </table:table-cell>
          <table:table-cell table:number-columns-repeated="16362"/>
        </table:table-row>
        <table:table-row table:style-name="ro1">
          <table:table-cell table:style-name="ce6" table:formula="of:=IF(AND([.B337]&lt;&gt;&quot;&quot;;[.C337]&lt;&gt;&quot;&quot;);CONCATENATE([Variables.$I$1];[Variables.$I$7];[.B337];[Variables.$I$7];[Variables.$I$6];[Variables.$I$7];[.C337];[Variables.$I$7];[Variables.$I$6];[Variables.$I$7];[.D337];[Variables.$I$7];[Variables.$I$6];[.E337];[Variables.$I$6];[.F337];[Variables.$I$6];[.G337];[Variables.$I$6];[.H337];[Variables.$I$6];[Variables.$I$1];[.I337];[.J337];[.K337];[.L337];[.M337];[.N337];[.O337];[Variables.$I$2];[Variables.$I$6];[.P337];[Variables.$I$6];[.Q337];[Variables.$I$6];[.R337];[Variables.$I$6];[.S337];[Variables.$I$6];[.T337];IF([.U337]&lt;&gt;&quot;&quot;;CONCATENATE([Variables.$I$6];[.U337]);&quot;&quot;);[Variables.$I$2];[Variables.$I$6]);IF([.B337]&lt;&gt;&quot;&quot;;CONCATENATE(&quot;#&quot;;[.B337]);&quot;&quot;))" office:value-type="string" office:string-value="[&quot;i4_isen_fell_orc_despoiler&quot;,&quot;Fell_Orc_Despoiler&quot;,&quot;Fell_Orc_Despoilers&quot;,tf_orc| tfg_armor| tfg_helm| tfg_boots| tfg_gloves| tf_no_capture_alive,0,0,fac_isengard,[itm_isen_orc_helm_a_good,itm_isen_orc_mail_a, itm_isen_orc_mail_b_bad,itm_orc_mittens,itm_orc_greaves,itm_isengard_mallet,itm_orc_sledgehammer,itm_isengard_hammer,itm_twohand_wood_club,],attr_orc_tier_4,wp_orc_tier_4,knows_common|knows_athletics_4|knows_power_strike_5,orc_face3,orc_face6]," calcext:value-type="string">
            <text:p>["i4_isen_fell_orc_despoiler","Fell_Orc_Despoiler","Fell_Orc_Despoilers",tf_orc| tfg_armor| tfg_helm| tfg_boots| tfg_gloves| tf_no_capture_alive,0,0,fac_isengard,[itm_isen_orc_helm_a_good,itm_isen_orc_mail_a, itm_isen_orc_mail_b_bad,itm_orc_mittens,itm_orc_greaves,itm_isengard_mallet,itm_orc_sledgehammer,itm_isengard_hammer,itm_twohand_wood_club,],attr_orc_tier_4,wp_orc_tier_4,knows_common|knows_athletics_4|knows_power_strike_5,orc_face3,orc_face6],</text:p>
          </table:table-cell>
          <table:table-cell table:style-name="ce7" office:value-type="string" calcext:value-type="string">
            <text:p>i4_isen_fell_orc_despoiler</text:p>
          </table:table-cell>
          <table:table-cell table:style-name="ce7" office:value-type="string" calcext:value-type="string">
            <text:p>Fell_Orc_Despoiler</text:p>
          </table:table-cell>
          <table:table-cell table:style-name="ce7" office:value-type="string" calcext:value-type="string">
            <text:p>Fell_Orc_Despoilers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sengard</text:p>
          </table:table-cell>
          <table:table-cell table:style-name="ce11" office:value-type="string" calcext:value-type="string">
            <text:p>itm_isen_orc_helm_a_good,</text:p>
          </table:table-cell>
          <table:table-cell table:style-name="ce11" office:value-type="string" calcext:value-type="string">
            <text:p>itm_isen_orc_mail_a, itm_isen_orc_mail_b_bad,</text:p>
          </table:table-cell>
          <table:table-cell table:style-name="ce11" office:value-type="string" calcext:value-type="string">
            <text:p>itm_orc_mittens,</text:p>
          </table:table-cell>
          <table:table-cell table:style-name="ce11" office:value-type="string" calcext:value-type="string">
            <text:p>itm_orc_greaves,</text:p>
          </table:table-cell>
          <table:table-cell table:style-name="ce11" office:value-type="string" calcext:value-type="string">
            <text:p>itm_isengard_mallet,itm_orc_sledgehammer,itm_isengard_hammer,itm_twohand_wood_club,</text:p>
          </table:table-cell>
          <table:table-cell table:style-name="ce11" table:number-columns-repeated="2"/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athletics_4|knows_power_strike_5</text:p>
          </table:table-cell>
          <table:table-cell table:style-name="ce14" office:value-type="string" calcext:value-type="string">
            <text:p>orc_face3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B337]&lt;&gt;&quot;&quot;;[.C337]&lt;&gt;&quot;&quot;);CONCATENATE([Variables.$I$1];[Variables.$I$7];[.B337];[Variables.$I$7];[Variables.$I$6];[Variables.$I$7];[.C337];[Variables.$I$7];[Variables.$I$6];[Variables.$I$7];[.D337];[Variables.$I$7];[Variables.$I$6];[.E337];[Variables.$I$6];[.F337];[Variables.$I$6];[.G337];[Variables.$I$6];[.H337];[Variables.$I$6];[Variables.$I$1];[.I337];[.J337];[.K337];[.L337];[.M337];[.N337];[.O337];[Variables.$I$2];[Variables.$I$6];[.P337];[Variables.$I$6];[.Q337];[Variables.$I$6];[.R337];[Variables.$I$6];[.S337];[Variables.$I$6];[.T337];IF([.U337]&lt;&gt;&quot;&quot;;CONCATENATE([Variables.$I$6];[.U337]);&quot;&quot;);[Variables.$I$2];[Variables.$I$6]);IF([.B337]&lt;&gt;&quot;&quot;;CONCATENATE(&quot;#&quot;;[.B337]);&quot;&quot;))" office:value-type="string" office:string-value="[&quot;i4_isen_fell_orc_despoiler&quot;,&quot;Fell_Orc_Despoiler&quot;,&quot;Fell_Orc_Despoilers&quot;,tf_orc| tfg_armor| tfg_helm| tfg_boots| tfg_gloves| tf_no_capture_alive,0,0,fac_isengard,[itm_isen_orc_helm_a_good,itm_isen_orc_mail_a, itm_isen_orc_mail_b_bad,itm_orc_mittens,itm_orc_greaves,itm_isengard_mallet,itm_orc_sledgehammer,itm_isengard_hammer,itm_twohand_wood_club,],attr_orc_tier_4,wp_orc_tier_4,knows_common|knows_athletics_4|knows_power_strike_5,orc_face3,orc_face6]," calcext:value-type="string">
            <text:p>["i4_isen_fell_orc_despoiler","Fell_Orc_Despoiler","Fell_Orc_Despoilers",tf_orc| tfg_armor| tfg_helm| tfg_boots| tfg_gloves| tf_no_capture_alive,0,0,fac_isengard,[itm_isen_orc_helm_a_good,itm_isen_orc_mail_a, itm_isen_orc_mail_b_bad,itm_orc_mittens,itm_orc_greaves,itm_isengard_mallet,itm_orc_sledgehammer,itm_isengard_hammer,itm_twohand_wood_club,],attr_orc_tier_4,wp_orc_tier_4,knows_common|knows_athletics_4|knows_power_strike_5,orc_face3,orc_face6],</text:p>
          </table:table-cell>
          <table:table-cell table:number-columns-repeated="16362"/>
        </table:table-row>
        <table:table-row table:style-name="ro1">
          <table:table-cell table:style-name="ce6" table:formula="of:=IF(AND([.B338]&lt;&gt;&quot;&quot;;[.C338]&lt;&gt;&quot;&quot;);CONCATENATE([Variables.$I$1];[Variables.$I$7];[.B338];[Variables.$I$7];[Variables.$I$6];[Variables.$I$7];[.C338];[Variables.$I$7];[Variables.$I$6];[Variables.$I$7];[.D338];[Variables.$I$7];[Variables.$I$6];[.E338];[Variables.$I$6];[.F338];[Variables.$I$6];[.G338];[Variables.$I$6];[.H338];[Variables.$I$6];[Variables.$I$1];[.I338];[.J338];[.K338];[.L338];[.M338];[.N338];[.O338];[Variables.$I$2];[Variables.$I$6];[.P338];[Variables.$I$6];[.Q338];[Variables.$I$6];[.R338];[Variables.$I$6];[.S338];[Variables.$I$6];[.T338];IF([.U338]&lt;&gt;&quot;&quot;;CONCATENATE([Variables.$I$6];[.U338]);&quot;&quot;);[Variables.$I$2];[Variables.$I$6]);IF([.B338]&lt;&gt;&quot;&quot;;CONCATENATE(&quot;#&quot;;[.B338]);&quot;&quot;))" office:value-type="string" office:string-value="[&quot;ac2_isen_wolf_rider&quot;,&quot;Wolf_Rider_of_Isengard&quot;,&quot;Wolf_Riders_of_Isengard&quot;,tf_orc| tf_mounted| tfg_ranged| tfg_armor| tfg_horse| tf_no_capture_alive,0,0,fac_isengard,[itm_isen_orc_light_a,itm_isen_orc_light_b,itm_orc_throwing_arrow,itm_orc_throwing_arrow,itm_orc_simple_spear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" calcext:value-type="string">
            <text:p>["ac2_isen_wolf_rider","Wolf_Rider_of_Isengard","Wolf_Riders_of_Isengard",tf_orc| tf_mounted| tfg_ranged| tfg_armor| tfg_horse| tf_no_capture_alive,0,0,fac_isengard,[itm_isen_orc_light_a,itm_isen_orc_light_b,itm_orc_throwing_arrow,itm_orc_throwing_arrow,itm_orc_simple_spear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</text:p>
          </table:table-cell>
          <table:table-cell table:style-name="ce7" office:value-type="string" calcext:value-type="string">
            <text:p>ac2_isen_wolf_rider</text:p>
          </table:table-cell>
          <table:table-cell table:style-name="ce7" office:value-type="string" calcext:value-type="string">
            <text:p>Wolf_Rider_of_Isengard</text:p>
          </table:table-cell>
          <table:table-cell table:style-name="ce7" office:value-type="string" calcext:value-type="string">
            <text:p>Wolf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sengard</text:p>
          </table:table-cell>
          <table:table-cell table:style-name="ce11"/>
          <table:table-cell table:style-name="ce11" office:value-type="string" calcext:value-type="string">
            <text:p>itm_isen_orc_light_a,itm_isen_orc_light_b,</text:p>
          </table:table-cell>
          <table:table-cell table:style-name="ce11" table:number-columns-repeated="2"/>
          <table:table-cell table:style-name="ce11" office:value-type="string" calcext:value-type="string">
            <text:p>itm_orc_throwing_arrow,itm_orc_throwing_arrow,</text:p>
          </table:table-cell>
          <table:table-cell table:style-name="ce11" office:value-type="string" calcext:value-type="string">
            <text:p>itm_orc_simple_spear,</text:p>
          </table:table-cell>
          <table:table-cell table:style-name="ce11" office:value-type="string" calcext:value-type="string">
            <text:p>itm_warg_1d,itm_warg_1b,itm_warg_1c,</text:p>
          </table:table-cell>
          <table:table-cell table:style-name="ce12" office:value-type="string" calcext:value-type="string">
            <text:p>attr_orc_tier_2</text:p>
          </table:table-cell>
          <table:table-cell table:style-name="ce12" office:value-type="string" calcext:value-type="string">
            <text:p>wp_orc_tier_2</text:p>
          </table:table-cell>
          <table:table-cell table:style-name="ce13" office:value-type="string" calcext:value-type="string">
            <text:p>knows_common|knows_power_strike_1|knows_power_throw_2|knows_riding_2|knows_horse_archery_2|knows_looting_2|knows_tactics_1|knows_pathfinding_1|knows_wound_treatment_1|knows_surgery_1|knows_prisoner_management_1|knows_trade_1</text:p>
          </table:table-cell>
          <table:table-cell table:style-name="ce14" office:value-type="string" calcext:value-type="string">
            <text:p>orc_face7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B338]&lt;&gt;&quot;&quot;;[.C338]&lt;&gt;&quot;&quot;);CONCATENATE([Variables.$I$1];[Variables.$I$7];[.B338];[Variables.$I$7];[Variables.$I$6];[Variables.$I$7];[.C338];[Variables.$I$7];[Variables.$I$6];[Variables.$I$7];[.D338];[Variables.$I$7];[Variables.$I$6];[.E338];[Variables.$I$6];[.F338];[Variables.$I$6];[.G338];[Variables.$I$6];[.H338];[Variables.$I$6];[Variables.$I$1];[.I338];[.J338];[.K338];[.L338];[.M338];[.N338];[.O338];[Variables.$I$2];[Variables.$I$6];[.P338];[Variables.$I$6];[.Q338];[Variables.$I$6];[.R338];[Variables.$I$6];[.S338];[Variables.$I$6];[.T338];IF([.U338]&lt;&gt;&quot;&quot;;CONCATENATE([Variables.$I$6];[.U338]);&quot;&quot;);[Variables.$I$2];[Variables.$I$6]);IF([.B338]&lt;&gt;&quot;&quot;;CONCATENATE(&quot;#&quot;;[.B338]);&quot;&quot;))" office:value-type="string" office:string-value="[&quot;ac2_isen_wolf_rider&quot;,&quot;Wolf_Rider_of_Isengard&quot;,&quot;Wolf_Riders_of_Isengard&quot;,tf_orc| tf_mounted| tfg_ranged| tfg_armor| tfg_horse| tf_no_capture_alive,0,0,fac_isengard,[itm_isen_orc_light_a,itm_isen_orc_light_b,itm_orc_throwing_arrow,itm_orc_throwing_arrow,itm_orc_simple_spear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" calcext:value-type="string">
            <text:p>["ac2_isen_wolf_rider","Wolf_Rider_of_Isengard","Wolf_Riders_of_Isengard",tf_orc| tf_mounted| tfg_ranged| tfg_armor| tfg_horse| tf_no_capture_alive,0,0,fac_isengard,[itm_isen_orc_light_a,itm_isen_orc_light_b,itm_orc_throwing_arrow,itm_orc_throwing_arrow,itm_orc_simple_spear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</text:p>
          </table:table-cell>
          <table:table-cell table:number-columns-repeated="16362"/>
        </table:table-row>
        <table:table-row table:style-name="ro1">
          <table:table-cell table:style-name="ce6" table:formula="of:=IF(AND([.B339]&lt;&gt;&quot;&quot;;[.C339]&lt;&gt;&quot;&quot;);CONCATENATE([Variables.$I$1];[Variables.$I$7];[.B339];[Variables.$I$7];[Variables.$I$6];[Variables.$I$7];[.C339];[Variables.$I$7];[Variables.$I$6];[Variables.$I$7];[.D339];[Variables.$I$7];[Variables.$I$6];[.E339];[Variables.$I$6];[.F339];[Variables.$I$6];[.G339];[Variables.$I$6];[.H339];[Variables.$I$6];[Variables.$I$1];[.I339];[.J339];[.K339];[.L339];[.M339];[.N339];[.O339];[Variables.$I$2];[Variables.$I$6];[.P339];[Variables.$I$6];[.Q339];[Variables.$I$6];[.R339];[Variables.$I$6];[.S339];[Variables.$I$6];[.T339];IF([.U339]&lt;&gt;&quot;&quot;;CONCATENATE([Variables.$I$6];[.U339]);&quot;&quot;);[Variables.$I$2];[Variables.$I$6]);IF([.B339]&lt;&gt;&quot;&quot;;CONCATENATE(&quot;#&quot;;[.B339]);&quot;&quot;))" office:value-type="string" office:string-value="[&quot;ac3_isen_warg_rider&quot;,&quot;Warg_Rider_of_Isengard&quot;,&quot;Warg_Riders_of_Isengard&quot;,tf_orc| tf_mounted| tfg_ranged| tfg_armor| tfg_horse| tf_no_capture_alive,0,0,fac_isengard,[itm_isen_orc_helm_a_good,itm_isen_orc_light_a_good, itm_isen_orc_light_b_good, itm_isen_orc_mail_a_bad,itm_orc_ragwrap,itm_orc_throwing_arrow,itm_orc_throwing_arrow,itm_orc_club_b,itm_orc_simple_spear,itm_warg_1d,itm_warg_1b,itm_warg_1c,],attr_orc_tier_3,wp_orc_tier_3,knows_common|knows_riding_3|knows_power_throw_3|knows_power_strike_3|knows_horse_archery_4,orc_face5,orc_face8]," calcext:value-type="string">
            <text:p>["ac3_isen_warg_rider","Warg_Rider_of_Isengard","Warg_Riders_of_Isengard",tf_orc| tf_mounted| tfg_ranged| tfg_armor| tfg_horse| tf_no_capture_alive,0,0,fac_isengard,[itm_isen_orc_helm_a_good,itm_isen_orc_light_a_good, itm_isen_orc_light_b_good, itm_isen_orc_mail_a_bad,itm_orc_ragwrap,itm_orc_throwing_arrow,itm_orc_throwing_arrow,itm_orc_club_b,itm_orc_simple_spear,itm_warg_1d,itm_warg_1b,itm_warg_1c,],attr_orc_tier_3,wp_orc_tier_3,knows_common|knows_riding_3|knows_power_throw_3|knows_power_strike_3|knows_horse_archery_4,orc_face5,orc_face8],</text:p>
          </table:table-cell>
          <table:table-cell table:style-name="ce7" office:value-type="string" calcext:value-type="string">
            <text:p>ac3_isen_warg_rider</text:p>
          </table:table-cell>
          <table:table-cell table:style-name="ce7" office:value-type="string" calcext:value-type="string">
            <text:p>Warg_Rider_of_Isengard</text:p>
          </table:table-cell>
          <table:table-cell table:style-name="ce7" office:value-type="string" calcext:value-type="string">
            <text:p>Warg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sengard</text:p>
          </table:table-cell>
          <table:table-cell table:style-name="ce11" office:value-type="string" calcext:value-type="string">
            <text:p>itm_isen_orc_helm_a_good,</text:p>
          </table:table-cell>
          <table:table-cell table:style-name="ce11" office:value-type="string" calcext:value-type="string">
            <text:p>itm_isen_orc_light_a_good, itm_isen_orc_light_b_good, itm_isen_orc_mail_a_bad,</text:p>
          </table:table-cell>
          <table:table-cell table:style-name="ce11"/>
          <table:table-cell table:style-name="ce11" office:value-type="string" calcext:value-type="string">
            <text:p>itm_orc_ragwrap,</text:p>
          </table:table-cell>
          <table:table-cell table:style-name="ce11" office:value-type="string" calcext:value-type="string">
            <text:p>itm_orc_throwing_arrow,itm_orc_throwing_arrow,</text:p>
          </table:table-cell>
          <table:table-cell table:style-name="ce11" office:value-type="string" calcext:value-type="string">
            <text:p>itm_orc_club_b,itm_orc_simple_spear,</text:p>
          </table:table-cell>
          <table:table-cell table:style-name="ce11" office:value-type="string" calcext:value-type="string">
            <text:p>itm_warg_1d,itm_warg_1b,itm_warg_1c,</text:p>
          </table:table-cell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3</text:p>
          </table:table-cell>
          <table:table-cell table:style-name="ce12" office:value-type="string" calcext:value-type="string">
            <text:p>knows_common|knows_riding_3|knows_power_throw_3|knows_power_strike_3|knows_horse_archery_4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B339]&lt;&gt;&quot;&quot;;[.C339]&lt;&gt;&quot;&quot;);CONCATENATE([Variables.$I$1];[Variables.$I$7];[.B339];[Variables.$I$7];[Variables.$I$6];[Variables.$I$7];[.C339];[Variables.$I$7];[Variables.$I$6];[Variables.$I$7];[.D339];[Variables.$I$7];[Variables.$I$6];[.E339];[Variables.$I$6];[.F339];[Variables.$I$6];[.G339];[Variables.$I$6];[.H339];[Variables.$I$6];[Variables.$I$1];[.I339];[.J339];[.K339];[.L339];[.M339];[.N339];[.O339];[Variables.$I$2];[Variables.$I$6];[.P339];[Variables.$I$6];[.Q339];[Variables.$I$6];[.R339];[Variables.$I$6];[.S339];[Variables.$I$6];[.T339];IF([.U339]&lt;&gt;&quot;&quot;;CONCATENATE([Variables.$I$6];[.U339]);&quot;&quot;);[Variables.$I$2];[Variables.$I$6]);IF([.B339]&lt;&gt;&quot;&quot;;CONCATENATE(&quot;#&quot;;[.B339]);&quot;&quot;))" office:value-type="string" office:string-value="[&quot;ac3_isen_warg_rider&quot;,&quot;Warg_Rider_of_Isengard&quot;,&quot;Warg_Riders_of_Isengard&quot;,tf_orc| tf_mounted| tfg_ranged| tfg_armor| tfg_horse| tf_no_capture_alive,0,0,fac_isengard,[itm_isen_orc_helm_a_good,itm_isen_orc_light_a_good, itm_isen_orc_light_b_good, itm_isen_orc_mail_a_bad,itm_orc_ragwrap,itm_orc_throwing_arrow,itm_orc_throwing_arrow,itm_orc_club_b,itm_orc_simple_spear,itm_warg_1d,itm_warg_1b,itm_warg_1c,],attr_orc_tier_3,wp_orc_tier_3,knows_common|knows_riding_3|knows_power_throw_3|knows_power_strike_3|knows_horse_archery_4,orc_face5,orc_face8]," calcext:value-type="string">
            <text:p>["ac3_isen_warg_rider","Warg_Rider_of_Isengard","Warg_Riders_of_Isengard",tf_orc| tf_mounted| tfg_ranged| tfg_armor| tfg_horse| tf_no_capture_alive,0,0,fac_isengard,[itm_isen_orc_helm_a_good,itm_isen_orc_light_a_good, itm_isen_orc_light_b_good, itm_isen_orc_mail_a_bad,itm_orc_ragwrap,itm_orc_throwing_arrow,itm_orc_throwing_arrow,itm_orc_club_b,itm_orc_simple_spear,itm_warg_1d,itm_warg_1b,itm_warg_1c,],attr_orc_tier_3,wp_orc_tier_3,knows_common|knows_riding_3|knows_power_throw_3|knows_power_strike_3|knows_horse_archery_4,orc_face5,orc_face8],</text:p>
          </table:table-cell>
          <table:table-cell table:number-columns-repeated="16362"/>
        </table:table-row>
        <table:table-row table:style-name="ro1">
          <table:table-cell table:style-name="ce6" table:formula="of:=IF(AND([.B340]&lt;&gt;&quot;&quot;;[.C340]&lt;&gt;&quot;&quot;);CONCATENATE([Variables.$I$1];[Variables.$I$7];[.B340];[Variables.$I$7];[Variables.$I$6];[Variables.$I$7];[.C340];[Variables.$I$7];[Variables.$I$6];[Variables.$I$7];[.D340];[Variables.$I$7];[Variables.$I$6];[.E340];[Variables.$I$6];[.F340];[Variables.$I$6];[.G340];[Variables.$I$6];[.H340];[Variables.$I$6];[Variables.$I$1];[.I340];[.J340];[.K340];[.L340];[.M340];[.N340];[.O340];[Variables.$I$2];[Variables.$I$6];[.P340];[Variables.$I$6];[.Q340];[Variables.$I$6];[.R340];[Variables.$I$6];[.S340];[Variables.$I$6];[.T340];IF([.U340]&lt;&gt;&quot;&quot;;CONCATENATE([Variables.$I$6];[.U340]);&quot;&quot;);[Variables.$I$2];[Variables.$I$6]);IF([.B340]&lt;&gt;&quot;&quot;;CONCATENATE(&quot;#&quot;;[.B340]);&quot;&quot;))" office:value-type="string" office:string-value="[&quot;ac4_isen_white_hand_rider&quot;,&quot;White_Hand_Rider&quot;,&quot;White_Hand_Riders&quot;,tf_orc| tf_mounted| tfg_ranged| tfg_armor| tfg_helm| tfg_horse| tfg_boots| tf_no_capture_alive,0,0,fac_isengard,[itm_isen_uruk_helm_a,itm_isen_orc_mail_a,itm_orc_ragwrap,itm_orc_throwing_arrow,itm_orc_throwing_arrow,itm_isengard_mallet,itm_isengard_spear,itm_wargarmored_1b, itm_wargarmored_1c,],attr_orc_tier_4,wp_orc_tier_4,knows_common|knows_riding_5|knows_power_throw_5|knows_power_strike_4|knows_horse_archery_5,orc_face7,orc_face8]," calcext:value-type="string">
            <text:p>["ac4_isen_white_hand_rider","White_Hand_Rider","White_Hand_Riders",tf_orc| tf_mounted| tfg_ranged| tfg_armor| tfg_helm| tfg_horse| tfg_boots| tf_no_capture_alive,0,0,fac_isengard,[itm_isen_uruk_helm_a,itm_isen_orc_mail_a,itm_orc_ragwrap,itm_orc_throwing_arrow,itm_orc_throwing_arrow,itm_isengard_mallet,itm_isengard_spear,itm_wargarmored_1b, itm_wargarmored_1c,],attr_orc_tier_4,wp_orc_tier_4,knows_common|knows_riding_5|knows_power_throw_5|knows_power_strike_4|knows_horse_archery_5,orc_face7,orc_face8],</text:p>
          </table:table-cell>
          <table:table-cell table:style-name="ce7" office:value-type="string" calcext:value-type="string">
            <text:p>ac4_isen_white_hand_rider</text:p>
          </table:table-cell>
          <table:table-cell table:style-name="ce7" office:value-type="string" calcext:value-type="string">
            <text:p>White_Hand_Rider</text:p>
          </table:table-cell>
          <table:table-cell table:style-name="ce7" office:value-type="string" calcext:value-type="string">
            <text:p>White_Hand_Riders</text:p>
          </table:table-cell>
          <table:table-cell table:style-name="ce8" office:value-type="string" calcext:value-type="string">
            <text:p>tf_orc| tf_mounted| tfg_range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sengard</text:p>
          </table:table-cell>
          <table:table-cell table:style-name="ce11" office:value-type="string" calcext:value-type="string">
            <text:p>itm_isen_uruk_helm_a,</text:p>
          </table:table-cell>
          <table:table-cell table:style-name="ce11" office:value-type="string" calcext:value-type="string">
            <text:p>itm_isen_orc_mail_a,</text:p>
          </table:table-cell>
          <table:table-cell table:style-name="ce11"/>
          <table:table-cell table:style-name="ce11" office:value-type="string" calcext:value-type="string">
            <text:p>itm_orc_ragwrap,</text:p>
          </table:table-cell>
          <table:table-cell table:style-name="ce11" office:value-type="string" calcext:value-type="string">
            <text:p>itm_orc_throwing_arrow,itm_orc_throwing_arrow,</text:p>
          </table:table-cell>
          <table:table-cell table:style-name="ce11" office:value-type="string" calcext:value-type="string">
            <text:p>itm_isengard_mallet,itm_isengard_spear,</text:p>
          </table:table-cell>
          <table:table-cell table:style-name="ce11" office:value-type="string" calcext:value-type="string">
            <text:p>itm_wargarmored_1b, itm_wargarmored_1c,</text:p>
          </table:table-cell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riding_5|knows_power_throw_5|knows_power_strike_4|knows_horse_archery_5</text:p>
          </table:table-cell>
          <table:table-cell table:style-name="ce14" office:value-type="string" calcext:value-type="string">
            <text:p>orc_face7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B340]&lt;&gt;&quot;&quot;;[.C340]&lt;&gt;&quot;&quot;);CONCATENATE([Variables.$I$1];[Variables.$I$7];[.B340];[Variables.$I$7];[Variables.$I$6];[Variables.$I$7];[.C340];[Variables.$I$7];[Variables.$I$6];[Variables.$I$7];[.D340];[Variables.$I$7];[Variables.$I$6];[.E340];[Variables.$I$6];[.F340];[Variables.$I$6];[.G340];[Variables.$I$6];[.H340];[Variables.$I$6];[Variables.$I$1];[.I340];[.J340];[.K340];[.L340];[.M340];[.N340];[.O340];[Variables.$I$2];[Variables.$I$6];[.P340];[Variables.$I$6];[.Q340];[Variables.$I$6];[.R340];[Variables.$I$6];[.S340];[Variables.$I$6];[.T340];IF([.U340]&lt;&gt;&quot;&quot;;CONCATENATE([Variables.$I$6];[.U340]);&quot;&quot;);[Variables.$I$2];[Variables.$I$6]);IF([.B340]&lt;&gt;&quot;&quot;;CONCATENATE(&quot;#&quot;;[.B340]);&quot;&quot;))" office:value-type="string" office:string-value="[&quot;ac4_isen_white_hand_rider&quot;,&quot;White_Hand_Rider&quot;,&quot;White_Hand_Riders&quot;,tf_orc| tf_mounted| tfg_ranged| tfg_armor| tfg_helm| tfg_horse| tfg_boots| tf_no_capture_alive,0,0,fac_isengard,[itm_isen_uruk_helm_a,itm_isen_orc_mail_a,itm_orc_ragwrap,itm_orc_throwing_arrow,itm_orc_throwing_arrow,itm_isengard_mallet,itm_isengard_spear,itm_wargarmored_1b, itm_wargarmored_1c,],attr_orc_tier_4,wp_orc_tier_4,knows_common|knows_riding_5|knows_power_throw_5|knows_power_strike_4|knows_horse_archery_5,orc_face7,orc_face8]," calcext:value-type="string">
            <text:p>["ac4_isen_white_hand_rider","White_Hand_Rider","White_Hand_Riders",tf_orc| tf_mounted| tfg_ranged| tfg_armor| tfg_helm| tfg_horse| tfg_boots| tf_no_capture_alive,0,0,fac_isengard,[itm_isen_uruk_helm_a,itm_isen_orc_mail_a,itm_orc_ragwrap,itm_orc_throwing_arrow,itm_orc_throwing_arrow,itm_isengard_mallet,itm_isengard_spear,itm_wargarmored_1b, itm_wargarmored_1c,],attr_orc_tier_4,wp_orc_tier_4,knows_common|knows_riding_5|knows_power_throw_5|knows_power_strike_4|knows_horse_archery_5,orc_face7,orc_face8],</text:p>
          </table:table-cell>
          <table:table-cell table:number-columns-repeated="16362"/>
        </table:table-row>
        <table:table-row table:style-name="ro1">
          <table:table-cell table:formula="of:=IF(AND([.B341]&lt;&gt;&quot;&quot;;[.C341]&lt;&gt;&quot;&quot;);CONCATENATE([Variables.$I$1];[Variables.$I$7];[.B341];[Variables.$I$7];[Variables.$I$6];[Variables.$I$7];[.C341];[Variables.$I$7];[Variables.$I$6];[Variables.$I$7];[.D341];[Variables.$I$7];[Variables.$I$6];[.E341];[Variables.$I$6];[.F341];[Variables.$I$6];[.G341];[Variables.$I$6];[.H341];[Variables.$I$6];[Variables.$I$1];[.I341];[.J341];[.K341];[.L341];[.M341];[.N341];[.O341];[Variables.$I$2];[Variables.$I$6];[.P341];[Variables.$I$6];[.Q341];[Variables.$I$6];[.R341];[Variables.$I$6];[.S341];[Variables.$I$6];[.T341];IF([.U341]&lt;&gt;&quot;&quot;;CONCATENATE([Variables.$I$6];[.U341]);&quot;&quot;);[Variables.$I$2];[Variables.$I$6]);IF([.B341]&lt;&gt;&quot;&quot;;CONCATENATE(&quot;#&quot;;[.B341]);&quot;&quot;))">
            <text:p/>
          </table:table-cell>
          <table:table-cell table:style-name="ce6" table:number-columns-repeated="21"/>
          <table:table-cell table:number-columns-repeated="16362"/>
        </table:table-row>
        <table:table-row table:style-name="ro1">
          <table:table-cell table:style-name="ce6" table:formula="of:=IF(AND([.B342]&lt;&gt;&quot;&quot;;[.C342]&lt;&gt;&quot;&quot;);CONCATENATE([Variables.$I$1];[Variables.$I$7];[.B342];[Variables.$I$7];[Variables.$I$6];[Variables.$I$7];[.C342];[Variables.$I$7];[Variables.$I$6];[Variables.$I$7];[.D342];[Variables.$I$7];[Variables.$I$6];[.E342];[Variables.$I$6];[.F342];[Variables.$I$6];[.G342];[Variables.$I$6];[.H342];[Variables.$I$6];[Variables.$I$1];[.I342];[.J342];[.K342];[.L342];[.M342];[.N342];[.O342];[Variables.$I$2];[Variables.$I$6];[.P342];[Variables.$I$6];[.Q342];[Variables.$I$6];[.R342];[Variables.$I$6];[.S342];[Variables.$I$6];[.T342];IF([.U342]&lt;&gt;&quot;&quot;;CONCATENATE([Variables.$I$6];[.U342]);&quot;&quot;);[Variables.$I$2];[Variables.$I$6]);IF([.B342]&lt;&gt;&quot;&quot;;CONCATENATE(&quot;#&quot;;[.B342]);&quot;&quot;))" office:value-type="string" office:string-value="#ISENGARD Uruk-hai" calcext:value-type="string">
            <text:p>#ISENGARD Uruk-hai</text:p>
          </table:table-cell>
          <table:table-cell table:style-name="ce5" office:value-type="string" calcext:value-type="string">
            <text:p>ISENGARD Uruk-hai</text:p>
          </table:table-cell>
          <table:table-cell table:style-name="ce6" table:number-columns-repeated="19"/>
          <table:table-cell table:style-name="ce6" table:formula="of:=IF(AND([.B342]&lt;&gt;&quot;&quot;;[.C342]&lt;&gt;&quot;&quot;);CONCATENATE([Variables.$I$1];[Variables.$I$7];[.B342];[Variables.$I$7];[Variables.$I$6];[Variables.$I$7];[.C342];[Variables.$I$7];[Variables.$I$6];[Variables.$I$7];[.D342];[Variables.$I$7];[Variables.$I$6];[.E342];[Variables.$I$6];[.F342];[Variables.$I$6];[.G342];[Variables.$I$6];[.H342];[Variables.$I$6];[Variables.$I$1];[.I342];[.J342];[.K342];[.L342];[.M342];[.N342];[.O342];[Variables.$I$2];[Variables.$I$6];[.P342];[Variables.$I$6];[.Q342];[Variables.$I$6];[.R342];[Variables.$I$6];[.S342];[Variables.$I$6];[.T342];IF([.U342]&lt;&gt;&quot;&quot;;CONCATENATE([Variables.$I$6];[.U342]);&quot;&quot;);[Variables.$I$2];[Variables.$I$6]);IF([.B342]&lt;&gt;&quot;&quot;;CONCATENATE(&quot;#&quot;;[.B342]);&quot;&quot;))" office:value-type="string" office:string-value="#ISENGARD Uruk-hai" calcext:value-type="string">
            <text:p>#ISENGARD Uruk-hai</text:p>
          </table:table-cell>
          <table:table-cell table:number-columns-repeated="16362"/>
        </table:table-row>
        <table:table-row table:style-name="ro1">
          <table:table-cell table:style-name="ce6" table:formula="of:=IF(AND([.B343]&lt;&gt;&quot;&quot;;[.C343]&lt;&gt;&quot;&quot;);CONCATENATE([Variables.$I$1];[Variables.$I$7];[.B343];[Variables.$I$7];[Variables.$I$6];[Variables.$I$7];[.C343];[Variables.$I$7];[Variables.$I$6];[Variables.$I$7];[.D343];[Variables.$I$7];[Variables.$I$6];[.E343];[Variables.$I$6];[.F343];[Variables.$I$6];[.G343];[Variables.$I$6];[.H343];[Variables.$I$6];[Variables.$I$1];[.I343];[.J343];[.K343];[.L343];[.M343];[.N343];[.O343];[Variables.$I$2];[Variables.$I$6];[.P343];[Variables.$I$6];[.Q343];[Variables.$I$6];[.R343];[Variables.$I$6];[.S343];[Variables.$I$6];[.T343];IF([.U343]&lt;&gt;&quot;&quot;;CONCATENATE([Variables.$I$6];[.U343]);&quot;&quot;);[Variables.$I$2];[Variables.$I$6]);IF([.B343]&lt;&gt;&quot;&quot;;CONCATENATE(&quot;#&quot;;[.B343]);&quot;&quot;))" office:value-type="string" office:string-value="[&quot;a2_isen_uruk_tracker&quot;,&quot;Uruk_Hai_Tracker&quot;,&quot;Uruk_Hai_Trackers&quot;,tf_urukhai| tf_mounted| tfg_ranged| tfg_armor| tf_no_capture_alive,0,0,fac_isengard,[itm_isen_uruk_heavy_d_bad,itm_uruk_ragwrap,itm_short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" calcext:value-type="string">
            <text:p>["a2_isen_uruk_tracker","Uruk_Hai_Tracker","Uruk_Hai_Trackers",tf_urukhai| tf_mounted| tfg_ranged| tfg_armor| tf_no_capture_alive,0,0,fac_isengard,[itm_isen_uruk_heavy_d_bad,itm_uruk_ragwrap,itm_short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</text:p>
          </table:table-cell>
          <table:table-cell table:style-name="ce7" office:value-type="string" calcext:value-type="string">
            <text:p>a2_isen_uruk_tracker</text:p>
          </table:table-cell>
          <table:table-cell table:style-name="ce7" office:value-type="string" calcext:value-type="string">
            <text:p>Uruk_Hai_Tracker</text:p>
          </table:table-cell>
          <table:table-cell table:style-name="ce7" office:value-type="string" calcext:value-type="string">
            <text:p>Uruk_Hai_Trackers</text:p>
          </table:table-cell>
          <table:table-cell table:style-name="ce8" office:value-type="string" calcext:value-type="string">
            <text:p>tf_urukhai| tf_mounted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sengard</text:p>
          </table:table-cell>
          <table:table-cell table:style-name="ce11"/>
          <table:table-cell table:style-name="ce11" office:value-type="string" calcext:value-type="string">
            <text:p>itm_isen_uruk_heavy_d_bad,</text:p>
          </table:table-cell>
          <table:table-cell table:style-name="ce11"/>
          <table:table-cell table:style-name="ce11" office:value-type="string" calcext:value-type="string">
            <text:p>itm_uruk_ragwrap,</text:p>
          </table:table-cell>
          <table:table-cell table:style-name="ce11" office:value-type="string" calcext:value-type="string">
            <text:p>itm_short_bow,itm_isengard_arrow,</text:p>
          </table:table-cell>
          <table:table-cell table:style-name="ce11" office:value-type="string" calcext:value-type="string">
            <text:p>itm_isengard_axe,</text:p>
          </table:table-cell>
          <table:table-cell table:style-name="ce11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bow_2</text:p>
          </table:table-cell>
          <table:table-cell table:style-name="ce13" office:value-type="string" calcext:value-type="string">
            <text:p>knows_common|knows_ironflesh_2|knows_power_strike_1|knows_power_draw_2|knows_weapon_master_1|knows_athletics_3|knows_trainer_1|knows_tactics_1|knows_pathfinding_2|knows_spotting_1|knows_surgery_1|knows_prisoner_management_1|knows_leadership_1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B343]&lt;&gt;&quot;&quot;;[.C343]&lt;&gt;&quot;&quot;);CONCATENATE([Variables.$I$1];[Variables.$I$7];[.B343];[Variables.$I$7];[Variables.$I$6];[Variables.$I$7];[.C343];[Variables.$I$7];[Variables.$I$6];[Variables.$I$7];[.D343];[Variables.$I$7];[Variables.$I$6];[.E343];[Variables.$I$6];[.F343];[Variables.$I$6];[.G343];[Variables.$I$6];[.H343];[Variables.$I$6];[Variables.$I$1];[.I343];[.J343];[.K343];[.L343];[.M343];[.N343];[.O343];[Variables.$I$2];[Variables.$I$6];[.P343];[Variables.$I$6];[.Q343];[Variables.$I$6];[.R343];[Variables.$I$6];[.S343];[Variables.$I$6];[.T343];IF([.U343]&lt;&gt;&quot;&quot;;CONCATENATE([Variables.$I$6];[.U343]);&quot;&quot;);[Variables.$I$2];[Variables.$I$6]);IF([.B343]&lt;&gt;&quot;&quot;;CONCATENATE(&quot;#&quot;;[.B343]);&quot;&quot;))" office:value-type="string" office:string-value="[&quot;a2_isen_uruk_tracker&quot;,&quot;Uruk_Hai_Tracker&quot;,&quot;Uruk_Hai_Trackers&quot;,tf_urukhai| tf_mounted| tfg_ranged| tfg_armor| tf_no_capture_alive,0,0,fac_isengard,[itm_isen_uruk_heavy_d_bad,itm_uruk_ragwrap,itm_short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" calcext:value-type="string">
            <text:p>["a2_isen_uruk_tracker","Uruk_Hai_Tracker","Uruk_Hai_Trackers",tf_urukhai| tf_mounted| tfg_ranged| tfg_armor| tf_no_capture_alive,0,0,fac_isengard,[itm_isen_uruk_heavy_d_bad,itm_uruk_ragwrap,itm_short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</text:p>
          </table:table-cell>
          <table:table-cell table:number-columns-repeated="16362"/>
        </table:table-row>
        <table:table-row table:style-name="ro1">
          <table:table-cell table:style-name="ce6" table:formula="of:=IF(AND([.B344]&lt;&gt;&quot;&quot;;[.C344]&lt;&gt;&quot;&quot;);CONCATENATE([Variables.$I$1];[Variables.$I$7];[.B344];[Variables.$I$7];[Variables.$I$6];[Variables.$I$7];[.C344];[Variables.$I$7];[Variables.$I$6];[Variables.$I$7];[.D344];[Variables.$I$7];[Variables.$I$6];[.E344];[Variables.$I$6];[.F344];[Variables.$I$6];[.G344];[Variables.$I$6];[.H344];[Variables.$I$6];[Variables.$I$1];[.I344];[.J344];[.K344];[.L344];[.M344];[.N344];[.O344];[Variables.$I$2];[Variables.$I$6];[.P344];[Variables.$I$6];[.Q344];[Variables.$I$6];[.R344];[Variables.$I$6];[.S344];[Variables.$I$6];[.T344];IF([.U344]&lt;&gt;&quot;&quot;;CONCATENATE([Variables.$I$6];[.U344]);&quot;&quot;);[Variables.$I$2];[Variables.$I$6]);IF([.B344]&lt;&gt;&quot;&quot;;CONCATENATE(&quot;#&quot;;[.B344]);&quot;&quot;))" office:value-type="string" office:string-value="[&quot;a3_isen_large_uruk_tracker&quot;,&quot;Large_Uruk_Hai_Tracker&quot;,&quot;Large_Uruk_Hai_Trackers&quot;,tf_urukhai| tf_mounted| tfg_ranged| tfg_armor| tfg_boots| tfg_helm| tf_no_capture_alive,0,0,fac_isengard,[itm_isen_tracker_helm,itm_isen_uruk_heavy_d,itm_uruk_ragwrap,itm_isengard_large_bow,itm_isengard_arrow,itm_isengard_axe,itm_isengard_sword],attr_evil_tier_3,wp_tier_bow_4,knows_common|knows_athletics_6|knows_power_draw_3|knows_power_strike_2|knows_ironflesh_2,uruk_hai_face1,uruk_hai_face2]," calcext:value-type="string">
            <text:p>["a3_isen_large_uruk_tracker","Large_Uruk_Hai_Tracker","Large_Uruk_Hai_Trackers",tf_urukhai| tf_mounted| tfg_ranged| tfg_armor| tfg_boots| tfg_helm| tf_no_capture_alive,0,0,fac_isengard,[itm_isen_tracker_helm,itm_isen_uruk_heavy_d,itm_uruk_ragwrap,itm_isengard_large_bow,itm_isengard_arrow,itm_isengard_axe,itm_isengard_sword],attr_evil_tier_3,wp_tier_bow_4,knows_common|knows_athletics_6|knows_power_draw_3|knows_power_strike_2|knows_ironflesh_2,uruk_hai_face1,uruk_hai_face2],</text:p>
          </table:table-cell>
          <table:table-cell table:style-name="ce7" office:value-type="string" calcext:value-type="string">
            <text:p>a3_isen_large_uruk_tracker</text:p>
          </table:table-cell>
          <table:table-cell table:style-name="ce7" office:value-type="string" calcext:value-type="string">
            <text:p>Large_Uruk_Hai_Tracker</text:p>
          </table:table-cell>
          <table:table-cell table:style-name="ce7" office:value-type="string" calcext:value-type="string">
            <text:p>Large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sengard</text:p>
          </table:table-cell>
          <table:table-cell table:style-name="ce11" office:value-type="string" calcext:value-type="string">
            <text:p>itm_isen_tracker_helm,</text:p>
          </table:table-cell>
          <table:table-cell table:style-name="ce11" office:value-type="string" calcext:value-type="string">
            <text:p>itm_isen_uruk_heavy_d,</text:p>
          </table:table-cell>
          <table:table-cell table:style-name="ce11"/>
          <table:table-cell table:style-name="ce11" office:value-type="string" calcext:value-type="string">
            <text:p>itm_uruk_ragwrap,</text:p>
          </table:table-cell>
          <table:table-cell table:style-name="ce11" office:value-type="string" calcext:value-type="string">
            <text:p>itm_isengard_large_bow,itm_isengard_arrow,</text:p>
          </table:table-cell>
          <table:table-cell table:style-name="ce11" office:value-type="string" calcext:value-type="string">
            <text:p>itm_isengard_axe,itm_isengard_sword</text:p>
          </table:table-cell>
          <table:table-cell table:style-name="ce11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bow_4</text:p>
          </table:table-cell>
          <table:table-cell table:style-name="ce12" office:value-type="string" calcext:value-type="string">
            <text:p>knows_common|knows_athletics_6|knows_power_draw_3|knows_power_strike_2|knows_ironflesh_2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B344]&lt;&gt;&quot;&quot;;[.C344]&lt;&gt;&quot;&quot;);CONCATENATE([Variables.$I$1];[Variables.$I$7];[.B344];[Variables.$I$7];[Variables.$I$6];[Variables.$I$7];[.C344];[Variables.$I$7];[Variables.$I$6];[Variables.$I$7];[.D344];[Variables.$I$7];[Variables.$I$6];[.E344];[Variables.$I$6];[.F344];[Variables.$I$6];[.G344];[Variables.$I$6];[.H344];[Variables.$I$6];[Variables.$I$1];[.I344];[.J344];[.K344];[.L344];[.M344];[.N344];[.O344];[Variables.$I$2];[Variables.$I$6];[.P344];[Variables.$I$6];[.Q344];[Variables.$I$6];[.R344];[Variables.$I$6];[.S344];[Variables.$I$6];[.T344];IF([.U344]&lt;&gt;&quot;&quot;;CONCATENATE([Variables.$I$6];[.U344]);&quot;&quot;);[Variables.$I$2];[Variables.$I$6]);IF([.B344]&lt;&gt;&quot;&quot;;CONCATENATE(&quot;#&quot;;[.B344]);&quot;&quot;))" office:value-type="string" office:string-value="[&quot;a3_isen_large_uruk_tracker&quot;,&quot;Large_Uruk_Hai_Tracker&quot;,&quot;Large_Uruk_Hai_Trackers&quot;,tf_urukhai| tf_mounted| tfg_ranged| tfg_armor| tfg_boots| tfg_helm| tf_no_capture_alive,0,0,fac_isengard,[itm_isen_tracker_helm,itm_isen_uruk_heavy_d,itm_uruk_ragwrap,itm_isengard_large_bow,itm_isengard_arrow,itm_isengard_axe,itm_isengard_sword],attr_evil_tier_3,wp_tier_bow_4,knows_common|knows_athletics_6|knows_power_draw_3|knows_power_strike_2|knows_ironflesh_2,uruk_hai_face1,uruk_hai_face2]," calcext:value-type="string">
            <text:p>["a3_isen_large_uruk_tracker","Large_Uruk_Hai_Tracker","Large_Uruk_Hai_Trackers",tf_urukhai| tf_mounted| tfg_ranged| tfg_armor| tfg_boots| tfg_helm| tf_no_capture_alive,0,0,fac_isengard,[itm_isen_tracker_helm,itm_isen_uruk_heavy_d,itm_uruk_ragwrap,itm_isengard_large_bow,itm_isengard_arrow,itm_isengard_axe,itm_isengard_sword],attr_evil_tier_3,wp_tier_bow_4,knows_common|knows_athletics_6|knows_power_draw_3|knows_power_strike_2|knows_ironflesh_2,uruk_hai_face1,uruk_hai_face2],</text:p>
          </table:table-cell>
          <table:table-cell table:number-columns-repeated="16362"/>
        </table:table-row>
        <table:table-row table:style-name="ro1">
          <table:table-cell table:style-name="ce6" table:formula="of:=IF(AND([.B345]&lt;&gt;&quot;&quot;;[.C345]&lt;&gt;&quot;&quot;);CONCATENATE([Variables.$I$1];[Variables.$I$7];[.B345];[Variables.$I$7];[Variables.$I$6];[Variables.$I$7];[.C345];[Variables.$I$7];[Variables.$I$6];[Variables.$I$7];[.D345];[Variables.$I$7];[Variables.$I$6];[.E345];[Variables.$I$6];[.F345];[Variables.$I$6];[.G345];[Variables.$I$6];[.H345];[Variables.$I$6];[Variables.$I$1];[.I345];[.J345];[.K345];[.L345];[.M345];[.N345];[.O345];[Variables.$I$2];[Variables.$I$6];[.P345];[Variables.$I$6];[.Q345];[Variables.$I$6];[.R345];[Variables.$I$6];[.S345];[Variables.$I$6];[.T345];IF([.U345]&lt;&gt;&quot;&quot;;CONCATENATE([Variables.$I$6];[.U345]);&quot;&quot;);[Variables.$I$2];[Variables.$I$6]);IF([.B345]&lt;&gt;&quot;&quot;;CONCATENATE(&quot;#&quot;;[.B345]);&quot;&quot;))" office:value-type="string" office:string-value="[&quot;a4_isen_fighting_uruk_tracker&quot;,&quot;Fighting_Uruk_Hai_Tracker&quot;,&quot;Fighting_Uruk_Hai_Trackers&quot;,tf_urukhai| tf_mounted| tfg_ranged| tfg_armor| tfg_boots| tfg_helm| tf_no_capture_alive,0,0,fac_isengard,[itm_isen_tracker_helm_good,itm_isen_uruk_heavy_d_good,itm_uruk_ragwrap,itm_isengard_large_bow,itm_isengard_arrow,itm_isengard_sword,itm_isengard_heavy_axe,itm_isengard_heavy_sword,],attr_evil_tier_4,wp_tier_bow_5,knows_common|knows_athletics_7|knows_power_draw_4|knows_power_strike_2|knows_ironflesh_5,uruk_hai_face1,uruk_hai_face2]," calcext:value-type="string">
            <text:p>["a4_isen_fighting_uruk_tracker","Fighting_Uruk_Hai_Tracker","Fighting_Uruk_Hai_Trackers",tf_urukhai| tf_mounted| tfg_ranged| tfg_armor| tfg_boots| tfg_helm| tf_no_capture_alive,0,0,fac_isengard,[itm_isen_tracker_helm_good,itm_isen_uruk_heavy_d_good,itm_uruk_ragwrap,itm_isengard_large_bow,itm_isengard_arrow,itm_isengard_sword,itm_isengard_heavy_axe,itm_isengard_heavy_sword,],attr_evil_tier_4,wp_tier_bow_5,knows_common|knows_athletics_7|knows_power_draw_4|knows_power_strike_2|knows_ironflesh_5,uruk_hai_face1,uruk_hai_face2],</text:p>
          </table:table-cell>
          <table:table-cell table:style-name="ce7" office:value-type="string" calcext:value-type="string">
            <text:p>a4_isen_fighting_uruk_tracker</text:p>
          </table:table-cell>
          <table:table-cell table:style-name="ce7" office:value-type="string" calcext:value-type="string">
            <text:p>Fighting_Uruk_Hai_Tracker</text:p>
          </table:table-cell>
          <table:table-cell table:style-name="ce7" office:value-type="string" calcext:value-type="string">
            <text:p>Fighting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sengard</text:p>
          </table:table-cell>
          <table:table-cell table:style-name="ce11" office:value-type="string" calcext:value-type="string">
            <text:p>itm_isen_tracker_helm_good,</text:p>
          </table:table-cell>
          <table:table-cell table:style-name="ce11" office:value-type="string" calcext:value-type="string">
            <text:p>itm_isen_uruk_heavy_d_good,</text:p>
          </table:table-cell>
          <table:table-cell table:style-name="ce11"/>
          <table:table-cell table:style-name="ce11" office:value-type="string" calcext:value-type="string">
            <text:p>itm_uruk_ragwrap,</text:p>
          </table:table-cell>
          <table:table-cell table:style-name="ce11" office:value-type="string" calcext:value-type="string">
            <text:p>itm_isengard_large_bow,itm_isengard_arrow,</text:p>
          </table:table-cell>
          <table:table-cell table:style-name="ce11" office:value-type="string" calcext:value-type="string">
            <text:p>itm_isengard_sword,itm_isengard_heavy_axe,itm_isengard_heavy_sword,</text:p>
          </table:table-cell>
          <table:table-cell table:style-name="ce11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bow_5</text:p>
          </table:table-cell>
          <table:table-cell table:style-name="ce12" office:value-type="string" calcext:value-type="string">
            <text:p>knows_common|knows_athletics_7|knows_power_draw_4|knows_power_strike_2|knows_ironflesh_5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B345]&lt;&gt;&quot;&quot;;[.C345]&lt;&gt;&quot;&quot;);CONCATENATE([Variables.$I$1];[Variables.$I$7];[.B345];[Variables.$I$7];[Variables.$I$6];[Variables.$I$7];[.C345];[Variables.$I$7];[Variables.$I$6];[Variables.$I$7];[.D345];[Variables.$I$7];[Variables.$I$6];[.E345];[Variables.$I$6];[.F345];[Variables.$I$6];[.G345];[Variables.$I$6];[.H345];[Variables.$I$6];[Variables.$I$1];[.I345];[.J345];[.K345];[.L345];[.M345];[.N345];[.O345];[Variables.$I$2];[Variables.$I$6];[.P345];[Variables.$I$6];[.Q345];[Variables.$I$6];[.R345];[Variables.$I$6];[.S345];[Variables.$I$6];[.T345];IF([.U345]&lt;&gt;&quot;&quot;;CONCATENATE([Variables.$I$6];[.U345]);&quot;&quot;);[Variables.$I$2];[Variables.$I$6]);IF([.B345]&lt;&gt;&quot;&quot;;CONCATENATE(&quot;#&quot;;[.B345]);&quot;&quot;))" office:value-type="string" office:string-value="[&quot;a4_isen_fighting_uruk_tracker&quot;,&quot;Fighting_Uruk_Hai_Tracker&quot;,&quot;Fighting_Uruk_Hai_Trackers&quot;,tf_urukhai| tf_mounted| tfg_ranged| tfg_armor| tfg_boots| tfg_helm| tf_no_capture_alive,0,0,fac_isengard,[itm_isen_tracker_helm_good,itm_isen_uruk_heavy_d_good,itm_uruk_ragwrap,itm_isengard_large_bow,itm_isengard_arrow,itm_isengard_sword,itm_isengard_heavy_axe,itm_isengard_heavy_sword,],attr_evil_tier_4,wp_tier_bow_5,knows_common|knows_athletics_7|knows_power_draw_4|knows_power_strike_2|knows_ironflesh_5,uruk_hai_face1,uruk_hai_face2]," calcext:value-type="string">
            <text:p>["a4_isen_fighting_uruk_tracker","Fighting_Uruk_Hai_Tracker","Fighting_Uruk_Hai_Trackers",tf_urukhai| tf_mounted| tfg_ranged| tfg_armor| tfg_boots| tfg_helm| tf_no_capture_alive,0,0,fac_isengard,[itm_isen_tracker_helm_good,itm_isen_uruk_heavy_d_good,itm_uruk_ragwrap,itm_isengard_large_bow,itm_isengard_arrow,itm_isengard_sword,itm_isengard_heavy_axe,itm_isengard_heavy_sword,],attr_evil_tier_4,wp_tier_bow_5,knows_common|knows_athletics_7|knows_power_draw_4|knows_power_strike_2|knows_ironflesh_5,uruk_hai_face1,uruk_hai_face2],</text:p>
          </table:table-cell>
          <table:table-cell table:number-columns-repeated="16362"/>
        </table:table-row>
        <table:table-row table:style-name="ro1">
          <table:table-cell table:style-name="ce6" table:formula="of:=IF(AND([.B346]&lt;&gt;&quot;&quot;;[.C346]&lt;&gt;&quot;&quot;);CONCATENATE([Variables.$I$1];[Variables.$I$7];[.B346];[Variables.$I$7];[Variables.$I$6];[Variables.$I$7];[.C346];[Variables.$I$7];[Variables.$I$6];[Variables.$I$7];[.D346];[Variables.$I$7];[Variables.$I$6];[.E346];[Variables.$I$6];[.F346];[Variables.$I$6];[.G346];[Variables.$I$6];[.H346];[Variables.$I$6];[Variables.$I$1];[.I346];[.J346];[.K346];[.L346];[.M346];[.N346];[.O346];[Variables.$I$2];[Variables.$I$6];[.P346];[Variables.$I$6];[.Q346];[Variables.$I$6];[.R346];[Variables.$I$6];[.S346];[Variables.$I$6];[.T346];IF([.U346]&lt;&gt;&quot;&quot;;CONCATENATE([Variables.$I$6];[.U346]);&quot;&quot;);[Variables.$I$2];[Variables.$I$6]);IF([.B346]&lt;&gt;&quot;&quot;;CONCATENATE(&quot;#&quot;;[.B346]);&quot;&quot;))" office:value-type="string" office:string-value="[&quot;i6_isen_uruk_berserker&quot;,&quot;Fighting_Uruk_Hai_Berserker&quot;,&quot;Fighting_Uruk_Hai_Berserkers&quot;,tf_urukhai| tf_mounted| tfg_armor| tfg_helm| tf_no_capture_alive,0,0,fac_isengard,[itm_isen_tracker_helm_good,itm_isen_uruk_light_c_bad, itm_isen_uruk_light_c,itm_evil_gauntlets_b,itm_orc_mittens_good,itm_uruk_chain_greaves,itm_uruk_ragwrap,itm_isengard_heavy_axe,itm_isengard_mallet,itm_isengard_heavy_sword,itm_marker_berserker,],attr_evil_tier_6,wp_tier_6,knows_common|knows_athletics_7|knows_power_strike_6|knows_ironflesh_10,uruk_hai_face1,uruk_hai_face2]," calcext:value-type="string">
            <text:p>["i6_isen_uruk_berserker","Fighting_Uruk_Hai_Berserker","Fighting_Uruk_Hai_Berserkers",tf_urukhai| tf_mounted| tfg_armor| tfg_helm| tf_no_capture_alive,0,0,fac_isengard,[itm_isen_tracker_helm_good,itm_isen_uruk_light_c_bad, itm_isen_uruk_light_c,itm_evil_gauntlets_b,itm_orc_mittens_good,itm_uruk_chain_greaves,itm_uruk_ragwrap,itm_isengard_heavy_axe,itm_isengard_mallet,itm_isengard_heavy_sword,itm_marker_berserker,],attr_evil_tier_6,wp_tier_6,knows_common|knows_athletics_7|knows_power_strike_6|knows_ironflesh_10,uruk_hai_face1,uruk_hai_face2],</text:p>
          </table:table-cell>
          <table:table-cell table:style-name="ce7" office:value-type="string" calcext:value-type="string">
            <text:p>i6_isen_uruk_berserker</text:p>
          </table:table-cell>
          <table:table-cell table:style-name="ce7" office:value-type="string" calcext:value-type="string">
            <text:p>Fighting_Uruk_Hai_Berserker</text:p>
          </table:table-cell>
          <table:table-cell table:style-name="ce7" office:value-type="string" calcext:value-type="string">
            <text:p>Fighting_Uruk_Hai_Berserkers</text:p>
          </table:table-cell>
          <table:table-cell table:style-name="ce8" office:value-type="string" calcext:value-type="string">
            <text:p>tf_urukhai| tf_mounte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sengard</text:p>
          </table:table-cell>
          <table:table-cell table:style-name="ce11" office:value-type="string" calcext:value-type="string">
            <text:p>itm_isen_tracker_helm_good,</text:p>
          </table:table-cell>
          <table:table-cell table:style-name="ce11" office:value-type="string" calcext:value-type="string">
            <text:p>itm_isen_uruk_light_c_bad, itm_isen_uruk_light_c,</text:p>
          </table:table-cell>
          <table:table-cell table:style-name="ce11" office:value-type="string" calcext:value-type="string">
            <text:p>itm_evil_gauntlets_b,itm_orc_mittens_good,</text:p>
          </table:table-cell>
          <table:table-cell table:style-name="ce11" office:value-type="string" calcext:value-type="string">
            <text:p>itm_uruk_chain_greaves,itm_uruk_ragwrap,</text:p>
          </table:table-cell>
          <table:table-cell table:style-name="ce11" office:value-type="string" calcext:value-type="string">
            <text:p>itm_isengard_heavy_axe,itm_isengard_mallet,itm_isengard_heavy_sword,</text:p>
          </table:table-cell>
          <table:table-cell table:style-name="ce11"/>
          <table:table-cell table:style-name="ce11" office:value-type="string" calcext:value-type="string">
            <text:p>itm_marker_berserker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7|knows_power_strike_6|knows_ironflesh_10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B346]&lt;&gt;&quot;&quot;;[.C346]&lt;&gt;&quot;&quot;);CONCATENATE([Variables.$I$1];[Variables.$I$7];[.B346];[Variables.$I$7];[Variables.$I$6];[Variables.$I$7];[.C346];[Variables.$I$7];[Variables.$I$6];[Variables.$I$7];[.D346];[Variables.$I$7];[Variables.$I$6];[.E346];[Variables.$I$6];[.F346];[Variables.$I$6];[.G346];[Variables.$I$6];[.H346];[Variables.$I$6];[Variables.$I$1];[.I346];[.J346];[.K346];[.L346];[.M346];[.N346];[.O346];[Variables.$I$2];[Variables.$I$6];[.P346];[Variables.$I$6];[.Q346];[Variables.$I$6];[.R346];[Variables.$I$6];[.S346];[Variables.$I$6];[.T346];IF([.U346]&lt;&gt;&quot;&quot;;CONCATENATE([Variables.$I$6];[.U346]);&quot;&quot;);[Variables.$I$2];[Variables.$I$6]);IF([.B346]&lt;&gt;&quot;&quot;;CONCATENATE(&quot;#&quot;;[.B346]);&quot;&quot;))" office:value-type="string" office:string-value="[&quot;i6_isen_uruk_berserker&quot;,&quot;Fighting_Uruk_Hai_Berserker&quot;,&quot;Fighting_Uruk_Hai_Berserkers&quot;,tf_urukhai| tf_mounted| tfg_armor| tfg_helm| tf_no_capture_alive,0,0,fac_isengard,[itm_isen_tracker_helm_good,itm_isen_uruk_light_c_bad, itm_isen_uruk_light_c,itm_evil_gauntlets_b,itm_orc_mittens_good,itm_uruk_chain_greaves,itm_uruk_ragwrap,itm_isengard_heavy_axe,itm_isengard_mallet,itm_isengard_heavy_sword,itm_marker_berserker,],attr_evil_tier_6,wp_tier_6,knows_common|knows_athletics_7|knows_power_strike_6|knows_ironflesh_10,uruk_hai_face1,uruk_hai_face2]," calcext:value-type="string">
            <text:p>["i6_isen_uruk_berserker","Fighting_Uruk_Hai_Berserker","Fighting_Uruk_Hai_Berserkers",tf_urukhai| tf_mounted| tfg_armor| tfg_helm| tf_no_capture_alive,0,0,fac_isengard,[itm_isen_tracker_helm_good,itm_isen_uruk_light_c_bad, itm_isen_uruk_light_c,itm_evil_gauntlets_b,itm_orc_mittens_good,itm_uruk_chain_greaves,itm_uruk_ragwrap,itm_isengard_heavy_axe,itm_isengard_mallet,itm_isengard_heavy_sword,itm_marker_berserker,],attr_evil_tier_6,wp_tier_6,knows_common|knows_athletics_7|knows_power_strike_6|knows_ironflesh_10,uruk_hai_face1,uruk_hai_face2],</text:p>
          </table:table-cell>
          <table:table-cell table:number-columns-repeated="16362"/>
        </table:table-row>
        <table:table-row table:style-name="ro1">
          <table:table-cell table:style-name="ce6" table:formula="of:=IF(AND([.B347]&lt;&gt;&quot;&quot;;[.C347]&lt;&gt;&quot;&quot;);CONCATENATE([Variables.$I$1];[Variables.$I$7];[.B347];[Variables.$I$7];[Variables.$I$6];[Variables.$I$7];[.C347];[Variables.$I$7];[Variables.$I$6];[Variables.$I$7];[.D347];[Variables.$I$7];[Variables.$I$6];[.E347];[Variables.$I$6];[.F347];[Variables.$I$6];[.G347];[Variables.$I$6];[.H347];[Variables.$I$6];[Variables.$I$1];[.I347];[.J347];[.K347];[.L347];[.M347];[.N347];[.O347];[Variables.$I$2];[Variables.$I$6];[.P347];[Variables.$I$6];[.Q347];[Variables.$I$6];[.R347];[Variables.$I$6];[.S347];[Variables.$I$6];[.T347];IF([.U347]&lt;&gt;&quot;&quot;;CONCATENATE([Variables.$I$6];[.U347]);&quot;&quot;);[Variables.$I$2];[Variables.$I$6]);IF([.B347]&lt;&gt;&quot;&quot;;CONCATENATE(&quot;#&quot;;[.B347]);&quot;&quot;))" office:value-type="string" office:string-value="[&quot;i1_isen_uruk_snaga&quot;,&quot;Uruk_Hai_Newborn&quot;,&quot;Uruk_Hai_Newborns&quot;,tf_urukhai| tf_mounted| tfg_boots| tfg_armor| tf_no_capture_alive,0,0,fac_isengard,[itm_isen_orc_helm_a_bad,itm_isen_uruk_light_a,itm_isen_uruk_light_a_bad,itm_isen_uruk_light_b_bad,itm_uruk_ragwrap,itm_orc_simple_spear,itm_orc_slasher,itm_orc_axe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" calcext:value-type="string">
            <text:p>["i1_isen_uruk_snaga","Uruk_Hai_Newborn","Uruk_Hai_Newborns",tf_urukhai| tf_mounted| tfg_boots| tfg_armor| tf_no_capture_alive,0,0,fac_isengard,[itm_isen_orc_helm_a_bad,itm_isen_uruk_light_a,itm_isen_uruk_light_a_bad,itm_isen_uruk_light_b_bad,itm_uruk_ragwrap,itm_orc_simple_spear,itm_orc_slasher,itm_orc_axe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</text:p>
          </table:table-cell>
          <table:table-cell table:style-name="ce7" office:value-type="string" calcext:value-type="string">
            <text:p>i1_isen_uruk_snaga</text:p>
          </table:table-cell>
          <table:table-cell table:style-name="ce7" office:value-type="string" calcext:value-type="string">
            <text:p>Uruk_Hai_Newborn</text:p>
          </table:table-cell>
          <table:table-cell table:style-name="ce7" office:value-type="string" calcext:value-type="string">
            <text:p>Uruk_Hai_Newborns</text:p>
          </table:table-cell>
          <table:table-cell table:style-name="ce8" office:value-type="string" calcext:value-type="string">
            <text:p>tf_urukhai| tf_mounted| tfg_boots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sengard</text:p>
          </table:table-cell>
          <table:table-cell table:style-name="ce11" office:value-type="string" calcext:value-type="string">
            <text:p>itm_isen_orc_helm_a_bad,</text:p>
          </table:table-cell>
          <table:table-cell table:style-name="ce11" office:value-type="string" calcext:value-type="string">
            <text:p>itm_isen_uruk_light_a,itm_isen_uruk_light_a_bad,itm_isen_uruk_light_b_bad,</text:p>
          </table:table-cell>
          <table:table-cell table:style-name="ce11"/>
          <table:table-cell table:style-name="ce11" office:value-type="string" calcext:value-type="string">
            <text:p>itm_uruk_ragwrap,</text:p>
          </table:table-cell>
          <table:table-cell table:style-name="ce11" office:value-type="string" calcext:value-type="string">
            <text:p>itm_orc_simple_spear,itm_orc_slasher,itm_orc_axe,</text:p>
          </table:table-cell>
          <table:table-cell table:style-name="ce11" table:number-columns-repeated="2"/>
          <table:table-cell table:style-name="ce12" office:value-type="string" calcext:value-type="string">
            <text:p>attr_evil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ironflesh_2|knows_power_strike_1|knows_weapon_master_1|knows_athletics_1|knows_trainer_1|knows_tactics_1|knows_pathfinding_2|knows_spotting_1|knows_surgery_1|knows_prisoner_management_1|knows_leadership_1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B347]&lt;&gt;&quot;&quot;;[.C347]&lt;&gt;&quot;&quot;);CONCATENATE([Variables.$I$1];[Variables.$I$7];[.B347];[Variables.$I$7];[Variables.$I$6];[Variables.$I$7];[.C347];[Variables.$I$7];[Variables.$I$6];[Variables.$I$7];[.D347];[Variables.$I$7];[Variables.$I$6];[.E347];[Variables.$I$6];[.F347];[Variables.$I$6];[.G347];[Variables.$I$6];[.H347];[Variables.$I$6];[Variables.$I$1];[.I347];[.J347];[.K347];[.L347];[.M347];[.N347];[.O347];[Variables.$I$2];[Variables.$I$6];[.P347];[Variables.$I$6];[.Q347];[Variables.$I$6];[.R347];[Variables.$I$6];[.S347];[Variables.$I$6];[.T347];IF([.U347]&lt;&gt;&quot;&quot;;CONCATENATE([Variables.$I$6];[.U347]);&quot;&quot;);[Variables.$I$2];[Variables.$I$6]);IF([.B347]&lt;&gt;&quot;&quot;;CONCATENATE(&quot;#&quot;;[.B347]);&quot;&quot;))" office:value-type="string" office:string-value="[&quot;i1_isen_uruk_snaga&quot;,&quot;Uruk_Hai_Newborn&quot;,&quot;Uruk_Hai_Newborns&quot;,tf_urukhai| tf_mounted| tfg_boots| tfg_armor| tf_no_capture_alive,0,0,fac_isengard,[itm_isen_orc_helm_a_bad,itm_isen_uruk_light_a,itm_isen_uruk_light_a_bad,itm_isen_uruk_light_b_bad,itm_uruk_ragwrap,itm_orc_simple_spear,itm_orc_slasher,itm_orc_axe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" calcext:value-type="string">
            <text:p>["i1_isen_uruk_snaga","Uruk_Hai_Newborn","Uruk_Hai_Newborns",tf_urukhai| tf_mounted| tfg_boots| tfg_armor| tf_no_capture_alive,0,0,fac_isengard,[itm_isen_orc_helm_a_bad,itm_isen_uruk_light_a,itm_isen_uruk_light_a_bad,itm_isen_uruk_light_b_bad,itm_uruk_ragwrap,itm_orc_simple_spear,itm_orc_slasher,itm_orc_axe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</text:p>
          </table:table-cell>
          <table:table-cell table:number-columns-repeated="16362"/>
        </table:table-row>
        <table:table-row table:style-name="ro1">
          <table:table-cell table:style-name="ce6" table:formula="of:=IF(AND([.B348]&lt;&gt;&quot;&quot;;[.C348]&lt;&gt;&quot;&quot;);CONCATENATE([Variables.$I$1];[Variables.$I$7];[.B348];[Variables.$I$7];[Variables.$I$6];[Variables.$I$7];[.C348];[Variables.$I$7];[Variables.$I$6];[Variables.$I$7];[.D348];[Variables.$I$7];[Variables.$I$6];[.E348];[Variables.$I$6];[.F348];[Variables.$I$6];[.G348];[Variables.$I$6];[.H348];[Variables.$I$6];[Variables.$I$1];[.I348];[.J348];[.K348];[.L348];[.M348];[.N348];[.O348];[Variables.$I$2];[Variables.$I$6];[.P348];[Variables.$I$6];[.Q348];[Variables.$I$6];[.R348];[Variables.$I$6];[.S348];[Variables.$I$6];[.T348];IF([.U348]&lt;&gt;&quot;&quot;;CONCATENATE([Variables.$I$6];[.U348]);&quot;&quot;);[Variables.$I$2];[Variables.$I$6]);IF([.B348]&lt;&gt;&quot;&quot;;CONCATENATE(&quot;#&quot;;[.B348]);&quot;&quot;))" office:value-type="string" office:string-value="[&quot;i2_isen_uruk&quot;,&quot;Uruk_Hai_of_Isengard&quot;,&quot;Uruk_Hai_of_Isengard&quot;,tf_urukhai| tf_mounted| tfg_shield| tfg_armor| tfg_helm| tfg_boots| tf_no_capture_alive,0,0,fac_isengard,[itm_isen_orc_helm_a,itm_isen_uruk_light_a_good, itm_isen_uruk_light_b, itm_isen_uruk_med_a_bad, itm_isen_uruk_med_b_bad,itm_uruk_ragwrap,itm_isengard_spear,itm_isengard_axe,itm_isengard_sword,itm_isen_orc_shield_a,itm_isen_orc_shield_b,],attr_evil_tier_2,wp_tier_2,knows_common|knows_ironflesh_2|knows_power_strike_2|knows_weapon_master_1|knows_shield_1|knows_athletics_2|knows_trainer_1|knows_tactics_1|knows_pathfinding_2|knows_spotting_1|knows_surgery_1|knows_prisoner_management_1|knows_leadership_1,uruk_hai_face1,uruk_hai_face2]," calcext:value-type="string">
            <text:p>["i2_isen_uruk","Uruk_Hai_of_Isengard","Uruk_Hai_of_Isengard",tf_urukhai| tf_mounted| tfg_shield| tfg_armor| tfg_helm| tfg_boots| tf_no_capture_alive,0,0,fac_isengard,[itm_isen_orc_helm_a,itm_isen_uruk_light_a_good, itm_isen_uruk_light_b, itm_isen_uruk_med_a_bad, itm_isen_uruk_med_b_bad,itm_uruk_ragwrap,itm_isengard_spear,itm_isengard_axe,itm_isengard_sword,itm_isen_orc_shield_a,itm_isen_orc_shield_b,],attr_evil_tier_2,wp_tier_2,knows_common|knows_ironflesh_2|knows_power_strike_2|knows_weapon_master_1|knows_shield_1|knows_athletics_2|knows_trainer_1|knows_tactics_1|knows_pathfinding_2|knows_spotting_1|knows_surgery_1|knows_prisoner_management_1|knows_leadership_1,uruk_hai_face1,uruk_hai_face2],</text:p>
          </table:table-cell>
          <table:table-cell table:style-name="ce7" office:value-type="string" calcext:value-type="string">
            <text:p>i2_isen_uruk</text:p>
          </table:table-cell>
          <table:table-cell table:number-columns-repeated="2" table:style-name="ce7" office:value-type="string" calcext:value-type="string">
            <text:p>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sengard</text:p>
          </table:table-cell>
          <table:table-cell table:style-name="ce11" office:value-type="string" calcext:value-type="string">
            <text:p>itm_isen_orc_helm_a,</text:p>
          </table:table-cell>
          <table:table-cell table:style-name="ce11" office:value-type="string" calcext:value-type="string">
            <text:p>itm_isen_uruk_light_a_good, itm_isen_uruk_light_b, itm_isen_uruk_med_a_bad, itm_isen_uruk_med_b_bad,</text:p>
          </table:table-cell>
          <table:table-cell table:style-name="ce11"/>
          <table:table-cell table:style-name="ce11" office:value-type="string" calcext:value-type="string">
            <text:p>itm_uruk_ragwrap,</text:p>
          </table:table-cell>
          <table:table-cell table:style-name="ce11" office:value-type="string" calcext:value-type="string">
            <text:p>itm_isengard_spear,itm_isengard_axe,itm_isengard_sword,</text:p>
          </table:table-cell>
          <table:table-cell table:style-name="ce11" office:value-type="string" calcext:value-type="string">
            <text:p>itm_isen_orc_shield_a,itm_isen_orc_shield_b,</text:p>
          </table:table-cell>
          <table:table-cell table:style-name="ce11"/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2|knows_power_strike_2|knows_weapon_master_1|knows_shield_1|knows_athletics_2|knows_trainer_1|knows_tactics_1|knows_pathfinding_2|knows_spotting_1|knows_surgery_1|knows_prisoner_management_1|knows_leadership_1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B348]&lt;&gt;&quot;&quot;;[.C348]&lt;&gt;&quot;&quot;);CONCATENATE([Variables.$I$1];[Variables.$I$7];[.B348];[Variables.$I$7];[Variables.$I$6];[Variables.$I$7];[.C348];[Variables.$I$7];[Variables.$I$6];[Variables.$I$7];[.D348];[Variables.$I$7];[Variables.$I$6];[.E348];[Variables.$I$6];[.F348];[Variables.$I$6];[.G348];[Variables.$I$6];[.H348];[Variables.$I$6];[Variables.$I$1];[.I348];[.J348];[.K348];[.L348];[.M348];[.N348];[.O348];[Variables.$I$2];[Variables.$I$6];[.P348];[Variables.$I$6];[.Q348];[Variables.$I$6];[.R348];[Variables.$I$6];[.S348];[Variables.$I$6];[.T348];IF([.U348]&lt;&gt;&quot;&quot;;CONCATENATE([Variables.$I$6];[.U348]);&quot;&quot;);[Variables.$I$2];[Variables.$I$6]);IF([.B348]&lt;&gt;&quot;&quot;;CONCATENATE(&quot;#&quot;;[.B348]);&quot;&quot;))" office:value-type="string" office:string-value="[&quot;i2_isen_uruk&quot;,&quot;Uruk_Hai_of_Isengard&quot;,&quot;Uruk_Hai_of_Isengard&quot;,tf_urukhai| tf_mounted| tfg_shield| tfg_armor| tfg_helm| tfg_boots| tf_no_capture_alive,0,0,fac_isengard,[itm_isen_orc_helm_a,itm_isen_uruk_light_a_good, itm_isen_uruk_light_b, itm_isen_uruk_med_a_bad, itm_isen_uruk_med_b_bad,itm_uruk_ragwrap,itm_isengard_spear,itm_isengard_axe,itm_isengard_sword,itm_isen_orc_shield_a,itm_isen_orc_shield_b,],attr_evil_tier_2,wp_tier_2,knows_common|knows_ironflesh_2|knows_power_strike_2|knows_weapon_master_1|knows_shield_1|knows_athletics_2|knows_trainer_1|knows_tactics_1|knows_pathfinding_2|knows_spotting_1|knows_surgery_1|knows_prisoner_management_1|knows_leadership_1,uruk_hai_face1,uruk_hai_face2]," calcext:value-type="string">
            <text:p>["i2_isen_uruk","Uruk_Hai_of_Isengard","Uruk_Hai_of_Isengard",tf_urukhai| tf_mounted| tfg_shield| tfg_armor| tfg_helm| tfg_boots| tf_no_capture_alive,0,0,fac_isengard,[itm_isen_orc_helm_a,itm_isen_uruk_light_a_good, itm_isen_uruk_light_b, itm_isen_uruk_med_a_bad, itm_isen_uruk_med_b_bad,itm_uruk_ragwrap,itm_isengard_spear,itm_isengard_axe,itm_isengard_sword,itm_isen_orc_shield_a,itm_isen_orc_shield_b,],attr_evil_tier_2,wp_tier_2,knows_common|knows_ironflesh_2|knows_power_strike_2|knows_weapon_master_1|knows_shield_1|knows_athletics_2|knows_trainer_1|knows_tactics_1|knows_pathfinding_2|knows_spotting_1|knows_surgery_1|knows_prisoner_management_1|knows_leadership_1,uruk_hai_face1,uruk_hai_face2],</text:p>
          </table:table-cell>
          <table:table-cell table:number-columns-repeated="16362"/>
        </table:table-row>
        <table:table-row table:style-name="ro1">
          <table:table-cell table:style-name="ce6" table:formula="of:=IF(AND([.B349]&lt;&gt;&quot;&quot;;[.C349]&lt;&gt;&quot;&quot;);CONCATENATE([Variables.$I$1];[Variables.$I$7];[.B349];[Variables.$I$7];[Variables.$I$6];[Variables.$I$7];[.C349];[Variables.$I$7];[Variables.$I$6];[Variables.$I$7];[.D349];[Variables.$I$7];[Variables.$I$6];[.E349];[Variables.$I$6];[.F349];[Variables.$I$6];[.G349];[Variables.$I$6];[.H349];[Variables.$I$6];[Variables.$I$1];[.I349];[.J349];[.K349];[.L349];[.M349];[.N349];[.O349];[Variables.$I$2];[Variables.$I$6];[.P349];[Variables.$I$6];[.Q349];[Variables.$I$6];[.R349];[Variables.$I$6];[.S349];[Variables.$I$6];[.T349];IF([.U349]&lt;&gt;&quot;&quot;;CONCATENATE([Variables.$I$6];[.U349]);&quot;&quot;);[Variables.$I$2];[Variables.$I$6]);IF([.B349]&lt;&gt;&quot;&quot;;CONCATENATE(&quot;#&quot;;[.B349]);&quot;&quot;))" office:value-type="string" office:string-value="[&quot;i3_isen_large_uruk&quot;,&quot;Large_Uruk_Hai_of_Isengard&quot;,&quot;Large_Uruk_Hai_of_Isengard&quot;,tf_urukhai| tf_mounted| tfg_shield| tfg_armor| tfg_helm| tfg_boots| tf_no_capture_alive,0,0,fac_isengard,[itm_isen_uruk_helm_a_bad,itm_isen_uruk_light_b_good, itm_isen_uruk_med_a, itm_isen_uruk_med_b,itm_evil_gauntlets_a,itm_orc_mittens,itm_uruk_ragwrap,itm_uruk_greaves,itm_isengard_axe,itm_isengard_sword,itm_isen_orc_shield_a,itm_isen_orc_shield_b,],attr_evil_tier_3,wp_tier_3,knows_common|knows_athletics_2|knows_power_strike_3|knows_ironflesh_4,uruk_hai_face1,uruk_hai_face2]," calcext:value-type="string">
            <text:p>["i3_isen_large_uruk","Large_Uruk_Hai_of_Isengard","Large_Uruk_Hai_of_Isengard",tf_urukhai| tf_mounted| tfg_shield| tfg_armor| tfg_helm| tfg_boots| tf_no_capture_alive,0,0,fac_isengard,[itm_isen_uruk_helm_a_bad,itm_isen_uruk_light_b_good, itm_isen_uruk_med_a, itm_isen_uruk_med_b,itm_evil_gauntlets_a,itm_orc_mittens,itm_uruk_ragwrap,itm_uruk_greaves,itm_isengard_axe,itm_isengard_sword,itm_isen_orc_shield_a,itm_isen_orc_shield_b,],attr_evil_tier_3,wp_tier_3,knows_common|knows_athletics_2|knows_power_strike_3|knows_ironflesh_4,uruk_hai_face1,uruk_hai_face2],</text:p>
          </table:table-cell>
          <table:table-cell table:style-name="ce7" office:value-type="string" calcext:value-type="string">
            <text:p>i3_isen_large_uruk</text:p>
          </table:table-cell>
          <table:table-cell table:number-columns-repeated="2" table:style-name="ce7" office:value-type="string" calcext:value-type="string">
            <text:p>Large_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sengard</text:p>
          </table:table-cell>
          <table:table-cell table:style-name="ce11" office:value-type="string" calcext:value-type="string">
            <text:p>itm_isen_uruk_helm_a_bad,</text:p>
          </table:table-cell>
          <table:table-cell table:style-name="ce11" office:value-type="string" calcext:value-type="string">
            <text:p>itm_isen_uruk_light_b_good, itm_isen_uruk_med_a, itm_isen_uruk_med_b,</text:p>
          </table:table-cell>
          <table:table-cell table:style-name="ce11" office:value-type="string" calcext:value-type="string">
            <text:p>itm_evil_gauntlets_a,itm_orc_mittens,</text:p>
          </table:table-cell>
          <table:table-cell table:style-name="ce11" office:value-type="string" calcext:value-type="string">
            <text:p>itm_uruk_ragwrap,itm_uruk_greaves,</text:p>
          </table:table-cell>
          <table:table-cell table:style-name="ce11" office:value-type="string" calcext:value-type="string">
            <text:p>itm_isengard_axe,itm_isengard_sword,</text:p>
          </table:table-cell>
          <table:table-cell table:style-name="ce11" office:value-type="string" calcext:value-type="string">
            <text:p>itm_isen_orc_shield_a,itm_isen_orc_shield_b,</text:p>
          </table:table-cell>
          <table:table-cell table:style-name="ce11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2|knows_power_strike_3|knows_ironflesh_4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B349]&lt;&gt;&quot;&quot;;[.C349]&lt;&gt;&quot;&quot;);CONCATENATE([Variables.$I$1];[Variables.$I$7];[.B349];[Variables.$I$7];[Variables.$I$6];[Variables.$I$7];[.C349];[Variables.$I$7];[Variables.$I$6];[Variables.$I$7];[.D349];[Variables.$I$7];[Variables.$I$6];[.E349];[Variables.$I$6];[.F349];[Variables.$I$6];[.G349];[Variables.$I$6];[.H349];[Variables.$I$6];[Variables.$I$1];[.I349];[.J349];[.K349];[.L349];[.M349];[.N349];[.O349];[Variables.$I$2];[Variables.$I$6];[.P349];[Variables.$I$6];[.Q349];[Variables.$I$6];[.R349];[Variables.$I$6];[.S349];[Variables.$I$6];[.T349];IF([.U349]&lt;&gt;&quot;&quot;;CONCATENATE([Variables.$I$6];[.U349]);&quot;&quot;);[Variables.$I$2];[Variables.$I$6]);IF([.B349]&lt;&gt;&quot;&quot;;CONCATENATE(&quot;#&quot;;[.B349]);&quot;&quot;))" office:value-type="string" office:string-value="[&quot;i3_isen_large_uruk&quot;,&quot;Large_Uruk_Hai_of_Isengard&quot;,&quot;Large_Uruk_Hai_of_Isengard&quot;,tf_urukhai| tf_mounted| tfg_shield| tfg_armor| tfg_helm| tfg_boots| tf_no_capture_alive,0,0,fac_isengard,[itm_isen_uruk_helm_a_bad,itm_isen_uruk_light_b_good, itm_isen_uruk_med_a, itm_isen_uruk_med_b,itm_evil_gauntlets_a,itm_orc_mittens,itm_uruk_ragwrap,itm_uruk_greaves,itm_isengard_axe,itm_isengard_sword,itm_isen_orc_shield_a,itm_isen_orc_shield_b,],attr_evil_tier_3,wp_tier_3,knows_common|knows_athletics_2|knows_power_strike_3|knows_ironflesh_4,uruk_hai_face1,uruk_hai_face2]," calcext:value-type="string">
            <text:p>["i3_isen_large_uruk","Large_Uruk_Hai_of_Isengard","Large_Uruk_Hai_of_Isengard",tf_urukhai| tf_mounted| tfg_shield| tfg_armor| tfg_helm| tfg_boots| tf_no_capture_alive,0,0,fac_isengard,[itm_isen_uruk_helm_a_bad,itm_isen_uruk_light_b_good, itm_isen_uruk_med_a, itm_isen_uruk_med_b,itm_evil_gauntlets_a,itm_orc_mittens,itm_uruk_ragwrap,itm_uruk_greaves,itm_isengard_axe,itm_isengard_sword,itm_isen_orc_shield_a,itm_isen_orc_shield_b,],attr_evil_tier_3,wp_tier_3,knows_common|knows_athletics_2|knows_power_strike_3|knows_ironflesh_4,uruk_hai_face1,uruk_hai_face2],</text:p>
          </table:table-cell>
          <table:table-cell table:number-columns-repeated="16362"/>
        </table:table-row>
        <table:table-row table:style-name="ro1">
          <table:table-cell table:style-name="ce6" table:formula="of:=IF(AND([.B350]&lt;&gt;&quot;&quot;;[.C350]&lt;&gt;&quot;&quot;);CONCATENATE([Variables.$I$1];[Variables.$I$7];[.B350];[Variables.$I$7];[Variables.$I$6];[Variables.$I$7];[.C350];[Variables.$I$7];[Variables.$I$6];[Variables.$I$7];[.D350];[Variables.$I$7];[Variables.$I$6];[.E350];[Variables.$I$6];[.F350];[Variables.$I$6];[.G350];[Variables.$I$6];[.H350];[Variables.$I$6];[Variables.$I$1];[.I350];[.J350];[.K350];[.L350];[.M350];[.N350];[.O350];[Variables.$I$2];[Variables.$I$6];[.P350];[Variables.$I$6];[.Q350];[Variables.$I$6];[.R350];[Variables.$I$6];[.S350];[Variables.$I$6];[.T350];IF([.U350]&lt;&gt;&quot;&quot;;CONCATENATE([Variables.$I$6];[.U350]);&quot;&quot;);[Variables.$I$2];[Variables.$I$6]);IF([.B350]&lt;&gt;&quot;&quot;;CONCATENATE(&quot;#&quot;;[.B350]);&quot;&quot;))" office:value-type="string" office:string-value="[&quot;i4_isen_fighting_uruk_warrior&quot;,&quot;Fighting_Uruk_Hai_Warrior&quot;,&quot;Fighting_Uruk_Hai_Warriors&quot;,tf_urukhai|tf_mounted| tfg_shield| tfg_armor| tfg_helm| tfg_boots| tf_no_capture_alive,0,0,fac_isengard,[itm_isen_uruk_helm_a,itm_isen_uruk_med_b_good, itm_isen_uruk_heavy_a_bad, itm_isen_uruk_heavy_b,itm_evil_gauntlets_b, itm_orc_mittens,itm_uruk_greaves,itm_isengard_sword,itm_isen_uruk_shield_b,],attr_evil_tier_4,wp_tier_4,knows_common|knows_athletics_2|knows_power_strike_5|knows_ironflesh_5,uruk_hai_face1,uruk_hai_face2]," calcext:value-type="string">
            <text:p>["i4_isen_fighting_uruk_warrior","Fighting_Uruk_Hai_Warrior","Fighting_Uruk_Hai_Warriors",tf_urukhai|tf_mounted| tfg_shield| tfg_armor| tfg_helm| tfg_boots| tf_no_capture_alive,0,0,fac_isengard,[itm_isen_uruk_helm_a,itm_isen_uruk_med_b_good, itm_isen_uruk_heavy_a_bad, itm_isen_uruk_heavy_b,itm_evil_gauntlets_b, itm_orc_mittens,itm_uruk_greaves,itm_isengard_sword,itm_isen_uruk_shield_b,],attr_evil_tier_4,wp_tier_4,knows_common|knows_athletics_2|knows_power_strike_5|knows_ironflesh_5,uruk_hai_face1,uruk_hai_face2],</text:p>
          </table:table-cell>
          <table:table-cell table:style-name="ce7" office:value-type="string" calcext:value-type="string">
            <text:p>i4_isen_fighting_uruk_warrior</text:p>
          </table:table-cell>
          <table:table-cell table:style-name="ce7" office:value-type="string" calcext:value-type="string">
            <text:p>Fighting_Uruk_Hai_Warrior</text:p>
          </table:table-cell>
          <table:table-cell table:style-name="ce7" office:value-type="string" calcext:value-type="string">
            <text:p>Fighting_Uruk_Hai_Warrior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sengard</text:p>
          </table:table-cell>
          <table:table-cell table:style-name="ce11" office:value-type="string" calcext:value-type="string">
            <text:p>itm_isen_uruk_helm_a,</text:p>
          </table:table-cell>
          <table:table-cell table:style-name="ce11" office:value-type="string" calcext:value-type="string">
            <text:p>itm_isen_uruk_med_b_good, itm_isen_uruk_heavy_a_bad, itm_isen_uruk_heavy_b,</text:p>
          </table:table-cell>
          <table:table-cell table:style-name="ce11" office:value-type="string" calcext:value-type="string">
            <text:p>itm_evil_gauntlets_b, itm_orc_mittens,</text:p>
          </table:table-cell>
          <table:table-cell table:style-name="ce11" office:value-type="string" calcext:value-type="string">
            <text:p>itm_uruk_greaves,</text:p>
          </table:table-cell>
          <table:table-cell table:style-name="ce11" office:value-type="string" calcext:value-type="string">
            <text:p>itm_isengard_sword,</text:p>
          </table:table-cell>
          <table:table-cell table:style-name="ce11" office:value-type="string" calcext:value-type="string">
            <text:p>itm_isen_uruk_shield_b,</text:p>
          </table:table-cell>
          <table:table-cell table:style-name="ce11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2|knows_power_strike_5|knows_ironflesh_5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B350]&lt;&gt;&quot;&quot;;[.C350]&lt;&gt;&quot;&quot;);CONCATENATE([Variables.$I$1];[Variables.$I$7];[.B350];[Variables.$I$7];[Variables.$I$6];[Variables.$I$7];[.C350];[Variables.$I$7];[Variables.$I$6];[Variables.$I$7];[.D350];[Variables.$I$7];[Variables.$I$6];[.E350];[Variables.$I$6];[.F350];[Variables.$I$6];[.G350];[Variables.$I$6];[.H350];[Variables.$I$6];[Variables.$I$1];[.I350];[.J350];[.K350];[.L350];[.M350];[.N350];[.O350];[Variables.$I$2];[Variables.$I$6];[.P350];[Variables.$I$6];[.Q350];[Variables.$I$6];[.R350];[Variables.$I$6];[.S350];[Variables.$I$6];[.T350];IF([.U350]&lt;&gt;&quot;&quot;;CONCATENATE([Variables.$I$6];[.U350]);&quot;&quot;);[Variables.$I$2];[Variables.$I$6]);IF([.B350]&lt;&gt;&quot;&quot;;CONCATENATE(&quot;#&quot;;[.B350]);&quot;&quot;))" office:value-type="string" office:string-value="[&quot;i4_isen_fighting_uruk_warrior&quot;,&quot;Fighting_Uruk_Hai_Warrior&quot;,&quot;Fighting_Uruk_Hai_Warriors&quot;,tf_urukhai|tf_mounted| tfg_shield| tfg_armor| tfg_helm| tfg_boots| tf_no_capture_alive,0,0,fac_isengard,[itm_isen_uruk_helm_a,itm_isen_uruk_med_b_good, itm_isen_uruk_heavy_a_bad, itm_isen_uruk_heavy_b,itm_evil_gauntlets_b, itm_orc_mittens,itm_uruk_greaves,itm_isengard_sword,itm_isen_uruk_shield_b,],attr_evil_tier_4,wp_tier_4,knows_common|knows_athletics_2|knows_power_strike_5|knows_ironflesh_5,uruk_hai_face1,uruk_hai_face2]," calcext:value-type="string">
            <text:p>["i4_isen_fighting_uruk_warrior","Fighting_Uruk_Hai_Warrior","Fighting_Uruk_Hai_Warriors",tf_urukhai|tf_mounted| tfg_shield| tfg_armor| tfg_helm| tfg_boots| tf_no_capture_alive,0,0,fac_isengard,[itm_isen_uruk_helm_a,itm_isen_uruk_med_b_good, itm_isen_uruk_heavy_a_bad, itm_isen_uruk_heavy_b,itm_evil_gauntlets_b, itm_orc_mittens,itm_uruk_greaves,itm_isengard_sword,itm_isen_uruk_shield_b,],attr_evil_tier_4,wp_tier_4,knows_common|knows_athletics_2|knows_power_strike_5|knows_ironflesh_5,uruk_hai_face1,uruk_hai_face2],</text:p>
          </table:table-cell>
          <table:table-cell table:number-columns-repeated="16362"/>
        </table:table-row>
        <table:table-row table:style-name="ro1">
          <table:table-cell table:style-name="ce6" table:formula="of:=IF(AND([.B351]&lt;&gt;&quot;&quot;;[.C351]&lt;&gt;&quot;&quot;);CONCATENATE([Variables.$I$1];[Variables.$I$7];[.B351];[Variables.$I$7];[Variables.$I$6];[Variables.$I$7];[.C351];[Variables.$I$7];[Variables.$I$6];[Variables.$I$7];[.D351];[Variables.$I$7];[Variables.$I$6];[.E351];[Variables.$I$6];[.F351];[Variables.$I$6];[.G351];[Variables.$I$6];[.H351];[Variables.$I$6];[Variables.$I$1];[.I351];[.J351];[.K351];[.L351];[.M351];[.N351];[.O351];[Variables.$I$2];[Variables.$I$6];[.P351];[Variables.$I$6];[.Q351];[Variables.$I$6];[.R351];[Variables.$I$6];[.S351];[Variables.$I$6];[.T351];IF([.U351]&lt;&gt;&quot;&quot;;CONCATENATE([Variables.$I$6];[.U351]);&quot;&quot;);[Variables.$I$2];[Variables.$I$6]);IF([.B351]&lt;&gt;&quot;&quot;;CONCATENATE(&quot;#&quot;;[.B351]);&quot;&quot;))" office:value-type="string" office:string-value="[&quot;i5_isen_fighting_uruk_champion&quot;,&quot;Fighting_Uruk_Hai_Champion&quot;,&quot;Fighting_Uruk_Hai_Champions&quot;,tf_urukhai|tf_mounted| tfg_shield| tfg_armor| tfg_helm| tfg_boots| tf_no_capture_alive,0,0,fac_isengard,[itm_isen_uruk_helm_a_good,itm_isen_uruk_heavy_b_good, itm_isen_uruk_heavy_c,itm_evil_gauntlets_b, itm_orc_mittens_good,itm_uruk_chain_greaves,itm_isengard_sword,itm_isen_uruk_shield_b,],attr_evil_tier_5,wp_tier_5,knows_common|knows_athletics_3|knows_power_strike_6|knows_ironflesh_6,uruk_hai_face1,uruk_hai_face2]," calcext:value-type="string">
            <text:p>["i5_isen_fighting_uruk_champion","Fighting_Uruk_Hai_Champion","Fighting_Uruk_Hai_Champions",tf_urukhai|tf_mounted| tfg_shield| tfg_armor| tfg_helm| tfg_boots| tf_no_capture_alive,0,0,fac_isengard,[itm_isen_uruk_helm_a_good,itm_isen_uruk_heavy_b_good, itm_isen_uruk_heavy_c,itm_evil_gauntlets_b, itm_orc_mittens_good,itm_uruk_chain_greaves,itm_isengard_sword,itm_isen_uruk_shield_b,],attr_evil_tier_5,wp_tier_5,knows_common|knows_athletics_3|knows_power_strike_6|knows_ironflesh_6,uruk_hai_face1,uruk_hai_face2],</text:p>
          </table:table-cell>
          <table:table-cell table:style-name="ce7" office:value-type="string" calcext:value-type="string">
            <text:p>i5_isen_fighting_uruk_champion</text:p>
          </table:table-cell>
          <table:table-cell table:style-name="ce7" office:value-type="string" calcext:value-type="string">
            <text:p>Fighting_Uruk_Hai_Champion</text:p>
          </table:table-cell>
          <table:table-cell table:style-name="ce7" office:value-type="string" calcext:value-type="string">
            <text:p>Fighting_Uruk_Hai_Champio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sengard</text:p>
          </table:table-cell>
          <table:table-cell table:style-name="ce11" office:value-type="string" calcext:value-type="string">
            <text:p>itm_isen_uruk_helm_a_good,</text:p>
          </table:table-cell>
          <table:table-cell table:style-name="ce11" office:value-type="string" calcext:value-type="string">
            <text:p>itm_isen_uruk_heavy_b_good, itm_isen_uruk_heavy_c,</text:p>
          </table:table-cell>
          <table:table-cell table:style-name="ce11" office:value-type="string" calcext:value-type="string">
            <text:p>itm_evil_gauntlets_b, itm_orc_mittens_good,</text:p>
          </table:table-cell>
          <table:table-cell table:style-name="ce11" office:value-type="string" calcext:value-type="string">
            <text:p>itm_uruk_chain_greaves,</text:p>
          </table:table-cell>
          <table:table-cell table:style-name="ce11" office:value-type="string" calcext:value-type="string">
            <text:p>itm_isengard_sword,</text:p>
          </table:table-cell>
          <table:table-cell table:style-name="ce11" office:value-type="string" calcext:value-type="string">
            <text:p>itm_isen_uruk_shield_b,</text:p>
          </table:table-cell>
          <table:table-cell table:style-name="ce11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3|knows_power_strike_6|knows_ironflesh_6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B351]&lt;&gt;&quot;&quot;;[.C351]&lt;&gt;&quot;&quot;);CONCATENATE([Variables.$I$1];[Variables.$I$7];[.B351];[Variables.$I$7];[Variables.$I$6];[Variables.$I$7];[.C351];[Variables.$I$7];[Variables.$I$6];[Variables.$I$7];[.D351];[Variables.$I$7];[Variables.$I$6];[.E351];[Variables.$I$6];[.F351];[Variables.$I$6];[.G351];[Variables.$I$6];[.H351];[Variables.$I$6];[Variables.$I$1];[.I351];[.J351];[.K351];[.L351];[.M351];[.N351];[.O351];[Variables.$I$2];[Variables.$I$6];[.P351];[Variables.$I$6];[.Q351];[Variables.$I$6];[.R351];[Variables.$I$6];[.S351];[Variables.$I$6];[.T351];IF([.U351]&lt;&gt;&quot;&quot;;CONCATENATE([Variables.$I$6];[.U351]);&quot;&quot;);[Variables.$I$2];[Variables.$I$6]);IF([.B351]&lt;&gt;&quot;&quot;;CONCATENATE(&quot;#&quot;;[.B351]);&quot;&quot;))" office:value-type="string" office:string-value="[&quot;i5_isen_fighting_uruk_champion&quot;,&quot;Fighting_Uruk_Hai_Champion&quot;,&quot;Fighting_Uruk_Hai_Champions&quot;,tf_urukhai|tf_mounted| tfg_shield| tfg_armor| tfg_helm| tfg_boots| tf_no_capture_alive,0,0,fac_isengard,[itm_isen_uruk_helm_a_good,itm_isen_uruk_heavy_b_good, itm_isen_uruk_heavy_c,itm_evil_gauntlets_b, itm_orc_mittens_good,itm_uruk_chain_greaves,itm_isengard_sword,itm_isen_uruk_shield_b,],attr_evil_tier_5,wp_tier_5,knows_common|knows_athletics_3|knows_power_strike_6|knows_ironflesh_6,uruk_hai_face1,uruk_hai_face2]," calcext:value-type="string">
            <text:p>["i5_isen_fighting_uruk_champion","Fighting_Uruk_Hai_Champion","Fighting_Uruk_Hai_Champions",tf_urukhai|tf_mounted| tfg_shield| tfg_armor| tfg_helm| tfg_boots| tf_no_capture_alive,0,0,fac_isengard,[itm_isen_uruk_helm_a_good,itm_isen_uruk_heavy_b_good, itm_isen_uruk_heavy_c,itm_evil_gauntlets_b, itm_orc_mittens_good,itm_uruk_chain_greaves,itm_isengard_sword,itm_isen_uruk_shield_b,],attr_evil_tier_5,wp_tier_5,knows_common|knows_athletics_3|knows_power_strike_6|knows_ironflesh_6,uruk_hai_face1,uruk_hai_face2],</text:p>
          </table:table-cell>
          <table:table-cell table:number-columns-repeated="16362"/>
        </table:table-row>
        <table:table-row table:style-name="ro1">
          <table:table-cell table:style-name="ce6" table:formula="of:=IF(AND([.B352]&lt;&gt;&quot;&quot;;[.C352]&lt;&gt;&quot;&quot;);CONCATENATE([Variables.$I$1];[Variables.$I$7];[.B352];[Variables.$I$7];[Variables.$I$6];[Variables.$I$7];[.C352];[Variables.$I$7];[Variables.$I$6];[Variables.$I$7];[.D352];[Variables.$I$7];[Variables.$I$6];[.E352];[Variables.$I$6];[.F352];[Variables.$I$6];[.G352];[Variables.$I$6];[.H352];[Variables.$I$6];[Variables.$I$1];[.I352];[.J352];[.K352];[.L352];[.M352];[.N352];[.O352];[Variables.$I$2];[Variables.$I$6];[.P352];[Variables.$I$6];[.Q352];[Variables.$I$6];[.R352];[Variables.$I$6];[.S352];[Variables.$I$6];[.T352];IF([.U352]&lt;&gt;&quot;&quot;;CONCATENATE([Variables.$I$6];[.U352]);&quot;&quot;);[Variables.$I$2];[Variables.$I$6]);IF([.B352]&lt;&gt;&quot;&quot;;CONCATENATE(&quot;#&quot;;[.B352]);&quot;&quot;))" office:value-type="string" office:string-value="[&quot;i3_isen_uruk_pikeman&quot;,&quot;Uruk_Hai_Pikeman&quot;,&quot;Uruk_Hai_Pikemen&quot;,tf_urukhai| tf_mounted|tfg_armor| tfg_helm| tfg_boots| tf_no_capture_alive,0,0,fac_isengard,[itm_isen_uruk_helm_a,itm_isen_uruk_med_a_good, itm_isen_uruk_heavy_a_bad, itm_isen_uruk_heavy_b_bad,itm_evil_gauntlets_a, itm_orc_mittens,itm_uruk_chain_greaves,itm_isengard_pike,],attr_evil_tier_3,wp_tier_3,knows_common|knows_athletics_2|knows_power_strike_3|knows_ironflesh_4,uruk_hai_face1,uruk_hai_face2]," calcext:value-type="string">
            <text:p>["i3_isen_uruk_pikeman","Uruk_Hai_Pikeman","Uruk_Hai_Pikemen",tf_urukhai| tf_mounted|tfg_armor| tfg_helm| tfg_boots| tf_no_capture_alive,0,0,fac_isengard,[itm_isen_uruk_helm_a,itm_isen_uruk_med_a_good, itm_isen_uruk_heavy_a_bad, itm_isen_uruk_heavy_b_bad,itm_evil_gauntlets_a, itm_orc_mittens,itm_uruk_chain_greaves,itm_isengard_pike,],attr_evil_tier_3,wp_tier_3,knows_common|knows_athletics_2|knows_power_strike_3|knows_ironflesh_4,uruk_hai_face1,uruk_hai_face2],</text:p>
          </table:table-cell>
          <table:table-cell table:style-name="ce7" office:value-type="string" calcext:value-type="string">
            <text:p>i3_isen_uruk_pikeman</text:p>
          </table:table-cell>
          <table:table-cell table:style-name="ce7" office:value-type="string" calcext:value-type="string">
            <text:p>Uruk_Hai_Pikeman</text:p>
          </table:table-cell>
          <table:table-cell table:style-name="ce7" office:value-type="string" calcext:value-type="string">
            <text:p>Uruk_Hai_Pikemen</text:p>
          </table:table-cell>
          <table:table-cell table:style-name="ce8" office:value-type="string" calcext:value-type="string">
            <text:p>tf_urukhai| tf_mounte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sengard</text:p>
          </table:table-cell>
          <table:table-cell table:style-name="ce11" office:value-type="string" calcext:value-type="string">
            <text:p>itm_isen_uruk_helm_a,</text:p>
          </table:table-cell>
          <table:table-cell table:style-name="ce11" office:value-type="string" calcext:value-type="string">
            <text:p>itm_isen_uruk_med_a_good, itm_isen_uruk_heavy_a_bad, itm_isen_uruk_heavy_b_bad,</text:p>
          </table:table-cell>
          <table:table-cell table:style-name="ce11" office:value-type="string" calcext:value-type="string">
            <text:p>itm_evil_gauntlets_a, itm_orc_mittens,</text:p>
          </table:table-cell>
          <table:table-cell table:style-name="ce11" office:value-type="string" calcext:value-type="string">
            <text:p>itm_uruk_chain_greaves,</text:p>
          </table:table-cell>
          <table:table-cell table:style-name="ce11" office:value-type="string" calcext:value-type="string">
            <text:p>itm_isengard_pike,</text:p>
          </table:table-cell>
          <table:table-cell table:style-name="ce11" table:number-columns-repeated="2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2|knows_power_strike_3|knows_ironflesh_4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B352]&lt;&gt;&quot;&quot;;[.C352]&lt;&gt;&quot;&quot;);CONCATENATE([Variables.$I$1];[Variables.$I$7];[.B352];[Variables.$I$7];[Variables.$I$6];[Variables.$I$7];[.C352];[Variables.$I$7];[Variables.$I$6];[Variables.$I$7];[.D352];[Variables.$I$7];[Variables.$I$6];[.E352];[Variables.$I$6];[.F352];[Variables.$I$6];[.G352];[Variables.$I$6];[.H352];[Variables.$I$6];[Variables.$I$1];[.I352];[.J352];[.K352];[.L352];[.M352];[.N352];[.O352];[Variables.$I$2];[Variables.$I$6];[.P352];[Variables.$I$6];[.Q352];[Variables.$I$6];[.R352];[Variables.$I$6];[.S352];[Variables.$I$6];[.T352];IF([.U352]&lt;&gt;&quot;&quot;;CONCATENATE([Variables.$I$6];[.U352]);&quot;&quot;);[Variables.$I$2];[Variables.$I$6]);IF([.B352]&lt;&gt;&quot;&quot;;CONCATENATE(&quot;#&quot;;[.B352]);&quot;&quot;))" office:value-type="string" office:string-value="[&quot;i3_isen_uruk_pikeman&quot;,&quot;Uruk_Hai_Pikeman&quot;,&quot;Uruk_Hai_Pikemen&quot;,tf_urukhai| tf_mounted|tfg_armor| tfg_helm| tfg_boots| tf_no_capture_alive,0,0,fac_isengard,[itm_isen_uruk_helm_a,itm_isen_uruk_med_a_good, itm_isen_uruk_heavy_a_bad, itm_isen_uruk_heavy_b_bad,itm_evil_gauntlets_a, itm_orc_mittens,itm_uruk_chain_greaves,itm_isengard_pike,],attr_evil_tier_3,wp_tier_3,knows_common|knows_athletics_2|knows_power_strike_3|knows_ironflesh_4,uruk_hai_face1,uruk_hai_face2]," calcext:value-type="string">
            <text:p>["i3_isen_uruk_pikeman","Uruk_Hai_Pikeman","Uruk_Hai_Pikemen",tf_urukhai| tf_mounted|tfg_armor| tfg_helm| tfg_boots| tf_no_capture_alive,0,0,fac_isengard,[itm_isen_uruk_helm_a,itm_isen_uruk_med_a_good, itm_isen_uruk_heavy_a_bad, itm_isen_uruk_heavy_b_bad,itm_evil_gauntlets_a, itm_orc_mittens,itm_uruk_chain_greaves,itm_isengard_pike,],attr_evil_tier_3,wp_tier_3,knows_common|knows_athletics_2|knows_power_strike_3|knows_ironflesh_4,uruk_hai_face1,uruk_hai_face2],</text:p>
          </table:table-cell>
          <table:table-cell table:number-columns-repeated="16362"/>
        </table:table-row>
        <table:table-row table:style-name="ro1">
          <table:table-cell table:style-name="ce6" table:formula="of:=IF(AND([.B353]&lt;&gt;&quot;&quot;;[.C353]&lt;&gt;&quot;&quot;);CONCATENATE([Variables.$I$1];[Variables.$I$7];[.B353];[Variables.$I$7];[Variables.$I$6];[Variables.$I$7];[.C353];[Variables.$I$7];[Variables.$I$6];[Variables.$I$7];[.D353];[Variables.$I$7];[Variables.$I$6];[.E353];[Variables.$I$6];[.F353];[Variables.$I$6];[.G353];[Variables.$I$6];[.H353];[Variables.$I$6];[Variables.$I$1];[.I353];[.J353];[.K353];[.L353];[.M353];[.N353];[.O353];[Variables.$I$2];[Variables.$I$6];[.P353];[Variables.$I$6];[.Q353];[Variables.$I$6];[.R353];[Variables.$I$6];[.S353];[Variables.$I$6];[.T353];IF([.U353]&lt;&gt;&quot;&quot;;CONCATENATE([Variables.$I$6];[.U353]);&quot;&quot;);[Variables.$I$2];[Variables.$I$6]);IF([.B353]&lt;&gt;&quot;&quot;;CONCATENATE(&quot;#&quot;;[.B353]);&quot;&quot;))" office:value-type="string" office:string-value="[&quot;i4_isen_fighting_uruk_pikeman&quot;,&quot;Fighting_Uruk_Hai_Pikeman&quot;,&quot;Fighting_Uruk_Hai_Pikemen&quot;,tf_urukhai|tf_mounted| tfg_armor| tfg_helm| tfg_boots| tf_no_capture_alive,0,0,fac_isengard,[itm_isen_uruk_helm_a_good,itm_isen_uruk_heavy_c_good, itm_isen_uruk_heavy_b_good,itm_evil_gauntlets_b, itm_orc_mittens_good,itm_uruk_chain_greaves,itm_isengard_pike,itm_isengard_halberd,],attr_evil_tier_4,wp_tier_4,knows_common|knows_athletics_2|knows_power_strike_5|knows_ironflesh_5,uruk_hai_face1,uruk_hai_face2]," calcext:value-type="string">
            <text:p>["i4_isen_fighting_uruk_pikeman","Fighting_Uruk_Hai_Pikeman","Fighting_Uruk_Hai_Pikemen",tf_urukhai|tf_mounted| tfg_armor| tfg_helm| tfg_boots| tf_no_capture_alive,0,0,fac_isengard,[itm_isen_uruk_helm_a_good,itm_isen_uruk_heavy_c_good, itm_isen_uruk_heavy_b_good,itm_evil_gauntlets_b, itm_orc_mittens_good,itm_uruk_chain_greaves,itm_isengard_pike,itm_isengard_halberd,],attr_evil_tier_4,wp_tier_4,knows_common|knows_athletics_2|knows_power_strike_5|knows_ironflesh_5,uruk_hai_face1,uruk_hai_face2],</text:p>
          </table:table-cell>
          <table:table-cell table:style-name="ce7" office:value-type="string" calcext:value-type="string">
            <text:p>i4_isen_fighting_uruk_pikeman</text:p>
          </table:table-cell>
          <table:table-cell table:style-name="ce7" office:value-type="string" calcext:value-type="string">
            <text:p>Fighting_Uruk_Hai_Pikeman</text:p>
          </table:table-cell>
          <table:table-cell table:style-name="ce7" office:value-type="string" calcext:value-type="string">
            <text:p>Fighting_Uruk_Hai_Pikemen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sengard</text:p>
          </table:table-cell>
          <table:table-cell table:style-name="ce11" office:value-type="string" calcext:value-type="string">
            <text:p>itm_isen_uruk_helm_a_good,</text:p>
          </table:table-cell>
          <table:table-cell table:style-name="ce11" office:value-type="string" calcext:value-type="string">
            <text:p>itm_isen_uruk_heavy_c_good, itm_isen_uruk_heavy_b_good,</text:p>
          </table:table-cell>
          <table:table-cell table:style-name="ce11" office:value-type="string" calcext:value-type="string">
            <text:p>itm_evil_gauntlets_b, itm_orc_mittens_good,</text:p>
          </table:table-cell>
          <table:table-cell table:style-name="ce11" office:value-type="string" calcext:value-type="string">
            <text:p>itm_uruk_chain_greaves,</text:p>
          </table:table-cell>
          <table:table-cell table:style-name="ce11" office:value-type="string" calcext:value-type="string">
            <text:p>itm_isengard_pike,itm_isengard_halberd,</text:p>
          </table:table-cell>
          <table:table-cell table:style-name="ce11" table:number-columns-repeated="2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2|knows_power_strike_5|knows_ironflesh_5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B353]&lt;&gt;&quot;&quot;;[.C353]&lt;&gt;&quot;&quot;);CONCATENATE([Variables.$I$1];[Variables.$I$7];[.B353];[Variables.$I$7];[Variables.$I$6];[Variables.$I$7];[.C353];[Variables.$I$7];[Variables.$I$6];[Variables.$I$7];[.D353];[Variables.$I$7];[Variables.$I$6];[.E353];[Variables.$I$6];[.F353];[Variables.$I$6];[.G353];[Variables.$I$6];[.H353];[Variables.$I$6];[Variables.$I$1];[.I353];[.J353];[.K353];[.L353];[.M353];[.N353];[.O353];[Variables.$I$2];[Variables.$I$6];[.P353];[Variables.$I$6];[.Q353];[Variables.$I$6];[.R353];[Variables.$I$6];[.S353];[Variables.$I$6];[.T353];IF([.U353]&lt;&gt;&quot;&quot;;CONCATENATE([Variables.$I$6];[.U353]);&quot;&quot;);[Variables.$I$2];[Variables.$I$6]);IF([.B353]&lt;&gt;&quot;&quot;;CONCATENATE(&quot;#&quot;;[.B353]);&quot;&quot;))" office:value-type="string" office:string-value="[&quot;i4_isen_fighting_uruk_pikeman&quot;,&quot;Fighting_Uruk_Hai_Pikeman&quot;,&quot;Fighting_Uruk_Hai_Pikemen&quot;,tf_urukhai|tf_mounted| tfg_armor| tfg_helm| tfg_boots| tf_no_capture_alive,0,0,fac_isengard,[itm_isen_uruk_helm_a_good,itm_isen_uruk_heavy_c_good, itm_isen_uruk_heavy_b_good,itm_evil_gauntlets_b, itm_orc_mittens_good,itm_uruk_chain_greaves,itm_isengard_pike,itm_isengard_halberd,],attr_evil_tier_4,wp_tier_4,knows_common|knows_athletics_2|knows_power_strike_5|knows_ironflesh_5,uruk_hai_face1,uruk_hai_face2]," calcext:value-type="string">
            <text:p>["i4_isen_fighting_uruk_pikeman","Fighting_Uruk_Hai_Pikeman","Fighting_Uruk_Hai_Pikemen",tf_urukhai|tf_mounted| tfg_armor| tfg_helm| tfg_boots| tf_no_capture_alive,0,0,fac_isengard,[itm_isen_uruk_helm_a_good,itm_isen_uruk_heavy_c_good, itm_isen_uruk_heavy_b_good,itm_evil_gauntlets_b, itm_orc_mittens_good,itm_uruk_chain_greaves,itm_isengard_pike,itm_isengard_halberd,],attr_evil_tier_4,wp_tier_4,knows_common|knows_athletics_2|knows_power_strike_5|knows_ironflesh_5,uruk_hai_face1,uruk_hai_face2],</text:p>
          </table:table-cell>
          <table:table-cell table:number-columns-repeated="16362"/>
        </table:table-row>
        <table:table-row table:style-name="ro1">
          <table:table-cell table:style-name="ce6" table:formula="of:=IF(AND([.B354]&lt;&gt;&quot;&quot;;[.C354]&lt;&gt;&quot;&quot;);CONCATENATE([Variables.$I$1];[Variables.$I$7];[.B354];[Variables.$I$7];[Variables.$I$6];[Variables.$I$7];[.C354];[Variables.$I$7];[Variables.$I$6];[Variables.$I$7];[.D354];[Variables.$I$7];[Variables.$I$6];[.E354];[Variables.$I$6];[.F354];[Variables.$I$6];[.G354];[Variables.$I$6];[.H354];[Variables.$I$6];[Variables.$I$1];[.I354];[.J354];[.K354];[.L354];[.M354];[.N354];[.O354];[Variables.$I$2];[Variables.$I$6];[.P354];[Variables.$I$6];[.Q354];[Variables.$I$6];[.R354];[Variables.$I$6];[.S354];[Variables.$I$6];[.T354];IF([.U354]&lt;&gt;&quot;&quot;;CONCATENATE([Variables.$I$6];[.U354]);&quot;&quot;);[Variables.$I$2];[Variables.$I$6]);IF([.B354]&lt;&gt;&quot;&quot;;CONCATENATE(&quot;#&quot;;[.B354]);&quot;&quot;))" office:value-type="string" office:string-value="[&quot;i5_isen_uruk_standard_bearer&quot;,&quot;Uruk_Hai_Standard_Bearer&quot;,&quot;Uruk_Hai_Standard_Bearers&quot;,tf_urukhai|tf_mounted| tfg_armor| tfg_helm| tfg_boots| tf_no_capture_alive,0,0,fac_isengard,[itm_isen_uruk_helm_a_good,itm_isen_uruk_heavy_c_good,itm_evil_gauntlets_b,itm_orc_mittens_good,itm_uruk_chain_greaves,itm_isengard_banner,],attr_evil_tier_5,wp_tier_5,knows_common|knows_athletics_2|knows_power_strike_5|knows_ironflesh_10,uruk_hai_face1,uruk_hai_face2]," calcext:value-type="string">
            <text:p>["i5_isen_uruk_standard_bearer","Uruk_Hai_Standard_Bearer","Uruk_Hai_Standard_Bearers",tf_urukhai|tf_mounted| tfg_armor| tfg_helm| tfg_boots| tf_no_capture_alive,0,0,fac_isengard,[itm_isen_uruk_helm_a_good,itm_isen_uruk_heavy_c_good,itm_evil_gauntlets_b,itm_orc_mittens_good,itm_uruk_chain_greaves,itm_isengard_banner,],attr_evil_tier_5,wp_tier_5,knows_common|knows_athletics_2|knows_power_strike_5|knows_ironflesh_10,uruk_hai_face1,uruk_hai_face2],</text:p>
          </table:table-cell>
          <table:table-cell table:style-name="ce7" office:value-type="string" calcext:value-type="string">
            <text:p>i5_isen_uruk_standard_bearer</text:p>
          </table:table-cell>
          <table:table-cell table:style-name="ce7" office:value-type="string" calcext:value-type="string">
            <text:p>Uruk_Hai_Standard_Bearer</text:p>
          </table:table-cell>
          <table:table-cell table:style-name="ce7" office:value-type="string" calcext:value-type="string">
            <text:p>Uruk_Hai_Standard_Bearers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sengard</text:p>
          </table:table-cell>
          <table:table-cell table:style-name="ce11" office:value-type="string" calcext:value-type="string">
            <text:p>itm_isen_uruk_helm_a_good,</text:p>
          </table:table-cell>
          <table:table-cell table:style-name="ce11" office:value-type="string" calcext:value-type="string">
            <text:p>itm_isen_uruk_heavy_c_good,</text:p>
          </table:table-cell>
          <table:table-cell table:style-name="ce11" office:value-type="string" calcext:value-type="string">
            <text:p>itm_evil_gauntlets_b,itm_orc_mittens_good,</text:p>
          </table:table-cell>
          <table:table-cell table:style-name="ce11" office:value-type="string" calcext:value-type="string">
            <text:p>itm_uruk_chain_greaves,</text:p>
          </table:table-cell>
          <table:table-cell table:style-name="ce11" office:value-type="string" calcext:value-type="string">
            <text:p>itm_isengard_banner,</text:p>
          </table:table-cell>
          <table:table-cell table:style-name="ce11" table:number-columns-repeated="2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2|knows_power_strike_5|knows_ironflesh_10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B354]&lt;&gt;&quot;&quot;;[.C354]&lt;&gt;&quot;&quot;);CONCATENATE([Variables.$I$1];[Variables.$I$7];[.B354];[Variables.$I$7];[Variables.$I$6];[Variables.$I$7];[.C354];[Variables.$I$7];[Variables.$I$6];[Variables.$I$7];[.D354];[Variables.$I$7];[Variables.$I$6];[.E354];[Variables.$I$6];[.F354];[Variables.$I$6];[.G354];[Variables.$I$6];[.H354];[Variables.$I$6];[Variables.$I$1];[.I354];[.J354];[.K354];[.L354];[.M354];[.N354];[.O354];[Variables.$I$2];[Variables.$I$6];[.P354];[Variables.$I$6];[.Q354];[Variables.$I$6];[.R354];[Variables.$I$6];[.S354];[Variables.$I$6];[.T354];IF([.U354]&lt;&gt;&quot;&quot;;CONCATENATE([Variables.$I$6];[.U354]);&quot;&quot;);[Variables.$I$2];[Variables.$I$6]);IF([.B354]&lt;&gt;&quot;&quot;;CONCATENATE(&quot;#&quot;;[.B354]);&quot;&quot;))" office:value-type="string" office:string-value="[&quot;i5_isen_uruk_standard_bearer&quot;,&quot;Uruk_Hai_Standard_Bearer&quot;,&quot;Uruk_Hai_Standard_Bearers&quot;,tf_urukhai|tf_mounted| tfg_armor| tfg_helm| tfg_boots| tf_no_capture_alive,0,0,fac_isengard,[itm_isen_uruk_helm_a_good,itm_isen_uruk_heavy_c_good,itm_evil_gauntlets_b,itm_orc_mittens_good,itm_uruk_chain_greaves,itm_isengard_banner,],attr_evil_tier_5,wp_tier_5,knows_common|knows_athletics_2|knows_power_strike_5|knows_ironflesh_10,uruk_hai_face1,uruk_hai_face2]," calcext:value-type="string">
            <text:p>["i5_isen_uruk_standard_bearer","Uruk_Hai_Standard_Bearer","Uruk_Hai_Standard_Bearers",tf_urukhai|tf_mounted| tfg_armor| tfg_helm| tfg_boots| tf_no_capture_alive,0,0,fac_isengard,[itm_isen_uruk_helm_a_good,itm_isen_uruk_heavy_c_good,itm_evil_gauntlets_b,itm_orc_mittens_good,itm_uruk_chain_greaves,itm_isengard_banner,],attr_evil_tier_5,wp_tier_5,knows_common|knows_athletics_2|knows_power_strike_5|knows_ironflesh_10,uruk_hai_face1,uruk_hai_face2],</text:p>
          </table:table-cell>
          <table:table-cell table:number-columns-repeated="16362"/>
        </table:table-row>
        <table:table-row table:style-name="ro1">
          <table:table-cell table:formula="of:=IF(AND([.B355]&lt;&gt;&quot;&quot;;[.C355]&lt;&gt;&quot;&quot;);CONCATENATE([Variables.$I$1];[Variables.$I$7];[.B355];[Variables.$I$7];[Variables.$I$6];[Variables.$I$7];[.C355];[Variables.$I$7];[Variables.$I$6];[Variables.$I$7];[.D355];[Variables.$I$7];[Variables.$I$6];[.E355];[Variables.$I$6];[.F355];[Variables.$I$6];[.G355];[Variables.$I$6];[.H355];[Variables.$I$6];[Variables.$I$1];[.I355];[.J355];[.K355];[.L355];[.M355];[.N355];[.O355];[Variables.$I$2];[Variables.$I$6];[.P355];[Variables.$I$6];[.Q355];[Variables.$I$6];[.R355];[Variables.$I$6];[.S355];[Variables.$I$6];[.T355];IF([.U355]&lt;&gt;&quot;&quot;;CONCATENATE([Variables.$I$6];[.U355]);&quot;&quot;);[Variables.$I$2];[Variables.$I$6]);IF([.B355]&lt;&gt;&quot;&quot;;CONCATENATE(&quot;#&quot;;[.B355]);&quot;&quot;))">
            <text:p/>
          </table:table-cell>
          <table:table-cell table:style-name="ce6" table:number-columns-repeated="20"/>
          <table:table-cell table:style-name="ce36" table:formula="of:=IF(AND([.B355]&lt;&gt;&quot;&quot;;[.C355]&lt;&gt;&quot;&quot;);CONCATENATE([Variables.$I$1];[Variables.$I$7];[.B355];[Variables.$I$7];[Variables.$I$6];[Variables.$I$7];[.C355];[Variables.$I$7];[Variables.$I$6];[Variables.$I$7];[.D355];[Variables.$I$7];[Variables.$I$6];[.E355];[Variables.$I$6];[.F355];[Variables.$I$6];[.G355];[Variables.$I$6];[.H355];[Variables.$I$6];[Variables.$I$1];[.I355];[.J355];[.K355];[.L355];[.M355];[.N355];[.O355];[Variables.$I$2];[Variables.$I$6];[.P355];[Variables.$I$6];[.Q355];[Variables.$I$6];[.R355];[Variables.$I$6];[.S355];[Variables.$I$6];[.T355];IF([.U355]&lt;&gt;&quot;&quot;;CONCATENATE([Variables.$I$6];[.U355]);&quot;&quot;);[Variables.$I$2];[Variables.$I$6]);IF([.B355]&lt;&gt;&quot;&quot;;CONCATENATE(&quot;#&quot;;[.B355]);&quot;&quot;))">
            <text:p/>
          </table:table-cell>
          <table:table-cell table:number-columns-repeated="16362"/>
        </table:table-row>
        <table:table-row table:style-name="ro1">
          <table:table-cell table:style-name="ce6" table:formula="of:=IF(AND([.B356]&lt;&gt;&quot;&quot;;[.C356]&lt;&gt;&quot;&quot;);CONCATENATE([Variables.$I$1];[Variables.$I$7];[.B356];[Variables.$I$7];[Variables.$I$6];[Variables.$I$7];[.C356];[Variables.$I$7];[Variables.$I$6];[Variables.$I$7];[.D356];[Variables.$I$7];[Variables.$I$6];[.E356];[Variables.$I$6];[.F356];[Variables.$I$6];[.G356];[Variables.$I$6];[.H356];[Variables.$I$6];[Variables.$I$1];[.I356];[.J356];[.K356];[.L356];[.M356];[.N356];[.O356];[Variables.$I$2];[Variables.$I$6];[.P356];[Variables.$I$6];[.Q356];[Variables.$I$6];[.R356];[Variables.$I$6];[.S356];[Variables.$I$6];[.T356];IF([.U356]&lt;&gt;&quot;&quot;;CONCATENATE([Variables.$I$6];[.U356]);&quot;&quot;);[Variables.$I$2];[Variables.$I$6]);IF([.B356]&lt;&gt;&quot;&quot;;CONCATENATE(&quot;#&quot;;[.B356]);&quot;&quot;))" office:value-type="string" office:string-value="#MORDOR Uruks" calcext:value-type="string">
            <text:p>#MORDOR Uruks</text:p>
          </table:table-cell>
          <table:table-cell table:style-name="ce5" office:value-type="string" calcext:value-type="string">
            <text:p>MORDOR Uruks</text:p>
          </table:table-cell>
          <table:table-cell table:style-name="ce6" table:number-columns-repeated="19"/>
          <table:table-cell table:style-name="ce6" table:formula="of:=IF(AND([.B356]&lt;&gt;&quot;&quot;;[.C356]&lt;&gt;&quot;&quot;);CONCATENATE([Variables.$I$1];[Variables.$I$7];[.B356];[Variables.$I$7];[Variables.$I$6];[Variables.$I$7];[.C356];[Variables.$I$7];[Variables.$I$6];[Variables.$I$7];[.D356];[Variables.$I$7];[Variables.$I$6];[.E356];[Variables.$I$6];[.F356];[Variables.$I$6];[.G356];[Variables.$I$6];[.H356];[Variables.$I$6];[Variables.$I$1];[.I356];[.J356];[.K356];[.L356];[.M356];[.N356];[.O356];[Variables.$I$2];[Variables.$I$6];[.P356];[Variables.$I$6];[.Q356];[Variables.$I$6];[.R356];[Variables.$I$6];[.S356];[Variables.$I$6];[.T356];IF([.U356]&lt;&gt;&quot;&quot;;CONCATENATE([Variables.$I$6];[.U356]);&quot;&quot;);[Variables.$I$2];[Variables.$I$6]);IF([.B356]&lt;&gt;&quot;&quot;;CONCATENATE(&quot;#&quot;;[.B356]);&quot;&quot;))" office:value-type="string" office:string-value="#MORDOR Uruks" calcext:value-type="string">
            <text:p>#MORDOR Uruks</text:p>
          </table:table-cell>
          <table:table-cell table:number-columns-repeated="16362"/>
        </table:table-row>
        <table:table-row table:style-name="ro1">
          <table:table-cell table:style-name="ce6" table:formula="of:=IF(AND([.B357]&lt;&gt;&quot;&quot;;[.C357]&lt;&gt;&quot;&quot;);CONCATENATE([Variables.$I$1];[Variables.$I$7];[.B357];[Variables.$I$7];[Variables.$I$6];[Variables.$I$7];[.C357];[Variables.$I$7];[Variables.$I$6];[Variables.$I$7];[.D357];[Variables.$I$7];[Variables.$I$6];[.E357];[Variables.$I$6];[.F357];[Variables.$I$6];[.G357];[Variables.$I$6];[.H357];[Variables.$I$6];[Variables.$I$1];[.I357];[.J357];[.K357];[.L357];[.M357];[.N357];[.O357];[Variables.$I$2];[Variables.$I$6];[.P357];[Variables.$I$6];[.Q357];[Variables.$I$6];[.R357];[Variables.$I$6];[.S357];[Variables.$I$6];[.T357];IF([.U357]&lt;&gt;&quot;&quot;;CONCATENATE([Variables.$I$6];[.U357]);&quot;&quot;);[Variables.$I$2];[Variables.$I$6]);IF([.B357]&lt;&gt;&quot;&quot;;CONCATENATE(&quot;#&quot;;[.B357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</text:p>
          </table:table-cell>
          <table:table-cell table:style-name="ce7" office:value-type="string" calcext:value-type="string">
            <text:p>i1_mordor_uruk_snaga</text:p>
          </table:table-cell>
          <table:table-cell table:style-name="ce7" office:value-type="string" calcext:value-type="string">
            <text:p>Uruk_Snaga_of_Mordor</text:p>
          </table:table-cell>
          <table:table-cell table:style-name="ce7" office:value-type="string" calcext:value-type="string">
            <text:p>Uruk_Snagas_of_Mordor</text:p>
          </table:table-cell>
          <table:table-cell table:style-name="ce8" office:value-type="string" calcext:value-type="string">
            <text:p>tf_uruk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/>
          <table:table-cell table:style-name="ce11" office:value-type="string" calcext:value-type="string">
            <text:p>itm_m_uruk_light_a,itm_m_uruk_light_a_good, itm_m_uruk_light_a_bad,</text:p>
          </table:table-cell>
          <table:table-cell table:style-name="ce11"/>
          <table:table-cell table:style-name="ce11" office:value-type="string" calcext:value-type="string">
            <text:p>itm_uruk_ragwrap,</text:p>
          </table:table-cell>
          <table:table-cell table:style-name="ce11" office:value-type="string" calcext:value-type="string">
            <text:p>itm_orc_axe,itm_orc_falchion,itm_orc_sabre,itm_orc_simple_spear,</text:p>
          </table:table-cell>
          <table:table-cell table:style-name="ce11"/>
          <table:table-cell table:style-name="ce11" office:value-type="string" calcext:value-type="string">
            <text:p>itm_metal_scraps_bad,itm_metal_scraps_medium,itm_metal_scraps_good,</text:p>
          </table:table-cell>
          <table:table-cell table:style-name="ce12" office:value-type="string" calcext:value-type="string">
            <text:p>attr_evil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ironflesh_2|knows_power_strike_1|knows_shield_1|knows_athletics_1|knows_looting_1|knows_trainer_2|knows_tactics_1|knows_spotting_1|knows_wound_treatment_1|knows_prisoner_management_1|knows_leadership_1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B357]&lt;&gt;&quot;&quot;;[.C357]&lt;&gt;&quot;&quot;);CONCATENATE([Variables.$I$1];[Variables.$I$7];[.B357];[Variables.$I$7];[Variables.$I$6];[Variables.$I$7];[.C357];[Variables.$I$7];[Variables.$I$6];[Variables.$I$7];[.D357];[Variables.$I$7];[Variables.$I$6];[.E357];[Variables.$I$6];[.F357];[Variables.$I$6];[.G357];[Variables.$I$6];[.H357];[Variables.$I$6];[Variables.$I$1];[.I357];[.J357];[.K357];[.L357];[.M357];[.N357];[.O357];[Variables.$I$2];[Variables.$I$6];[.P357];[Variables.$I$6];[.Q357];[Variables.$I$6];[.R357];[Variables.$I$6];[.S357];[Variables.$I$6];[.T357];IF([.U357]&lt;&gt;&quot;&quot;;CONCATENATE([Variables.$I$6];[.U357]);&quot;&quot;);[Variables.$I$2];[Variables.$I$6]);IF([.B357]&lt;&gt;&quot;&quot;;CONCATENATE(&quot;#&quot;;[.B357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16362"/>
        </table:table-row>
        <table:table-row table:style-name="ro1">
          <table:table-cell table:style-name="ce6" table:formula="of:=IF(AND([.B358]&lt;&gt;&quot;&quot;;[.C358]&lt;&gt;&quot;&quot;);CONCATENATE([Variables.$I$1];[Variables.$I$7];[.B358];[Variables.$I$7];[Variables.$I$6];[Variables.$I$7];[.C358];[Variables.$I$7];[Variables.$I$6];[Variables.$I$7];[.D358];[Variables.$I$7];[Variables.$I$6];[.E358];[Variables.$I$6];[.F358];[Variables.$I$6];[.G358];[Variables.$I$6];[.H358];[Variables.$I$6];[Variables.$I$1];[.I358];[.J358];[.K358];[.L358];[.M358];[.N358];[.O358];[Variables.$I$2];[Variables.$I$6];[.P358];[Variables.$I$6];[.Q358];[Variables.$I$6];[.R358];[Variables.$I$6];[.S358];[Variables.$I$6];[.T358];IF([.U358]&lt;&gt;&quot;&quot;;CONCATENATE([Variables.$I$6];[.U358]);&quot;&quot;);[Variables.$I$2];[Variables.$I$6]);IF([.B358]&lt;&gt;&quot;&quot;;CONCATENATE(&quot;#&quot;;[.B358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orc_mittens_bad,itm_uruk_ragwrap,itm_orc_simple_spear_heavy,itm_uruk_falchion_a,itm_orc_bastard_scimitar_bad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orc_mittens_bad,itm_uruk_ragwrap,itm_orc_simple_spear_heavy,itm_uruk_falchion_a,itm_orc_bastard_scimitar_bad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</text:p>
          </table:table-cell>
          <table:table-cell table:style-name="ce7" office:value-type="string" calcext:value-type="string">
            <text:p>i2_mordor_uruk</text:p>
          </table:table-cell>
          <table:table-cell table:style-name="ce7" office:value-type="string" calcext:value-type="string">
            <text:p>Uruk_of_Mordor</text:p>
          </table:table-cell>
          <table:table-cell table:style-name="ce7" office:value-type="string" calcext:value-type="string">
            <text:p>Uruk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uruk_helm_a,itm_uruk_helm_b,itm_orc_coif,</text:p>
          </table:table-cell>
          <table:table-cell table:style-name="ce11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1" office:value-type="string" calcext:value-type="string">
            <text:p>itm_orc_mittens_bad,</text:p>
          </table:table-cell>
          <table:table-cell table:style-name="ce11" office:value-type="string" calcext:value-type="string">
            <text:p>itm_uruk_ragwrap,</text:p>
          </table:table-cell>
          <table:table-cell table:style-name="ce11" office:value-type="string" calcext:value-type="string">
            <text:p>itm_orc_simple_spear_heavy,itm_uruk_falchion_a,itm_orc_bastard_scimitar_bad,</text:p>
          </table:table-cell>
          <table:table-cell table:style-name="ce11" office:value-type="string" calcext:value-type="string">
            <text:p>itm_mordor_uruk_shield_a,</text:p>
          </table:table-cell>
          <table:table-cell table:style-name="ce11"/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3|knows_power_strike_2|knows_shield_1|knows_athletics_1|knows_looting_1|knows_trainer_2|knows_tactics_1|knows_spotting_1|knows_wound_treatment_1|knows_prisoner_management_1|knows_leadership_1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B358]&lt;&gt;&quot;&quot;;[.C358]&lt;&gt;&quot;&quot;);CONCATENATE([Variables.$I$1];[Variables.$I$7];[.B358];[Variables.$I$7];[Variables.$I$6];[Variables.$I$7];[.C358];[Variables.$I$7];[Variables.$I$6];[Variables.$I$7];[.D358];[Variables.$I$7];[Variables.$I$6];[.E358];[Variables.$I$6];[.F358];[Variables.$I$6];[.G358];[Variables.$I$6];[.H358];[Variables.$I$6];[Variables.$I$1];[.I358];[.J358];[.K358];[.L358];[.M358];[.N358];[.O358];[Variables.$I$2];[Variables.$I$6];[.P358];[Variables.$I$6];[.Q358];[Variables.$I$6];[.R358];[Variables.$I$6];[.S358];[Variables.$I$6];[.T358];IF([.U358]&lt;&gt;&quot;&quot;;CONCATENATE([Variables.$I$6];[.U358]);&quot;&quot;);[Variables.$I$2];[Variables.$I$6]);IF([.B358]&lt;&gt;&quot;&quot;;CONCATENATE(&quot;#&quot;;[.B358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orc_mittens_bad,itm_uruk_ragwrap,itm_orc_simple_spear_heavy,itm_uruk_falchion_a,itm_orc_bastard_scimitar_bad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orc_mittens_bad,itm_uruk_ragwrap,itm_orc_simple_spear_heavy,itm_uruk_falchion_a,itm_orc_bastard_scimitar_bad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16362"/>
        </table:table-row>
        <table:table-row table:style-name="ro1">
          <table:table-cell table:style-name="ce6" table:formula="of:=IF(AND([.B359]&lt;&gt;&quot;&quot;;[.C359]&lt;&gt;&quot;&quot;);CONCATENATE([Variables.$I$1];[Variables.$I$7];[.B359];[Variables.$I$7];[Variables.$I$6];[Variables.$I$7];[.C359];[Variables.$I$7];[Variables.$I$6];[Variables.$I$7];[.D359];[Variables.$I$7];[Variables.$I$6];[.E359];[Variables.$I$6];[.F359];[Variables.$I$6];[.G359];[Variables.$I$6];[.H359];[Variables.$I$6];[Variables.$I$1];[.I359];[.J359];[.K359];[.L359];[.M359];[.N359];[.O359];[Variables.$I$2];[Variables.$I$6];[.P359];[Variables.$I$6];[.Q359];[Variables.$I$6];[.R359];[Variables.$I$6];[.S359];[Variables.$I$6];[.T359];IF([.U359]&lt;&gt;&quot;&quot;;CONCATENATE([Variables.$I$6];[.U359]);&quot;&quot;);[Variables.$I$2];[Variables.$I$6]);IF([.B359]&lt;&gt;&quot;&quot;;CONCATENATE(&quot;#&quot;;[.B359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 itm_orc_mittens,itm_uruk_ragwrap,itm_uruk_greaves,itm_uruk_falchion_a,itm_orc_bastard_scimitar,itm_orc_cleaver_a,itm_mordor_uruk_shield_a,itm_mordor_uruk_shield_b,],attr_evil_tier_3,wp_tier_3,knows_common|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 itm_orc_mittens,itm_uruk_ragwrap,itm_uruk_greaves,itm_uruk_falchion_a,itm_orc_bastard_scimitar,itm_orc_cleaver_a,itm_mordor_uruk_shield_a,itm_mordor_uruk_shield_b,],attr_evil_tier_3,wp_tier_3,knows_common|knows_athletics_2|knows_power_strike_3|knows_ironflesh_4,uruk_hai_face1,uruk_hai_face2],</text:p>
          </table:table-cell>
          <table:table-cell table:style-name="ce7" office:value-type="string" calcext:value-type="string">
            <text:p>i3_mordor_large_uruk</text:p>
          </table:table-cell>
          <table:table-cell table:style-name="ce7" office:value-type="string" calcext:value-type="string">
            <text:p>Large_Uruk_of_Mordor</text:p>
          </table:table-cell>
          <table:table-cell table:style-name="ce7" office:value-type="string" calcext:value-type="string">
            <text:p>Large_Uruks_of_Mordor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uruk_helm_c,itm_uruk_helm_d,</text:p>
          </table:table-cell>
          <table:table-cell table:style-name="ce11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1" office:value-type="string" calcext:value-type="string">
            <text:p><text:s/>itm_evil_gauntlets_a, itm_orc_mittens,</text:p>
          </table:table-cell>
          <table:table-cell table:style-name="ce11" office:value-type="string" calcext:value-type="string">
            <text:p>itm_uruk_ragwrap,itm_uruk_greaves,</text:p>
          </table:table-cell>
          <table:table-cell table:style-name="ce11" office:value-type="string" calcext:value-type="string">
            <text:p>itm_uruk_falchion_a,itm_orc_bastard_scimitar,itm_orc_cleaver_a,</text:p>
          </table:table-cell>
          <table:table-cell table:style-name="ce11" office:value-type="string" calcext:value-type="string">
            <text:p>itm_mordor_uruk_shield_a,itm_mordor_uruk_shield_b,</text:p>
          </table:table-cell>
          <table:table-cell table:style-name="ce11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2|knows_power_strike_3|knows_ironflesh_4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B359]&lt;&gt;&quot;&quot;;[.C359]&lt;&gt;&quot;&quot;);CONCATENATE([Variables.$I$1];[Variables.$I$7];[.B359];[Variables.$I$7];[Variables.$I$6];[Variables.$I$7];[.C359];[Variables.$I$7];[Variables.$I$6];[Variables.$I$7];[.D359];[Variables.$I$7];[Variables.$I$6];[.E359];[Variables.$I$6];[.F359];[Variables.$I$6];[.G359];[Variables.$I$6];[.H359];[Variables.$I$6];[Variables.$I$1];[.I359];[.J359];[.K359];[.L359];[.M359];[.N359];[.O359];[Variables.$I$2];[Variables.$I$6];[.P359];[Variables.$I$6];[.Q359];[Variables.$I$6];[.R359];[Variables.$I$6];[.S359];[Variables.$I$6];[.T359];IF([.U359]&lt;&gt;&quot;&quot;;CONCATENATE([Variables.$I$6];[.U359]);&quot;&quot;);[Variables.$I$2];[Variables.$I$6]);IF([.B359]&lt;&gt;&quot;&quot;;CONCATENATE(&quot;#&quot;;[.B359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 itm_orc_mittens,itm_uruk_ragwrap,itm_uruk_greaves,itm_uruk_falchion_a,itm_orc_bastard_scimitar,itm_orc_cleaver_a,itm_mordor_uruk_shield_a,itm_mordor_uruk_shield_b,],attr_evil_tier_3,wp_tier_3,knows_common|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 itm_orc_mittens,itm_uruk_ragwrap,itm_uruk_greaves,itm_uruk_falchion_a,itm_orc_bastard_scimitar,itm_orc_cleaver_a,itm_mordor_uruk_shield_a,itm_mordor_uruk_shield_b,],attr_evil_tier_3,wp_tier_3,knows_common|knows_athletics_2|knows_power_strike_3|knows_ironflesh_4,uruk_hai_face1,uruk_hai_face2],</text:p>
          </table:table-cell>
          <table:table-cell table:number-columns-repeated="16362"/>
        </table:table-row>
        <table:table-row table:style-name="ro1">
          <table:table-cell table:style-name="ce6" table:formula="of:=IF(AND([.B360]&lt;&gt;&quot;&quot;;[.C360]&lt;&gt;&quot;&quot;);CONCATENATE([Variables.$I$1];[Variables.$I$7];[.B360];[Variables.$I$7];[Variables.$I$6];[Variables.$I$7];[.C360];[Variables.$I$7];[Variables.$I$6];[Variables.$I$7];[.D360];[Variables.$I$7];[Variables.$I$6];[.E360];[Variables.$I$6];[.F360];[Variables.$I$6];[.G360];[Variables.$I$6];[.H360];[Variables.$I$6];[Variables.$I$1];[.I360];[.J360];[.K360];[.L360];[.M360];[.N360];[.O360];[Variables.$I$2];[Variables.$I$6];[.P360];[Variables.$I$6];[.Q360];[Variables.$I$6];[.R360];[Variables.$I$6];[.S360];[Variables.$I$6];[.T360];IF([.U360]&lt;&gt;&quot;&quot;;CONCATENATE([Variables.$I$6];[.U360]);&quot;&quot;);[Variables.$I$2];[Variables.$I$6]);IF([.B360]&lt;&gt;&quot;&quot;;CONCATENATE(&quot;#&quot;;[.B360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 itm_orc_mittens,itm_uruk_greaves,itm_uruk_chain_greaves,itm_uruk_falchion_a,itm_orc_bastard_scimitar_heavy,itm_orc_cleaver_a_heavy,itm_mordor_uruk_shield_a,itm_mordor_uruk_shield_b,],attr_evil_tier_4,wp_tier_4,knows_common|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 itm_orc_mittens,itm_uruk_greaves,itm_uruk_chain_greaves,itm_uruk_falchion_a,itm_orc_bastard_scimitar_heavy,itm_orc_cleaver_a_heavy,itm_mordor_uruk_shield_a,itm_mordor_uruk_shield_b,],attr_evil_tier_4,wp_tier_4,knows_common|knows_athletics_3|knows_power_strike_5|knows_power_throw_3|knows_ironflesh_4|knows_shield_2,uruk_hai_face1,uruk_hai_face2],</text:p>
          </table:table-cell>
          <table:table-cell table:style-name="ce7" office:value-type="string" calcext:value-type="string">
            <text:p>i4_mordor_fell_uruk</text:p>
          </table:table-cell>
          <table:table-cell table:style-name="ce7" office:value-type="string" calcext:value-type="string">
            <text:p>Fell_Uruk_of_Mordor</text:p>
          </table:table-cell>
          <table:table-cell table:style-name="ce7" office:value-type="string" calcext:value-type="string">
            <text:p>Fell_Uruks_of_Mordor</text:p>
          </table:table-cell>
          <table:table-cell table:style-name="ce8" office:value-type="string" calcext:value-type="string">
            <text:p>tf_uruk| tfg_shiel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uruk_helm_b,itm_uruk_helm_c,itm_uruk_helm_d,</text:p>
          </table:table-cell>
          <table:table-cell table:style-name="ce11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1" office:value-type="string" calcext:value-type="string">
            <text:p>itm_evil_gauntlets_b, itm_orc_mittens,</text:p>
          </table:table-cell>
          <table:table-cell table:style-name="ce11" office:value-type="string" calcext:value-type="string">
            <text:p>itm_uruk_greaves,itm_uruk_chain_greaves,</text:p>
          </table:table-cell>
          <table:table-cell table:style-name="ce11" office:value-type="string" calcext:value-type="string">
            <text:p>itm_uruk_falchion_a,itm_orc_bastard_scimitar_heavy,itm_orc_cleaver_a_heavy,</text:p>
          </table:table-cell>
          <table:table-cell table:style-name="ce11" office:value-type="string" calcext:value-type="string">
            <text:p>itm_mordor_uruk_shield_a,itm_mordor_uruk_shield_b,</text:p>
          </table:table-cell>
          <table:table-cell table:style-name="ce11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3|knows_power_strike_5|knows_power_throw_3|knows_ironflesh_4|knows_shield_2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B360]&lt;&gt;&quot;&quot;;[.C360]&lt;&gt;&quot;&quot;);CONCATENATE([Variables.$I$1];[Variables.$I$7];[.B360];[Variables.$I$7];[Variables.$I$6];[Variables.$I$7];[.C360];[Variables.$I$7];[Variables.$I$6];[Variables.$I$7];[.D360];[Variables.$I$7];[Variables.$I$6];[.E360];[Variables.$I$6];[.F360];[Variables.$I$6];[.G360];[Variables.$I$6];[.H360];[Variables.$I$6];[Variables.$I$1];[.I360];[.J360];[.K360];[.L360];[.M360];[.N360];[.O360];[Variables.$I$2];[Variables.$I$6];[.P360];[Variables.$I$6];[.Q360];[Variables.$I$6];[.R360];[Variables.$I$6];[.S360];[Variables.$I$6];[.T360];IF([.U360]&lt;&gt;&quot;&quot;;CONCATENATE([Variables.$I$6];[.U360]);&quot;&quot;);[Variables.$I$2];[Variables.$I$6]);IF([.B360]&lt;&gt;&quot;&quot;;CONCATENATE(&quot;#&quot;;[.B360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 itm_orc_mittens,itm_uruk_greaves,itm_uruk_chain_greaves,itm_uruk_falchion_a,itm_orc_bastard_scimitar_heavy,itm_orc_cleaver_a_heavy,itm_mordor_uruk_shield_a,itm_mordor_uruk_shield_b,],attr_evil_tier_4,wp_tier_4,knows_common|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 itm_orc_mittens,itm_uruk_greaves,itm_uruk_chain_greaves,itm_uruk_falchion_a,itm_orc_bastard_scimitar_heavy,itm_orc_cleaver_a_heavy,itm_mordor_uruk_shield_a,itm_mordor_uruk_shield_b,],attr_evil_tier_4,wp_tier_4,knows_common|knows_athletics_3|knows_power_strike_5|knows_power_throw_3|knows_ironflesh_4|knows_shield_2,uruk_hai_face1,uruk_hai_face2],</text:p>
          </table:table-cell>
          <table:table-cell table:number-columns-repeated="16362"/>
        </table:table-row>
        <table:table-row table:style-name="ro1">
          <table:table-cell table:style-name="ce6" table:formula="of:=IF(AND([.B361]&lt;&gt;&quot;&quot;;[.C361]&lt;&gt;&quot;&quot;);CONCATENATE([Variables.$I$1];[Variables.$I$7];[.B361];[Variables.$I$7];[Variables.$I$6];[Variables.$I$7];[.C361];[Variables.$I$7];[Variables.$I$6];[Variables.$I$7];[.D361];[Variables.$I$7];[Variables.$I$6];[.E361];[Variables.$I$6];[.F361];[Variables.$I$6];[.G361];[Variables.$I$6];[.H361];[Variables.$I$6];[Variables.$I$1];[.I361];[.J361];[.K361];[.L361];[.M361];[.N361];[.O361];[Variables.$I$2];[Variables.$I$6];[.P361];[Variables.$I$6];[.Q361];[Variables.$I$6];[.R361];[Variables.$I$6];[.S361];[Variables.$I$6];[.T361];IF([.U361]&lt;&gt;&quot;&quot;;CONCATENATE([Variables.$I$6];[.U361]);&quot;&quot;);[Variables.$I$2];[Variables.$I$6]);IF([.B361]&lt;&gt;&quot;&quot;;CONCATENATE(&quot;#&quot;;[.B361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orc_bastard_scimitar,],attr_evil_tier_3,wp_tier_4,knows_common|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orc_bastard_scimitar,],attr_evil_tier_3,wp_tier_4,knows_common|knows_athletics_3|knows_power_strike_5|knows_ironflesh_6,uruk_hai_face1,uruk_hai_face2],</text:p>
          </table:table-cell>
          <table:table-cell table:style-name="ce7" office:value-type="string" calcext:value-type="string">
            <text:p>i3_mordor_uruk_slayer</text:p>
          </table:table-cell>
          <table:table-cell table:style-name="ce7" office:value-type="string" calcext:value-type="string">
            <text:p>Uruk_Slayer_of_Mordor</text:p>
          </table:table-cell>
          <table:table-cell table:style-name="ce7" office:value-type="string" calcext:value-type="string">
            <text:p>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uruk_helm_b,itm_uruk_helm_c,itm_uruk_helm_d,</text:p>
          </table:table-cell>
          <table:table-cell table:style-name="ce11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1"/>
          <table:table-cell table:style-name="ce11" office:value-type="string" calcext:value-type="string">
            <text:p>itm_uruk_tracker_boots,</text:p>
          </table:table-cell>
          <table:table-cell table:style-name="ce11" office:value-type="string" calcext:value-type="string">
            <text:p>itm_orc_bill_heavy,itm_orc_skull_spear_heavy,itm_uruk_pike_b,</text:p>
          </table:table-cell>
          <table:table-cell table:style-name="ce11" office:value-type="string" calcext:value-type="string">
            <text:p>itm_uruk_falchion_a,itm_orc_bastard_scimitar,</text:p>
          </table:table-cell>
          <table:table-cell table:style-name="ce11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3|knows_power_strike_5|knows_ironflesh_6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B361]&lt;&gt;&quot;&quot;;[.C361]&lt;&gt;&quot;&quot;);CONCATENATE([Variables.$I$1];[Variables.$I$7];[.B361];[Variables.$I$7];[Variables.$I$6];[Variables.$I$7];[.C361];[Variables.$I$7];[Variables.$I$6];[Variables.$I$7];[.D361];[Variables.$I$7];[Variables.$I$6];[.E361];[Variables.$I$6];[.F361];[Variables.$I$6];[.G361];[Variables.$I$6];[.H361];[Variables.$I$6];[Variables.$I$1];[.I361];[.J361];[.K361];[.L361];[.M361];[.N361];[.O361];[Variables.$I$2];[Variables.$I$6];[.P361];[Variables.$I$6];[.Q361];[Variables.$I$6];[.R361];[Variables.$I$6];[.S361];[Variables.$I$6];[.T361];IF([.U361]&lt;&gt;&quot;&quot;;CONCATENATE([Variables.$I$6];[.U361]);&quot;&quot;);[Variables.$I$2];[Variables.$I$6]);IF([.B361]&lt;&gt;&quot;&quot;;CONCATENATE(&quot;#&quot;;[.B361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orc_bastard_scimitar,],attr_evil_tier_3,wp_tier_4,knows_common|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orc_bastard_scimitar,],attr_evil_tier_3,wp_tier_4,knows_common|knows_athletics_3|knows_power_strike_5|knows_ironflesh_6,uruk_hai_face1,uruk_hai_face2],</text:p>
          </table:table-cell>
          <table:table-cell table:number-columns-repeated="16362"/>
        </table:table-row>
        <table:table-row table:style-name="ro1">
          <table:table-cell table:style-name="ce6" table:formula="of:=IF(AND([.B362]&lt;&gt;&quot;&quot;;[.C362]&lt;&gt;&quot;&quot;);CONCATENATE([Variables.$I$1];[Variables.$I$7];[.B362];[Variables.$I$7];[Variables.$I$6];[Variables.$I$7];[.C362];[Variables.$I$7];[Variables.$I$6];[Variables.$I$7];[.D362];[Variables.$I$7];[Variables.$I$6];[.E362];[Variables.$I$6];[.F362];[Variables.$I$6];[.G362];[Variables.$I$6];[.H362];[Variables.$I$6];[Variables.$I$1];[.I362];[.J362];[.K362];[.L362];[.M362];[.N362];[.O362];[Variables.$I$2];[Variables.$I$6];[.P362];[Variables.$I$6];[.Q362];[Variables.$I$6];[.R362];[Variables.$I$6];[.S362];[Variables.$I$6];[.T362];IF([.U362]&lt;&gt;&quot;&quot;;CONCATENATE([Variables.$I$6];[.U362]);&quot;&quot;);[Variables.$I$2];[Variables.$I$6]);IF([.B362]&lt;&gt;&quot;&quot;;CONCATENATE(&quot;#&quot;;[.B362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orc_mangler_heavy,itm_uruk_falchion_a_heavy,itm_orc_bastard_scimitar_heavy,itm_uruk_bow,itm_orc_hook_arrow,],attr_evil_tier_4,wp_tier_5,knows_common|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orc_mangler_heavy,itm_uruk_falchion_a_heavy,itm_orc_bastard_scimitar_heavy,itm_uruk_bow,itm_orc_hook_arrow,],attr_evil_tier_4,wp_tier_5,knows_common|knows_athletics_5|knows_power_strike_7|knows_power_draw_4|knows_ironflesh_7,uruk_hai_face1,uruk_hai_face2],</text:p>
          </table:table-cell>
          <table:table-cell table:style-name="ce7" office:value-type="string" calcext:value-type="string">
            <text:p>i4_mordor_fell_uruk_slayer</text:p>
          </table:table-cell>
          <table:table-cell table:style-name="ce7" office:value-type="string" calcext:value-type="string">
            <text:p>Fell_Uruk_Slayer_of_Mordor</text:p>
          </table:table-cell>
          <table:table-cell table:style-name="ce7" office:value-type="string" calcext:value-type="string">
            <text:p>Fell_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uruk_helm_c,itm_uruk_helm_f,</text:p>
          </table:table-cell>
          <table:table-cell table:style-name="ce11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1" office:value-type="string" calcext:value-type="string">
            <text:p>itm_evil_gauntlets_b,</text:p>
          </table:table-cell>
          <table:table-cell table:style-name="ce11" office:value-type="string" calcext:value-type="string">
            <text:p>itm_uruk_greaves,itm_uruk_chain_greaves,</text:p>
          </table:table-cell>
          <table:table-cell table:style-name="ce11" office:value-type="string" calcext:value-type="string">
            <text:p>itm_orc_bill_heavy,itm_orc_two_handed_axe_heavy,itm_orc_skull_spear_heavy,itm_uruk_pike_b,itm_orc_mangler_heavy,</text:p>
          </table:table-cell>
          <table:table-cell table:style-name="ce11" office:value-type="string" calcext:value-type="string">
            <text:p>itm_uruk_falchion_a_heavy,itm_orc_bastard_scimitar_heavy,</text:p>
          </table:table-cell>
          <table:table-cell table:style-name="ce11" office:value-type="string" calcext:value-type="string">
            <text:p>itm_uruk_bow,itm_orc_hook_arrow,</text:p>
          </table:table-cell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5|knows_power_strike_7|knows_power_draw_4|knows_ironflesh_7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B362]&lt;&gt;&quot;&quot;;[.C362]&lt;&gt;&quot;&quot;);CONCATENATE([Variables.$I$1];[Variables.$I$7];[.B362];[Variables.$I$7];[Variables.$I$6];[Variables.$I$7];[.C362];[Variables.$I$7];[Variables.$I$6];[Variables.$I$7];[.D362];[Variables.$I$7];[Variables.$I$6];[.E362];[Variables.$I$6];[.F362];[Variables.$I$6];[.G362];[Variables.$I$6];[.H362];[Variables.$I$6];[Variables.$I$1];[.I362];[.J362];[.K362];[.L362];[.M362];[.N362];[.O362];[Variables.$I$2];[Variables.$I$6];[.P362];[Variables.$I$6];[.Q362];[Variables.$I$6];[.R362];[Variables.$I$6];[.S362];[Variables.$I$6];[.T362];IF([.U362]&lt;&gt;&quot;&quot;;CONCATENATE([Variables.$I$6];[.U362]);&quot;&quot;);[Variables.$I$2];[Variables.$I$6]);IF([.B362]&lt;&gt;&quot;&quot;;CONCATENATE(&quot;#&quot;;[.B362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orc_mangler_heavy,itm_uruk_falchion_a_heavy,itm_orc_bastard_scimitar_heavy,itm_uruk_bow,itm_orc_hook_arrow,],attr_evil_tier_4,wp_tier_5,knows_common|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orc_mangler_heavy,itm_uruk_falchion_a_heavy,itm_orc_bastard_scimitar_heavy,itm_uruk_bow,itm_orc_hook_arrow,],attr_evil_tier_4,wp_tier_5,knows_common|knows_athletics_5|knows_power_strike_7|knows_power_draw_4|knows_ironflesh_7,uruk_hai_face1,uruk_hai_face2],</text:p>
          </table:table-cell>
          <table:table-cell table:number-columns-repeated="16362"/>
        </table:table-row>
        <table:table-row table:style-name="ro1">
          <table:table-cell table:style-name="ce6" table:formula="of:=IF(AND([.B363]&lt;&gt;&quot;&quot;;[.C363]&lt;&gt;&quot;&quot;);CONCATENATE([Variables.$I$1];[Variables.$I$7];[.B363];[Variables.$I$7];[Variables.$I$6];[Variables.$I$7];[.C363];[Variables.$I$7];[Variables.$I$6];[Variables.$I$7];[.D363];[Variables.$I$7];[Variables.$I$6];[.E363];[Variables.$I$6];[.F363];[Variables.$I$6];[.G363];[Variables.$I$6];[.H363];[Variables.$I$6];[Variables.$I$1];[.I363];[.J363];[.K363];[.L363];[.M363];[.N363];[.O363];[Variables.$I$2];[Variables.$I$6];[.P363];[Variables.$I$6];[.Q363];[Variables.$I$6];[.R363];[Variables.$I$6];[.S363];[Variables.$I$6];[.T363];IF([.U363]&lt;&gt;&quot;&quot;;CONCATENATE([Variables.$I$6];[.U363]);&quot;&quot;);[Variables.$I$2];[Variables.$I$6]);IF([.B363]&lt;&gt;&quot;&quot;;CONCATENATE(&quot;#&quot;;[.B363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b, itm_orc_mittens_good,itm_uruk_chain_greaves,itm_orc_two_handed_axe_heavy,itm_uruk_falchion_a_heavy,itm_orc_bastard_scimitar_heavy,itm_mordor_uruk_shield_c,],attr_evil_tier_5,wp_tier_5,knows_common|knows_athletics_3|knows_power_strike_6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b, itm_orc_mittens_good,itm_uruk_chain_greaves,itm_orc_two_handed_axe_heavy,itm_uruk_falchion_a_heavy,itm_orc_bastard_scimitar_heavy,itm_mordor_uruk_shield_c,],attr_evil_tier_5,wp_tier_5,knows_common|knows_athletics_3|knows_power_strike_6|knows_ironflesh_9,uruk_hai_face1,uruk_hai_face2],</text:p>
          </table:table-cell>
          <table:table-cell table:style-name="ce7" office:value-type="string" calcext:value-type="string">
            <text:p>i5_mordor_black_uruk</text:p>
          </table:table-cell>
          <table:table-cell table:style-name="ce7" office:value-type="string" calcext:value-type="string">
            <text:p>Black_Uruk_of_Barad_Dur</text:p>
          </table:table-cell>
          <table:table-cell table:style-name="ce7" office:value-type="string" calcext:value-type="string">
            <text:p>Black_Uruks_of_Barad_Dur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uruk_helm_e,</text:p>
          </table:table-cell>
          <table:table-cell table:style-name="ce11" office:value-type="string" calcext:value-type="string">
            <text:p>itm_m_uruk_heavy_c, itm_m_uruk_heavy_c_good, itm_m_uruk_heavy_c_bad,</text:p>
          </table:table-cell>
          <table:table-cell table:style-name="ce11" office:value-type="string" calcext:value-type="string">
            <text:p>itm_evil_gauntlets_b, itm_orc_mittens_good,</text:p>
          </table:table-cell>
          <table:table-cell table:style-name="ce11" office:value-type="string" calcext:value-type="string">
            <text:p>itm_uruk_chain_greaves,</text:p>
          </table:table-cell>
          <table:table-cell table:style-name="ce11" office:value-type="string" calcext:value-type="string">
            <text:p>itm_orc_two_handed_axe_heavy,</text:p>
          </table:table-cell>
          <table:table-cell table:style-name="ce11" office:value-type="string" calcext:value-type="string">
            <text:p>itm_uruk_falchion_a_heavy,itm_orc_bastard_scimitar_heavy,itm_mordor_uruk_shield_c,</text:p>
          </table:table-cell>
          <table:table-cell table:style-name="ce11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3|knows_power_strike_6|knows_ironflesh_9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B363]&lt;&gt;&quot;&quot;;[.C363]&lt;&gt;&quot;&quot;);CONCATENATE([Variables.$I$1];[Variables.$I$7];[.B363];[Variables.$I$7];[Variables.$I$6];[Variables.$I$7];[.C363];[Variables.$I$7];[Variables.$I$6];[Variables.$I$7];[.D363];[Variables.$I$7];[Variables.$I$6];[.E363];[Variables.$I$6];[.F363];[Variables.$I$6];[.G363];[Variables.$I$6];[.H363];[Variables.$I$6];[Variables.$I$1];[.I363];[.J363];[.K363];[.L363];[.M363];[.N363];[.O363];[Variables.$I$2];[Variables.$I$6];[.P363];[Variables.$I$6];[.Q363];[Variables.$I$6];[.R363];[Variables.$I$6];[.S363];[Variables.$I$6];[.T363];IF([.U363]&lt;&gt;&quot;&quot;;CONCATENATE([Variables.$I$6];[.U363]);&quot;&quot;);[Variables.$I$2];[Variables.$I$6]);IF([.B363]&lt;&gt;&quot;&quot;;CONCATENATE(&quot;#&quot;;[.B363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b, itm_orc_mittens_good,itm_uruk_chain_greaves,itm_orc_two_handed_axe_heavy,itm_uruk_falchion_a_heavy,itm_orc_bastard_scimitar_heavy,itm_mordor_uruk_shield_c,],attr_evil_tier_5,wp_tier_5,knows_common|knows_athletics_3|knows_power_strike_6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b, itm_orc_mittens_good,itm_uruk_chain_greaves,itm_orc_two_handed_axe_heavy,itm_uruk_falchion_a_heavy,itm_orc_bastard_scimitar_heavy,itm_mordor_uruk_shield_c,],attr_evil_tier_5,wp_tier_5,knows_common|knows_athletics_3|knows_power_strike_6|knows_ironflesh_9,uruk_hai_face1,uruk_hai_face2],</text:p>
          </table:table-cell>
          <table:table-cell table:number-columns-repeated="16362"/>
        </table:table-row>
        <table:table-row table:style-name="ro1">
          <table:table-cell table:style-name="ce6" table:formula="of:=IF(AND([.B364]&lt;&gt;&quot;&quot;;[.C364]&lt;&gt;&quot;&quot;);CONCATENATE([Variables.$I$1];[Variables.$I$7];[.B364];[Variables.$I$7];[Variables.$I$6];[Variables.$I$7];[.C364];[Variables.$I$7];[Variables.$I$6];[Variables.$I$7];[.D364];[Variables.$I$7];[Variables.$I$6];[.E364];[Variables.$I$6];[.F364];[Variables.$I$6];[.G364];[Variables.$I$6];[.H364];[Variables.$I$6];[Variables.$I$1];[.I364];[.J364];[.K364];[.L364];[.M364];[.N364];[.O364];[Variables.$I$2];[Variables.$I$6];[.P364];[Variables.$I$6];[.Q364];[Variables.$I$6];[.R364];[Variables.$I$6];[.S364];[Variables.$I$6];[.T364];IF([.U364]&lt;&gt;&quot;&quot;;CONCATENATE([Variables.$I$6];[.U364]);&quot;&quot;);[Variables.$I$2];[Variables.$I$6]);IF([.B364]&lt;&gt;&quot;&quot;;CONCATENATE(&quot;#&quot;;[.B364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 itm_orc_mittens_good,itm_uruk_greaves,itm_uruk_chain_greaves,itm_mordor_banner,],attr_evil_tier_5,wp_tier_5,knows_common|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 itm_orc_mittens_good,itm_uruk_greaves,itm_uruk_chain_greaves,itm_mordor_banner,],attr_evil_tier_5,wp_tier_5,knows_common|knows_athletics_3|knows_power_strike_5|knows_ironflesh_10,uruk_hai_face1,uruk_hai_face2],</text:p>
          </table:table-cell>
          <table:table-cell table:style-name="ce7" office:value-type="string" calcext:value-type="string">
            <text:p>i5_mordor_uruk_standard_bearer</text:p>
          </table:table-cell>
          <table:table-cell table:style-name="ce7" office:value-type="string" calcext:value-type="string">
            <text:p>Mordor_Standard_Bearer</text:p>
          </table:table-cell>
          <table:table-cell table:style-name="ce7" office:value-type="string" calcext:value-type="string">
            <text:p>Mordor_Standard_Bearers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uruk_helm_b,itm_uruk_helm_c,itm_uruk_helm_d,</text:p>
          </table:table-cell>
          <table:table-cell table:style-name="ce11" office:value-type="string" calcext:value-type="string">
            <text:p>itm_m_uruk_heavy_c, itm_m_uruk_heavy_c_good, itm_m_uruk_heavy_c_bad,</text:p>
          </table:table-cell>
          <table:table-cell table:style-name="ce11" office:value-type="string" calcext:value-type="string">
            <text:p>itm_evil_gauntlets_b, itm_orc_mittens_good,</text:p>
          </table:table-cell>
          <table:table-cell table:style-name="ce11" office:value-type="string" calcext:value-type="string">
            <text:p>itm_uruk_greaves,itm_uruk_chain_greaves,</text:p>
          </table:table-cell>
          <table:table-cell table:style-name="ce11" office:value-type="string" calcext:value-type="string">
            <text:p>itm_mordor_banner,</text:p>
          </table:table-cell>
          <table:table-cell table:style-name="ce11" table:number-columns-repeated="2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3|knows_power_strike_5|knows_ironflesh_10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B364]&lt;&gt;&quot;&quot;;[.C364]&lt;&gt;&quot;&quot;);CONCATENATE([Variables.$I$1];[Variables.$I$7];[.B364];[Variables.$I$7];[Variables.$I$6];[Variables.$I$7];[.C364];[Variables.$I$7];[Variables.$I$6];[Variables.$I$7];[.D364];[Variables.$I$7];[Variables.$I$6];[.E364];[Variables.$I$6];[.F364];[Variables.$I$6];[.G364];[Variables.$I$6];[.H364];[Variables.$I$6];[Variables.$I$1];[.I364];[.J364];[.K364];[.L364];[.M364];[.N364];[.O364];[Variables.$I$2];[Variables.$I$6];[.P364];[Variables.$I$6];[.Q364];[Variables.$I$6];[.R364];[Variables.$I$6];[.S364];[Variables.$I$6];[.T364];IF([.U364]&lt;&gt;&quot;&quot;;CONCATENATE([Variables.$I$6];[.U364]);&quot;&quot;);[Variables.$I$2];[Variables.$I$6]);IF([.B364]&lt;&gt;&quot;&quot;;CONCATENATE(&quot;#&quot;;[.B364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 itm_orc_mittens_good,itm_uruk_greaves,itm_uruk_chain_greaves,itm_mordor_banner,],attr_evil_tier_5,wp_tier_5,knows_common|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 itm_orc_mittens_good,itm_uruk_greaves,itm_uruk_chain_greaves,itm_mordor_banner,],attr_evil_tier_5,wp_tier_5,knows_common|knows_athletics_3|knows_power_strike_5|knows_ironflesh_10,uruk_hai_face1,uruk_hai_face2],</text:p>
          </table:table-cell>
          <table:table-cell table:number-columns-repeated="16362"/>
        </table:table-row>
        <table:table-row table:style-name="ro1">
          <table:table-cell table:formula="of:=IF(AND([.B365]&lt;&gt;&quot;&quot;;[.C365]&lt;&gt;&quot;&quot;);CONCATENATE([Variables.$I$1];[Variables.$I$7];[.B365];[Variables.$I$7];[Variables.$I$6];[Variables.$I$7];[.C365];[Variables.$I$7];[Variables.$I$6];[Variables.$I$7];[.D365];[Variables.$I$7];[Variables.$I$6];[.E365];[Variables.$I$6];[.F365];[Variables.$I$6];[.G365];[Variables.$I$6];[.H365];[Variables.$I$6];[Variables.$I$1];[.I365];[.J365];[.K365];[.L365];[.M365];[.N365];[.O365];[Variables.$I$2];[Variables.$I$6];[.P365];[Variables.$I$6];[.Q365];[Variables.$I$6];[.R365];[Variables.$I$6];[.S365];[Variables.$I$6];[.T365];IF([.U365]&lt;&gt;&quot;&quot;;CONCATENATE([Variables.$I$6];[.U365]);&quot;&quot;);[Variables.$I$2];[Variables.$I$6]);IF([.B365]&lt;&gt;&quot;&quot;;CONCATENATE(&quot;#&quot;;[.B365]);&quot;&quot;))">
            <text:p/>
          </table:table-cell>
          <table:table-cell table:style-name="ce6" table:number-columns-repeated="4"/>
          <table:table-cell table:style-name="ce36" table:number-columns-repeated="2"/>
          <table:table-cell table:style-name="ce6" table:number-columns-repeated="14"/>
          <table:table-cell table:style-name="ce36" table:formula="of:=IF(AND([.B365]&lt;&gt;&quot;&quot;;[.C365]&lt;&gt;&quot;&quot;);CONCATENATE([Variables.$I$1];[Variables.$I$7];[.B365];[Variables.$I$7];[Variables.$I$6];[Variables.$I$7];[.C365];[Variables.$I$7];[Variables.$I$6];[Variables.$I$7];[.D365];[Variables.$I$7];[Variables.$I$6];[.E365];[Variables.$I$6];[.F365];[Variables.$I$6];[.G365];[Variables.$I$6];[.H365];[Variables.$I$6];[Variables.$I$1];[.I365];[.J365];[.K365];[.L365];[.M365];[.N365];[.O365];[Variables.$I$2];[Variables.$I$6];[.P365];[Variables.$I$6];[.Q365];[Variables.$I$6];[.R365];[Variables.$I$6];[.S365];[Variables.$I$6];[.T365];IF([.U365]&lt;&gt;&quot;&quot;;CONCATENATE([Variables.$I$6];[.U365]);&quot;&quot;);[Variables.$I$2];[Variables.$I$6]);IF([.B365]&lt;&gt;&quot;&quot;;CONCATENATE(&quot;#&quot;;[.B365]);&quot;&quot;))">
            <text:p/>
          </table:table-cell>
          <table:table-cell table:number-columns-repeated="16362"/>
        </table:table-row>
        <table:table-row table:style-name="ro1">
          <table:table-cell table:style-name="ce6" table:formula="of:=IF(AND([.B366]&lt;&gt;&quot;&quot;;[.C366]&lt;&gt;&quot;&quot;);CONCATENATE([Variables.$I$1];[Variables.$I$7];[.B366];[Variables.$I$7];[Variables.$I$6];[Variables.$I$7];[.C366];[Variables.$I$7];[Variables.$I$6];[Variables.$I$7];[.D366];[Variables.$I$7];[Variables.$I$6];[.E366];[Variables.$I$6];[.F366];[Variables.$I$6];[.G366];[Variables.$I$6];[.H366];[Variables.$I$6];[Variables.$I$1];[.I366];[.J366];[.K366];[.L366];[.M366];[.N366];[.O366];[Variables.$I$2];[Variables.$I$6];[.P366];[Variables.$I$6];[.Q366];[Variables.$I$6];[.R366];[Variables.$I$6];[.S366];[Variables.$I$6];[.T366];IF([.U366]&lt;&gt;&quot;&quot;;CONCATENATE([Variables.$I$6];[.U366]);&quot;&quot;);[Variables.$I$2];[Variables.$I$6]);IF([.B366]&lt;&gt;&quot;&quot;;CONCATENATE(&quot;#&quot;;[.B366]);&quot;&quot;))" office:value-type="string" office:string-value="#Trolls #Ents" calcext:value-type="string">
            <text:p>#Trolls #Ents</text:p>
          </table:table-cell>
          <table:table-cell table:style-name="ce5" office:value-type="string" calcext:value-type="string">
            <text:p>Trolls #Ents</text:p>
          </table:table-cell>
          <table:table-cell table:style-name="ce6" table:number-columns-repeated="19"/>
          <table:table-cell table:style-name="ce6" table:formula="of:=IF(AND([.B366]&lt;&gt;&quot;&quot;;[.C366]&lt;&gt;&quot;&quot;);CONCATENATE([Variables.$I$1];[Variables.$I$7];[.B366];[Variables.$I$7];[Variables.$I$6];[Variables.$I$7];[.C366];[Variables.$I$7];[Variables.$I$6];[Variables.$I$7];[.D366];[Variables.$I$7];[Variables.$I$6];[.E366];[Variables.$I$6];[.F366];[Variables.$I$6];[.G366];[Variables.$I$6];[.H366];[Variables.$I$6];[Variables.$I$1];[.I366];[.J366];[.K366];[.L366];[.M366];[.N366];[.O366];[Variables.$I$2];[Variables.$I$6];[.P366];[Variables.$I$6];[.Q366];[Variables.$I$6];[.R366];[Variables.$I$6];[.S366];[Variables.$I$6];[.T366];IF([.U366]&lt;&gt;&quot;&quot;;CONCATENATE([Variables.$I$6];[.U366]);&quot;&quot;);[Variables.$I$2];[Variables.$I$6]);IF([.B366]&lt;&gt;&quot;&quot;;CONCATENATE(&quot;#&quot;;[.B366]);&quot;&quot;))" office:value-type="string" office:string-value="#Trolls #Ents" calcext:value-type="string">
            <text:p>#Trolls #Ents</text:p>
          </table:table-cell>
          <table:table-cell table:number-columns-repeated="16362"/>
        </table:table-row>
        <table:table-row table:style-name="ro1">
          <table:table-cell table:style-name="ce6" table:formula="of:=IF(AND([.B367]&lt;&gt;&quot;&quot;;[.C367]&lt;&gt;&quot;&quot;);CONCATENATE([Variables.$I$1];[Variables.$I$7];[.B367];[Variables.$I$7];[Variables.$I$6];[Variables.$I$7];[.C367];[Variables.$I$7];[Variables.$I$6];[Variables.$I$7];[.D367];[Variables.$I$7];[Variables.$I$6];[.E367];[Variables.$I$6];[.F367];[Variables.$I$6];[.G367];[Variables.$I$6];[.H367];[Variables.$I$6];[Variables.$I$1];[.I367];[.J367];[.K367];[.L367];[.M367];[.N367];[.O367];[Variables.$I$2];[Variables.$I$6];[.P367];[Variables.$I$6];[.Q367];[Variables.$I$6];[.R367];[Variables.$I$6];[.S367];[Variables.$I$6];[.T367];IF([.U367]&lt;&gt;&quot;&quot;;CONCATENATE([Variables.$I$6];[.U367]);&quot;&quot;);[Variables.$I$2];[Variables.$I$6]);IF([.B367]&lt;&gt;&quot;&quot;;CONCATENATE(&quot;#&quot;;[.B367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</text:p>
          </table:table-cell>
          <table:table-cell table:style-name="ce7" office:value-type="string" calcext:value-type="string">
            <text:p>troll_of_moria</text:p>
          </table:table-cell>
          <table:table-cell table:style-name="ce7" office:value-type="string" calcext:value-type="string">
            <text:p>Troll_of_Moria</text:p>
          </table:table-cell>
          <table:table-cell table:style-name="ce7" office:value-type="string" calcext:value-type="string">
            <text:p>Trolls_of_Moria</text:p>
          </table:table-cell>
          <table:table-cell table:style-name="ce8" office:value-type="string" calcext:value-type="string">
            <text:p>tf_troll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ia</text:p>
          </table:table-cell>
          <table:table-cell table:style-name="ce11" office:value-type="string" calcext:value-type="string">
            <text:p>itm_troll_head_helm,itm_troll_head_helm_b,itm_troll_head_helm_c,</text:p>
          </table:table-cell>
          <table:table-cell table:style-name="ce11" table:number-columns-repeated="2"/>
          <table:table-cell table:style-name="ce11" office:value-type="string" calcext:value-type="string">
            <text:p>itm_troll_feet_boots,</text:p>
          </table:table-cell>
          <table:table-cell table:style-name="ce11" office:value-type="string" calcext:value-type="string">
            <text:p>itm_tree_trunk_club_a,itm_tree_trunk_club_a,itm_tree_trunk_club_a,itm_tree_trunk_club_b,itm_tree_trunk_club_b,</text:p>
          </table:table-cell>
          <table:table-cell table:style-name="ce11" table:number-columns-repeated="2"/>
          <table:table-cell table:style-name="ce12" office:value-type="string" calcext:value-type="string">
            <text:p>str_25| agi_3| int_3| cha_3|level(58)</text:p>
          </table:table-cell>
          <table:table-cell table:style-name="ce12" office:value-type="string" calcext:value-type="string">
            <text:p>wp(75)</text:p>
          </table:table-cell>
          <table:table-cell table:style-name="ce12" office:value-type="string" calcext:value-type="string">
            <text:p>knows_power_strike_10|knows_ironflesh_10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B367]&lt;&gt;&quot;&quot;;[.C367]&lt;&gt;&quot;&quot;);CONCATENATE([Variables.$I$1];[Variables.$I$7];[.B367];[Variables.$I$7];[Variables.$I$6];[Variables.$I$7];[.C367];[Variables.$I$7];[Variables.$I$6];[Variables.$I$7];[.D367];[Variables.$I$7];[Variables.$I$6];[.E367];[Variables.$I$6];[.F367];[Variables.$I$6];[.G367];[Variables.$I$6];[.H367];[Variables.$I$6];[Variables.$I$1];[.I367];[.J367];[.K367];[.L367];[.M367];[.N367];[.O367];[Variables.$I$2];[Variables.$I$6];[.P367];[Variables.$I$6];[.Q367];[Variables.$I$6];[.R367];[Variables.$I$6];[.S367];[Variables.$I$6];[.T367];IF([.U367]&lt;&gt;&quot;&quot;;CONCATENATE([Variables.$I$6];[.U367]);&quot;&quot;);[Variables.$I$2];[Variables.$I$6]);IF([.B367]&lt;&gt;&quot;&quot;;CONCATENATE(&quot;#&quot;;[.B367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</text:p>
          </table:table-cell>
          <table:table-cell table:number-columns-repeated="16362"/>
        </table:table-row>
        <table:table-row table:style-name="ro1">
          <table:table-cell table:style-name="ce6" table:formula="of:=IF(AND([.B368]&lt;&gt;&quot;&quot;;[.C368]&lt;&gt;&quot;&quot;);CONCATENATE([Variables.$I$1];[Variables.$I$7];[.B368];[Variables.$I$7];[Variables.$I$6];[Variables.$I$7];[.C368];[Variables.$I$7];[Variables.$I$6];[Variables.$I$7];[.D368];[Variables.$I$7];[Variables.$I$6];[.E368];[Variables.$I$6];[.F368];[Variables.$I$6];[.G368];[Variables.$I$6];[.H368];[Variables.$I$6];[Variables.$I$1];[.I368];[.J368];[.K368];[.L368];[.M368];[.N368];[.O368];[Variables.$I$2];[Variables.$I$6];[.P368];[Variables.$I$6];[.Q368];[Variables.$I$6];[.R368];[Variables.$I$6];[.S368];[Variables.$I$6];[.T368];IF([.U368]&lt;&gt;&quot;&quot;;CONCATENATE([Variables.$I$6];[.U368]);&quot;&quot;);[Variables.$I$2];[Variables.$I$6]);IF([.B368]&lt;&gt;&quot;&quot;;CONCATENATE(&quot;#&quot;;[.B368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style-name="ce7" office:value-type="string" calcext:value-type="string">
            <text:p>armoured_troll</text:p>
          </table:table-cell>
          <table:table-cell table:style-name="ce7" office:value-type="string" calcext:value-type="string">
            <text:p>Armored_Troll</text:p>
          </table:table-cell>
          <table:table-cell table:style-name="ce7" office:value-type="string" calcext:value-type="string">
            <text:p>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sengard</text:p>
          </table:table-cell>
          <table:table-cell table:style-name="ce11" office:value-type="string" calcext:value-type="string">
            <text:p>itm_olog_head_helm,itm_olog_head_helm_b,itm_olog_head_helm_c,</text:p>
          </table:table-cell>
          <table:table-cell table:style-name="ce11" office:value-type="string" calcext:value-type="string">
            <text:p>itm_olog_body,itm_olog_body_b,</text:p>
          </table:table-cell>
          <table:table-cell table:style-name="ce11" office:value-type="string" calcext:value-type="string">
            <text:p>itm_olog_hands,</text:p>
          </table:table-cell>
          <table:table-cell table:style-name="ce11" office:value-type="string" calcext:value-type="string">
            <text:p>itm_olog_feet_boots,</text:p>
          </table:table-cell>
          <table:table-cell table:style-name="ce11" office:value-type="string" calcext:value-type="string">
            <text:p>itm_giant_mace,itm_giant_mace_b,itm_giant_hammer,</text:p>
          </table:table-cell>
          <table:table-cell table:style-name="ce11" table:number-columns-repeated="2"/>
          <table:table-cell table:style-name="ce12" office:value-type="string" calcext:value-type="string">
            <text:p>str_25| agi_3| int_3| cha_3|level(61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10|knows_ironflesh_10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B368]&lt;&gt;&quot;&quot;;[.C368]&lt;&gt;&quot;&quot;);CONCATENATE([Variables.$I$1];[Variables.$I$7];[.B368];[Variables.$I$7];[Variables.$I$6];[Variables.$I$7];[.C368];[Variables.$I$7];[Variables.$I$6];[Variables.$I$7];[.D368];[Variables.$I$7];[Variables.$I$6];[.E368];[Variables.$I$6];[.F368];[Variables.$I$6];[.G368];[Variables.$I$6];[.H368];[Variables.$I$6];[Variables.$I$1];[.I368];[.J368];[.K368];[.L368];[.M368];[.N368];[.O368];[Variables.$I$2];[Variables.$I$6];[.P368];[Variables.$I$6];[.Q368];[Variables.$I$6];[.R368];[Variables.$I$6];[.S368];[Variables.$I$6];[.T368];IF([.U368]&lt;&gt;&quot;&quot;;CONCATENATE([Variables.$I$6];[.U368]);&quot;&quot;);[Variables.$I$2];[Variables.$I$6]);IF([.B368]&lt;&gt;&quot;&quot;;CONCATENATE(&quot;#&quot;;[.B368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16362"/>
        </table:table-row>
        <table:table-row table:style-name="ro1">
          <table:table-cell table:style-name="ce6" table:formula="of:=IF(AND([.B369]&lt;&gt;&quot;&quot;;[.C369]&lt;&gt;&quot;&quot;);CONCATENATE([Variables.$I$1];[Variables.$I$7];[.B369];[Variables.$I$7];[Variables.$I$6];[Variables.$I$7];[.C369];[Variables.$I$7];[Variables.$I$6];[Variables.$I$7];[.D369];[Variables.$I$7];[Variables.$I$6];[.E369];[Variables.$I$6];[.F369];[Variables.$I$6];[.G369];[Variables.$I$6];[.H369];[Variables.$I$6];[Variables.$I$1];[.I369];[.J369];[.K369];[.L369];[.M369];[.N369];[.O369];[Variables.$I$2];[Variables.$I$6];[.P369];[Variables.$I$6];[.Q369];[Variables.$I$6];[.R369];[Variables.$I$6];[.S369];[Variables.$I$6];[.T369];IF([.U369]&lt;&gt;&quot;&quot;;CONCATENATE([Variables.$I$6];[.U369]);&quot;&quot;);[Variables.$I$2];[Variables.$I$6]);IF([.B369]&lt;&gt;&quot;&quot;;CONCATENATE(&quot;#&quot;;[.B369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style-name="ce7" office:value-type="string" calcext:value-type="string">
            <text:p>olog_hai</text:p>
          </table:table-cell>
          <table:table-cell table:number-columns-repeated="2" table:style-name="ce7" office:value-type="string" calcext:value-type="string">
            <text:p>Olog_Hai_of_Mordor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olog_head_helm,itm_olog_head_helm_b,itm_olog_head_helm_c,</text:p>
          </table:table-cell>
          <table:table-cell table:style-name="ce11" office:value-type="string" calcext:value-type="string">
            <text:p>itm_olog_body,itm_olog_body_b,</text:p>
          </table:table-cell>
          <table:table-cell table:style-name="ce11" office:value-type="string" calcext:value-type="string">
            <text:p>itm_olog_hands,</text:p>
          </table:table-cell>
          <table:table-cell table:style-name="ce11" office:value-type="string" calcext:value-type="string">
            <text:p>itm_olog_feet_boots,</text:p>
          </table:table-cell>
          <table:table-cell table:style-name="ce11" office:value-type="string" calcext:value-type="string">
            <text:p>itm_giant_mace,itm_giant_mace_b,itm_giant_hammer,</text:p>
          </table:table-cell>
          <table:table-cell table:style-name="ce11" table:number-columns-repeated="2"/>
          <table:table-cell table:style-name="ce12" office:value-type="string" calcext:value-type="string">
            <text:p>str_25| agi_3| int_3| cha_3|level(61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10|knows_ironflesh_10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B369]&lt;&gt;&quot;&quot;;[.C369]&lt;&gt;&quot;&quot;);CONCATENATE([Variables.$I$1];[Variables.$I$7];[.B369];[Variables.$I$7];[Variables.$I$6];[Variables.$I$7];[.C369];[Variables.$I$7];[Variables.$I$6];[Variables.$I$7];[.D369];[Variables.$I$7];[Variables.$I$6];[.E369];[Variables.$I$6];[.F369];[Variables.$I$6];[.G369];[Variables.$I$6];[.H369];[Variables.$I$6];[Variables.$I$1];[.I369];[.J369];[.K369];[.L369];[.M369];[.N369];[.O369];[Variables.$I$2];[Variables.$I$6];[.P369];[Variables.$I$6];[.Q369];[Variables.$I$6];[.R369];[Variables.$I$6];[.S369];[Variables.$I$6];[.T369];IF([.U369]&lt;&gt;&quot;&quot;;CONCATENATE([Variables.$I$6];[.U369]);&quot;&quot;);[Variables.$I$2];[Variables.$I$6]);IF([.B369]&lt;&gt;&quot;&quot;;CONCATENATE(&quot;#&quot;;[.B369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16362"/>
        </table:table-row>
        <table:table-row table:style-name="ro1">
          <table:table-cell table:style-name="ce6" table:formula="of:=IF(AND([.B370]&lt;&gt;&quot;&quot;;[.C370]&lt;&gt;&quot;&quot;);CONCATENATE([Variables.$I$1];[Variables.$I$7];[.B370];[Variables.$I$7];[Variables.$I$6];[Variables.$I$7];[.C370];[Variables.$I$7];[Variables.$I$6];[Variables.$I$7];[.D370];[Variables.$I$7];[Variables.$I$6];[.E370];[Variables.$I$6];[.F370];[Variables.$I$6];[.G370];[Variables.$I$6];[.H370];[Variables.$I$6];[Variables.$I$1];[.I370];[.J370];[.K370];[.L370];[.M370];[.N370];[.O370];[Variables.$I$2];[Variables.$I$6];[.P370];[Variables.$I$6];[.Q370];[Variables.$I$6];[.R370];[Variables.$I$6];[.S370];[Variables.$I$6];[.T370];IF([.U370]&lt;&gt;&quot;&quot;;CONCATENATE([Variables.$I$6];[.U370]);&quot;&quot;);[Variables.$I$2];[Variables.$I$6]);IF([.B370]&lt;&gt;&quot;&quot;;CONCATENATE(&quot;#&quot;;[.B370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</text:p>
          </table:table-cell>
          <table:table-cell table:style-name="ce7" office:value-type="string" calcext:value-type="string">
            <text:p>ent</text:p>
          </table:table-cell>
          <table:table-cell table:style-name="ce7" office:value-type="string" calcext:value-type="string">
            <text:p>Ent</text:p>
          </table:table-cell>
          <table:table-cell table:style-name="ce7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commoners</text:p>
          </table:table-cell>
          <table:table-cell table:style-name="ce11" office:value-type="string" calcext:value-type="string">
            <text:p>itm_ent_head_helm,itm_ent_head_helm2,itm_ent_head_helm3,</text:p>
          </table:table-cell>
          <table:table-cell table:style-name="ce11" office:value-type="string" calcext:value-type="string">
            <text:p>itm_ent_body,</text:p>
          </table:table-cell>
          <table:table-cell table:style-name="ce11" office:value-type="string" calcext:value-type="string">
            <text:p>itm_ent_hands,</text:p>
          </table:table-cell>
          <table:table-cell table:style-name="ce11" office:value-type="string" calcext:value-type="string">
            <text:p>itm_ent_feet_boots,</text:p>
          </table:table-cell>
          <table:table-cell table:style-name="ce11" office:value-type="string" calcext:value-type="string">
            <text:p>itm_tree_trunk_invis,</text:p>
          </table:table-cell>
          <table:table-cell table:style-name="ce11"/>
          <table:table-cell table:style-name="ce11" office:value-type="string" calcext:value-type="string">
            <text:p>itm_ent_water,</text:p>
          </table:table-cell>
          <table:table-cell table:style-name="ce12" office:value-type="string" calcext:value-type="string">
            <text:p>str_25| agi_3| int_3| cha_3|level(63)</text:p>
          </table:table-cell>
          <table:table-cell table:style-name="ce12" office:value-type="string" calcext:value-type="string">
            <text:p>wp(200)</text:p>
          </table:table-cell>
          <table:table-cell table:style-name="ce12" office:value-type="string" calcext:value-type="string">
            <text:p>knows_power_strike_10|knows_ironflesh_10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B370]&lt;&gt;&quot;&quot;;[.C370]&lt;&gt;&quot;&quot;);CONCATENATE([Variables.$I$1];[Variables.$I$7];[.B370];[Variables.$I$7];[Variables.$I$6];[Variables.$I$7];[.C370];[Variables.$I$7];[Variables.$I$6];[Variables.$I$7];[.D370];[Variables.$I$7];[Variables.$I$6];[.E370];[Variables.$I$6];[.F370];[Variables.$I$6];[.G370];[Variables.$I$6];[.H370];[Variables.$I$6];[Variables.$I$1];[.I370];[.J370];[.K370];[.L370];[.M370];[.N370];[.O370];[Variables.$I$2];[Variables.$I$6];[.P370];[Variables.$I$6];[.Q370];[Variables.$I$6];[.R370];[Variables.$I$6];[.S370];[Variables.$I$6];[.T370];IF([.U370]&lt;&gt;&quot;&quot;;CONCATENATE([Variables.$I$6];[.U370]);&quot;&quot;);[Variables.$I$2];[Variables.$I$6]);IF([.B370]&lt;&gt;&quot;&quot;;CONCATENATE(&quot;#&quot;;[.B370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</text:p>
          </table:table-cell>
          <table:table-cell table:number-columns-repeated="16362"/>
        </table:table-row>
        <table:table-row table:style-name="ro1">
          <table:table-cell table:formula="of:=IF(AND([.B371]&lt;&gt;&quot;&quot;;[.C371]&lt;&gt;&quot;&quot;);CONCATENATE([Variables.$I$1];[Variables.$I$7];[.B371];[Variables.$I$7];[Variables.$I$6];[Variables.$I$7];[.C371];[Variables.$I$7];[Variables.$I$6];[Variables.$I$7];[.D371];[Variables.$I$7];[Variables.$I$6];[.E371];[Variables.$I$6];[.F371];[Variables.$I$6];[.G371];[Variables.$I$6];[.H371];[Variables.$I$6];[Variables.$I$1];[.I371];[.J371];[.K371];[.L371];[.M371];[.N371];[.O371];[Variables.$I$2];[Variables.$I$6];[.P371];[Variables.$I$6];[.Q371];[Variables.$I$6];[.R371];[Variables.$I$6];[.S371];[Variables.$I$6];[.T371];IF([.U371]&lt;&gt;&quot;&quot;;CONCATENATE([Variables.$I$6];[.U371]);&quot;&quot;);[Variables.$I$2];[Variables.$I$6]);IF([.B371]&lt;&gt;&quot;&quot;;CONCATENATE(&quot;#&quot;;[.B371]);&quot;&quot;))">
            <text:p/>
          </table:table-cell>
          <table:table-cell table:style-name="ce6" table:number-columns-repeated="4"/>
          <table:table-cell table:style-name="ce36" table:number-columns-repeated="2"/>
          <table:table-cell table:style-name="ce6" table:number-columns-repeated="14"/>
          <table:table-cell table:style-name="ce36" table:formula="of:=IF(AND([.B371]&lt;&gt;&quot;&quot;;[.C371]&lt;&gt;&quot;&quot;);CONCATENATE([Variables.$I$1];[Variables.$I$7];[.B371];[Variables.$I$7];[Variables.$I$6];[Variables.$I$7];[.C371];[Variables.$I$7];[Variables.$I$6];[Variables.$I$7];[.D371];[Variables.$I$7];[Variables.$I$6];[.E371];[Variables.$I$6];[.F371];[Variables.$I$6];[.G371];[Variables.$I$6];[.H371];[Variables.$I$6];[Variables.$I$1];[.I371];[.J371];[.K371];[.L371];[.M371];[.N371];[.O371];[Variables.$I$2];[Variables.$I$6];[.P371];[Variables.$I$6];[.Q371];[Variables.$I$6];[.R371];[Variables.$I$6];[.S371];[Variables.$I$6];[.T371];IF([.U371]&lt;&gt;&quot;&quot;;CONCATENATE([Variables.$I$6];[.U371]);&quot;&quot;);[Variables.$I$2];[Variables.$I$6]);IF([.B371]&lt;&gt;&quot;&quot;;CONCATENATE(&quot;#&quot;;[.B371]);&quot;&quot;))">
            <text:p/>
          </table:table-cell>
          <table:table-cell table:number-columns-repeated="16362"/>
        </table:table-row>
        <table:table-row table:style-name="ro1">
          <table:table-cell table:style-name="ce6" table:formula="of:=IF(AND([.B372]&lt;&gt;&quot;&quot;;[.C372]&lt;&gt;&quot;&quot;);CONCATENATE([Variables.$I$1];[Variables.$I$7];[.B372];[Variables.$I$7];[Variables.$I$6];[Variables.$I$7];[.C372];[Variables.$I$7];[Variables.$I$6];[Variables.$I$7];[.D372];[Variables.$I$7];[Variables.$I$6];[.E372];[Variables.$I$6];[.F372];[Variables.$I$6];[.G372];[Variables.$I$6];[.H372];[Variables.$I$6];[Variables.$I$1];[.I372];[.J372];[.K372];[.L372];[.M372];[.N372];[.O372];[Variables.$I$2];[Variables.$I$6];[.P372];[Variables.$I$6];[.Q372];[Variables.$I$6];[.R372];[Variables.$I$6];[.S372];[Variables.$I$6];[.T372];IF([.U372]&lt;&gt;&quot;&quot;;CONCATENATE([Variables.$I$6];[.U372]);&quot;&quot;);[Variables.$I$2];[Variables.$I$6]);IF([.B372]&lt;&gt;&quot;&quot;;CONCATENATE(&quot;#&quot;;[.B372]);&quot;&quot;))" office:value-type="string" office:string-value="#DOL GULDUR Orcs" calcext:value-type="string">
            <text:p>#DOL GULDUR Orcs</text:p>
          </table:table-cell>
          <table:table-cell table:style-name="ce5" office:value-type="string" calcext:value-type="string">
            <text:p>DOL GULDUR Orcs</text:p>
          </table:table-cell>
          <table:table-cell table:style-name="ce6" table:number-columns-repeated="19"/>
          <table:table-cell table:style-name="ce6" table:formula="of:=IF(AND([.B372]&lt;&gt;&quot;&quot;;[.C372]&lt;&gt;&quot;&quot;);CONCATENATE([Variables.$I$1];[Variables.$I$7];[.B372];[Variables.$I$7];[Variables.$I$6];[Variables.$I$7];[.C372];[Variables.$I$7];[Variables.$I$6];[Variables.$I$7];[.D372];[Variables.$I$7];[Variables.$I$6];[.E372];[Variables.$I$6];[.F372];[Variables.$I$6];[.G372];[Variables.$I$6];[.H372];[Variables.$I$6];[Variables.$I$1];[.I372];[.J372];[.K372];[.L372];[.M372];[.N372];[.O372];[Variables.$I$2];[Variables.$I$6];[.P372];[Variables.$I$6];[.Q372];[Variables.$I$6];[.R372];[Variables.$I$6];[.S372];[Variables.$I$6];[.T372];IF([.U372]&lt;&gt;&quot;&quot;;CONCATENATE([Variables.$I$6];[.U372]);&quot;&quot;);[Variables.$I$2];[Variables.$I$6]);IF([.B372]&lt;&gt;&quot;&quot;;CONCATENATE(&quot;#&quot;;[.B372]);&quot;&quot;))" office:value-type="string" office:string-value="#DOL GULDUR Orcs" calcext:value-type="string">
            <text:p>#DOL GULDUR Orcs</text:p>
          </table:table-cell>
          <table:table-cell table:number-columns-repeated="16362"/>
        </table:table-row>
        <table:table-row table:style-name="ro1">
          <table:table-cell table:style-name="ce6" table:formula="of:=IF(AND([.B373]&lt;&gt;&quot;&quot;;[.C373]&lt;&gt;&quot;&quot;);CONCATENATE([Variables.$I$1];[Variables.$I$7];[.B373];[Variables.$I$7];[Variables.$I$6];[Variables.$I$7];[.C373];[Variables.$I$7];[Variables.$I$6];[Variables.$I$7];[.D373];[Variables.$I$7];[Variables.$I$6];[.E373];[Variables.$I$6];[.F373];[Variables.$I$6];[.G373];[Variables.$I$6];[.H373];[Variables.$I$6];[Variables.$I$1];[.I373];[.J373];[.K373];[.L373];[.M373];[.N373];[.O373];[Variables.$I$2];[Variables.$I$6];[.P373];[Variables.$I$6];[.Q373];[Variables.$I$6];[.R373];[Variables.$I$6];[.S373];[Variables.$I$6];[.T373];IF([.U373]&lt;&gt;&quot;&quot;;CONCATENATE([Variables.$I$6];[.U373]);&quot;&quot;);[Variables.$I$2];[Variables.$I$6]);IF([.B373]&lt;&gt;&quot;&quot;;CONCATENATE(&quot;#&quot;;[.B373]);&quot;&quot;))" office:value-type="string" office:string-value="[&quot;i1_guldur_orc_snaga&quot;,&quot;Orc_Snaga_of_Dol_Guldur&quot;,&quot;Orc_Snagas_of_Dol_Guldur&quot;,tf_orc| tf_no_capture_alive,0,0,fac_guldur,[itm_orc_skullcap_bad,itm_orc_coif_bad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" calcext:value-type="string">
            <text:p>["i1_guldur_orc_snaga","Orc_Snaga_of_Dol_Guldur","Orc_Snagas_of_Dol_Guldur",tf_orc| tf_no_capture_alive,0,0,fac_guldur,[itm_orc_skullcap_bad,itm_orc_coif_bad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</text:p>
          </table:table-cell>
          <table:table-cell table:style-name="ce7" office:value-type="string" calcext:value-type="string">
            <text:p>i1_guldur_orc_snaga</text:p>
          </table:table-cell>
          <table:table-cell table:style-name="ce7" office:value-type="string" calcext:value-type="string">
            <text:p>Orc_Snaga_of_Dol_Guldur</text:p>
          </table:table-cell>
          <table:table-cell table:style-name="ce7" office:value-type="string" calcext:value-type="string">
            <text:p>Orc_Snagas_of_Dol_Guldu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uldur</text:p>
          </table:table-cell>
          <table:table-cell table:style-name="ce11" office:value-type="string" calcext:value-type="string">
            <text:p>itm_orc_skullcap_bad,itm_orc_coif_bad,</text:p>
          </table:table-cell>
          <table:table-cell table:style-name="ce11" office:value-type="string" calcext:value-type="string">
            <text:p>itm_m_orc_light_a,itm_m_orc_light_b,itm_m_orc_light_c,</text:p>
          </table:table-cell>
          <table:table-cell table:style-name="ce11" table:number-columns-repeated="2"/>
          <table:table-cell table:style-name="ce11" office:value-type="string" calcext:value-type="string">
            <text:p>itm_wood_club,itm_orc_slasher,itm_orc_simple_spear,itm_orc_axe,</text:p>
          </table:table-cell>
          <table:table-cell table:style-name="ce11"/>
          <table:table-cell table:style-name="ce11" office:value-type="string" calcext:value-type="string">
            <text:p>itm_metal_scraps_bad,itm_metal_scraps_medium,itm_metal_scraps_good,</text:p>
          </table:table-cell>
          <table:table-cell table:style-name="ce12" office:value-type="string" calcext:value-type="string">
            <text:p>attr_orc_tier_1</text:p>
          </table:table-cell>
          <table:table-cell table:style-name="ce12" office:value-type="string" calcext:value-type="string">
            <text:p>wp_orc_tier_1</text:p>
          </table:table-cell>
          <table:table-cell table:style-name="ce13" office:value-type="string" calcext:value-type="string">
            <text:p>knows_common|knows_ironflesh_1|knows_power_draw_1|knows_athletics_3|knows_looting_1|knows_tracking_1|knows_tactics_1|knows_pathfinding_2|knows_spotting_1|knows_surgery_1|knows_persuasion_1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B373]&lt;&gt;&quot;&quot;;[.C373]&lt;&gt;&quot;&quot;);CONCATENATE([Variables.$I$1];[Variables.$I$7];[.B373];[Variables.$I$7];[Variables.$I$6];[Variables.$I$7];[.C373];[Variables.$I$7];[Variables.$I$6];[Variables.$I$7];[.D373];[Variables.$I$7];[Variables.$I$6];[.E373];[Variables.$I$6];[.F373];[Variables.$I$6];[.G373];[Variables.$I$6];[.H373];[Variables.$I$6];[Variables.$I$1];[.I373];[.J373];[.K373];[.L373];[.M373];[.N373];[.O373];[Variables.$I$2];[Variables.$I$6];[.P373];[Variables.$I$6];[.Q373];[Variables.$I$6];[.R373];[Variables.$I$6];[.S373];[Variables.$I$6];[.T373];IF([.U373]&lt;&gt;&quot;&quot;;CONCATENATE([Variables.$I$6];[.U373]);&quot;&quot;);[Variables.$I$2];[Variables.$I$6]);IF([.B373]&lt;&gt;&quot;&quot;;CONCATENATE(&quot;#&quot;;[.B373]);&quot;&quot;))" office:value-type="string" office:string-value="[&quot;i1_guldur_orc_snaga&quot;,&quot;Orc_Snaga_of_Dol_Guldur&quot;,&quot;Orc_Snagas_of_Dol_Guldur&quot;,tf_orc| tf_no_capture_alive,0,0,fac_guldur,[itm_orc_skullcap_bad,itm_orc_coif_bad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" calcext:value-type="string">
            <text:p>["i1_guldur_orc_snaga","Orc_Snaga_of_Dol_Guldur","Orc_Snagas_of_Dol_Guldur",tf_orc| tf_no_capture_alive,0,0,fac_guldur,[itm_orc_skullcap_bad,itm_orc_coif_bad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</text:p>
          </table:table-cell>
          <table:table-cell table:number-columns-repeated="16362"/>
        </table:table-row>
        <table:table-row table:style-name="ro1">
          <table:table-cell table:style-name="ce6" table:formula="of:=IF(AND([.B374]&lt;&gt;&quot;&quot;;[.C374]&lt;&gt;&quot;&quot;);CONCATENATE([Variables.$I$1];[Variables.$I$7];[.B374];[Variables.$I$7];[Variables.$I$6];[Variables.$I$7];[.C374];[Variables.$I$7];[Variables.$I$6];[Variables.$I$7];[.D374];[Variables.$I$7];[Variables.$I$6];[.E374];[Variables.$I$6];[.F374];[Variables.$I$6];[.G374];[Variables.$I$6];[.H374];[Variables.$I$6];[Variables.$I$1];[.I374];[.J374];[.K374];[.L374];[.M374];[.N374];[.O374];[Variables.$I$2];[Variables.$I$6];[.P374];[Variables.$I$6];[.Q374];[Variables.$I$6];[.R374];[Variables.$I$6];[.S374];[Variables.$I$6];[.T374];IF([.U374]&lt;&gt;&quot;&quot;;CONCATENATE([Variables.$I$6];[.U374]);&quot;&quot;);[Variables.$I$2];[Variables.$I$6]);IF([.B374]&lt;&gt;&quot;&quot;;CONCATENATE(&quot;#&quot;;[.B374]);&quot;&quot;))" office:value-type="string" office:string-value="[&quot;a2_guldur_orc_tracker&quot;,&quot;Orc_Tracker_of_Dol_Guldur&quot;,&quot;Orc_Trackers_of_Dol_Guldur&quot;,tf_orc| tfg_ranged| tfg_armor| tf_no_capture_alive,0,0,fac_guldur,[itm_orc_coif, itm_orc_nosehelm_bad, itm_orc_nosehelm,itm_orc_skullcap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" calcext:value-type="string">
            <text:p>["a2_guldur_orc_tracker","Orc_Tracker_of_Dol_Guldur","Orc_Trackers_of_Dol_Guldur",tf_orc| tfg_ranged| tfg_armor| tf_no_capture_alive,0,0,fac_guldur,[itm_orc_coif, itm_orc_nosehelm_bad, itm_orc_nosehelm,itm_orc_skullcap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</text:p>
          </table:table-cell>
          <table:table-cell table:style-name="ce7" office:value-type="string" calcext:value-type="string">
            <text:p>a2_guldur_orc_tracker</text:p>
          </table:table-cell>
          <table:table-cell table:style-name="ce7" office:value-type="string" calcext:value-type="string">
            <text:p>Orc_Tracker_of_Dol_Guldur</text:p>
          </table:table-cell>
          <table:table-cell table:style-name="ce7" office:value-type="string" calcext:value-type="string">
            <text:p>Orc_Trackers_of_Dol_Guldu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uldur</text:p>
          </table:table-cell>
          <table:table-cell table:style-name="ce11" office:value-type="string" calcext:value-type="string">
            <text:p>itm_orc_coif, itm_orc_nosehelm_bad, itm_orc_nosehelm,itm_orc_skullcap,</text:p>
          </table:table-cell>
          <table:table-cell table:style-name="ce11" office:value-type="string" calcext:value-type="string">
            <text:p>itm_m_orc_light_a,itm_m_orc_light_b,itm_m_orc_light_c,</text:p>
          </table:table-cell>
          <table:table-cell table:style-name="ce11"/>
          <table:table-cell table:style-name="ce11" office:value-type="string" calcext:value-type="string">
            <text:p>itm_orc_ragwrap,</text:p>
          </table:table-cell>
          <table:table-cell table:style-name="ce11" office:value-type="string" calcext:value-type="string">
            <text:p>itm_orc_bow,itm_orc_hook_arrow,</text:p>
          </table:table-cell>
          <table:table-cell table:style-name="ce11" office:value-type="string" calcext:value-type="string">
            <text:p>itm_wood_club,itm_orc_simple_spear,itm_orc_axe,</text:p>
          </table:table-cell>
          <table:table-cell table:style-name="ce11"/>
          <table:table-cell table:style-name="ce12" office:value-type="string" calcext:value-type="string">
            <text:p>attr_orc_tier_2</text:p>
          </table:table-cell>
          <table:table-cell table:style-name="ce12" office:value-type="string" calcext:value-type="string">
            <text:p>wp_orc_tier_2</text:p>
          </table:table-cell>
          <table:table-cell table:style-name="ce13" office:value-type="string" calcext:value-type="string">
            <text:p>knows_common|knows_ironflesh_1|knows_power_strike_2|knows_power_draw_1|knows_athletics_4|knows_looting_1|knows_tracking_1|knows_tactics_1|knows_pathfinding_2|knows_spotting_1|knows_surgery_1|knows_persuasion_1</text:p>
          </table:table-cell>
          <table:table-cell table:style-name="ce14" office:value-type="string" calcext:value-type="string">
            <text:p>orc_face3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B374]&lt;&gt;&quot;&quot;;[.C374]&lt;&gt;&quot;&quot;);CONCATENATE([Variables.$I$1];[Variables.$I$7];[.B374];[Variables.$I$7];[Variables.$I$6];[Variables.$I$7];[.C374];[Variables.$I$7];[Variables.$I$6];[Variables.$I$7];[.D374];[Variables.$I$7];[Variables.$I$6];[.E374];[Variables.$I$6];[.F374];[Variables.$I$6];[.G374];[Variables.$I$6];[.H374];[Variables.$I$6];[Variables.$I$1];[.I374];[.J374];[.K374];[.L374];[.M374];[.N374];[.O374];[Variables.$I$2];[Variables.$I$6];[.P374];[Variables.$I$6];[.Q374];[Variables.$I$6];[.R374];[Variables.$I$6];[.S374];[Variables.$I$6];[.T374];IF([.U374]&lt;&gt;&quot;&quot;;CONCATENATE([Variables.$I$6];[.U374]);&quot;&quot;);[Variables.$I$2];[Variables.$I$6]);IF([.B374]&lt;&gt;&quot;&quot;;CONCATENATE(&quot;#&quot;;[.B374]);&quot;&quot;))" office:value-type="string" office:string-value="[&quot;a2_guldur_orc_tracker&quot;,&quot;Orc_Tracker_of_Dol_Guldur&quot;,&quot;Orc_Trackers_of_Dol_Guldur&quot;,tf_orc| tfg_ranged| tfg_armor| tf_no_capture_alive,0,0,fac_guldur,[itm_orc_coif, itm_orc_nosehelm_bad, itm_orc_nosehelm,itm_orc_skullcap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" calcext:value-type="string">
            <text:p>["a2_guldur_orc_tracker","Orc_Tracker_of_Dol_Guldur","Orc_Trackers_of_Dol_Guldur",tf_orc| tfg_ranged| tfg_armor| tf_no_capture_alive,0,0,fac_guldur,[itm_orc_coif, itm_orc_nosehelm_bad, itm_orc_nosehelm,itm_orc_skullcap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</text:p>
          </table:table-cell>
          <table:table-cell table:number-columns-repeated="16362"/>
        </table:table-row>
        <table:table-row table:style-name="ro1">
          <table:table-cell table:formula="of:=IF(AND([.B375]&lt;&gt;&quot;&quot;;[.C375]&lt;&gt;&quot;&quot;);CONCATENATE([Variables.$I$1];[Variables.$I$7];[.B375];[Variables.$I$7];[Variables.$I$6];[Variables.$I$7];[.C375];[Variables.$I$7];[Variables.$I$6];[Variables.$I$7];[.D375];[Variables.$I$7];[Variables.$I$6];[.E375];[Variables.$I$6];[.F375];[Variables.$I$6];[.G375];[Variables.$I$6];[.H375];[Variables.$I$6];[Variables.$I$1];[.I375];[.J375];[.K375];[.L375];[.M375];[.N375];[.O375];[Variables.$I$2];[Variables.$I$6];[.P375];[Variables.$I$6];[.Q375];[Variables.$I$6];[.R375];[Variables.$I$6];[.S375];[Variables.$I$6];[.T375];IF([.U375]&lt;&gt;&quot;&quot;;CONCATENATE([Variables.$I$6];[.U375]);&quot;&quot;);[Variables.$I$2];[Variables.$I$6]);IF([.B375]&lt;&gt;&quot;&quot;;CONCATENATE(&quot;#&quot;;[.B375]);&quot;&quot;))">
            <text:p/>
          </table:table-cell>
          <table:table-cell table:style-name="ce6" table:number-columns-repeated="20"/>
          <table:table-cell table:style-name="ce36" table:formula="of:=IF(AND([.B375]&lt;&gt;&quot;&quot;;[.C375]&lt;&gt;&quot;&quot;);CONCATENATE([Variables.$I$1];[Variables.$I$7];[.B375];[Variables.$I$7];[Variables.$I$6];[Variables.$I$7];[.C375];[Variables.$I$7];[Variables.$I$6];[Variables.$I$7];[.D375];[Variables.$I$7];[Variables.$I$6];[.E375];[Variables.$I$6];[.F375];[Variables.$I$6];[.G375];[Variables.$I$6];[.H375];[Variables.$I$6];[Variables.$I$1];[.I375];[.J375];[.K375];[.L375];[.M375];[.N375];[.O375];[Variables.$I$2];[Variables.$I$6];[.P375];[Variables.$I$6];[.Q375];[Variables.$I$6];[.R375];[Variables.$I$6];[.S375];[Variables.$I$6];[.T375];IF([.U375]&lt;&gt;&quot;&quot;;CONCATENATE([Variables.$I$6];[.U375]);&quot;&quot;);[Variables.$I$2];[Variables.$I$6]);IF([.B375]&lt;&gt;&quot;&quot;;CONCATENATE(&quot;#&quot;;[.B375]);&quot;&quot;))">
            <text:p/>
          </table:table-cell>
          <table:table-cell table:number-columns-repeated="16362"/>
        </table:table-row>
        <table:table-row table:style-name="ro1">
          <table:table-cell table:style-name="ce6" table:formula="of:=IF(AND([.B376]&lt;&gt;&quot;&quot;;[.C376]&lt;&gt;&quot;&quot;);CONCATENATE([Variables.$I$1];[Variables.$I$7];[.B376];[Variables.$I$7];[Variables.$I$6];[Variables.$I$7];[.C376];[Variables.$I$7];[Variables.$I$6];[Variables.$I$7];[.D376];[Variables.$I$7];[Variables.$I$6];[.E376];[Variables.$I$6];[.F376];[Variables.$I$6];[.G376];[Variables.$I$6];[.H376];[Variables.$I$6];[Variables.$I$1];[.I376];[.J376];[.K376];[.L376];[.M376];[.N376];[.O376];[Variables.$I$2];[Variables.$I$6];[.P376];[Variables.$I$6];[.Q376];[Variables.$I$6];[.R376];[Variables.$I$6];[.S376];[Variables.$I$6];[.T376];IF([.U376]&lt;&gt;&quot;&quot;;CONCATENATE([Variables.$I$6];[.U376]);&quot;&quot;);[Variables.$I$2];[Variables.$I$6]);IF([.B376]&lt;&gt;&quot;&quot;;CONCATENATE(&quot;#&quot;;[.B376]);&quot;&quot;))" office:value-type="string" office:string-value="#MORDOR Orcs" calcext:value-type="string">
            <text:p>#MORDOR Orcs</text:p>
          </table:table-cell>
          <table:table-cell table:style-name="ce5" office:value-type="string" calcext:value-type="string">
            <text:p>MORDOR Orcs</text:p>
          </table:table-cell>
          <table:table-cell table:style-name="ce6" table:number-columns-repeated="19"/>
          <table:table-cell table:style-name="ce6" table:formula="of:=IF(AND([.B376]&lt;&gt;&quot;&quot;;[.C376]&lt;&gt;&quot;&quot;);CONCATENATE([Variables.$I$1];[Variables.$I$7];[.B376];[Variables.$I$7];[Variables.$I$6];[Variables.$I$7];[.C376];[Variables.$I$7];[Variables.$I$6];[Variables.$I$7];[.D376];[Variables.$I$7];[Variables.$I$6];[.E376];[Variables.$I$6];[.F376];[Variables.$I$6];[.G376];[Variables.$I$6];[.H376];[Variables.$I$6];[Variables.$I$1];[.I376];[.J376];[.K376];[.L376];[.M376];[.N376];[.O376];[Variables.$I$2];[Variables.$I$6];[.P376];[Variables.$I$6];[.Q376];[Variables.$I$6];[.R376];[Variables.$I$6];[.S376];[Variables.$I$6];[.T376];IF([.U376]&lt;&gt;&quot;&quot;;CONCATENATE([Variables.$I$6];[.U376]);&quot;&quot;);[Variables.$I$2];[Variables.$I$6]);IF([.B376]&lt;&gt;&quot;&quot;;CONCATENATE(&quot;#&quot;;[.B376]);&quot;&quot;))" office:value-type="string" office:string-value="#MORDOR Orcs" calcext:value-type="string">
            <text:p>#MORDOR Orcs</text:p>
          </table:table-cell>
          <table:table-cell table:number-columns-repeated="16362"/>
        </table:table-row>
        <table:table-row table:style-name="ro1">
          <table:table-cell table:style-name="ce6" table:formula="of:=IF(AND([.B377]&lt;&gt;&quot;&quot;;[.C377]&lt;&gt;&quot;&quot;);CONCATENATE([Variables.$I$1];[Variables.$I$7];[.B377];[Variables.$I$7];[Variables.$I$6];[Variables.$I$7];[.C377];[Variables.$I$7];[Variables.$I$6];[Variables.$I$7];[.D377];[Variables.$I$7];[Variables.$I$6];[.E377];[Variables.$I$6];[.F377];[Variables.$I$6];[.G377];[Variables.$I$6];[.H377];[Variables.$I$6];[Variables.$I$1];[.I377];[.J377];[.K377];[.L377];[.M377];[.N377];[.O377];[Variables.$I$2];[Variables.$I$6];[.P377];[Variables.$I$6];[.Q377];[Variables.$I$6];[.R377];[Variables.$I$6];[.S377];[Variables.$I$6];[.T377];IF([.U377]&lt;&gt;&quot;&quot;;CONCATENATE([Variables.$I$6];[.U377]);&quot;&quot;);[Variables.$I$2];[Variables.$I$6]);IF([.B377]&lt;&gt;&quot;&quot;;CONCATENATE(&quot;#&quot;;[.B377]);&quot;&quot;))" office:value-type="string" office:string-value="[&quot;i1_mordor_orc_snaga&quot;,&quot;Orc_Snaga_of_Mordor&quot;,&quot;Orc_Snagas_of_Mordor&quot;,tf_orc| tf_no_capture_alive,0,0,fac_mordor,[itm_orc_coif_bad, itm_orc_coif, itm_orc_nosehelm_bad,itm_orc_skullcap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" calcext:value-type="string">
            <text:p>["i1_mordor_orc_snaga","Orc_Snaga_of_Mordor","Orc_Snagas_of_Mordor",tf_orc| tf_no_capture_alive,0,0,fac_mordor,[itm_orc_coif_bad, itm_orc_coif, itm_orc_nosehelm_bad,itm_orc_skullcap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</text:p>
          </table:table-cell>
          <table:table-cell table:style-name="ce7" office:value-type="string" calcext:value-type="string">
            <text:p>i1_mordor_orc_snaga</text:p>
          </table:table-cell>
          <table:table-cell table:style-name="ce7" office:value-type="string" calcext:value-type="string">
            <text:p>Orc_Snaga_of_Mordor</text:p>
          </table:table-cell>
          <table:table-cell table:style-name="ce7" office:value-type="string" calcext:value-type="string">
            <text:p>Orc_Snagas_of_Mordo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orc_coif_bad, itm_orc_coif, itm_orc_nosehelm_bad,itm_orc_skullcap_bad,</text:p>
          </table:table-cell>
          <table:table-cell table:style-name="ce11" office:value-type="string" calcext:value-type="string">
            <text:p>itm_m_orc_light_a,itm_m_orc_light_b,itm_m_orc_light_c,</text:p>
          </table:table-cell>
          <table:table-cell table:style-name="ce11"/>
          <table:table-cell table:style-name="ce11" office:value-type="string" calcext:value-type="string">
            <text:p>itm_orc_ragwrap,</text:p>
          </table:table-cell>
          <table:table-cell table:style-name="ce11" office:value-type="string" calcext:value-type="string">
            <text:p>itm_wood_club,itm_orc_slasher,itm_orc_axe,</text:p>
          </table:table-cell>
          <table:table-cell table:style-name="ce11"/>
          <table:table-cell table:style-name="ce11" office:value-type="string" calcext:value-type="string">
            <text:p>itm_metal_scraps_bad,itm_metal_scraps_medium,itm_metal_scraps_good,</text:p>
          </table:table-cell>
          <table:table-cell table:style-name="ce12" office:value-type="string" calcext:value-type="string">
            <text:p>attr_orc_tier_1</text:p>
          </table:table-cell>
          <table:table-cell table:style-name="ce12" office:value-type="string" calcext:value-type="string">
            <text:p>wp_orc_tier_1</text:p>
          </table:table-cell>
          <table:table-cell table:style-name="ce13" office:value-type="string" calcext:value-type="string">
            <text:p>knows_common|knows_power_strike_1|knows_power_throw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14" office:value-type="string" calcext:value-type="string">
            <text:p>orc_face1</text:p>
          </table:table-cell>
          <table:table-cell table:style-name="ce14" office:value-type="string" calcext:value-type="string">
            <text:p>orc_face2</text:p>
          </table:table-cell>
          <table:table-cell table:style-name="ce15"/>
          <table:table-cell table:style-name="ce6" table:formula="of:=IF(AND([.B377]&lt;&gt;&quot;&quot;;[.C377]&lt;&gt;&quot;&quot;);CONCATENATE([Variables.$I$1];[Variables.$I$7];[.B377];[Variables.$I$7];[Variables.$I$6];[Variables.$I$7];[.C377];[Variables.$I$7];[Variables.$I$6];[Variables.$I$7];[.D377];[Variables.$I$7];[Variables.$I$6];[.E377];[Variables.$I$6];[.F377];[Variables.$I$6];[.G377];[Variables.$I$6];[.H377];[Variables.$I$6];[Variables.$I$1];[.I377];[.J377];[.K377];[.L377];[.M377];[.N377];[.O377];[Variables.$I$2];[Variables.$I$6];[.P377];[Variables.$I$6];[.Q377];[Variables.$I$6];[.R377];[Variables.$I$6];[.S377];[Variables.$I$6];[.T377];IF([.U377]&lt;&gt;&quot;&quot;;CONCATENATE([Variables.$I$6];[.U377]);&quot;&quot;);[Variables.$I$2];[Variables.$I$6]);IF([.B377]&lt;&gt;&quot;&quot;;CONCATENATE(&quot;#&quot;;[.B377]);&quot;&quot;))" office:value-type="string" office:string-value="[&quot;i1_mordor_orc_snaga&quot;,&quot;Orc_Snaga_of_Mordor&quot;,&quot;Orc_Snagas_of_Mordor&quot;,tf_orc| tf_no_capture_alive,0,0,fac_mordor,[itm_orc_coif_bad, itm_orc_coif, itm_orc_nosehelm_bad,itm_orc_skullcap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" calcext:value-type="string">
            <text:p>["i1_mordor_orc_snaga","Orc_Snaga_of_Mordor","Orc_Snagas_of_Mordor",tf_orc| tf_no_capture_alive,0,0,fac_mordor,[itm_orc_coif_bad, itm_orc_coif, itm_orc_nosehelm_bad,itm_orc_skullcap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</text:p>
          </table:table-cell>
          <table:table-cell table:number-columns-repeated="16362"/>
        </table:table-row>
        <table:table-row table:style-name="ro1">
          <table:table-cell table:style-name="ce6" table:formula="of:=IF(AND([.B378]&lt;&gt;&quot;&quot;;[.C378]&lt;&gt;&quot;&quot;);CONCATENATE([Variables.$I$1];[Variables.$I$7];[.B378];[Variables.$I$7];[Variables.$I$6];[Variables.$I$7];[.C378];[Variables.$I$7];[Variables.$I$6];[Variables.$I$7];[.D378];[Variables.$I$7];[Variables.$I$6];[.E378];[Variables.$I$6];[.F378];[Variables.$I$6];[.G378];[Variables.$I$6];[.H378];[Variables.$I$6];[Variables.$I$1];[.I378];[.J378];[.K378];[.L378];[.M378];[.N378];[.O378];[Variables.$I$2];[Variables.$I$6];[.P378];[Variables.$I$6];[.Q378];[Variables.$I$6];[.R378];[Variables.$I$6];[.S378];[Variables.$I$6];[.T378];IF([.U378]&lt;&gt;&quot;&quot;;CONCATENATE([Variables.$I$6];[.U378]);&quot;&quot;);[Variables.$I$2];[Variables.$I$6]);IF([.B378]&lt;&gt;&quot;&quot;;CONCATENATE(&quot;#&quot;;[.B378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orc_skullcap,itm_orc_barbuta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" calcext:value-type="string">
            <text:p>["i2_mordor_orc","Orc_of_Mordor","Orcs_of_Mordor",tf_orc| tfg_armor| tf_no_capture_alive,0,0,fac_mordor,[itm_orc_coif_bad, itm_orc_coif, itm_orc_nosehelm, itm_orc_nosehelm_bad, itm_orc_visorhelm_bad,itm_orc_skullcap,itm_orc_barbuta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</text:p>
          </table:table-cell>
          <table:table-cell table:style-name="ce7" office:value-type="string" calcext:value-type="string">
            <text:p>i2_mordor_orc</text:p>
          </table:table-cell>
          <table:table-cell table:style-name="ce7" office:value-type="string" calcext:value-type="string">
            <text:p>Orc_of_Mordor</text:p>
          </table:table-cell>
          <table:table-cell table:style-name="ce7" office:value-type="string" calcext:value-type="string">
            <text:p>Orcs_of_Mordor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orc_coif_bad, itm_orc_coif, itm_orc_nosehelm, itm_orc_nosehelm_bad, itm_orc_visorhelm_bad,itm_orc_skullcap,itm_orc_barbuta_bad,</text:p>
          </table:table-cell>
          <table:table-cell table:style-name="ce11" office:value-type="string" calcext:value-type="string">
            <text:p>itm_m_orc_light_b,itm_m_orc_light_c,itm_m_orc_light_d,itm_m_orc_light_e,</text:p>
          </table:table-cell>
          <table:table-cell table:style-name="ce11"/>
          <table:table-cell table:style-name="ce11" office:value-type="string" calcext:value-type="string">
            <text:p>itm_orc_ragwrap,</text:p>
          </table:table-cell>
          <table:table-cell table:style-name="ce11" office:value-type="string" calcext:value-type="string">
            <text:p>itm_wood_club,itm_orc_falchion_bad,itm_orc_slasher_heavy,itm_orc_slasher,itm_orc_axe,</text:p>
          </table:table-cell>
          <table:table-cell table:style-name="ce11"/>
          <table:table-cell table:style-name="ce11" office:value-type="string" calcext:value-type="string">
            <text:p>itm_mordor_orc_shield_b,itm_mordor_orc_shield_c,itm_mordor_orc_shield_a,</text:p>
          </table:table-cell>
          <table:table-cell table:style-name="ce12" office:value-type="string" calcext:value-type="string">
            <text:p>attr_orc_tier_2</text:p>
          </table:table-cell>
          <table:table-cell table:style-name="ce12" office:value-type="string" calcext:value-type="string">
            <text:p>wp_orc_tier_2</text:p>
          </table:table-cell>
          <table:table-cell table:style-name="ce13" office:value-type="string" calcext:value-type="string">
            <text:p>knows_common|knows_power_strike_2|knows_power_throw_1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14" office:value-type="string" calcext:value-type="string">
            <text:p>orc_face7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B378]&lt;&gt;&quot;&quot;;[.C378]&lt;&gt;&quot;&quot;);CONCATENATE([Variables.$I$1];[Variables.$I$7];[.B378];[Variables.$I$7];[Variables.$I$6];[Variables.$I$7];[.C378];[Variables.$I$7];[Variables.$I$6];[Variables.$I$7];[.D378];[Variables.$I$7];[Variables.$I$6];[.E378];[Variables.$I$6];[.F378];[Variables.$I$6];[.G378];[Variables.$I$6];[.H378];[Variables.$I$6];[Variables.$I$1];[.I378];[.J378];[.K378];[.L378];[.M378];[.N378];[.O378];[Variables.$I$2];[Variables.$I$6];[.P378];[Variables.$I$6];[.Q378];[Variables.$I$6];[.R378];[Variables.$I$6];[.S378];[Variables.$I$6];[.T378];IF([.U378]&lt;&gt;&quot;&quot;;CONCATENATE([Variables.$I$6];[.U378]);&quot;&quot;);[Variables.$I$2];[Variables.$I$6]);IF([.B378]&lt;&gt;&quot;&quot;;CONCATENATE(&quot;#&quot;;[.B378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orc_skullcap,itm_orc_barbuta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" calcext:value-type="string">
            <text:p>["i2_mordor_orc","Orc_of_Mordor","Orcs_of_Mordor",tf_orc| tfg_armor| tf_no_capture_alive,0,0,fac_mordor,[itm_orc_coif_bad, itm_orc_coif, itm_orc_nosehelm, itm_orc_nosehelm_bad, itm_orc_visorhelm_bad,itm_orc_skullcap,itm_orc_barbuta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</text:p>
          </table:table-cell>
          <table:table-cell table:number-columns-repeated="16362"/>
        </table:table-row>
        <table:table-row table:style-name="ro1">
          <table:table-cell table:style-name="ce6" table:formula="of:=IF(AND([.B379]&lt;&gt;&quot;&quot;;[.C379]&lt;&gt;&quot;&quot;);CONCATENATE([Variables.$I$1];[Variables.$I$7];[.B379];[Variables.$I$7];[Variables.$I$6];[Variables.$I$7];[.C379];[Variables.$I$7];[Variables.$I$6];[Variables.$I$7];[.D379];[Variables.$I$7];[Variables.$I$6];[.E379];[Variables.$I$6];[.F379];[Variables.$I$6];[.G379];[Variables.$I$6];[.H379];[Variables.$I$6];[Variables.$I$1];[.I379];[.J379];[.K379];[.L379];[.M379];[.N379];[.O379];[Variables.$I$2];[Variables.$I$6];[.P379];[Variables.$I$6];[.Q379];[Variables.$I$6];[.R379];[Variables.$I$6];[.S379];[Variables.$I$6];[.T379];IF([.U379]&lt;&gt;&quot;&quot;;CONCATENATE([Variables.$I$6];[.U379]);&quot;&quot;);[Variables.$I$2];[Variables.$I$6]);IF([.B379]&lt;&gt;&quot;&quot;;CONCATENATE(&quot;#&quot;;[.B379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orc_coif,itm_orc_barbuta,itm_m_orc_light_d,itm_m_orc_light_e,itm_m_orc_heavy_a,itm_m_orc_heavy_b,itm_orc_mittens,itm_orc_greaves,itm_orc_falchion,itm_orc_slasher_heavy,itm_orc_axe_heavy,itm_orc_sabre_b,itm_mordor_orc_shield_b,itm_mordor_orc_shield_c,],attr_orc_tier_3,wp_orc_tier_3,knows_common|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orc_coif,itm_orc_barbuta,itm_m_orc_light_d,itm_m_orc_light_e,itm_m_orc_heavy_a,itm_m_orc_heavy_b,itm_orc_mittens,itm_orc_greaves,itm_orc_falchion,itm_orc_slasher_heavy,itm_orc_axe_heavy,itm_orc_sabre_b,itm_mordor_orc_shield_b,itm_mordor_orc_shield_c,],attr_orc_tier_3,wp_orc_tier_3,knows_common|knows_athletics_2|knows_power_strike_3|knows_power_throw_3,orc_face3,orc_face6],</text:p>
          </table:table-cell>
          <table:table-cell table:style-name="ce7" office:value-type="string" calcext:value-type="string">
            <text:p>i3_mordor_large_orc</text:p>
          </table:table-cell>
          <table:table-cell table:style-name="ce7" office:value-type="string" calcext:value-type="string">
            <text:p>Large_Orc_of_Mordor</text:p>
          </table:table-cell>
          <table:table-cell table:style-name="ce7" office:value-type="string" calcext:value-type="string">
            <text:p>Large_Orcs_of_Mordor</text:p>
          </table:table-cell>
          <table:table-cell table:style-name="ce8" office:value-type="string" calcext:value-type="string">
            <text:p>tf_orc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orc_nosehelm_good,itm_orc_kettlehelm_bad, itm_orc_kettlehelm, itm_orc_morion_bad, itm_orc_morion, itm_orc_visorhelm,itm_orc_coif,itm_orc_barbuta,</text:p>
          </table:table-cell>
          <table:table-cell table:style-name="ce11" office:value-type="string" calcext:value-type="string">
            <text:p>itm_m_orc_light_d,itm_m_orc_light_e,itm_m_orc_heavy_a,itm_m_orc_heavy_b,</text:p>
          </table:table-cell>
          <table:table-cell table:style-name="ce11" office:value-type="string" calcext:value-type="string">
            <text:p>itm_orc_mittens,</text:p>
          </table:table-cell>
          <table:table-cell table:style-name="ce11" office:value-type="string" calcext:value-type="string">
            <text:p>itm_orc_greaves,</text:p>
          </table:table-cell>
          <table:table-cell table:style-name="ce11" office:value-type="string" calcext:value-type="string">
            <text:p>itm_orc_falchion,itm_orc_slasher_heavy,itm_orc_axe_heavy,itm_orc_sabre_b,</text:p>
          </table:table-cell>
          <table:table-cell table:style-name="ce11"/>
          <table:table-cell table:style-name="ce11" office:value-type="string" calcext:value-type="string">
            <text:p>itm_mordor_orc_shield_b,itm_mordor_orc_shield_c,</text:p>
          </table:table-cell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3</text:p>
          </table:table-cell>
          <table:table-cell table:style-name="ce12" office:value-type="string" calcext:value-type="string">
            <text:p>knows_common|knows_athletics_2|knows_power_strike_3|knows_power_throw_3</text:p>
          </table:table-cell>
          <table:table-cell table:style-name="ce14" office:value-type="string" calcext:value-type="string">
            <text:p>orc_face3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B379]&lt;&gt;&quot;&quot;;[.C379]&lt;&gt;&quot;&quot;);CONCATENATE([Variables.$I$1];[Variables.$I$7];[.B379];[Variables.$I$7];[Variables.$I$6];[Variables.$I$7];[.C379];[Variables.$I$7];[Variables.$I$6];[Variables.$I$7];[.D379];[Variables.$I$7];[Variables.$I$6];[.E379];[Variables.$I$6];[.F379];[Variables.$I$6];[.G379];[Variables.$I$6];[.H379];[Variables.$I$6];[Variables.$I$1];[.I379];[.J379];[.K379];[.L379];[.M379];[.N379];[.O379];[Variables.$I$2];[Variables.$I$6];[.P379];[Variables.$I$6];[.Q379];[Variables.$I$6];[.R379];[Variables.$I$6];[.S379];[Variables.$I$6];[.T379];IF([.U379]&lt;&gt;&quot;&quot;;CONCATENATE([Variables.$I$6];[.U379]);&quot;&quot;);[Variables.$I$2];[Variables.$I$6]);IF([.B379]&lt;&gt;&quot;&quot;;CONCATENATE(&quot;#&quot;;[.B379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orc_coif,itm_orc_barbuta,itm_m_orc_light_d,itm_m_orc_light_e,itm_m_orc_heavy_a,itm_m_orc_heavy_b,itm_orc_mittens,itm_orc_greaves,itm_orc_falchion,itm_orc_slasher_heavy,itm_orc_axe_heavy,itm_orc_sabre_b,itm_mordor_orc_shield_b,itm_mordor_orc_shield_c,],attr_orc_tier_3,wp_orc_tier_3,knows_common|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orc_coif,itm_orc_barbuta,itm_m_orc_light_d,itm_m_orc_light_e,itm_m_orc_heavy_a,itm_m_orc_heavy_b,itm_orc_mittens,itm_orc_greaves,itm_orc_falchion,itm_orc_slasher_heavy,itm_orc_axe_heavy,itm_orc_sabre_b,itm_mordor_orc_shield_b,itm_mordor_orc_shield_c,],attr_orc_tier_3,wp_orc_tier_3,knows_common|knows_athletics_2|knows_power_strike_3|knows_power_throw_3,orc_face3,orc_face6],</text:p>
          </table:table-cell>
          <table:table-cell table:number-columns-repeated="16362"/>
        </table:table-row>
        <table:table-row table:style-name="ro1">
          <table:table-cell table:style-name="ce6" table:formula="of:=IF(AND([.B380]&lt;&gt;&quot;&quot;;[.C380]&lt;&gt;&quot;&quot;);CONCATENATE([Variables.$I$1];[Variables.$I$7];[.B380];[Variables.$I$7];[Variables.$I$6];[Variables.$I$7];[.C380];[Variables.$I$7];[Variables.$I$6];[Variables.$I$7];[.D380];[Variables.$I$7];[Variables.$I$6];[.E380];[Variables.$I$6];[.F380];[Variables.$I$6];[.G380];[Variables.$I$6];[.H380];[Variables.$I$6];[Variables.$I$1];[.I380];[.J380];[.K380];[.L380];[.M380];[.N380];[.O380];[Variables.$I$2];[Variables.$I$6];[.P380];[Variables.$I$6];[.Q380];[Variables.$I$6];[.R380];[Variables.$I$6];[.S380];[Variables.$I$6];[.T380];IF([.U380]&lt;&gt;&quot;&quot;;CONCATENATE([Variables.$I$6];[.U380]);&quot;&quot;);[Variables.$I$2];[Variables.$I$6]);IF([.B380]&lt;&gt;&quot;&quot;;CONCATENATE(&quot;#&quot;;[.B380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orc_barbuta_good,itm_m_orc_heavy_b,itm_m_orc_heavy_c,itm_m_orc_heavy_d,itm_m_orc_heavy_e,itm_evil_gauntlets_a, itm_orc_mittens,itm_orc_greaves,itm_orc_falchion_heavy,itm_orc_two_handed_axe,itm_orc_axe_heavy,itm_uruk_falchion_a,itm_orc_sabre_b_heavy,itm_orc_cleaver_a,itm_mordor_orc_shield_b,itm_mordor_orc_shield_c,itm_mordor_orc_shield_e,],attr_orc_tier_4,wp_orc_tier_4,knows_common|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orc_barbuta_good,itm_m_orc_heavy_b,itm_m_orc_heavy_c,itm_m_orc_heavy_d,itm_m_orc_heavy_e,itm_evil_gauntlets_a, itm_orc_mittens,itm_orc_greaves,itm_orc_falchion_heavy,itm_orc_two_handed_axe,itm_orc_axe_heavy,itm_uruk_falchion_a,itm_orc_sabre_b_heavy,itm_orc_cleaver_a,itm_mordor_orc_shield_b,itm_mordor_orc_shield_c,itm_mordor_orc_shield_e,],attr_orc_tier_4,wp_orc_tier_4,knows_common|knows_athletics_2|knows_power_strike_4|knows_power_throw_4,orc_face7,orc_face4],</text:p>
          </table:table-cell>
          <table:table-cell table:style-name="ce7" office:value-type="string" calcext:value-type="string">
            <text:p>i4_mordor_fell_orc</text:p>
          </table:table-cell>
          <table:table-cell table:style-name="ce7" office:value-type="string" calcext:value-type="string">
            <text:p>Fell_Orc_of_Mordor</text:p>
          </table:table-cell>
          <table:table-cell table:style-name="ce7" office:value-type="string" calcext:value-type="string">
            <text:p>Fell_Orcs_of_Mordor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orc_visorhelm_good, itm_orc_buckethelm_bad, itm_orc_buckethelm, itm_orc_kettlehelm_good,itm_orc_barbuta_good,</text:p>
          </table:table-cell>
          <table:table-cell table:style-name="ce11" office:value-type="string" calcext:value-type="string">
            <text:p>itm_m_orc_heavy_b,itm_m_orc_heavy_c,itm_m_orc_heavy_d,itm_m_orc_heavy_e,</text:p>
          </table:table-cell>
          <table:table-cell table:style-name="ce11" office:value-type="string" calcext:value-type="string">
            <text:p>itm_evil_gauntlets_a, itm_orc_mittens,</text:p>
          </table:table-cell>
          <table:table-cell table:style-name="ce11" office:value-type="string" calcext:value-type="string">
            <text:p>itm_orc_greaves,</text:p>
          </table:table-cell>
          <table:table-cell table:style-name="ce11" office:value-type="string" calcext:value-type="string">
            <text:p>itm_orc_falchion_heavy,itm_orc_two_handed_axe,itm_orc_axe_heavy,itm_uruk_falchion_a,itm_orc_sabre_b_heavy,itm_orc_cleaver_a,</text:p>
          </table:table-cell>
          <table:table-cell table:style-name="ce11" office:value-type="string" calcext:value-type="string">
            <text:p>itm_mordor_orc_shield_b,itm_mordor_orc_shield_c,itm_mordor_orc_shield_e,</text:p>
          </table:table-cell>
          <table:table-cell table:style-name="ce11"/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athletics_2|knows_power_strike_4|knows_power_throw_4</text:p>
          </table:table-cell>
          <table:table-cell table:style-name="ce14" office:value-type="string" calcext:value-type="string">
            <text:p>orc_face7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B380]&lt;&gt;&quot;&quot;;[.C380]&lt;&gt;&quot;&quot;);CONCATENATE([Variables.$I$1];[Variables.$I$7];[.B380];[Variables.$I$7];[Variables.$I$6];[Variables.$I$7];[.C380];[Variables.$I$7];[Variables.$I$6];[Variables.$I$7];[.D380];[Variables.$I$7];[Variables.$I$6];[.E380];[Variables.$I$6];[.F380];[Variables.$I$6];[.G380];[Variables.$I$6];[.H380];[Variables.$I$6];[Variables.$I$1];[.I380];[.J380];[.K380];[.L380];[.M380];[.N380];[.O380];[Variables.$I$2];[Variables.$I$6];[.P380];[Variables.$I$6];[.Q380];[Variables.$I$6];[.R380];[Variables.$I$6];[.S380];[Variables.$I$6];[.T380];IF([.U380]&lt;&gt;&quot;&quot;;CONCATENATE([Variables.$I$6];[.U380]);&quot;&quot;);[Variables.$I$2];[Variables.$I$6]);IF([.B380]&lt;&gt;&quot;&quot;;CONCATENATE(&quot;#&quot;;[.B380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orc_barbuta_good,itm_m_orc_heavy_b,itm_m_orc_heavy_c,itm_m_orc_heavy_d,itm_m_orc_heavy_e,itm_evil_gauntlets_a, itm_orc_mittens,itm_orc_greaves,itm_orc_falchion_heavy,itm_orc_two_handed_axe,itm_orc_axe_heavy,itm_uruk_falchion_a,itm_orc_sabre_b_heavy,itm_orc_cleaver_a,itm_mordor_orc_shield_b,itm_mordor_orc_shield_c,itm_mordor_orc_shield_e,],attr_orc_tier_4,wp_orc_tier_4,knows_common|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orc_barbuta_good,itm_m_orc_heavy_b,itm_m_orc_heavy_c,itm_m_orc_heavy_d,itm_m_orc_heavy_e,itm_evil_gauntlets_a, itm_orc_mittens,itm_orc_greaves,itm_orc_falchion_heavy,itm_orc_two_handed_axe,itm_orc_axe_heavy,itm_uruk_falchion_a,itm_orc_sabre_b_heavy,itm_orc_cleaver_a,itm_mordor_orc_shield_b,itm_mordor_orc_shield_c,itm_mordor_orc_shield_e,],attr_orc_tier_4,wp_orc_tier_4,knows_common|knows_athletics_2|knows_power_strike_4|knows_power_throw_4,orc_face7,orc_face4],</text:p>
          </table:table-cell>
          <table:table-cell table:number-columns-repeated="16362"/>
        </table:table-row>
        <table:table-row table:style-name="ro1">
          <table:table-cell table:style-name="ce6" table:formula="of:=IF(AND([.B381]&lt;&gt;&quot;&quot;;[.C381]&lt;&gt;&quot;&quot;);CONCATENATE([Variables.$I$1];[Variables.$I$7];[.B381];[Variables.$I$7];[Variables.$I$6];[Variables.$I$7];[.C381];[Variables.$I$7];[Variables.$I$6];[Variables.$I$7];[.D381];[Variables.$I$7];[Variables.$I$6];[.E381];[Variables.$I$6];[.F381];[Variables.$I$6];[.G381];[Variables.$I$6];[.H381];[Variables.$I$6];[Variables.$I$1];[.I381];[.J381];[.K381];[.L381];[.M381];[.N381];[.O381];[Variables.$I$2];[Variables.$I$6];[.P381];[Variables.$I$6];[.Q381];[Variables.$I$6];[.R381];[Variables.$I$6];[.S381];[Variables.$I$6];[.T381];IF([.U381]&lt;&gt;&quot;&quot;;CONCATENATE([Variables.$I$6];[.U381]);&quot;&quot;);[Variables.$I$2];[Variables.$I$6]);IF([.B381]&lt;&gt;&quot;&quot;;CONCATENATE(&quot;#&quot;;[.B381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mittens_bad,itm_orc_throwing_arrow,itm_orc_throwing_arrow,itm_orc_scimitar_b, itm_orc_sabre_b_heavy, itm_uruk_falchion_a,itm_orc_club_b,itm_warg_1d,itm_warg_1b,itm_warg_1c,],attr_orc_tier_3,wp_orc_tier_3,knows_common|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mittens_bad,itm_orc_throwing_arrow,itm_orc_throwing_arrow,itm_orc_scimitar_b, itm_orc_sabre_b_heavy, itm_uruk_falchion_a,itm_orc_club_b,itm_warg_1d,itm_warg_1b,itm_warg_1c,],attr_orc_tier_3,wp_orc_tier_3,knows_common|knows_horse_archery_2|knows_riding_4|knows_power_throw_3|knows_power_strike_4,orc_face5,orc_face8],</text:p>
          </table:table-cell>
          <table:table-cell table:style-name="ce7" office:value-type="string" calcext:value-type="string">
            <text:p>c3_mordor_warg_rider</text:p>
          </table:table-cell>
          <table:table-cell table:style-name="ce7" office:value-type="string" calcext:value-type="string">
            <text:p>Warg_Rider_of_Gorgoroth</text:p>
          </table:table-cell>
          <table:table-cell table:style-name="ce7" office:value-type="string" calcext:value-type="string">
            <text:p>Warg_Riders_of_Gorgoroth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orc_coif_bad, itm_orc_coif, itm_orc_nosehelm_bad, itm_orc_nosehelm,itm_orc_visorhelm_bad,</text:p>
          </table:table-cell>
          <table:table-cell table:style-name="ce11" office:value-type="string" calcext:value-type="string">
            <text:p>itm_m_orc_light_a,itm_m_orc_light_b,itm_m_orc_light_c,</text:p>
          </table:table-cell>
          <table:table-cell table:style-name="ce11" office:value-type="string" calcext:value-type="string">
            <text:p>itm_orc_mittens_bad,</text:p>
          </table:table-cell>
          <table:table-cell table:style-name="ce11"/>
          <table:table-cell table:style-name="ce11" office:value-type="string" calcext:value-type="string">
            <text:p>itm_orc_throwing_arrow,itm_orc_throwing_arrow,</text:p>
          </table:table-cell>
          <table:table-cell table:style-name="ce11" office:value-type="string" calcext:value-type="string">
            <text:p>itm_orc_scimitar_b, itm_orc_sabre_b_heavy, itm_uruk_falchion_a,itm_orc_club_b,</text:p>
          </table:table-cell>
          <table:table-cell table:style-name="ce11" office:value-type="string" calcext:value-type="string">
            <text:p>itm_warg_1d,itm_warg_1b,itm_warg_1c,</text:p>
          </table:table-cell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3</text:p>
          </table:table-cell>
          <table:table-cell table:style-name="ce12" office:value-type="string" calcext:value-type="string">
            <text:p>knows_common|knows_horse_archery_2|knows_riding_4|knows_power_throw_3|knows_power_strike_4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B381]&lt;&gt;&quot;&quot;;[.C381]&lt;&gt;&quot;&quot;);CONCATENATE([Variables.$I$1];[Variables.$I$7];[.B381];[Variables.$I$7];[Variables.$I$6];[Variables.$I$7];[.C381];[Variables.$I$7];[Variables.$I$6];[Variables.$I$7];[.D381];[Variables.$I$7];[Variables.$I$6];[.E381];[Variables.$I$6];[.F381];[Variables.$I$6];[.G381];[Variables.$I$6];[.H381];[Variables.$I$6];[Variables.$I$1];[.I381];[.J381];[.K381];[.L381];[.M381];[.N381];[.O381];[Variables.$I$2];[Variables.$I$6];[.P381];[Variables.$I$6];[.Q381];[Variables.$I$6];[.R381];[Variables.$I$6];[.S381];[Variables.$I$6];[.T381];IF([.U381]&lt;&gt;&quot;&quot;;CONCATENATE([Variables.$I$6];[.U381]);&quot;&quot;);[Variables.$I$2];[Variables.$I$6]);IF([.B381]&lt;&gt;&quot;&quot;;CONCATENATE(&quot;#&quot;;[.B381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mittens_bad,itm_orc_throwing_arrow,itm_orc_throwing_arrow,itm_orc_scimitar_b, itm_orc_sabre_b_heavy, itm_uruk_falchion_a,itm_orc_club_b,itm_warg_1d,itm_warg_1b,itm_warg_1c,],attr_orc_tier_3,wp_orc_tier_3,knows_common|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mittens_bad,itm_orc_throwing_arrow,itm_orc_throwing_arrow,itm_orc_scimitar_b, itm_orc_sabre_b_heavy, itm_uruk_falchion_a,itm_orc_club_b,itm_warg_1d,itm_warg_1b,itm_warg_1c,],attr_orc_tier_3,wp_orc_tier_3,knows_common|knows_horse_archery_2|knows_riding_4|knows_power_throw_3|knows_power_strike_4,orc_face5,orc_face8],</text:p>
          </table:table-cell>
          <table:table-cell table:number-columns-repeated="16362"/>
        </table:table-row>
        <table:table-row table:style-name="ro1">
          <table:table-cell table:style-name="ce6" table:formula="of:=IF(AND([.B382]&lt;&gt;&quot;&quot;;[.C382]&lt;&gt;&quot;&quot;);CONCATENATE([Variables.$I$1];[Variables.$I$7];[.B382];[Variables.$I$7];[Variables.$I$6];[Variables.$I$7];[.C382];[Variables.$I$7];[Variables.$I$6];[Variables.$I$7];[.D382];[Variables.$I$7];[Variables.$I$6];[.E382];[Variables.$I$6];[.F382];[Variables.$I$6];[.G382];[Variables.$I$6];[.H382];[Variables.$I$6];[Variables.$I$1];[.I382];[.J382];[.K382];[.L382];[.M382];[.N382];[.O382];[Variables.$I$2];[Variables.$I$6];[.P382];[Variables.$I$6];[.Q382];[Variables.$I$6];[.R382];[Variables.$I$6];[.S382];[Variables.$I$6];[.T382];IF([.U382]&lt;&gt;&quot;&quot;;CONCATENATE([Variables.$I$6];[.U382]);&quot;&quot;);[Variables.$I$2];[Variables.$I$6]);IF([.B382]&lt;&gt;&quot;&quot;;CONCATENATE(&quot;#&quot;;[.B382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orc_coif,itm_m_orc_light_b,itm_m_orc_light_c,itm_m_orc_light_d,itm_m_orc_light_e,itm_evil_gauntlets_a, itm_orc_mittens,itm_orc_ragwrap,itm_orc_throwing_arrow,itm_orc_throwing_arrow,itm_orc_scimitar_b_heavy,itm_orc_sabre_b_heavy,itm_orc_cleaver_a,itm_orc_club_b_heavy,itm_wargarmored_1b, itm_wargarmored_1c,],attr_orc_tier_4,wp_orc_tier_4,knows_common|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orc_coif,itm_m_orc_light_b,itm_m_orc_light_c,itm_m_orc_light_d,itm_m_orc_light_e,itm_evil_gauntlets_a, itm_orc_mittens,itm_orc_ragwrap,itm_orc_throwing_arrow,itm_orc_throwing_arrow,itm_orc_scimitar_b_heavy,itm_orc_sabre_b_heavy,itm_orc_cleaver_a,itm_orc_club_b_heavy,itm_wargarmored_1b, itm_wargarmored_1c,],attr_orc_tier_4,wp_orc_tier_4,knows_common|knows_riding_5|knows_horse_archery_3|knows_power_throw_4|knows_power_strike_4,orc_face7,orc_face8],</text:p>
          </table:table-cell>
          <table:table-cell table:style-name="ce7" office:value-type="string" calcext:value-type="string">
            <text:p>c4_mordor_great_warg_rider</text:p>
          </table:table-cell>
          <table:table-cell table:style-name="ce7" office:value-type="string" calcext:value-type="string">
            <text:p>Great_Warg_Rider_of_Udun</text:p>
          </table:table-cell>
          <table:table-cell table:style-name="ce7" office:value-type="string" calcext:value-type="string">
            <text:p>Great_Warg_Riders_of_Udun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orc_visorhelm, itm_orc_nosehelm,itm_orc_coif,</text:p>
          </table:table-cell>
          <table:table-cell table:style-name="ce11" office:value-type="string" calcext:value-type="string">
            <text:p>itm_m_orc_light_b,itm_m_orc_light_c,itm_m_orc_light_d,itm_m_orc_light_e,</text:p>
          </table:table-cell>
          <table:table-cell table:style-name="ce11" office:value-type="string" calcext:value-type="string">
            <text:p>itm_evil_gauntlets_a, itm_orc_mittens,</text:p>
          </table:table-cell>
          <table:table-cell table:style-name="ce11" office:value-type="string" calcext:value-type="string">
            <text:p>itm_orc_ragwrap,</text:p>
          </table:table-cell>
          <table:table-cell table:style-name="ce11" office:value-type="string" calcext:value-type="string">
            <text:p>itm_orc_throwing_arrow,itm_orc_throwing_arrow,</text:p>
          </table:table-cell>
          <table:table-cell table:style-name="ce11" office:value-type="string" calcext:value-type="string">
            <text:p>itm_orc_scimitar_b_heavy,itm_orc_sabre_b_heavy,itm_orc_cleaver_a,itm_orc_club_b_heavy,</text:p>
          </table:table-cell>
          <table:table-cell table:style-name="ce11" office:value-type="string" calcext:value-type="string">
            <text:p>itm_wargarmored_1b, itm_wargarmored_1c,</text:p>
          </table:table-cell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riding_5|knows_horse_archery_3|knows_power_throw_4|knows_power_strike_4</text:p>
          </table:table-cell>
          <table:table-cell table:style-name="ce14" office:value-type="string" calcext:value-type="string">
            <text:p>orc_face7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B382]&lt;&gt;&quot;&quot;;[.C382]&lt;&gt;&quot;&quot;);CONCATENATE([Variables.$I$1];[Variables.$I$7];[.B382];[Variables.$I$7];[Variables.$I$6];[Variables.$I$7];[.C382];[Variables.$I$7];[Variables.$I$6];[Variables.$I$7];[.D382];[Variables.$I$7];[Variables.$I$6];[.E382];[Variables.$I$6];[.F382];[Variables.$I$6];[.G382];[Variables.$I$6];[.H382];[Variables.$I$6];[Variables.$I$1];[.I382];[.J382];[.K382];[.L382];[.M382];[.N382];[.O382];[Variables.$I$2];[Variables.$I$6];[.P382];[Variables.$I$6];[.Q382];[Variables.$I$6];[.R382];[Variables.$I$6];[.S382];[Variables.$I$6];[.T382];IF([.U382]&lt;&gt;&quot;&quot;;CONCATENATE([Variables.$I$6];[.U382]);&quot;&quot;);[Variables.$I$2];[Variables.$I$6]);IF([.B382]&lt;&gt;&quot;&quot;;CONCATENATE(&quot;#&quot;;[.B382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orc_coif,itm_m_orc_light_b,itm_m_orc_light_c,itm_m_orc_light_d,itm_m_orc_light_e,itm_evil_gauntlets_a, itm_orc_mittens,itm_orc_ragwrap,itm_orc_throwing_arrow,itm_orc_throwing_arrow,itm_orc_scimitar_b_heavy,itm_orc_sabre_b_heavy,itm_orc_cleaver_a,itm_orc_club_b_heavy,itm_wargarmored_1b, itm_wargarmored_1c,],attr_orc_tier_4,wp_orc_tier_4,knows_common|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orc_coif,itm_m_orc_light_b,itm_m_orc_light_c,itm_m_orc_light_d,itm_m_orc_light_e,itm_evil_gauntlets_a, itm_orc_mittens,itm_orc_ragwrap,itm_orc_throwing_arrow,itm_orc_throwing_arrow,itm_orc_scimitar_b_heavy,itm_orc_sabre_b_heavy,itm_orc_cleaver_a,itm_orc_club_b_heavy,itm_wargarmored_1b, itm_wargarmored_1c,],attr_orc_tier_4,wp_orc_tier_4,knows_common|knows_riding_5|knows_horse_archery_3|knows_power_throw_4|knows_power_strike_4,orc_face7,orc_face8],</text:p>
          </table:table-cell>
          <table:table-cell table:number-columns-repeated="16362"/>
        </table:table-row>
        <table:table-row table:style-name="ro1">
          <table:table-cell table:style-name="ce6" table:formula="of:=IF(AND([.B383]&lt;&gt;&quot;&quot;;[.C383]&lt;&gt;&quot;&quot;);CONCATENATE([Variables.$I$1];[Variables.$I$7];[.B383];[Variables.$I$7];[Variables.$I$6];[Variables.$I$7];[.C383];[Variables.$I$7];[Variables.$I$6];[Variables.$I$7];[.D383];[Variables.$I$7];[Variables.$I$6];[.E383];[Variables.$I$6];[.F383];[Variables.$I$6];[.G383];[Variables.$I$6];[.H383];[Variables.$I$6];[Variables.$I$1];[.I383];[.J383];[.K383];[.L383];[.M383];[.N383];[.O383];[Variables.$I$2];[Variables.$I$6];[.P383];[Variables.$I$6];[.Q383];[Variables.$I$6];[.R383];[Variables.$I$6];[.S383];[Variables.$I$6];[.T383];IF([.U383]&lt;&gt;&quot;&quot;;CONCATENATE([Variables.$I$6];[.U383]);&quot;&quot;);[Variables.$I$2];[Variables.$I$6]);IF([.B383]&lt;&gt;&quot;&quot;;CONCATENATE(&quot;#&quot;;[.B383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orc_coif,itm_m_orc_light_b,itm_m_orc_light_c,itm_m_orc_light_d,itm_m_orc_light_e,itm_orc_ragwrap,itm_orc_simple_spear,itm_orc_bill_bad,itm_orc_mangler_bad,itm_wood_club,itm_orc_slasher,itm_orc_slasher,itm_mordor_orc_shield_c,itm_mordor_orc_shield_d,],attr_orc_tier_2,wp_orc_tier_2,knows_common|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orc_coif,itm_m_orc_light_b,itm_m_orc_light_c,itm_m_orc_light_d,itm_m_orc_light_e,itm_orc_ragwrap,itm_orc_simple_spear,itm_orc_bill_bad,itm_orc_mangler_bad,itm_wood_club,itm_orc_slasher,itm_orc_slasher,itm_mordor_orc_shield_c,itm_mordor_orc_shield_d,],attr_orc_tier_2,wp_orc_tier_2,knows_common|knows_athletics_2|knows_power_strike_3,orc_face5,orc_face4],</text:p>
          </table:table-cell>
          <table:table-cell table:style-name="ce7" office:value-type="string" calcext:value-type="string">
            <text:p>i2_mordor_morgul_orc</text:p>
          </table:table-cell>
          <table:table-cell table:style-name="ce7" office:value-type="string" calcext:value-type="string">
            <text:p>Orc_of_Minas_Morgul</text:p>
          </table:table-cell>
          <table:table-cell table:style-name="ce7" office:value-type="string" calcext:value-type="string">
            <text:p>Orcs_of_Minas_Morgul</text:p>
          </table:table-cell>
          <table:table-cell table:style-name="ce8" office:value-type="string" calcext:value-type="string">
            <text:p>tf_orc| tfg_armor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orc_kettlehelm_bad,itm_orc_morion_bad,itm_orc_visorhelm_bad,itm_orc_coif,</text:p>
          </table:table-cell>
          <table:table-cell table:style-name="ce11" office:value-type="string" calcext:value-type="string">
            <text:p>itm_m_orc_light_b,itm_m_orc_light_c,itm_m_orc_light_d,itm_m_orc_light_e,</text:p>
          </table:table-cell>
          <table:table-cell table:style-name="ce11"/>
          <table:table-cell table:style-name="ce11" office:value-type="string" calcext:value-type="string">
            <text:p>itm_orc_ragwrap,</text:p>
          </table:table-cell>
          <table:table-cell table:style-name="ce11" office:value-type="string" calcext:value-type="string">
            <text:p>itm_orc_simple_spear,itm_orc_bill_bad,itm_orc_mangler_bad,</text:p>
          </table:table-cell>
          <table:table-cell table:style-name="ce11" office:value-type="string" calcext:value-type="string">
            <text:p>itm_wood_club,itm_orc_slasher,itm_orc_slasher,itm_mordor_orc_shield_c,itm_mordor_orc_shield_d,</text:p>
          </table:table-cell>
          <table:table-cell table:style-name="ce11"/>
          <table:table-cell table:style-name="ce12" office:value-type="string" calcext:value-type="string">
            <text:p>attr_orc_tier_2</text:p>
          </table:table-cell>
          <table:table-cell table:style-name="ce12" office:value-type="string" calcext:value-type="string">
            <text:p>wp_orc_tier_2</text:p>
          </table:table-cell>
          <table:table-cell table:style-name="ce12" office:value-type="string" calcext:value-type="string">
            <text:p>knows_common|knows_athletics_2|knows_power_strike_3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B383]&lt;&gt;&quot;&quot;;[.C383]&lt;&gt;&quot;&quot;);CONCATENATE([Variables.$I$1];[Variables.$I$7];[.B383];[Variables.$I$7];[Variables.$I$6];[Variables.$I$7];[.C383];[Variables.$I$7];[Variables.$I$6];[Variables.$I$7];[.D383];[Variables.$I$7];[Variables.$I$6];[.E383];[Variables.$I$6];[.F383];[Variables.$I$6];[.G383];[Variables.$I$6];[.H383];[Variables.$I$6];[Variables.$I$1];[.I383];[.J383];[.K383];[.L383];[.M383];[.N383];[.O383];[Variables.$I$2];[Variables.$I$6];[.P383];[Variables.$I$6];[.Q383];[Variables.$I$6];[.R383];[Variables.$I$6];[.S383];[Variables.$I$6];[.T383];IF([.U383]&lt;&gt;&quot;&quot;;CONCATENATE([Variables.$I$6];[.U383]);&quot;&quot;);[Variables.$I$2];[Variables.$I$6]);IF([.B383]&lt;&gt;&quot;&quot;;CONCATENATE(&quot;#&quot;;[.B383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orc_coif,itm_m_orc_light_b,itm_m_orc_light_c,itm_m_orc_light_d,itm_m_orc_light_e,itm_orc_ragwrap,itm_orc_simple_spear,itm_orc_bill_bad,itm_orc_mangler_bad,itm_wood_club,itm_orc_slasher,itm_orc_slasher,itm_mordor_orc_shield_c,itm_mordor_orc_shield_d,],attr_orc_tier_2,wp_orc_tier_2,knows_common|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orc_coif,itm_m_orc_light_b,itm_m_orc_light_c,itm_m_orc_light_d,itm_m_orc_light_e,itm_orc_ragwrap,itm_orc_simple_spear,itm_orc_bill_bad,itm_orc_mangler_bad,itm_wood_club,itm_orc_slasher,itm_orc_slasher,itm_mordor_orc_shield_c,itm_mordor_orc_shield_d,],attr_orc_tier_2,wp_orc_tier_2,knows_common|knows_athletics_2|knows_power_strike_3,orc_face5,orc_face4],</text:p>
          </table:table-cell>
          <table:table-cell table:number-columns-repeated="16362"/>
        </table:table-row>
        <table:table-row table:style-name="ro1">
          <table:table-cell table:style-name="ce6" table:formula="of:=IF(AND([.B384]&lt;&gt;&quot;&quot;;[.C384]&lt;&gt;&quot;&quot;);CONCATENATE([Variables.$I$1];[Variables.$I$7];[.B384];[Variables.$I$7];[Variables.$I$6];[Variables.$I$7];[.C384];[Variables.$I$7];[Variables.$I$6];[Variables.$I$7];[.D384];[Variables.$I$7];[Variables.$I$6];[.E384];[Variables.$I$6];[.F384];[Variables.$I$6];[.G384];[Variables.$I$6];[.H384];[Variables.$I$6];[Variables.$I$1];[.I384];[.J384];[.K384];[.L384];[.M384];[.N384];[.O384];[Variables.$I$2];[Variables.$I$6];[.P384];[Variables.$I$6];[.Q384];[Variables.$I$6];[.R384];[Variables.$I$6];[.S384];[Variables.$I$6];[.T384];IF([.U384]&lt;&gt;&quot;&quot;;CONCATENATE([Variables.$I$6];[.U384]);&quot;&quot;);[Variables.$I$2];[Variables.$I$6]);IF([.B384]&lt;&gt;&quot;&quot;;CONCATENATE(&quot;#&quot;;[.B384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orc_coif_good,itm_m_orc_heavy_b,itm_m_orc_heavy_c,itm_m_orc_heavy_d,itm_m_orc_heavy_e,itm_orc_ragwrap,itm_orc_bill_heavy, itm_orc_simple_spear_heavy,itm_orc_mangler,itm_orc_slasher,itm_orc_slasher,itm_mordor_uruk_shield_c,],attr_orc_tier_4,wp_orc_tier_4,knows_common|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orc_coif_good,itm_m_orc_heavy_b,itm_m_orc_heavy_c,itm_m_orc_heavy_d,itm_m_orc_heavy_e,itm_orc_ragwrap,itm_orc_bill_heavy, itm_orc_simple_spear_heavy,itm_orc_mangler,itm_orc_slasher,itm_orc_slasher,itm_mordor_uruk_shield_c,],attr_orc_tier_4,wp_orc_tier_4,knows_common|knows_athletics_2|knows_shield_1|knows_power_strike_4,orc_face5,orc_face4],</text:p>
          </table:table-cell>
          <table:table-cell table:style-name="ce7" office:value-type="string" calcext:value-type="string">
            <text:p>i4_mordor_fell_morgul_orc</text:p>
          </table:table-cell>
          <table:table-cell table:style-name="ce7" office:value-type="string" calcext:value-type="string">
            <text:p>Fell_Orc_of_Minas_Morgul</text:p>
          </table:table-cell>
          <table:table-cell table:style-name="ce7" office:value-type="string" calcext:value-type="string">
            <text:p>Fell_Orcs_of_Minas_Morgul</text:p>
          </table:table-cell>
          <table:table-cell table:style-name="ce8" office:value-type="string" calcext:value-type="string">
            <text:p>tf_orc| tfg_armor| tfg_helm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orc_kettlehelm_good, itm_orc_morion_good, itm_orc_buckethelm_good,itm_orc_coif_good,</text:p>
          </table:table-cell>
          <table:table-cell table:style-name="ce11" office:value-type="string" calcext:value-type="string">
            <text:p>itm_m_orc_heavy_b,itm_m_orc_heavy_c,itm_m_orc_heavy_d,itm_m_orc_heavy_e,</text:p>
          </table:table-cell>
          <table:table-cell table:style-name="ce11"/>
          <table:table-cell table:style-name="ce11" office:value-type="string" calcext:value-type="string">
            <text:p>itm_orc_ragwrap,</text:p>
          </table:table-cell>
          <table:table-cell table:style-name="ce11" office:value-type="string" calcext:value-type="string">
            <text:p>itm_orc_bill_heavy, itm_orc_simple_spear_heavy,itm_orc_mangler,</text:p>
          </table:table-cell>
          <table:table-cell table:style-name="ce11" office:value-type="string" calcext:value-type="string">
            <text:p>itm_orc_slasher,itm_orc_slasher,itm_mordor_uruk_shield_c,</text:p>
          </table:table-cell>
          <table:table-cell table:style-name="ce11"/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athletics_2|knows_shield_1|knows_power_strike_4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B384]&lt;&gt;&quot;&quot;;[.C384]&lt;&gt;&quot;&quot;);CONCATENATE([Variables.$I$1];[Variables.$I$7];[.B384];[Variables.$I$7];[Variables.$I$6];[Variables.$I$7];[.C384];[Variables.$I$7];[Variables.$I$6];[Variables.$I$7];[.D384];[Variables.$I$7];[Variables.$I$6];[.E384];[Variables.$I$6];[.F384];[Variables.$I$6];[.G384];[Variables.$I$6];[.H384];[Variables.$I$6];[Variables.$I$1];[.I384];[.J384];[.K384];[.L384];[.M384];[.N384];[.O384];[Variables.$I$2];[Variables.$I$6];[.P384];[Variables.$I$6];[.Q384];[Variables.$I$6];[.R384];[Variables.$I$6];[.S384];[Variables.$I$6];[.T384];IF([.U384]&lt;&gt;&quot;&quot;;CONCATENATE([Variables.$I$6];[.U384]);&quot;&quot;);[Variables.$I$2];[Variables.$I$6]);IF([.B384]&lt;&gt;&quot;&quot;;CONCATENATE(&quot;#&quot;;[.B384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orc_coif_good,itm_m_orc_heavy_b,itm_m_orc_heavy_c,itm_m_orc_heavy_d,itm_m_orc_heavy_e,itm_orc_ragwrap,itm_orc_bill_heavy, itm_orc_simple_spear_heavy,itm_orc_mangler,itm_orc_slasher,itm_orc_slasher,itm_mordor_uruk_shield_c,],attr_orc_tier_4,wp_orc_tier_4,knows_common|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orc_coif_good,itm_m_orc_heavy_b,itm_m_orc_heavy_c,itm_m_orc_heavy_d,itm_m_orc_heavy_e,itm_orc_ragwrap,itm_orc_bill_heavy, itm_orc_simple_spear_heavy,itm_orc_mangler,itm_orc_slasher,itm_orc_slasher,itm_mordor_uruk_shield_c,],attr_orc_tier_4,wp_orc_tier_4,knows_common|knows_athletics_2|knows_shield_1|knows_power_strike_4,orc_face5,orc_face4],</text:p>
          </table:table-cell>
          <table:table-cell table:number-columns-repeated="16362"/>
        </table:table-row>
        <table:table-row table:style-name="ro1">
          <table:table-cell table:formula="of:=IF(AND([.B385]&lt;&gt;&quot;&quot;;[.C385]&lt;&gt;&quot;&quot;);CONCATENATE([Variables.$I$1];[Variables.$I$7];[.B385];[Variables.$I$7];[Variables.$I$6];[Variables.$I$7];[.C385];[Variables.$I$7];[Variables.$I$6];[Variables.$I$7];[.D385];[Variables.$I$7];[Variables.$I$6];[.E385];[Variables.$I$6];[.F385];[Variables.$I$6];[.G385];[Variables.$I$6];[.H385];[Variables.$I$6];[Variables.$I$1];[.I385];[.J385];[.K385];[.L385];[.M385];[.N385];[.O385];[Variables.$I$2];[Variables.$I$6];[.P385];[Variables.$I$6];[.Q385];[Variables.$I$6];[.R385];[Variables.$I$6];[.S385];[Variables.$I$6];[.T385];IF([.U385]&lt;&gt;&quot;&quot;;CONCATENATE([Variables.$I$6];[.U385]);&quot;&quot;);[Variables.$I$2];[Variables.$I$6]);IF([.B385]&lt;&gt;&quot;&quot;;CONCATENATE(&quot;#&quot;;[.B385]);&quot;&quot;))">
            <text:p/>
          </table:table-cell>
          <table:table-cell table:style-name="ce7" table:number-columns-repeated="3"/>
          <table:table-cell table:style-name="ce8"/>
          <table:table-cell table:style-name="ce9" table:number-columns-repeated="2"/>
          <table:table-cell table:style-name="ce10"/>
          <table:table-cell table:style-name="ce11" table:number-columns-repeated="7"/>
          <table:table-cell table:style-name="ce12" table:number-columns-repeated="3"/>
          <table:table-cell table:style-name="ce14" table:number-columns-repeated="2"/>
          <table:table-cell table:style-name="ce15"/>
          <table:table-cell table:style-name="ce6"/>
          <table:table-cell table:number-columns-repeated="16362"/>
        </table:table-row>
        <table:table-row table:style-name="ro1">
          <table:table-cell table:style-name="ce6" table:formula="of:=IF(AND([.B386]&lt;&gt;&quot;&quot;;[.C386]&lt;&gt;&quot;&quot;);CONCATENATE([Variables.$I$1];[Variables.$I$7];[.B386];[Variables.$I$7];[Variables.$I$6];[Variables.$I$7];[.C386];[Variables.$I$7];[Variables.$I$6];[Variables.$I$7];[.D386];[Variables.$I$7];[Variables.$I$6];[.E386];[Variables.$I$6];[.F386];[Variables.$I$6];[.G386];[Variables.$I$6];[.H386];[Variables.$I$6];[Variables.$I$1];[.I386];[.J386];[.K386];[.L386];[.M386];[.N386];[.O386];[Variables.$I$2];[Variables.$I$6];[.P386];[Variables.$I$6];[.Q386];[Variables.$I$6];[.R386];[Variables.$I$6];[.S386];[Variables.$I$6];[.T386];IF([.U386]&lt;&gt;&quot;&quot;;CONCATENATE([Variables.$I$6];[.U386]);&quot;&quot;);[Variables.$I$2];[Variables.$I$6]);IF([.B386]&lt;&gt;&quot;&quot;;CONCATENATE(&quot;#&quot;;[.B386]);&quot;&quot;))" office:value-type="string" office:string-value="#Changed these two below to Guldur" calcext:value-type="string">
            <text:p>#Changed these two below to Guldur</text:p>
          </table:table-cell>
          <table:table-cell table:style-name="ce5" office:value-type="string" calcext:value-type="string">
            <text:p>Changed these two below to Guldur</text:p>
          </table:table-cell>
          <table:table-cell table:style-name="ce6" table:number-columns-repeated="19"/>
          <table:table-cell table:style-name="ce6" table:formula="of:=IF(AND([.B386]&lt;&gt;&quot;&quot;;[.C386]&lt;&gt;&quot;&quot;);CONCATENATE([Variables.$I$1];[Variables.$I$7];[.B386];[Variables.$I$7];[Variables.$I$6];[Variables.$I$7];[.C386];[Variables.$I$7];[Variables.$I$6];[Variables.$I$7];[.D386];[Variables.$I$7];[Variables.$I$6];[.E386];[Variables.$I$6];[.F386];[Variables.$I$6];[.G386];[Variables.$I$6];[.H386];[Variables.$I$6];[Variables.$I$1];[.I386];[.J386];[.K386];[.L386];[.M386];[.N386];[.O386];[Variables.$I$2];[Variables.$I$6];[.P386];[Variables.$I$6];[.Q386];[Variables.$I$6];[.R386];[Variables.$I$6];[.S386];[Variables.$I$6];[.T386];IF([.U386]&lt;&gt;&quot;&quot;;CONCATENATE([Variables.$I$6];[.U386]);&quot;&quot;);[Variables.$I$2];[Variables.$I$6]);IF([.B386]&lt;&gt;&quot;&quot;;CONCATENATE(&quot;#&quot;;[.B386]);&quot;&quot;))" office:value-type="string" office:string-value="#Changed these two below to Guldur" calcext:value-type="string">
            <text:p>#Changed these two below to Guldur</text:p>
          </table:table-cell>
          <table:table-cell table:number-columns-repeated="16362"/>
        </table:table-row>
        <table:table-row table:style-name="ro1">
          <table:table-cell table:style-name="ce6" table:formula="of:=IF(AND([.B387]&lt;&gt;&quot;&quot;;[.C387]&lt;&gt;&quot;&quot;);CONCATENATE([Variables.$I$1];[Variables.$I$7];[.B387];[Variables.$I$7];[Variables.$I$6];[Variables.$I$7];[.C387];[Variables.$I$7];[Variables.$I$6];[Variables.$I$7];[.D387];[Variables.$I$7];[Variables.$I$6];[.E387];[Variables.$I$6];[.F387];[Variables.$I$6];[.G387];[Variables.$I$6];[.H387];[Variables.$I$6];[Variables.$I$1];[.I387];[.J387];[.K387];[.L387];[.M387];[.N387];[.O387];[Variables.$I$2];[Variables.$I$6];[.P387];[Variables.$I$6];[.Q387];[Variables.$I$6];[.R387];[Variables.$I$6];[.S387];[Variables.$I$6];[.T387];IF([.U387]&lt;&gt;&quot;&quot;;CONCATENATE([Variables.$I$6];[.U387]);&quot;&quot;);[Variables.$I$2];[Variables.$I$6]);IF([.B387]&lt;&gt;&quot;&quot;;CONCATENATE(&quot;#&quot;;[.B387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skullcap_bad, itm_orc_nosehelm_bad,itm_m_orc_light_b,itm_m_orc_light_c,itm_orc_ragwrap,itm_orc_bow,itm_orc_hook_arrow,itm_orc_mace_bad,],attr_orc_tier_3,wp_orc_tier_3,knows_common|knows_riding_1|knows_athletics_5|knows_power_draw_3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skullcap_bad, itm_orc_nosehelm_bad,itm_m_orc_light_b,itm_m_orc_light_c,itm_orc_ragwrap,itm_orc_bow,itm_orc_hook_arrow,itm_orc_mace_bad,],attr_orc_tier_3,wp_orc_tier_3,knows_common|knows_riding_1|knows_athletics_5|knows_power_draw_3|knows_power_strike_2,orc_face9,orc_face4],</text:p>
          </table:table-cell>
          <table:table-cell table:style-name="ce7" office:value-type="string" calcext:value-type="string">
            <text:p>a3_guldur_large_orc_tracker</text:p>
          </table:table-cell>
          <table:table-cell table:style-name="ce7" office:value-type="string" calcext:value-type="string">
            <text:p>Large_Orc_Tracker_of_Dol_Guldur</text:p>
          </table:table-cell>
          <table:table-cell table:style-name="ce7" office:value-type="string" calcext:value-type="string">
            <text:p>Large_Orc_Trackers_of_Dol_Guldur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uldur</text:p>
          </table:table-cell>
          <table:table-cell table:style-name="ce11" office:value-type="string" calcext:value-type="string">
            <text:p>itm_orc_skullcap_bad, itm_orc_nosehelm_bad,</text:p>
          </table:table-cell>
          <table:table-cell table:style-name="ce11" office:value-type="string" calcext:value-type="string">
            <text:p>itm_m_orc_light_b,itm_m_orc_light_c,</text:p>
          </table:table-cell>
          <table:table-cell table:style-name="ce11"/>
          <table:table-cell table:style-name="ce11" office:value-type="string" calcext:value-type="string">
            <text:p>itm_orc_ragwrap,</text:p>
          </table:table-cell>
          <table:table-cell table:style-name="ce11" office:value-type="string" calcext:value-type="string">
            <text:p>itm_orc_bow,itm_orc_hook_arrow,</text:p>
          </table:table-cell>
          <table:table-cell table:style-name="ce11" office:value-type="string" calcext:value-type="string">
            <text:p>itm_orc_mace_bad,</text:p>
          </table:table-cell>
          <table:table-cell table:style-name="ce11"/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3</text:p>
          </table:table-cell>
          <table:table-cell table:style-name="ce12" office:value-type="string" calcext:value-type="string">
            <text:p>knows_common|knows_riding_1|knows_athletics_5|knows_power_draw_3|knows_power_strike_2</text:p>
          </table:table-cell>
          <table:table-cell table:style-name="ce14" office:value-type="string" calcext:value-type="string">
            <text:p>orc_face9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B387]&lt;&gt;&quot;&quot;;[.C387]&lt;&gt;&quot;&quot;);CONCATENATE([Variables.$I$1];[Variables.$I$7];[.B387];[Variables.$I$7];[Variables.$I$6];[Variables.$I$7];[.C387];[Variables.$I$7];[Variables.$I$6];[Variables.$I$7];[.D387];[Variables.$I$7];[Variables.$I$6];[.E387];[Variables.$I$6];[.F387];[Variables.$I$6];[.G387];[Variables.$I$6];[.H387];[Variables.$I$6];[Variables.$I$1];[.I387];[.J387];[.K387];[.L387];[.M387];[.N387];[.O387];[Variables.$I$2];[Variables.$I$6];[.P387];[Variables.$I$6];[.Q387];[Variables.$I$6];[.R387];[Variables.$I$6];[.S387];[Variables.$I$6];[.T387];IF([.U387]&lt;&gt;&quot;&quot;;CONCATENATE([Variables.$I$6];[.U387]);&quot;&quot;);[Variables.$I$2];[Variables.$I$6]);IF([.B387]&lt;&gt;&quot;&quot;;CONCATENATE(&quot;#&quot;;[.B387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skullcap_bad, itm_orc_nosehelm_bad,itm_m_orc_light_b,itm_m_orc_light_c,itm_orc_ragwrap,itm_orc_bow,itm_orc_hook_arrow,itm_orc_mace_bad,],attr_orc_tier_3,wp_orc_tier_3,knows_common|knows_riding_1|knows_athletics_5|knows_power_draw_3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skullcap_bad, itm_orc_nosehelm_bad,itm_m_orc_light_b,itm_m_orc_light_c,itm_orc_ragwrap,itm_orc_bow,itm_orc_hook_arrow,itm_orc_mace_bad,],attr_orc_tier_3,wp_orc_tier_3,knows_common|knows_riding_1|knows_athletics_5|knows_power_draw_3|knows_power_strike_2,orc_face9,orc_face4],</text:p>
          </table:table-cell>
          <table:table-cell table:number-columns-repeated="16362"/>
        </table:table-row>
        <table:table-row table:style-name="ro1">
          <table:table-cell table:style-name="ce6" table:formula="of:=IF(AND([.B388]&lt;&gt;&quot;&quot;;[.C388]&lt;&gt;&quot;&quot;);CONCATENATE([Variables.$I$1];[Variables.$I$7];[.B388];[Variables.$I$7];[Variables.$I$6];[Variables.$I$7];[.C388];[Variables.$I$7];[Variables.$I$6];[Variables.$I$7];[.D388];[Variables.$I$7];[Variables.$I$6];[.E388];[Variables.$I$6];[.F388];[Variables.$I$6];[.G388];[Variables.$I$6];[.H388];[Variables.$I$6];[Variables.$I$1];[.I388];[.J388];[.K388];[.L388];[.M388];[.N388];[.O388];[Variables.$I$2];[Variables.$I$6];[.P388];[Variables.$I$6];[.Q388];[Variables.$I$6];[.R388];[Variables.$I$6];[.S388];[Variables.$I$6];[.T388];IF([.U388]&lt;&gt;&quot;&quot;;CONCATENATE([Variables.$I$6];[.U388]);&quot;&quot;);[Variables.$I$2];[Variables.$I$6]);IF([.B388]&lt;&gt;&quot;&quot;;CONCATENATE(&quot;#&quot;;[.B388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skullcap_good, itm_orc_nosehelm_bad, itm_orc_nosehelm,itm_m_orc_light_c,itm_m_orc_light_d,itm_m_orc_light_e,itm_m_orc_light_c,itm_evil_gauntlets_a,itm_orc_furboots,itm_uruk_bow,itm_black_arrows_reward,itm_orc_mace,],str_12| agi_11| int_7| cha_7|level(20),wp_orc_tier_5,knows_common|knows_riding_1|knows_athletics_7|knows_power_draw_4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skullcap_good, itm_orc_nosehelm_bad, itm_orc_nosehelm,itm_m_orc_light_c,itm_m_orc_light_d,itm_m_orc_light_e,itm_m_orc_light_c,itm_evil_gauntlets_a,itm_orc_furboots,itm_uruk_bow,itm_black_arrows_reward,itm_orc_mace,],str_12| agi_11| int_7| cha_7|level(20),wp_orc_tier_5,knows_common|knows_riding_1|knows_athletics_7|knows_power_draw_4|knows_power_strike_3|knows_ironflesh_2,orc_face1,orc_face4],</text:p>
          </table:table-cell>
          <table:table-cell table:style-name="ce7" office:value-type="string" calcext:value-type="string">
            <text:p>a4_guldur_fell_orc_tracker</text:p>
          </table:table-cell>
          <table:table-cell table:style-name="ce7" office:value-type="string" calcext:value-type="string">
            <text:p>Fell_Orc_Tracker_of_Dol_Guldur</text:p>
          </table:table-cell>
          <table:table-cell table:style-name="ce7" office:value-type="string" calcext:value-type="string">
            <text:p>Fell_Orc_Trackers_of_Dol_Guldur</text:p>
          </table:table-cell>
          <table:table-cell table:style-name="ce8" office:value-type="string" calcext:value-type="string">
            <text:p>tf_orc| tfg_ranged| tfg_helm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uldur</text:p>
          </table:table-cell>
          <table:table-cell table:style-name="ce11" office:value-type="string" calcext:value-type="string">
            <text:p>itm_orc_skullcap_good, itm_orc_nosehelm_bad, itm_orc_nosehelm,</text:p>
          </table:table-cell>
          <table:table-cell table:style-name="ce11" office:value-type="string" calcext:value-type="string">
            <text:p>itm_m_orc_light_c,itm_m_orc_light_d,itm_m_orc_light_e,itm_m_orc_light_c,</text:p>
          </table:table-cell>
          <table:table-cell table:style-name="ce11" office:value-type="string" calcext:value-type="string">
            <text:p>itm_evil_gauntlets_a,</text:p>
          </table:table-cell>
          <table:table-cell table:style-name="ce11" office:value-type="string" calcext:value-type="string">
            <text:p>itm_orc_furboots,</text:p>
          </table:table-cell>
          <table:table-cell table:style-name="ce11" office:value-type="string" calcext:value-type="string">
            <text:p>itm_uruk_bow,itm_black_arrows_reward,</text:p>
          </table:table-cell>
          <table:table-cell table:style-name="ce11" office:value-type="string" calcext:value-type="string">
            <text:p>itm_orc_mace,</text:p>
          </table:table-cell>
          <table:table-cell table:style-name="ce11"/>
          <table:table-cell table:style-name="ce12" office:value-type="string" calcext:value-type="string">
            <text:p>str_12| agi_11| int_7| cha_7|level(20)</text:p>
          </table:table-cell>
          <table:table-cell table:style-name="ce12" office:value-type="string" calcext:value-type="string">
            <text:p>wp_orc_tier_5</text:p>
          </table:table-cell>
          <table:table-cell table:style-name="ce12" office:value-type="string" calcext:value-type="string">
            <text:p>knows_common|knows_riding_1|knows_athletics_7|knows_power_draw_4|knows_power_strike_3|knows_ironflesh_2</text:p>
          </table:table-cell>
          <table:table-cell table:style-name="ce14" office:value-type="string" calcext:value-type="string">
            <text:p>orc_face1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B388]&lt;&gt;&quot;&quot;;[.C388]&lt;&gt;&quot;&quot;);CONCATENATE([Variables.$I$1];[Variables.$I$7];[.B388];[Variables.$I$7];[Variables.$I$6];[Variables.$I$7];[.C388];[Variables.$I$7];[Variables.$I$6];[Variables.$I$7];[.D388];[Variables.$I$7];[Variables.$I$6];[.E388];[Variables.$I$6];[.F388];[Variables.$I$6];[.G388];[Variables.$I$6];[.H388];[Variables.$I$6];[Variables.$I$1];[.I388];[.J388];[.K388];[.L388];[.M388];[.N388];[.O388];[Variables.$I$2];[Variables.$I$6];[.P388];[Variables.$I$6];[.Q388];[Variables.$I$6];[.R388];[Variables.$I$6];[.S388];[Variables.$I$6];[.T388];IF([.U388]&lt;&gt;&quot;&quot;;CONCATENATE([Variables.$I$6];[.U388]);&quot;&quot;);[Variables.$I$2];[Variables.$I$6]);IF([.B388]&lt;&gt;&quot;&quot;;CONCATENATE(&quot;#&quot;;[.B388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skullcap_good, itm_orc_nosehelm_bad, itm_orc_nosehelm,itm_m_orc_light_c,itm_m_orc_light_d,itm_m_orc_light_e,itm_m_orc_light_c,itm_evil_gauntlets_a,itm_orc_furboots,itm_uruk_bow,itm_black_arrows_reward,itm_orc_mace,],str_12| agi_11| int_7| cha_7|level(20),wp_orc_tier_5,knows_common|knows_riding_1|knows_athletics_7|knows_power_draw_4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skullcap_good, itm_orc_nosehelm_bad, itm_orc_nosehelm,itm_m_orc_light_c,itm_m_orc_light_d,itm_m_orc_light_e,itm_m_orc_light_c,itm_evil_gauntlets_a,itm_orc_furboots,itm_uruk_bow,itm_black_arrows_reward,itm_orc_mace,],str_12| agi_11| int_7| cha_7|level(20),wp_orc_tier_5,knows_common|knows_riding_1|knows_athletics_7|knows_power_draw_4|knows_power_strike_3|knows_ironflesh_2,orc_face1,orc_face4],</text:p>
          </table:table-cell>
          <table:table-cell table:number-columns-repeated="16362"/>
        </table:table-row>
        <table:table-row table:style-name="ro1">
          <table:table-cell table:formula="of:=IF(AND([.B389]&lt;&gt;&quot;&quot;;[.C389]&lt;&gt;&quot;&quot;);CONCATENATE([Variables.$I$1];[Variables.$I$7];[.B389];[Variables.$I$7];[Variables.$I$6];[Variables.$I$7];[.C389];[Variables.$I$7];[Variables.$I$6];[Variables.$I$7];[.D389];[Variables.$I$7];[Variables.$I$6];[.E389];[Variables.$I$6];[.F389];[Variables.$I$6];[.G389];[Variables.$I$6];[.H389];[Variables.$I$6];[Variables.$I$1];[.I389];[.J389];[.K389];[.L389];[.M389];[.N389];[.O389];[Variables.$I$2];[Variables.$I$6];[.P389];[Variables.$I$6];[.Q389];[Variables.$I$6];[.R389];[Variables.$I$6];[.S389];[Variables.$I$6];[.T389];IF([.U389]&lt;&gt;&quot;&quot;;CONCATENATE([Variables.$I$6];[.U389]);&quot;&quot;);[Variables.$I$2];[Variables.$I$6]);IF([.B389]&lt;&gt;&quot;&quot;;CONCATENATE(&quot;#&quot;;[.B389]);&quot;&quot;))">
            <text:p/>
          </table:table-cell>
          <table:table-cell table:style-name="ce7" table:number-columns-repeated="3"/>
          <table:table-cell table:style-name="ce8"/>
          <table:table-cell table:style-name="ce9" table:number-columns-repeated="2"/>
          <table:table-cell table:style-name="ce10"/>
          <table:table-cell table:style-name="ce11" table:number-columns-repeated="7"/>
          <table:table-cell table:style-name="ce12" table:number-columns-repeated="3"/>
          <table:table-cell table:style-name="ce14" table:number-columns-repeated="2"/>
          <table:table-cell table:style-name="ce15"/>
          <table:table-cell table:style-name="ce6"/>
          <table:table-cell table:number-columns-repeated="16362"/>
        </table:table-row>
        <table:table-row table:style-name="ro1">
          <table:table-cell table:style-name="ce6" table:formula="of:=IF(AND([.B390]&lt;&gt;&quot;&quot;;[.C390]&lt;&gt;&quot;&quot;);CONCATENATE([Variables.$I$1];[Variables.$I$7];[.B390];[Variables.$I$7];[Variables.$I$6];[Variables.$I$7];[.C390];[Variables.$I$7];[Variables.$I$6];[Variables.$I$7];[.D390];[Variables.$I$7];[Variables.$I$6];[.E390];[Variables.$I$6];[.F390];[Variables.$I$6];[.G390];[Variables.$I$6];[.H390];[Variables.$I$6];[Variables.$I$1];[.I390];[.J390];[.K390];[.L390];[.M390];[.N390];[.O390];[Variables.$I$2];[Variables.$I$6];[.P390];[Variables.$I$6];[.Q390];[Variables.$I$6];[.R390];[Variables.$I$6];[.S390];[Variables.$I$6];[.T390];IF([.U390]&lt;&gt;&quot;&quot;;CONCATENATE([Variables.$I$6];[.U390]);&quot;&quot;);[Variables.$I$2];[Variables.$I$6]);IF([.B390]&lt;&gt;&quot;&quot;;CONCATENATE(&quot;#&quot;;[.B390]);&quot;&quot;))" office:value-type="string" office:string-value="[&quot;a2_mordor_orc_archer&quot;,&quot;Orc_Archer_of_Mordor&quot;,&quot;Orc_Archers_of_Mordor&quot;,tf_orc| tfg_ranged| tfg_armor| tf_no_capture_alive,0,0,fac_mordor,[itm_orc_coif_bad, itm_orc_nosehelm_bad,itm_orc_skullcap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" calcext:value-type="string">
            <text:p>["a2_mordor_orc_archer","Orc_Archer_of_Mordor","Orc_Archers_of_Mordor",tf_orc| tfg_ranged| tfg_armor| tf_no_capture_alive,0,0,fac_mordor,[itm_orc_coif_bad, itm_orc_nosehelm_bad,itm_orc_skullcap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</text:p>
          </table:table-cell>
          <table:table-cell table:style-name="ce7" office:value-type="string" calcext:value-type="string">
            <text:p>a2_mordor_orc_archer</text:p>
          </table:table-cell>
          <table:table-cell table:style-name="ce7" office:value-type="string" calcext:value-type="string">
            <text:p>Orc_Archer_of_Mordor</text:p>
          </table:table-cell>
          <table:table-cell table:style-name="ce7" office:value-type="string" calcext:value-type="string">
            <text:p>Orc_Archers_of_Mordo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orc_coif_bad, itm_orc_nosehelm_bad,itm_orc_skullcap_bad,</text:p>
          </table:table-cell>
          <table:table-cell table:style-name="ce11" office:value-type="string" calcext:value-type="string">
            <text:p>itm_m_orc_light_b,itm_m_orc_light_c,itm_m_orc_light_d,itm_m_orc_light_e,</text:p>
          </table:table-cell>
          <table:table-cell table:style-name="ce11" table:number-columns-repeated="2"/>
          <table:table-cell table:style-name="ce11" office:value-type="string" calcext:value-type="string">
            <text:p>itm_orc_bow,itm_orc_hook_arrow,</text:p>
          </table:table-cell>
          <table:table-cell table:style-name="ce11" office:value-type="string" calcext:value-type="string">
            <text:p>itm_wood_club,itm_orc_slasher,itm_orc_axe,</text:p>
          </table:table-cell>
          <table:table-cell table:style-name="ce11"/>
          <table:table-cell table:style-name="ce12" office:value-type="string" calcext:value-type="string">
            <text:p>attr_orc_tier_2</text:p>
          </table:table-cell>
          <table:table-cell table:style-name="ce12" office:value-type="string" calcext:value-type="string">
            <text:p>wp_orc_tier_bow_2</text:p>
          </table:table-cell>
          <table:table-cell table:style-name="ce13" office:value-type="string" calcext:value-type="string">
            <text:p>knows_common|knows_power_throw_1|knows_power_draw_2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14" office:value-type="string" calcext:value-type="string">
            <text:p>orc_face7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B390]&lt;&gt;&quot;&quot;;[.C390]&lt;&gt;&quot;&quot;);CONCATENATE([Variables.$I$1];[Variables.$I$7];[.B390];[Variables.$I$7];[Variables.$I$6];[Variables.$I$7];[.C390];[Variables.$I$7];[Variables.$I$6];[Variables.$I$7];[.D390];[Variables.$I$7];[Variables.$I$6];[.E390];[Variables.$I$6];[.F390];[Variables.$I$6];[.G390];[Variables.$I$6];[.H390];[Variables.$I$6];[Variables.$I$1];[.I390];[.J390];[.K390];[.L390];[.M390];[.N390];[.O390];[Variables.$I$2];[Variables.$I$6];[.P390];[Variables.$I$6];[.Q390];[Variables.$I$6];[.R390];[Variables.$I$6];[.S390];[Variables.$I$6];[.T390];IF([.U390]&lt;&gt;&quot;&quot;;CONCATENATE([Variables.$I$6];[.U390]);&quot;&quot;);[Variables.$I$2];[Variables.$I$6]);IF([.B390]&lt;&gt;&quot;&quot;;CONCATENATE(&quot;#&quot;;[.B390]);&quot;&quot;))" office:value-type="string" office:string-value="[&quot;a2_mordor_orc_archer&quot;,&quot;Orc_Archer_of_Mordor&quot;,&quot;Orc_Archers_of_Mordor&quot;,tf_orc| tfg_ranged| tfg_armor| tf_no_capture_alive,0,0,fac_mordor,[itm_orc_coif_bad, itm_orc_nosehelm_bad,itm_orc_skullcap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" calcext:value-type="string">
            <text:p>["a2_mordor_orc_archer","Orc_Archer_of_Mordor","Orc_Archers_of_Mordor",tf_orc| tfg_ranged| tfg_armor| tf_no_capture_alive,0,0,fac_mordor,[itm_orc_coif_bad, itm_orc_nosehelm_bad,itm_orc_skullcap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</text:p>
          </table:table-cell>
          <table:table-cell table:number-columns-repeated="16362"/>
        </table:table-row>
        <table:table-row table:style-name="ro1">
          <table:table-cell table:style-name="ce6" table:formula="of:=IF(AND([.B391]&lt;&gt;&quot;&quot;;[.C391]&lt;&gt;&quot;&quot;);CONCATENATE([Variables.$I$1];[Variables.$I$7];[.B391];[Variables.$I$7];[Variables.$I$6];[Variables.$I$7];[.C391];[Variables.$I$7];[Variables.$I$6];[Variables.$I$7];[.D391];[Variables.$I$7];[Variables.$I$6];[.E391];[Variables.$I$6];[.F391];[Variables.$I$6];[.G391];[Variables.$I$6];[.H391];[Variables.$I$6];[Variables.$I$1];[.I391];[.J391];[.K391];[.L391];[.M391];[.N391];[.O391];[Variables.$I$2];[Variables.$I$6];[.P391];[Variables.$I$6];[.Q391];[Variables.$I$6];[.R391];[Variables.$I$6];[.S391];[Variables.$I$6];[.T391];IF([.U391]&lt;&gt;&quot;&quot;;CONCATENATE([Variables.$I$6];[.U391]);&quot;&quot;);[Variables.$I$2];[Variables.$I$6]);IF([.B391]&lt;&gt;&quot;&quot;;CONCATENATE(&quot;#&quot;;[.B391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orc_skullcap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orc_skullcap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</text:p>
          </table:table-cell>
          <table:table-cell table:style-name="ce7" office:value-type="string" calcext:value-type="string">
            <text:p>a3_mordor_large_orc_archer</text:p>
          </table:table-cell>
          <table:table-cell table:style-name="ce7" office:value-type="string" calcext:value-type="string">
            <text:p>Large_Orc_Archer_of_Mordor</text:p>
          </table:table-cell>
          <table:table-cell table:style-name="ce7" office:value-type="string" calcext:value-type="string">
            <text:p>Large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orc_kettlehelm_bad, itm_orc_coif, itm_orc_nosehelm,itm_orc_skullcap,</text:p>
          </table:table-cell>
          <table:table-cell table:style-name="ce11" office:value-type="string" calcext:value-type="string">
            <text:p>itm_m_orc_light_b,itm_m_orc_light_c,itm_m_orc_light_d,itm_m_orc_light_e,</text:p>
          </table:table-cell>
          <table:table-cell table:style-name="ce11"/>
          <table:table-cell table:style-name="ce11" office:value-type="string" calcext:value-type="string">
            <text:p>itm_orc_ragwrap,</text:p>
          </table:table-cell>
          <table:table-cell table:style-name="ce11" office:value-type="string" calcext:value-type="string">
            <text:p>itm_orc_bow,itm_orc_hook_arrow,</text:p>
          </table:table-cell>
          <table:table-cell table:style-name="ce11" office:value-type="string" calcext:value-type="string">
            <text:p>itm_orc_slasher_heavy,itm_orc_falchion_bad,itm_orc_axe,</text:p>
          </table:table-cell>
          <table:table-cell table:style-name="ce11"/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bow_3</text:p>
          </table:table-cell>
          <table:table-cell table:style-name="ce12" office:value-type="string" calcext:value-type="string">
            <text:p>knows_common|knows_athletics_2|knows_power_draw_3|knows_power_strike_2</text:p>
          </table:table-cell>
          <table:table-cell table:style-name="ce14" office:value-type="string" calcext:value-type="string">
            <text:p>orc_face9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B391]&lt;&gt;&quot;&quot;;[.C391]&lt;&gt;&quot;&quot;);CONCATENATE([Variables.$I$1];[Variables.$I$7];[.B391];[Variables.$I$7];[Variables.$I$6];[Variables.$I$7];[.C391];[Variables.$I$7];[Variables.$I$6];[Variables.$I$7];[.D391];[Variables.$I$7];[Variables.$I$6];[.E391];[Variables.$I$6];[.F391];[Variables.$I$6];[.G391];[Variables.$I$6];[.H391];[Variables.$I$6];[Variables.$I$1];[.I391];[.J391];[.K391];[.L391];[.M391];[.N391];[.O391];[Variables.$I$2];[Variables.$I$6];[.P391];[Variables.$I$6];[.Q391];[Variables.$I$6];[.R391];[Variables.$I$6];[.S391];[Variables.$I$6];[.T391];IF([.U391]&lt;&gt;&quot;&quot;;CONCATENATE([Variables.$I$6];[.U391]);&quot;&quot;);[Variables.$I$2];[Variables.$I$6]);IF([.B391]&lt;&gt;&quot;&quot;;CONCATENATE(&quot;#&quot;;[.B391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orc_skullcap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orc_skullcap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</text:p>
          </table:table-cell>
          <table:table-cell table:number-columns-repeated="16362"/>
        </table:table-row>
        <table:table-row table:style-name="ro1">
          <table:table-cell table:style-name="ce6" table:formula="of:=IF(AND([.B392]&lt;&gt;&quot;&quot;;[.C392]&lt;&gt;&quot;&quot;);CONCATENATE([Variables.$I$1];[Variables.$I$7];[.B392];[Variables.$I$7];[Variables.$I$6];[Variables.$I$7];[.C392];[Variables.$I$7];[Variables.$I$6];[Variables.$I$7];[.D392];[Variables.$I$7];[Variables.$I$6];[.E392];[Variables.$I$6];[.F392];[Variables.$I$6];[.G392];[Variables.$I$6];[.H392];[Variables.$I$6];[Variables.$I$1];[.I392];[.J392];[.K392];[.L392];[.M392];[.N392];[.O392];[Variables.$I$2];[Variables.$I$6];[.P392];[Variables.$I$6];[.Q392];[Variables.$I$6];[.R392];[Variables.$I$6];[.S392];[Variables.$I$6];[.T392];IF([.U392]&lt;&gt;&quot;&quot;;CONCATENATE([Variables.$I$6];[.U392]);&quot;&quot;);[Variables.$I$2];[Variables.$I$6]);IF([.B392]&lt;&gt;&quot;&quot;;CONCATENATE(&quot;#&quot;;[.B392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</text:p>
          </table:table-cell>
          <table:table-cell table:style-name="ce7" office:value-type="string" calcext:value-type="string">
            <text:p>a4_mordor_fell_orc_archer</text:p>
          </table:table-cell>
          <table:table-cell table:style-name="ce7" office:value-type="string" calcext:value-type="string">
            <text:p>Fell_Orc_Archer_of_Mordor</text:p>
          </table:table-cell>
          <table:table-cell table:style-name="ce7" office:value-type="string" calcext:value-type="string">
            <text:p>Fell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orc_kettlehelm, itm_orc_coif_good, itm_orc_buckethelm_bad,</text:p>
          </table:table-cell>
          <table:table-cell table:style-name="ce11" office:value-type="string" calcext:value-type="string">
            <text:p>itm_m_orc_light_d,itm_m_orc_light_e,itm_m_orc_heavy_a,itm_m_orc_heavy_b,</text:p>
          </table:table-cell>
          <table:table-cell table:style-name="ce11" office:value-type="string" calcext:value-type="string">
            <text:p>itm_evil_gauntlets_a,</text:p>
          </table:table-cell>
          <table:table-cell table:style-name="ce11" office:value-type="string" calcext:value-type="string">
            <text:p>itm_orc_greaves,</text:p>
          </table:table-cell>
          <table:table-cell table:style-name="ce11" office:value-type="string" calcext:value-type="string">
            <text:p>itm_orc_bow,itm_orc_hook_arrow,</text:p>
          </table:table-cell>
          <table:table-cell table:style-name="ce11" office:value-type="string" calcext:value-type="string">
            <text:p>itm_orc_slasher_heavy,itm_orc_falchion,</text:p>
          </table:table-cell>
          <table:table-cell table:style-name="ce11"/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bow_4</text:p>
          </table:table-cell>
          <table:table-cell table:style-name="ce12" office:value-type="string" calcext:value-type="string">
            <text:p>knows_common|knows_athletics_4|knows_power_draw_4|knows_power_strike_2</text:p>
          </table:table-cell>
          <table:table-cell table:style-name="ce14" office:value-type="string" calcext:value-type="string">
            <text:p>orc_face7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B392]&lt;&gt;&quot;&quot;;[.C392]&lt;&gt;&quot;&quot;);CONCATENATE([Variables.$I$1];[Variables.$I$7];[.B392];[Variables.$I$7];[Variables.$I$6];[Variables.$I$7];[.C392];[Variables.$I$7];[Variables.$I$6];[Variables.$I$7];[.D392];[Variables.$I$7];[Variables.$I$6];[.E392];[Variables.$I$6];[.F392];[Variables.$I$6];[.G392];[Variables.$I$6];[.H392];[Variables.$I$6];[Variables.$I$1];[.I392];[.J392];[.K392];[.L392];[.M392];[.N392];[.O392];[Variables.$I$2];[Variables.$I$6];[.P392];[Variables.$I$6];[.Q392];[Variables.$I$6];[.R392];[Variables.$I$6];[.S392];[Variables.$I$6];[.T392];IF([.U392]&lt;&gt;&quot;&quot;;CONCATENATE([Variables.$I$6];[.U392]);&quot;&quot;);[Variables.$I$2];[Variables.$I$6]);IF([.B392]&lt;&gt;&quot;&quot;;CONCATENATE(&quot;#&quot;;[.B392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</text:p>
          </table:table-cell>
          <table:table-cell table:number-columns-repeated="16362"/>
        </table:table-row>
        <table:table-row table:style-name="ro1">
          <table:table-cell table:formula="of:=IF(AND([.B393]&lt;&gt;&quot;&quot;;[.C393]&lt;&gt;&quot;&quot;);CONCATENATE([Variables.$I$1];[Variables.$I$7];[.B393];[Variables.$I$7];[Variables.$I$6];[Variables.$I$7];[.C393];[Variables.$I$7];[Variables.$I$6];[Variables.$I$7];[.D393];[Variables.$I$7];[Variables.$I$6];[.E393];[Variables.$I$6];[.F393];[Variables.$I$6];[.G393];[Variables.$I$6];[.H393];[Variables.$I$6];[Variables.$I$1];[.I393];[.J393];[.K393];[.L393];[.M393];[.N393];[.O393];[Variables.$I$2];[Variables.$I$6];[.P393];[Variables.$I$6];[.Q393];[Variables.$I$6];[.R393];[Variables.$I$6];[.S393];[Variables.$I$6];[.T393];IF([.U393]&lt;&gt;&quot;&quot;;CONCATENATE([Variables.$I$6];[.U393]);&quot;&quot;);[Variables.$I$2];[Variables.$I$6]);IF([.B393]&lt;&gt;&quot;&quot;;CONCATENATE(&quot;#&quot;;[.B393]);&quot;&quot;))">
            <text:p/>
          </table:table-cell>
          <table:table-cell table:style-name="ce6" table:number-columns-repeated="20"/>
          <table:table-cell table:style-name="ce36" table:formula="of:=IF(AND([.B393]&lt;&gt;&quot;&quot;;[.C393]&lt;&gt;&quot;&quot;);CONCATENATE([Variables.$I$1];[Variables.$I$7];[.B393];[Variables.$I$7];[Variables.$I$6];[Variables.$I$7];[.C393];[Variables.$I$7];[Variables.$I$6];[Variables.$I$7];[.D393];[Variables.$I$7];[Variables.$I$6];[.E393];[Variables.$I$6];[.F393];[Variables.$I$6];[.G393];[Variables.$I$6];[.H393];[Variables.$I$6];[Variables.$I$1];[.I393];[.J393];[.K393];[.L393];[.M393];[.N393];[.O393];[Variables.$I$2];[Variables.$I$6];[.P393];[Variables.$I$6];[.Q393];[Variables.$I$6];[.R393];[Variables.$I$6];[.S393];[Variables.$I$6];[.T393];IF([.U393]&lt;&gt;&quot;&quot;;CONCATENATE([Variables.$I$6];[.U393]);&quot;&quot;);[Variables.$I$2];[Variables.$I$6]);IF([.B393]&lt;&gt;&quot;&quot;;CONCATENATE(&quot;#&quot;;[.B393]);&quot;&quot;))">
            <text:p/>
          </table:table-cell>
          <table:table-cell table:number-columns-repeated="16362"/>
        </table:table-row>
        <table:table-row table:style-name="ro1">
          <table:table-cell table:style-name="ce6" table:formula="of:=IF(AND([.B394]&lt;&gt;&quot;&quot;;[.C394]&lt;&gt;&quot;&quot;);CONCATENATE([Variables.$I$1];[Variables.$I$7];[.B394];[Variables.$I$7];[Variables.$I$6];[Variables.$I$7];[.C394];[Variables.$I$7];[Variables.$I$6];[Variables.$I$7];[.D394];[Variables.$I$7];[Variables.$I$6];[.E394];[Variables.$I$6];[.F394];[Variables.$I$6];[.G394];[Variables.$I$6];[.H394];[Variables.$I$6];[Variables.$I$1];[.I394];[.J394];[.K394];[.L394];[.M394];[.N394];[.O394];[Variables.$I$2];[Variables.$I$6];[.P394];[Variables.$I$6];[.Q394];[Variables.$I$6];[.R394];[Variables.$I$6];[.S394];[Variables.$I$6];[.T394];IF([.U394]&lt;&gt;&quot;&quot;;CONCATENATE([Variables.$I$6];[.U394]);&quot;&quot;);[Variables.$I$2];[Variables.$I$6]);IF([.B394]&lt;&gt;&quot;&quot;;CONCATENATE(&quot;#&quot;;[.B394]);&quot;&quot;))" office:value-type="string" office:string-value="#Moria + tribal orc chief below" calcext:value-type="string">
            <text:p>#Moria + tribal orc chief below</text:p>
          </table:table-cell>
          <table:table-cell table:style-name="ce5" office:value-type="string" calcext:value-type="string">
            <text:p>Moria + tribal orc chief below</text:p>
          </table:table-cell>
          <table:table-cell table:style-name="ce6" table:number-columns-repeated="19"/>
          <table:table-cell table:style-name="ce6" table:formula="of:=IF(AND([.B394]&lt;&gt;&quot;&quot;;[.C394]&lt;&gt;&quot;&quot;);CONCATENATE([Variables.$I$1];[Variables.$I$7];[.B394];[Variables.$I$7];[Variables.$I$6];[Variables.$I$7];[.C394];[Variables.$I$7];[Variables.$I$6];[Variables.$I$7];[.D394];[Variables.$I$7];[Variables.$I$6];[.E394];[Variables.$I$6];[.F394];[Variables.$I$6];[.G394];[Variables.$I$6];[.H394];[Variables.$I$6];[Variables.$I$1];[.I394];[.J394];[.K394];[.L394];[.M394];[.N394];[.O394];[Variables.$I$2];[Variables.$I$6];[.P394];[Variables.$I$6];[.Q394];[Variables.$I$6];[.R394];[Variables.$I$6];[.S394];[Variables.$I$6];[.T394];IF([.U394]&lt;&gt;&quot;&quot;;CONCATENATE([Variables.$I$6];[.U394]);&quot;&quot;);[Variables.$I$2];[Variables.$I$6]);IF([.B394]&lt;&gt;&quot;&quot;;CONCATENATE(&quot;#&quot;;[.B394]);&quot;&quot;))" office:value-type="string" office:string-value="#Moria + tribal orc chief below" calcext:value-type="string">
            <text:p>#Moria + tribal orc chief below</text:p>
          </table:table-cell>
          <table:table-cell table:number-columns-repeated="16362"/>
        </table:table-row>
        <table:table-row table:style-name="ro1">
          <table:table-cell table:style-name="ce6" table:formula="of:=IF(AND([.B395]&lt;&gt;&quot;&quot;;[.C395]&lt;&gt;&quot;&quot;);CONCATENATE([Variables.$I$1];[Variables.$I$7];[.B395];[Variables.$I$7];[Variables.$I$6];[Variables.$I$7];[.C395];[Variables.$I$7];[Variables.$I$6];[Variables.$I$7];[.D395];[Variables.$I$7];[Variables.$I$6];[.E395];[Variables.$I$6];[.F395];[Variables.$I$6];[.G395];[Variables.$I$6];[.H395];[Variables.$I$6];[Variables.$I$1];[.I395];[.J395];[.K395];[.L395];[.M395];[.N395];[.O395];[Variables.$I$2];[Variables.$I$6];[.P395];[Variables.$I$6];[.Q395];[Variables.$I$6];[.R395];[Variables.$I$6];[.S395];[Variables.$I$6];[.T395];IF([.U395]&lt;&gt;&quot;&quot;;CONCATENATE([Variables.$I$6];[.U395]);&quot;&quot;);[Variables.$I$2];[Variables.$I$6]);IF([.B395]&lt;&gt;&quot;&quot;;CONCATENATE(&quot;#&quot;;[.B395]);&quot;&quot;))" office:value-type="string" office:string-value="[&quot;c3_moria_wolf_rider&quot;,&quot;Wolf_Rider_of_Moria&quot;,&quot;Wolf_Riders_of_Moria&quot;,tf_orc| tf_mounted| tfg_ranged| tfg_armor| tfg_horse| tf_no_capture_alive,0,0,fac_moria,[itm_orc_nosehelm_bad,itm_moria_armor_a,itm_moria_armor_b,itm_orc_sabre_bad,itm_orc_scimitar_bad,itm_orc_simple_spear,itm_wood_club,itm_orc_throwing_arrow,itm_orc_shield_b,itm_orc_shield_a,itm_warg_1d,itm_warg_1b,itm_warg_1c,],attr_orc_tier_3,wp_orc_tier_2,knows_common|knows_riding_3|knows_power_throw_2|knows_power_strike_2|knows_horse_archery_2,orc_face5,orc_face2]," calcext:value-type="string">
            <text:p>["c3_moria_wolf_rider","Wolf_Rider_of_Moria","Wolf_Riders_of_Moria",tf_orc| tf_mounted| tfg_ranged| tfg_armor| tfg_horse| tf_no_capture_alive,0,0,fac_moria,[itm_orc_nosehelm_bad,itm_moria_armor_a,itm_moria_armor_b,itm_orc_sabre_bad,itm_orc_scimitar_bad,itm_orc_simple_spear,itm_wood_club,itm_orc_throwing_arrow,itm_orc_shield_b,itm_orc_shield_a,itm_warg_1d,itm_warg_1b,itm_warg_1c,],attr_orc_tier_3,wp_orc_tier_2,knows_common|knows_riding_3|knows_power_throw_2|knows_power_strike_2|knows_horse_archery_2,orc_face5,orc_face2],</text:p>
          </table:table-cell>
          <table:table-cell table:style-name="ce7" office:value-type="string" calcext:value-type="string">
            <text:p>c3_moria_wolf_rider</text:p>
          </table:table-cell>
          <table:table-cell table:style-name="ce7" office:value-type="string" calcext:value-type="string">
            <text:p>Wolf_Rider_of_Moria</text:p>
          </table:table-cell>
          <table:table-cell table:style-name="ce7" office:value-type="string" calcext:value-type="string">
            <text:p>Wolf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ia</text:p>
          </table:table-cell>
          <table:table-cell table:style-name="ce11" office:value-type="string" calcext:value-type="string">
            <text:p>itm_orc_nosehelm_bad,</text:p>
          </table:table-cell>
          <table:table-cell table:style-name="ce11" office:value-type="string" calcext:value-type="string">
            <text:p>itm_moria_armor_a,itm_moria_armor_b,</text:p>
          </table:table-cell>
          <table:table-cell table:style-name="ce11" table:number-columns-repeated="2"/>
          <table:table-cell table:style-name="ce11" office:value-type="string" calcext:value-type="string">
            <text:p>itm_orc_sabre_bad,itm_orc_scimitar_bad,itm_orc_simple_spear,itm_wood_club,</text:p>
          </table:table-cell>
          <table:table-cell table:style-name="ce11" office:value-type="string" calcext:value-type="string">
            <text:p>itm_orc_throwing_arrow,itm_orc_shield_b,itm_orc_shield_a,</text:p>
          </table:table-cell>
          <table:table-cell table:style-name="ce11" office:value-type="string" calcext:value-type="string">
            <text:p>itm_warg_1d,itm_warg_1b,itm_warg_1c,</text:p>
          </table:table-cell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2</text:p>
          </table:table-cell>
          <table:table-cell table:style-name="ce12" office:value-type="string" calcext:value-type="string">
            <text:p>knows_common|knows_riding_3|knows_power_throw_2|knows_power_strike_2|knows_horse_archery_2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2</text:p>
          </table:table-cell>
          <table:table-cell table:style-name="ce15"/>
          <table:table-cell table:style-name="ce6" table:formula="of:=IF(AND([.B395]&lt;&gt;&quot;&quot;;[.C395]&lt;&gt;&quot;&quot;);CONCATENATE([Variables.$I$1];[Variables.$I$7];[.B395];[Variables.$I$7];[Variables.$I$6];[Variables.$I$7];[.C395];[Variables.$I$7];[Variables.$I$6];[Variables.$I$7];[.D395];[Variables.$I$7];[Variables.$I$6];[.E395];[Variables.$I$6];[.F395];[Variables.$I$6];[.G395];[Variables.$I$6];[.H395];[Variables.$I$6];[Variables.$I$1];[.I395];[.J395];[.K395];[.L395];[.M395];[.N395];[.O395];[Variables.$I$2];[Variables.$I$6];[.P395];[Variables.$I$6];[.Q395];[Variables.$I$6];[.R395];[Variables.$I$6];[.S395];[Variables.$I$6];[.T395];IF([.U395]&lt;&gt;&quot;&quot;;CONCATENATE([Variables.$I$6];[.U395]);&quot;&quot;);[Variables.$I$2];[Variables.$I$6]);IF([.B395]&lt;&gt;&quot;&quot;;CONCATENATE(&quot;#&quot;;[.B395]);&quot;&quot;))" office:value-type="string" office:string-value="[&quot;c3_moria_wolf_rider&quot;,&quot;Wolf_Rider_of_Moria&quot;,&quot;Wolf_Riders_of_Moria&quot;,tf_orc| tf_mounted| tfg_ranged| tfg_armor| tfg_horse| tf_no_capture_alive,0,0,fac_moria,[itm_orc_nosehelm_bad,itm_moria_armor_a,itm_moria_armor_b,itm_orc_sabre_bad,itm_orc_scimitar_bad,itm_orc_simple_spear,itm_wood_club,itm_orc_throwing_arrow,itm_orc_shield_b,itm_orc_shield_a,itm_warg_1d,itm_warg_1b,itm_warg_1c,],attr_orc_tier_3,wp_orc_tier_2,knows_common|knows_riding_3|knows_power_throw_2|knows_power_strike_2|knows_horse_archery_2,orc_face5,orc_face2]," calcext:value-type="string">
            <text:p>["c3_moria_wolf_rider","Wolf_Rider_of_Moria","Wolf_Riders_of_Moria",tf_orc| tf_mounted| tfg_ranged| tfg_armor| tfg_horse| tf_no_capture_alive,0,0,fac_moria,[itm_orc_nosehelm_bad,itm_moria_armor_a,itm_moria_armor_b,itm_orc_sabre_bad,itm_orc_scimitar_bad,itm_orc_simple_spear,itm_wood_club,itm_orc_throwing_arrow,itm_orc_shield_b,itm_orc_shield_a,itm_warg_1d,itm_warg_1b,itm_warg_1c,],attr_orc_tier_3,wp_orc_tier_2,knows_common|knows_riding_3|knows_power_throw_2|knows_power_strike_2|knows_horse_archery_2,orc_face5,orc_face2],</text:p>
          </table:table-cell>
          <table:table-cell table:number-columns-repeated="16362"/>
        </table:table-row>
        <table:table-row table:style-name="ro1">
          <table:table-cell table:style-name="ce6" table:formula="of:=IF(AND([.B396]&lt;&gt;&quot;&quot;;[.C396]&lt;&gt;&quot;&quot;);CONCATENATE([Variables.$I$1];[Variables.$I$7];[.B396];[Variables.$I$7];[Variables.$I$6];[Variables.$I$7];[.C396];[Variables.$I$7];[Variables.$I$6];[Variables.$I$7];[.D396];[Variables.$I$7];[Variables.$I$6];[.E396];[Variables.$I$6];[.F396];[Variables.$I$6];[.G396];[Variables.$I$6];[.H396];[Variables.$I$6];[Variables.$I$1];[.I396];[.J396];[.K396];[.L396];[.M396];[.N396];[.O396];[Variables.$I$2];[Variables.$I$6];[.P396];[Variables.$I$6];[.Q396];[Variables.$I$6];[.R396];[Variables.$I$6];[.S396];[Variables.$I$6];[.T396];IF([.U396]&lt;&gt;&quot;&quot;;CONCATENATE([Variables.$I$6];[.U396]);&quot;&quot;);[Variables.$I$2];[Variables.$I$6]);IF([.B396]&lt;&gt;&quot;&quot;;CONCATENATE(&quot;#&quot;;[.B396]);&quot;&quot;))" office:value-type="string" office:string-value="[&quot;c4_moria_warg_rider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club_b,itm_orc_shield_b,itm_orc_shield_a,itm_wargarmored_1b, itm_wargarmored_1c,],attr_orc_tier_4,wp_orc_tier_3,knows_common|knows_riding_3|knows_power_throw_3|knows_power_strike_4|knows_horse_archery_3,orc_face9,orc_face8]," calcext:value-type="string">
            <text:p>["c4_moria_warg_rider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club_b,itm_orc_shield_b,itm_orc_shield_a,itm_wargarmored_1b, itm_wargarmored_1c,],attr_orc_tier_4,wp_orc_tier_3,knows_common|knows_riding_3|knows_power_throw_3|knows_power_strike_4|knows_horse_archery_3,orc_face9,orc_face8],</text:p>
          </table:table-cell>
          <table:table-cell table:style-name="ce7" office:value-type="string" calcext:value-type="string">
            <text:p>c4_moria_warg_rider</text:p>
          </table:table-cell>
          <table:table-cell table:style-name="ce7" office:value-type="string" calcext:value-type="string">
            <text:p>Warg_Rider_of_Moria</text:p>
          </table:table-cell>
          <table:table-cell table:style-name="ce7" office:value-type="string" calcext:value-type="string">
            <text:p>Warg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ia</text:p>
          </table:table-cell>
          <table:table-cell table:style-name="ce11" office:value-type="string" calcext:value-type="string">
            <text:p>itm_orc_bughelm_bad, itm_orc_nosehelm, itm_orc_beakhelm_bad,</text:p>
          </table:table-cell>
          <table:table-cell table:style-name="ce11" office:value-type="string" calcext:value-type="string">
            <text:p>itm_moria_armor_a,itm_moria_armor_b,itm_moria_armor_c,</text:p>
          </table:table-cell>
          <table:table-cell table:style-name="ce11"/>
          <table:table-cell table:style-name="ce11" office:value-type="string" calcext:value-type="string">
            <text:p>itm_orc_ragwrap,</text:p>
          </table:table-cell>
          <table:table-cell table:style-name="ce11" office:value-type="string" calcext:value-type="string">
            <text:p>itm_orc_sabre,itm_orc_sabre,itm_orc_throwing_arrow,itm_orc_scimitar,itm_orc_simple_spear_heavy,itm_orc_skull_spear,itm_orc_club_b,</text:p>
          </table:table-cell>
          <table:table-cell table:style-name="ce11" office:value-type="string" calcext:value-type="string">
            <text:p>itm_orc_shield_b,itm_orc_shield_a,</text:p>
          </table:table-cell>
          <table:table-cell table:style-name="ce11" office:value-type="string" calcext:value-type="string">
            <text:p>itm_wargarmored_1b, itm_wargarmored_1c,</text:p>
          </table:table-cell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3</text:p>
          </table:table-cell>
          <table:table-cell table:style-name="ce12" office:value-type="string" calcext:value-type="string">
            <text:p>knows_common|knows_riding_3|knows_power_throw_3|knows_power_strike_4|knows_horse_archery_3</text:p>
          </table:table-cell>
          <table:table-cell table:style-name="ce14" office:value-type="string" calcext:value-type="string">
            <text:p>orc_face9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B396]&lt;&gt;&quot;&quot;;[.C396]&lt;&gt;&quot;&quot;);CONCATENATE([Variables.$I$1];[Variables.$I$7];[.B396];[Variables.$I$7];[Variables.$I$6];[Variables.$I$7];[.C396];[Variables.$I$7];[Variables.$I$6];[Variables.$I$7];[.D396];[Variables.$I$7];[Variables.$I$6];[.E396];[Variables.$I$6];[.F396];[Variables.$I$6];[.G396];[Variables.$I$6];[.H396];[Variables.$I$6];[Variables.$I$1];[.I396];[.J396];[.K396];[.L396];[.M396];[.N396];[.O396];[Variables.$I$2];[Variables.$I$6];[.P396];[Variables.$I$6];[.Q396];[Variables.$I$6];[.R396];[Variables.$I$6];[.S396];[Variables.$I$6];[.T396];IF([.U396]&lt;&gt;&quot;&quot;;CONCATENATE([Variables.$I$6];[.U396]);&quot;&quot;);[Variables.$I$2];[Variables.$I$6]);IF([.B396]&lt;&gt;&quot;&quot;;CONCATENATE(&quot;#&quot;;[.B396]);&quot;&quot;))" office:value-type="string" office:string-value="[&quot;c4_moria_warg_rider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club_b,itm_orc_shield_b,itm_orc_shield_a,itm_wargarmored_1b, itm_wargarmored_1c,],attr_orc_tier_4,wp_orc_tier_3,knows_common|knows_riding_3|knows_power_throw_3|knows_power_strike_4|knows_horse_archery_3,orc_face9,orc_face8]," calcext:value-type="string">
            <text:p>["c4_moria_warg_rider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club_b,itm_orc_shield_b,itm_orc_shield_a,itm_wargarmored_1b, itm_wargarmored_1c,],attr_orc_tier_4,wp_orc_tier_3,knows_common|knows_riding_3|knows_power_throw_3|knows_power_strike_4|knows_horse_archery_3,orc_face9,orc_face8],</text:p>
          </table:table-cell>
          <table:table-cell table:number-columns-repeated="16362"/>
        </table:table-row>
        <table:table-row table:style-name="ro1">
          <table:table-cell table:style-name="ce6" table:formula="of:=IF(AND([.B397]&lt;&gt;&quot;&quot;;[.C397]&lt;&gt;&quot;&quot;);CONCATENATE([Variables.$I$1];[Variables.$I$7];[.B397];[Variables.$I$7];[Variables.$I$6];[Variables.$I$7];[.C397];[Variables.$I$7];[Variables.$I$6];[Variables.$I$7];[.D397];[Variables.$I$7];[Variables.$I$6];[.E397];[Variables.$I$6];[.F397];[Variables.$I$6];[.G397];[Variables.$I$6];[.H397];[Variables.$I$6];[Variables.$I$1];[.I397];[.J397];[.K397];[.L397];[.M397];[.N397];[.O397];[Variables.$I$2];[Variables.$I$6];[.P397];[Variables.$I$6];[.Q397];[Variables.$I$6];[.R397];[Variables.$I$6];[.S397];[Variables.$I$6];[.T397];IF([.U397]&lt;&gt;&quot;&quot;;CONCATENATE([Variables.$I$6];[.U397]);&quot;&quot;);[Variables.$I$2];[Variables.$I$6]);IF([.B397]&lt;&gt;&quot;&quot;;CONCATENATE(&quot;#&quot;;[.B397]);&quot;&quot;))" office:value-type="string" office:string-value="[&quot;c5_moria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_heavy,itm_orc_scimitar_heavy,itm_orc_simple_spear,itm_orc_skull_spear_heavy, itm_orc_simple_spear_heavy,itm_orc_club_b_heavy,itm_moria_orc_shield_c,itm_wargarmored_2b, itm_wargarmored_2c,],attr_orc_tier_5,wp_orc_tier_4,knows_common|knows_riding_4|knows_power_throw_4|knows_power_strike_4|knows_horse_archery_5,orc_face5,orc_face4]," calcext:value-type="string">
            <text:p>["c5_moria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_heavy,itm_orc_scimitar_heavy,itm_orc_simple_spear,itm_orc_skull_spear_heavy, itm_orc_simple_spear_heavy,itm_orc_club_b_heavy,itm_moria_orc_shield_c,itm_wargarmored_2b, itm_wargarmored_2c,],attr_orc_tier_5,wp_orc_tier_4,knows_common|knows_riding_4|knows_power_throw_4|knows_power_strike_4|knows_horse_archery_5,orc_face5,orc_face4],</text:p>
          </table:table-cell>
          <table:table-cell table:style-name="ce7" office:value-type="string" calcext:value-type="string">
            <text:p>c5_moria_clan_rider</text:p>
          </table:table-cell>
          <table:table-cell table:style-name="ce7" office:value-type="string" calcext:value-type="string">
            <text:p>Bolg_Clan_Rider</text:p>
          </table:table-cell>
          <table:table-cell table:style-name="ce7" office:value-type="string" calcext:value-type="string">
            <text:p>Bolg_Clan_Riders</text:p>
          </table:table-cell>
          <table:table-cell table:style-name="ce8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ia</text:p>
          </table:table-cell>
          <table:table-cell table:style-name="ce11" office:value-type="string" calcext:value-type="string">
            <text:p>itm_orc_bughelm, itm_orc_bughelm_good, itm_orc_beakhelm, <text:s/>itm_gundabad_helm_e,</text:p>
          </table:table-cell>
          <table:table-cell table:style-name="ce11" office:value-type="string" calcext:value-type="string">
            <text:p>itm_moria_armor_c,itm_moria_armor_d,</text:p>
          </table:table-cell>
          <table:table-cell table:style-name="ce11"/>
          <table:table-cell table:style-name="ce11" office:value-type="string" calcext:value-type="string">
            <text:p>itm_orc_greaves,</text:p>
          </table:table-cell>
          <table:table-cell table:style-name="ce11" office:value-type="string" calcext:value-type="string">
            <text:p>itm_orc_throwing_arrow,itm_orc_sabre_heavy,itm_orc_scimitar_heavy,itm_orc_simple_spear,itm_orc_skull_spear_heavy, itm_orc_simple_spear_heavy,itm_orc_club_b_heavy,</text:p>
          </table:table-cell>
          <table:table-cell table:style-name="ce11" office:value-type="string" calcext:value-type="string">
            <text:p>itm_moria_orc_shield_c,</text:p>
          </table:table-cell>
          <table:table-cell table:style-name="ce11" office:value-type="string" calcext:value-type="string">
            <text:p>itm_wargarmored_2b, itm_wargarmored_2c,</text:p>
          </table:table-cell>
          <table:table-cell table:style-name="ce12" office:value-type="string" calcext:value-type="string">
            <text:p>attr_orc_tier_5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riding_4|knows_power_throw_4|knows_power_strike_4|knows_horse_archery_5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B397]&lt;&gt;&quot;&quot;;[.C397]&lt;&gt;&quot;&quot;);CONCATENATE([Variables.$I$1];[Variables.$I$7];[.B397];[Variables.$I$7];[Variables.$I$6];[Variables.$I$7];[.C397];[Variables.$I$7];[Variables.$I$6];[Variables.$I$7];[.D397];[Variables.$I$7];[Variables.$I$6];[.E397];[Variables.$I$6];[.F397];[Variables.$I$6];[.G397];[Variables.$I$6];[.H397];[Variables.$I$6];[Variables.$I$1];[.I397];[.J397];[.K397];[.L397];[.M397];[.N397];[.O397];[Variables.$I$2];[Variables.$I$6];[.P397];[Variables.$I$6];[.Q397];[Variables.$I$6];[.R397];[Variables.$I$6];[.S397];[Variables.$I$6];[.T397];IF([.U397]&lt;&gt;&quot;&quot;;CONCATENATE([Variables.$I$6];[.U397]);&quot;&quot;);[Variables.$I$2];[Variables.$I$6]);IF([.B397]&lt;&gt;&quot;&quot;;CONCATENATE(&quot;#&quot;;[.B397]);&quot;&quot;))" office:value-type="string" office:string-value="[&quot;c5_moria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_heavy,itm_orc_scimitar_heavy,itm_orc_simple_spear,itm_orc_skull_spear_heavy, itm_orc_simple_spear_heavy,itm_orc_club_b_heavy,itm_moria_orc_shield_c,itm_wargarmored_2b, itm_wargarmored_2c,],attr_orc_tier_5,wp_orc_tier_4,knows_common|knows_riding_4|knows_power_throw_4|knows_power_strike_4|knows_horse_archery_5,orc_face5,orc_face4]," calcext:value-type="string">
            <text:p>["c5_moria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_heavy,itm_orc_scimitar_heavy,itm_orc_simple_spear,itm_orc_skull_spear_heavy, itm_orc_simple_spear_heavy,itm_orc_club_b_heavy,itm_moria_orc_shield_c,itm_wargarmored_2b, itm_wargarmored_2c,],attr_orc_tier_5,wp_orc_tier_4,knows_common|knows_riding_4|knows_power_throw_4|knows_power_strike_4|knows_horse_archery_5,orc_face5,orc_face4],</text:p>
          </table:table-cell>
          <table:table-cell table:number-columns-repeated="16362"/>
        </table:table-row>
        <table:table-row table:style-name="ro1">
          <table:table-cell table:style-name="ce6" table:formula="of:=IF(AND([.B398]&lt;&gt;&quot;&quot;;[.C398]&lt;&gt;&quot;&quot;);CONCATENATE([Variables.$I$1];[Variables.$I$7];[.B398];[Variables.$I$7];[Variables.$I$6];[Variables.$I$7];[.C398];[Variables.$I$7];[Variables.$I$6];[Variables.$I$7];[.D398];[Variables.$I$7];[Variables.$I$6];[.E398];[Variables.$I$6];[.F398];[Variables.$I$6];[.G398];[Variables.$I$6];[.H398];[Variables.$I$6];[Variables.$I$1];[.I398];[.J398];[.K398];[.L398];[.M398];[.N398];[.O398];[Variables.$I$2];[Variables.$I$6];[.P398];[Variables.$I$6];[.Q398];[Variables.$I$6];[.R398];[Variables.$I$6];[.S398];[Variables.$I$6];[.T398];IF([.U398]&lt;&gt;&quot;&quot;;CONCATENATE([Variables.$I$6];[.U398]);&quot;&quot;);[Variables.$I$2];[Variables.$I$6]);IF([.B398]&lt;&gt;&quot;&quot;;CONCATENATE(&quot;#&quot;;[.B398]);&quot;&quot;))" office:value-type="string" office:string-value="[&quot;i1_moria_snaga&quot;,&quot;Snaga_of_Moria&quot;,&quot;Snagas_of_Moria&quot;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" calcext:value-type="string">
            <text:p>["i1_moria_snaga","Snaga_of_Moria","Snagas_of_Moria"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</text:p>
          </table:table-cell>
          <table:table-cell table:style-name="ce7" office:value-type="string" calcext:value-type="string">
            <text:p>i1_moria_snaga</text:p>
          </table:table-cell>
          <table:table-cell table:style-name="ce7" office:value-type="string" calcext:value-type="string">
            <text:p>Snaga_of_Moria</text:p>
          </table:table-cell>
          <table:table-cell table:style-name="ce7" office:value-type="string" calcext:value-type="string">
            <text:p>Snagas_of_Moria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ia</text:p>
          </table:table-cell>
          <table:table-cell table:style-name="ce11" office:value-type="string" calcext:value-type="string">
            <text:p>itm_orc_coif_bad, itm_orc_nosehelm_bad,</text:p>
          </table:table-cell>
          <table:table-cell table:style-name="ce11" office:value-type="string" calcext:value-type="string">
            <text:p>itm_moria_armor_a,itm_moria_armor_b,</text:p>
          </table:table-cell>
          <table:table-cell table:style-name="ce11" table:number-columns-repeated="2"/>
          <table:table-cell table:style-name="ce11" office:value-type="string" calcext:value-type="string">
            <text:p>itm_orc_falchion_bad,itm_orc_slasher,itm_orc_axe,itm_wood_club,</text:p>
          </table:table-cell>
          <table:table-cell table:style-name="ce11" office:value-type="string" calcext:value-type="string">
            <text:p>itm_orc_shield_a</text:p>
          </table:table-cell>
          <table:table-cell table:style-name="ce11"/>
          <table:table-cell table:style-name="ce12" office:value-type="string" calcext:value-type="string">
            <text:p>attr_orc_tier_1</text:p>
          </table:table-cell>
          <table:table-cell table:style-name="ce12" office:value-type="string" calcext:value-type="string">
            <text:p>wp_orc_tier_1</text:p>
          </table:table-cell>
          <table:table-cell table:style-name="ce13" office:value-type="string" calcext:value-type="string">
            <text:p>knows_common|knows_ironflesh_2|knows_power_strike_1|knows_athletics_2|knows_looting_2|knows_pathfinding_1|knows_spotting_1|knows_inventory_management_1|knows_surgery_1|knows_prisoner_management_1|knows_trade_1</text:p>
          </table:table-cell>
          <table:table-cell table:style-name="ce14" office:value-type="string" calcext:value-type="string">
            <text:p>orc_face4</text:p>
          </table:table-cell>
          <table:table-cell table:style-name="ce14" office:value-type="string" calcext:value-type="string">
            <text:p>orc_face9</text:p>
          </table:table-cell>
          <table:table-cell table:style-name="ce15"/>
          <table:table-cell table:style-name="ce6" table:formula="of:=IF(AND([.B398]&lt;&gt;&quot;&quot;;[.C398]&lt;&gt;&quot;&quot;);CONCATENATE([Variables.$I$1];[Variables.$I$7];[.B398];[Variables.$I$7];[Variables.$I$6];[Variables.$I$7];[.C398];[Variables.$I$7];[Variables.$I$6];[Variables.$I$7];[.D398];[Variables.$I$7];[Variables.$I$6];[.E398];[Variables.$I$6];[.F398];[Variables.$I$6];[.G398];[Variables.$I$6];[.H398];[Variables.$I$6];[Variables.$I$1];[.I398];[.J398];[.K398];[.L398];[.M398];[.N398];[.O398];[Variables.$I$2];[Variables.$I$6];[.P398];[Variables.$I$6];[.Q398];[Variables.$I$6];[.R398];[Variables.$I$6];[.S398];[Variables.$I$6];[.T398];IF([.U398]&lt;&gt;&quot;&quot;;CONCATENATE([Variables.$I$6];[.U398]);&quot;&quot;);[Variables.$I$2];[Variables.$I$6]);IF([.B398]&lt;&gt;&quot;&quot;;CONCATENATE(&quot;#&quot;;[.B398]);&quot;&quot;))" office:value-type="string" office:string-value="[&quot;i1_moria_snaga&quot;,&quot;Snaga_of_Moria&quot;,&quot;Snagas_of_Moria&quot;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" calcext:value-type="string">
            <text:p>["i1_moria_snaga","Snaga_of_Moria","Snagas_of_Moria"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</text:p>
          </table:table-cell>
          <table:table-cell table:number-columns-repeated="16362"/>
        </table:table-row>
        <table:table-row table:style-name="ro1">
          <table:table-cell table:style-name="ce6" table:formula="of:=IF(AND([.B399]&lt;&gt;&quot;&quot;;[.C399]&lt;&gt;&quot;&quot;);CONCATENATE([Variables.$I$1];[Variables.$I$7];[.B399];[Variables.$I$7];[Variables.$I$6];[Variables.$I$7];[.C399];[Variables.$I$7];[Variables.$I$6];[Variables.$I$7];[.D399];[Variables.$I$7];[Variables.$I$6];[.E399];[Variables.$I$6];[.F399];[Variables.$I$6];[.G399];[Variables.$I$6];[.H399];[Variables.$I$6];[Variables.$I$1];[.I399];[.J399];[.K399];[.L399];[.M399];[.N399];[.O399];[Variables.$I$2];[Variables.$I$6];[.P399];[Variables.$I$6];[.Q399];[Variables.$I$6];[.R399];[Variables.$I$6];[.S399];[Variables.$I$6];[.T399];IF([.U399]&lt;&gt;&quot;&quot;;CONCATENATE([Variables.$I$6];[.U399]);&quot;&quot;);[Variables.$I$2];[Variables.$I$6]);IF([.B399]&lt;&gt;&quot;&quot;;CONCATENATE(&quot;#&quot;;[.B399]);&quot;&quot;))" office:value-type="string" office:string-value="[&quot;i2_moria_goblin&quot;,&quot;Goblin_of_Moria&quot;,&quot;Goblins_of_Moria&quot;,tf_orc| tfg_armor| tf_no_capture_alive,0,0,fac_moria,[itm_orc_nosehelm, itm_orc_bughelm_bad, itm_orc_beakhelm_bad,itm_moria_armor_b,itm_moria_armor_c,itm_moria_armor_b,itm_orc_sabre_bad,itm_orc_falchion,itm_orc_scimitar_bad,itm_orc_simple_spear,itm_orc_scimitar_b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" calcext:value-type="string">
            <text:p>["i2_moria_goblin","Goblin_of_Moria","Goblins_of_Moria",tf_orc| tfg_armor| tf_no_capture_alive,0,0,fac_moria,[itm_orc_nosehelm, itm_orc_bughelm_bad, itm_orc_beakhelm_bad,itm_moria_armor_b,itm_moria_armor_c,itm_moria_armor_b,itm_orc_sabre_bad,itm_orc_falchion,itm_orc_scimitar_bad,itm_orc_simple_spear,itm_orc_scimitar_b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</text:p>
          </table:table-cell>
          <table:table-cell table:style-name="ce7" office:value-type="string" calcext:value-type="string">
            <text:p>i2_moria_goblin</text:p>
          </table:table-cell>
          <table:table-cell table:style-name="ce7" office:value-type="string" calcext:value-type="string">
            <text:p>Goblin_of_Moria</text:p>
          </table:table-cell>
          <table:table-cell table:style-name="ce7" office:value-type="string" calcext:value-type="string">
            <text:p>Goblins_of_Moria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ia</text:p>
          </table:table-cell>
          <table:table-cell table:style-name="ce11" office:value-type="string" calcext:value-type="string">
            <text:p>itm_orc_nosehelm, itm_orc_bughelm_bad, itm_orc_beakhelm_bad,</text:p>
          </table:table-cell>
          <table:table-cell table:style-name="ce11" office:value-type="string" calcext:value-type="string">
            <text:p>itm_moria_armor_b,itm_moria_armor_c,itm_moria_armor_b,</text:p>
          </table:table-cell>
          <table:table-cell table:style-name="ce11" table:number-columns-repeated="2"/>
          <table:table-cell table:style-name="ce11" office:value-type="string" calcext:value-type="string">
            <text:p>itm_orc_sabre_bad,itm_orc_falchion,itm_orc_scimitar_bad,itm_orc_simple_spear,itm_orc_scimitar_b,</text:p>
          </table:table-cell>
          <table:table-cell table:style-name="ce11" office:value-type="string" calcext:value-type="string">
            <text:p>itm_moria_orc_shield_b,itm_orc_shield_b,itm_orc_shield_a,</text:p>
          </table:table-cell>
          <table:table-cell table:style-name="ce11"/>
          <table:table-cell table:style-name="ce12" office:value-type="string" calcext:value-type="string">
            <text:p>attr_orc_tier_2</text:p>
          </table:table-cell>
          <table:table-cell table:style-name="ce12" office:value-type="string" calcext:value-type="string">
            <text:p>wp_orc_tier_2</text:p>
          </table:table-cell>
          <table:table-cell table:style-name="ce13" office:value-type="string" calcext:value-type="string">
            <text:p>knows_common|knows_ironflesh_2|knows_power_strike_3|knows_athletics_3|knows_looting_2|knows_pathfinding_1|knows_spotting_1|knows_inventory_management_1|knows_surgery_1|knows_prisoner_management_1|knows_trade_1</text:p>
          </table:table-cell>
          <table:table-cell table:style-name="ce14" office:value-type="string" calcext:value-type="string">
            <text:p>orc_face9</text:p>
          </table:table-cell>
          <table:table-cell table:style-name="ce14" office:value-type="string" calcext:value-type="string">
            <text:p>orc_face2</text:p>
          </table:table-cell>
          <table:table-cell table:style-name="ce15"/>
          <table:table-cell table:style-name="ce6" table:formula="of:=IF(AND([.B399]&lt;&gt;&quot;&quot;;[.C399]&lt;&gt;&quot;&quot;);CONCATENATE([Variables.$I$1];[Variables.$I$7];[.B399];[Variables.$I$7];[Variables.$I$6];[Variables.$I$7];[.C399];[Variables.$I$7];[Variables.$I$6];[Variables.$I$7];[.D399];[Variables.$I$7];[Variables.$I$6];[.E399];[Variables.$I$6];[.F399];[Variables.$I$6];[.G399];[Variables.$I$6];[.H399];[Variables.$I$6];[Variables.$I$1];[.I399];[.J399];[.K399];[.L399];[.M399];[.N399];[.O399];[Variables.$I$2];[Variables.$I$6];[.P399];[Variables.$I$6];[.Q399];[Variables.$I$6];[.R399];[Variables.$I$6];[.S399];[Variables.$I$6];[.T399];IF([.U399]&lt;&gt;&quot;&quot;;CONCATENATE([Variables.$I$6];[.U399]);&quot;&quot;);[Variables.$I$2];[Variables.$I$6]);IF([.B399]&lt;&gt;&quot;&quot;;CONCATENATE(&quot;#&quot;;[.B399]);&quot;&quot;))" office:value-type="string" office:string-value="[&quot;i2_moria_goblin&quot;,&quot;Goblin_of_Moria&quot;,&quot;Goblins_of_Moria&quot;,tf_orc| tfg_armor| tf_no_capture_alive,0,0,fac_moria,[itm_orc_nosehelm, itm_orc_bughelm_bad, itm_orc_beakhelm_bad,itm_moria_armor_b,itm_moria_armor_c,itm_moria_armor_b,itm_orc_sabre_bad,itm_orc_falchion,itm_orc_scimitar_bad,itm_orc_simple_spear,itm_orc_scimitar_b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" calcext:value-type="string">
            <text:p>["i2_moria_goblin","Goblin_of_Moria","Goblins_of_Moria",tf_orc| tfg_armor| tf_no_capture_alive,0,0,fac_moria,[itm_orc_nosehelm, itm_orc_bughelm_bad, itm_orc_beakhelm_bad,itm_moria_armor_b,itm_moria_armor_c,itm_moria_armor_b,itm_orc_sabre_bad,itm_orc_falchion,itm_orc_scimitar_bad,itm_orc_simple_spear,itm_orc_scimitar_b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</text:p>
          </table:table-cell>
          <table:table-cell table:number-columns-repeated="16362"/>
        </table:table-row>
        <table:table-row table:style-name="ro1">
          <table:table-cell table:style-name="ce6" table:formula="of:=IF(AND([.B400]&lt;&gt;&quot;&quot;;[.C400]&lt;&gt;&quot;&quot;);CONCATENATE([Variables.$I$1];[Variables.$I$7];[.B400];[Variables.$I$7];[Variables.$I$6];[Variables.$I$7];[.C400];[Variables.$I$7];[Variables.$I$6];[Variables.$I$7];[.D400];[Variables.$I$7];[Variables.$I$6];[.E400];[Variables.$I$6];[.F400];[Variables.$I$6];[.G400];[Variables.$I$6];[.H400];[Variables.$I$6];[Variables.$I$1];[.I400];[.J400];[.K400];[.L400];[.M400];[.N400];[.O400];[Variables.$I$2];[Variables.$I$6];[.P400];[Variables.$I$6];[.Q400];[Variables.$I$6];[.R400];[Variables.$I$6];[.S400];[Variables.$I$6];[.T400];IF([.U400]&lt;&gt;&quot;&quot;;CONCATENATE([Variables.$I$6];[.U400]);&quot;&quot;);[Variables.$I$2];[Variables.$I$6]);IF([.B400]&lt;&gt;&quot;&quot;;CONCATENATE(&quot;#&quot;;[.B400]);&quot;&quot;))" office:value-type="string" office:string-value="[&quot;i3_moria_large_goblin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pick,itm_orc_scimitar_b_heavy,itm_orc_throwing_axes,itm_moria_orc_shield_c,itm_moria_orc_shield_b,],attr_orc_tier_3,wp_orc_tier_3,knows_common|knows_ironflesh_3|knows_athletics_5|knows_power_throw_2|knows_power_strike_3,orc_face3,orc_face8]," calcext:value-type="string">
            <text:p>["i3_moria_large_goblin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pick,itm_orc_scimitar_b_heavy,itm_orc_throwing_axes,itm_moria_orc_shield_c,itm_moria_orc_shield_b,],attr_orc_tier_3,wp_orc_tier_3,knows_common|knows_ironflesh_3|knows_athletics_5|knows_power_throw_2|knows_power_strike_3,orc_face3,orc_face8],</text:p>
          </table:table-cell>
          <table:table-cell table:style-name="ce7" office:value-type="string" calcext:value-type="string">
            <text:p>i3_moria_large_goblin</text:p>
          </table:table-cell>
          <table:table-cell table:style-name="ce7" office:value-type="string" calcext:value-type="string">
            <text:p>Large_Goblin_of_Moria</text:p>
          </table:table-cell>
          <table:table-cell table:style-name="ce7" office:value-type="string" calcext:value-type="string">
            <text:p>Large_Goblins_of_Moria</text:p>
          </table:table-cell>
          <table:table-cell table:style-name="ce8" office:value-type="string" calcext:value-type="string">
            <text:p>tf_orc| tfg_shiel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ia</text:p>
          </table:table-cell>
          <table:table-cell table:style-name="ce11" office:value-type="string" calcext:value-type="string">
            <text:p>itm_orc_bughelm, itm_orc_beakhelm,</text:p>
          </table:table-cell>
          <table:table-cell table:style-name="ce11" office:value-type="string" calcext:value-type="string">
            <text:p>itm_moria_armor_d,itm_moria_armor_c,itm_moria_armor_d,</text:p>
          </table:table-cell>
          <table:table-cell table:style-name="ce11" table:number-columns-repeated="2"/>
          <table:table-cell table:style-name="ce11" office:value-type="string" calcext:value-type="string">
            <text:p>itm_orc_sabre,itm_orc_scimitar,itm_orc_simple_spear,itm_orc_bill,itm_orc_pick,itm_orc_scimitar_b_heavy,</text:p>
          </table:table-cell>
          <table:table-cell table:style-name="ce11" office:value-type="string" calcext:value-type="string">
            <text:p>itm_orc_throwing_axes,itm_moria_orc_shield_c,itm_moria_orc_shield_b,</text:p>
          </table:table-cell>
          <table:table-cell table:style-name="ce11"/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3</text:p>
          </table:table-cell>
          <table:table-cell table:style-name="ce12" office:value-type="string" calcext:value-type="string">
            <text:p>knows_common|knows_ironflesh_3|knows_athletics_5|knows_power_throw_2|knows_power_strike_3</text:p>
          </table:table-cell>
          <table:table-cell table:style-name="ce14" office:value-type="string" calcext:value-type="string">
            <text:p>orc_face3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B400]&lt;&gt;&quot;&quot;;[.C400]&lt;&gt;&quot;&quot;);CONCATENATE([Variables.$I$1];[Variables.$I$7];[.B400];[Variables.$I$7];[Variables.$I$6];[Variables.$I$7];[.C400];[Variables.$I$7];[Variables.$I$6];[Variables.$I$7];[.D400];[Variables.$I$7];[Variables.$I$6];[.E400];[Variables.$I$6];[.F400];[Variables.$I$6];[.G400];[Variables.$I$6];[.H400];[Variables.$I$6];[Variables.$I$1];[.I400];[.J400];[.K400];[.L400];[.M400];[.N400];[.O400];[Variables.$I$2];[Variables.$I$6];[.P400];[Variables.$I$6];[.Q400];[Variables.$I$6];[.R400];[Variables.$I$6];[.S400];[Variables.$I$6];[.T400];IF([.U400]&lt;&gt;&quot;&quot;;CONCATENATE([Variables.$I$6];[.U400]);&quot;&quot;);[Variables.$I$2];[Variables.$I$6]);IF([.B400]&lt;&gt;&quot;&quot;;CONCATENATE(&quot;#&quot;;[.B400]);&quot;&quot;))" office:value-type="string" office:string-value="[&quot;i3_moria_large_goblin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pick,itm_orc_scimitar_b_heavy,itm_orc_throwing_axes,itm_moria_orc_shield_c,itm_moria_orc_shield_b,],attr_orc_tier_3,wp_orc_tier_3,knows_common|knows_ironflesh_3|knows_athletics_5|knows_power_throw_2|knows_power_strike_3,orc_face3,orc_face8]," calcext:value-type="string">
            <text:p>["i3_moria_large_goblin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pick,itm_orc_scimitar_b_heavy,itm_orc_throwing_axes,itm_moria_orc_shield_c,itm_moria_orc_shield_b,],attr_orc_tier_3,wp_orc_tier_3,knows_common|knows_ironflesh_3|knows_athletics_5|knows_power_throw_2|knows_power_strike_3,orc_face3,orc_face8],</text:p>
          </table:table-cell>
          <table:table-cell table:number-columns-repeated="16362"/>
        </table:table-row>
        <table:table-row table:style-name="ro1">
          <table:table-cell table:style-name="ce6" table:formula="of:=IF(AND([.B401]&lt;&gt;&quot;&quot;;[.C401]&lt;&gt;&quot;&quot;);CONCATENATE([Variables.$I$1];[Variables.$I$7];[.B401];[Variables.$I$7];[Variables.$I$6];[Variables.$I$7];[.C401];[Variables.$I$7];[Variables.$I$6];[Variables.$I$7];[.D401];[Variables.$I$7];[Variables.$I$6];[.E401];[Variables.$I$6];[.F401];[Variables.$I$6];[.G401];[Variables.$I$6];[.H401];[Variables.$I$6];[Variables.$I$1];[.I401];[.J401];[.K401];[.L401];[.M401];[.N401];[.O401];[Variables.$I$2];[Variables.$I$6];[.P401];[Variables.$I$6];[.Q401];[Variables.$I$6];[.R401];[Variables.$I$6];[.S401];[Variables.$I$6];[.T401];IF([.U401]&lt;&gt;&quot;&quot;;CONCATENATE([Variables.$I$6];[.U401]);&quot;&quot;);[Variables.$I$2];[Variables.$I$6]);IF([.B401]&lt;&gt;&quot;&quot;;CONCATENATE(&quot;#&quot;;[.B401]);&quot;&quot;))" office:value-type="string" office:string-value="[&quot;i4_moria_fell_goblin&quot;,&quot;Fell_Goblin_of_Moria&quot;,&quot;Fell_Goblins_of_Moria&quot;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" calcext:value-type="string">
            <text:p>["i4_moria_fell_goblin","Fell_Goblin_of_Moria","Fell_Goblins_of_Moria"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</text:p>
          </table:table-cell>
          <table:table-cell table:style-name="ce7" office:value-type="string" calcext:value-type="string">
            <text:p>i4_moria_fell_goblin</text:p>
          </table:table-cell>
          <table:table-cell table:style-name="ce7" office:value-type="string" calcext:value-type="string">
            <text:p>Fell_Goblin_of_Moria</text:p>
          </table:table-cell>
          <table:table-cell table:style-name="ce7" office:value-type="string" calcext:value-type="string">
            <text:p>Fell_Goblins_of_Moria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ia</text:p>
          </table:table-cell>
          <table:table-cell table:style-name="ce11" office:value-type="string" calcext:value-type="string">
            <text:p>itm_orc_bughelm_good, itm_orc_beakhelm_good,</text:p>
          </table:table-cell>
          <table:table-cell table:style-name="ce11" office:value-type="string" calcext:value-type="string">
            <text:p>itm_moria_armor_e,</text:p>
          </table:table-cell>
          <table:table-cell table:style-name="ce11"/>
          <table:table-cell table:style-name="ce11" office:value-type="string" calcext:value-type="string">
            <text:p>itm_orc_greaves,</text:p>
          </table:table-cell>
          <table:table-cell table:style-name="ce11" office:value-type="string" calcext:value-type="string">
            <text:p>itm_orc_sabre_heavy,itm_orc_scimitar_heavy,itm_orc_simple_spear_heavy,itm_orc_bill_heavy,itm_orc_pick,</text:p>
          </table:table-cell>
          <table:table-cell table:style-name="ce11" office:value-type="string" calcext:value-type="string">
            <text:p>itm_orc_throwing_axes,itm_moria_orc_shield_b,itm_moria_orc_shield_c,</text:p>
          </table:table-cell>
          <table:table-cell table:style-name="ce11"/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ironflesh_4|knows_athletics_6|knows_power_throw_3|knows_power_strike_4</text:p>
          </table:table-cell>
          <table:table-cell table:style-name="ce14" office:value-type="string" calcext:value-type="string">
            <text:p>orc_face1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B401]&lt;&gt;&quot;&quot;;[.C401]&lt;&gt;&quot;&quot;);CONCATENATE([Variables.$I$1];[Variables.$I$7];[.B401];[Variables.$I$7];[Variables.$I$6];[Variables.$I$7];[.C401];[Variables.$I$7];[Variables.$I$6];[Variables.$I$7];[.D401];[Variables.$I$7];[Variables.$I$6];[.E401];[Variables.$I$6];[.F401];[Variables.$I$6];[.G401];[Variables.$I$6];[.H401];[Variables.$I$6];[Variables.$I$1];[.I401];[.J401];[.K401];[.L401];[.M401];[.N401];[.O401];[Variables.$I$2];[Variables.$I$6];[.P401];[Variables.$I$6];[.Q401];[Variables.$I$6];[.R401];[Variables.$I$6];[.S401];[Variables.$I$6];[.T401];IF([.U401]&lt;&gt;&quot;&quot;;CONCATENATE([Variables.$I$6];[.U401]);&quot;&quot;);[Variables.$I$2];[Variables.$I$6]);IF([.B401]&lt;&gt;&quot;&quot;;CONCATENATE(&quot;#&quot;;[.B401]);&quot;&quot;))" office:value-type="string" office:string-value="[&quot;i4_moria_fell_goblin&quot;,&quot;Fell_Goblin_of_Moria&quot;,&quot;Fell_Goblins_of_Moria&quot;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" calcext:value-type="string">
            <text:p>["i4_moria_fell_goblin","Fell_Goblin_of_Moria","Fell_Goblins_of_Moria"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</text:p>
          </table:table-cell>
          <table:table-cell table:number-columns-repeated="16362"/>
        </table:table-row>
        <table:table-row table:style-name="ro1">
          <table:table-cell table:style-name="ce6" table:formula="of:=IF(AND([.B402]&lt;&gt;&quot;&quot;;[.C402]&lt;&gt;&quot;&quot;);CONCATENATE([Variables.$I$1];[Variables.$I$7];[.B402];[Variables.$I$7];[Variables.$I$6];[Variables.$I$7];[.C402];[Variables.$I$7];[Variables.$I$6];[Variables.$I$7];[.D402];[Variables.$I$7];[Variables.$I$6];[.E402];[Variables.$I$6];[.F402];[Variables.$I$6];[.G402];[Variables.$I$6];[.H402];[Variables.$I$6];[Variables.$I$1];[.I402];[.J402];[.K402];[.L402];[.M402];[.N402];[.O402];[Variables.$I$2];[Variables.$I$6];[.P402];[Variables.$I$6];[.Q402];[Variables.$I$6];[.R402];[Variables.$I$6];[.S402];[Variables.$I$6];[.T402];IF([.U402]&lt;&gt;&quot;&quot;;CONCATENATE([Variables.$I$6];[.U402]);&quot;&quot;);[Variables.$I$2];[Variables.$I$6]);IF([.B402]&lt;&gt;&quot;&quot;;CONCATENATE(&quot;#&quot;;[.B402]);&quot;&quot;))" office:value-type="string" office:string-value="[&quot;a2_moria_goblin_archer&quot;,&quot;Goblin_Archer_of_Moria&quot;,&quot;Goblin_Archers_of_Moria&quot;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" calcext:value-type="string">
            <text:p>["a2_moria_goblin_archer","Goblin_Archer_of_Moria","Goblin_Archers_of_Moria"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</text:p>
          </table:table-cell>
          <table:table-cell table:style-name="ce7" office:value-type="string" calcext:value-type="string">
            <text:p>a2_moria_goblin_archer</text:p>
          </table:table-cell>
          <table:table-cell table:style-name="ce7" office:value-type="string" calcext:value-type="string">
            <text:p>Goblin_Archer_of_Moria</text:p>
          </table:table-cell>
          <table:table-cell table:style-name="ce7" office:value-type="string" calcext:value-type="string">
            <text:p>Goblin_Archers_of_Moria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ia</text:p>
          </table:table-cell>
          <table:table-cell table:style-name="ce11" office:value-type="string" calcext:value-type="string">
            <text:p>itm_orc_bughelm_bad, itm_orc_beakhelm_bad,</text:p>
          </table:table-cell>
          <table:table-cell table:style-name="ce11" office:value-type="string" calcext:value-type="string">
            <text:p>itm_moria_armor_b,</text:p>
          </table:table-cell>
          <table:table-cell table:style-name="ce11" table:number-columns-repeated="2"/>
          <table:table-cell table:style-name="ce11" office:value-type="string" calcext:value-type="string">
            <text:p><text:s/>itm_orc_bow,itm_orc_hook_arrow,</text:p>
          </table:table-cell>
          <table:table-cell table:style-name="ce11" office:value-type="string" calcext:value-type="string">
            <text:p>itm_orc_slasher,itm_orc_falchion_bad,</text:p>
          </table:table-cell>
          <table:table-cell table:style-name="ce11" office:value-type="string" calcext:value-type="string">
            <text:p>itm_orc_shield_a</text:p>
          </table:table-cell>
          <table:table-cell table:style-name="ce12" office:value-type="string" calcext:value-type="string">
            <text:p>attr_orc_tier_2</text:p>
          </table:table-cell>
          <table:table-cell table:style-name="ce12" office:value-type="string" calcext:value-type="string">
            <text:p>wp_orc_tier_bow_2</text:p>
          </table:table-cell>
          <table:table-cell table:style-name="ce13" office:value-type="string" calcext:value-type="string">
            <text:p>knows_common|knows_ironflesh_2|knows_power_strike_1|knows_power_draw_2|knows_athletics_3|knows_looting_2|knows_pathfinding_1|knows_spotting_1|knows_inventory_management_1|knows_surgery_1|knows_prisoner_management_1|knows_trade_1</text:p>
          </table:table-cell>
          <table:table-cell table:style-name="ce14" office:value-type="string" calcext:value-type="string">
            <text:p>orc_face9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B402]&lt;&gt;&quot;&quot;;[.C402]&lt;&gt;&quot;&quot;);CONCATENATE([Variables.$I$1];[Variables.$I$7];[.B402];[Variables.$I$7];[Variables.$I$6];[Variables.$I$7];[.C402];[Variables.$I$7];[Variables.$I$6];[Variables.$I$7];[.D402];[Variables.$I$7];[Variables.$I$6];[.E402];[Variables.$I$6];[.F402];[Variables.$I$6];[.G402];[Variables.$I$6];[.H402];[Variables.$I$6];[Variables.$I$1];[.I402];[.J402];[.K402];[.L402];[.M402];[.N402];[.O402];[Variables.$I$2];[Variables.$I$6];[.P402];[Variables.$I$6];[.Q402];[Variables.$I$6];[.R402];[Variables.$I$6];[.S402];[Variables.$I$6];[.T402];IF([.U402]&lt;&gt;&quot;&quot;;CONCATENATE([Variables.$I$6];[.U402]);&quot;&quot;);[Variables.$I$2];[Variables.$I$6]);IF([.B402]&lt;&gt;&quot;&quot;;CONCATENATE(&quot;#&quot;;[.B402]);&quot;&quot;))" office:value-type="string" office:string-value="[&quot;a2_moria_goblin_archer&quot;,&quot;Goblin_Archer_of_Moria&quot;,&quot;Goblin_Archers_of_Moria&quot;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" calcext:value-type="string">
            <text:p>["a2_moria_goblin_archer","Goblin_Archer_of_Moria","Goblin_Archers_of_Moria"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</text:p>
          </table:table-cell>
          <table:table-cell table:number-columns-repeated="16362"/>
        </table:table-row>
        <table:table-row table:style-name="ro1">
          <table:table-cell table:style-name="ce6" table:formula="of:=IF(AND([.B403]&lt;&gt;&quot;&quot;;[.C403]&lt;&gt;&quot;&quot;);CONCATENATE([Variables.$I$1];[Variables.$I$7];[.B403];[Variables.$I$7];[Variables.$I$6];[Variables.$I$7];[.C403];[Variables.$I$7];[Variables.$I$6];[Variables.$I$7];[.D403];[Variables.$I$7];[Variables.$I$6];[.E403];[Variables.$I$6];[.F403];[Variables.$I$6];[.G403];[Variables.$I$6];[.H403];[Variables.$I$6];[Variables.$I$1];[.I403];[.J403];[.K403];[.L403];[.M403];[.N403];[.O403];[Variables.$I$2];[Variables.$I$6];[.P403];[Variables.$I$6];[.Q403];[Variables.$I$6];[.R403];[Variables.$I$6];[.S403];[Variables.$I$6];[.T403];IF([.U403]&lt;&gt;&quot;&quot;;CONCATENATE([Variables.$I$6];[.U403]);&quot;&quot;);[Variables.$I$2];[Variables.$I$6]);IF([.B403]&lt;&gt;&quot;&quot;;CONCATENATE(&quot;#&quot;;[.B403]);&quot;&quot;))" office:value-type="string" office:string-value="[&quot;a3_moria_large_goblin_archer&quot;,&quot;Large_Goblin_Archer_of_Moria&quot;,&quot;Large_Goblin_Archers_of_Moria&quot;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" calcext:value-type="string">
            <text:p>["a3_moria_large_goblin_archer","Large_Goblin_Archer_of_Moria","Large_Goblin_Archers_of_Moria"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</text:p>
          </table:table-cell>
          <table:table-cell table:style-name="ce7" office:value-type="string" calcext:value-type="string">
            <text:p>a3_moria_large_goblin_archer</text:p>
          </table:table-cell>
          <table:table-cell table:style-name="ce7" office:value-type="string" calcext:value-type="string">
            <text:p>Large_Goblin_Archer_of_Moria</text:p>
          </table:table-cell>
          <table:table-cell table:style-name="ce7" office:value-type="string" calcext:value-type="string">
            <text:p>Large_Goblin_Archers_of_Moria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ia</text:p>
          </table:table-cell>
          <table:table-cell table:style-name="ce11" office:value-type="string" calcext:value-type="string">
            <text:p>itm_orc_bughelm_bad, itm_orc_bughelm, itm_orc_beakhelm,</text:p>
          </table:table-cell>
          <table:table-cell table:style-name="ce11" office:value-type="string" calcext:value-type="string">
            <text:p>itm_moria_armor_c,itm_moria_armor_b,itm_moria_armor_c,</text:p>
          </table:table-cell>
          <table:table-cell table:style-name="ce11" office:value-type="string" calcext:value-type="string">
            <text:p><text:s/>itm_evil_gauntlets_a,</text:p>
          </table:table-cell>
          <table:table-cell table:style-name="ce11" office:value-type="string" calcext:value-type="string">
            <text:p>itm_orc_ragwrap,</text:p>
          </table:table-cell>
          <table:table-cell table:style-name="ce11" office:value-type="string" calcext:value-type="string">
            <text:p>itm_orc_bow,itm_orc_hook_arrow,</text:p>
          </table:table-cell>
          <table:table-cell table:style-name="ce11" office:value-type="string" calcext:value-type="string">
            <text:p>itm_orc_slasher_heavy,itm_orc_falchion,</text:p>
          </table:table-cell>
          <table:table-cell table:style-name="ce11" office:value-type="string" calcext:value-type="string">
            <text:p>itm_moria_orc_shield_b,itm_orc_shield_b,itm_orc_shield_a,</text:p>
          </table:table-cell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bow_3</text:p>
          </table:table-cell>
          <table:table-cell table:style-name="ce12" office:value-type="string" calcext:value-type="string">
            <text:p>knows_common|knows_ironflesh_3|knows_athletics_5|knows_power_draw_3|knows_power_strike_2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B403]&lt;&gt;&quot;&quot;;[.C403]&lt;&gt;&quot;&quot;);CONCATENATE([Variables.$I$1];[Variables.$I$7];[.B403];[Variables.$I$7];[Variables.$I$6];[Variables.$I$7];[.C403];[Variables.$I$7];[Variables.$I$6];[Variables.$I$7];[.D403];[Variables.$I$7];[Variables.$I$6];[.E403];[Variables.$I$6];[.F403];[Variables.$I$6];[.G403];[Variables.$I$6];[.H403];[Variables.$I$6];[Variables.$I$1];[.I403];[.J403];[.K403];[.L403];[.M403];[.N403];[.O403];[Variables.$I$2];[Variables.$I$6];[.P403];[Variables.$I$6];[.Q403];[Variables.$I$6];[.R403];[Variables.$I$6];[.S403];[Variables.$I$6];[.T403];IF([.U403]&lt;&gt;&quot;&quot;;CONCATENATE([Variables.$I$6];[.U403]);&quot;&quot;);[Variables.$I$2];[Variables.$I$6]);IF([.B403]&lt;&gt;&quot;&quot;;CONCATENATE(&quot;#&quot;;[.B403]);&quot;&quot;))" office:value-type="string" office:string-value="[&quot;a3_moria_large_goblin_archer&quot;,&quot;Large_Goblin_Archer_of_Moria&quot;,&quot;Large_Goblin_Archers_of_Moria&quot;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" calcext:value-type="string">
            <text:p>["a3_moria_large_goblin_archer","Large_Goblin_Archer_of_Moria","Large_Goblin_Archers_of_Moria"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</text:p>
          </table:table-cell>
          <table:table-cell table:number-columns-repeated="16362"/>
        </table:table-row>
        <table:table-row table:style-name="ro1">
          <table:table-cell table:style-name="ce6" table:formula="of:=IF(AND([.B404]&lt;&gt;&quot;&quot;;[.C404]&lt;&gt;&quot;&quot;);CONCATENATE([Variables.$I$1];[Variables.$I$7];[.B404];[Variables.$I$7];[Variables.$I$6];[Variables.$I$7];[.C404];[Variables.$I$7];[Variables.$I$6];[Variables.$I$7];[.D404];[Variables.$I$7];[Variables.$I$6];[.E404];[Variables.$I$6];[.F404];[Variables.$I$6];[.G404];[Variables.$I$6];[.H404];[Variables.$I$6];[Variables.$I$1];[.I404];[.J404];[.K404];[.L404];[.M404];[.N404];[.O404];[Variables.$I$2];[Variables.$I$6];[.P404];[Variables.$I$6];[.Q404];[Variables.$I$6];[.R404];[Variables.$I$6];[.S404];[Variables.$I$6];[.T404];IF([.U404]&lt;&gt;&quot;&quot;;CONCATENATE([Variables.$I$6];[.U404]);&quot;&quot;);[Variables.$I$2];[Variables.$I$6]);IF([.B404]&lt;&gt;&quot;&quot;;CONCATENATE(&quot;#&quot;;[.B404]);&quot;&quot;))" office:value-type="string" office:string-value="[&quot;a4_moria_fell_goblin_archer&quot;,&quot;Fell_Goblin_Archer_of_Moria&quot;,&quot;Fell_Goblin_Archers_of_Moria&quot;,tf_orc| tfg_ranged| tfg_armor| tfg_boots| tfg_helm| tf_no_capture_alive,0,0,fac_moria,[itm_orc_bughelm_good, itm_orc_beakhelm_good,itm_moria_armor_d,itm_moria_armor_c,itm_moria_armor_d, itm_evil_gauntlets_a,itm_orc_ragwrap,itm_uruk_bow,itm_orc_hook_arrow,itm_orc_falchion_heavy,itm_orc_pick,itm_moria_orc_shield_b,itm_moria_orc_shield_c,],attr_orc_tier_4,wp_orc_tier_bow_4,knows_common|knows_ironflesh_4|knows_athletics_7|knows_power_draw_4|knows_power_strike_3,orc_face5,orc_face6]," calcext:value-type="string">
            <text:p>["a4_moria_fell_goblin_archer","Fell_Goblin_Archer_of_Moria","Fell_Goblin_Archers_of_Moria",tf_orc| tfg_ranged| tfg_armor| tfg_boots| tfg_helm| tf_no_capture_alive,0,0,fac_moria,[itm_orc_bughelm_good, itm_orc_beakhelm_good,itm_moria_armor_d,itm_moria_armor_c,itm_moria_armor_d, itm_evil_gauntlets_a,itm_orc_ragwrap,itm_uruk_bow,itm_orc_hook_arrow,itm_orc_falchion_heavy,itm_orc_pick,itm_moria_orc_shield_b,itm_moria_orc_shield_c,],attr_orc_tier_4,wp_orc_tier_bow_4,knows_common|knows_ironflesh_4|knows_athletics_7|knows_power_draw_4|knows_power_strike_3,orc_face5,orc_face6],</text:p>
          </table:table-cell>
          <table:table-cell table:style-name="ce7" office:value-type="string" calcext:value-type="string">
            <text:p>a4_moria_fell_goblin_archer</text:p>
          </table:table-cell>
          <table:table-cell table:style-name="ce7" office:value-type="string" calcext:value-type="string">
            <text:p>Fell_Goblin_Archer_of_Moria</text:p>
          </table:table-cell>
          <table:table-cell table:style-name="ce7" office:value-type="string" calcext:value-type="string">
            <text:p>Fell_Goblin_Archers_of_Moria</text:p>
          </table:table-cell>
          <table:table-cell table:style-name="ce8" office:value-type="string" calcext:value-type="string">
            <text:p>tf_orc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ia</text:p>
          </table:table-cell>
          <table:table-cell table:style-name="ce11" office:value-type="string" calcext:value-type="string">
            <text:p>itm_orc_bughelm_good, itm_orc_beakhelm_good,</text:p>
          </table:table-cell>
          <table:table-cell table:style-name="ce11" office:value-type="string" calcext:value-type="string">
            <text:p>itm_moria_armor_d,itm_moria_armor_c,itm_moria_armor_d,</text:p>
          </table:table-cell>
          <table:table-cell table:style-name="ce11" office:value-type="string" calcext:value-type="string">
            <text:p><text:s/>itm_evil_gauntlets_a,</text:p>
          </table:table-cell>
          <table:table-cell table:style-name="ce11" office:value-type="string" calcext:value-type="string">
            <text:p>itm_orc_ragwrap,</text:p>
          </table:table-cell>
          <table:table-cell table:style-name="ce11" office:value-type="string" calcext:value-type="string">
            <text:p>itm_uruk_bow,itm_orc_hook_arrow,</text:p>
          </table:table-cell>
          <table:table-cell table:style-name="ce11" office:value-type="string" calcext:value-type="string">
            <text:p>itm_orc_falchion_heavy,itm_orc_pick,</text:p>
          </table:table-cell>
          <table:table-cell table:style-name="ce11" office:value-type="string" calcext:value-type="string">
            <text:p>itm_moria_orc_shield_b,itm_moria_orc_shield_c,</text:p>
          </table:table-cell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bow_4</text:p>
          </table:table-cell>
          <table:table-cell table:style-name="ce12" office:value-type="string" calcext:value-type="string">
            <text:p>knows_common|knows_ironflesh_4|knows_athletics_7|knows_power_draw_4|knows_power_strike_3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B404]&lt;&gt;&quot;&quot;;[.C404]&lt;&gt;&quot;&quot;);CONCATENATE([Variables.$I$1];[Variables.$I$7];[.B404];[Variables.$I$7];[Variables.$I$6];[Variables.$I$7];[.C404];[Variables.$I$7];[Variables.$I$6];[Variables.$I$7];[.D404];[Variables.$I$7];[Variables.$I$6];[.E404];[Variables.$I$6];[.F404];[Variables.$I$6];[.G404];[Variables.$I$6];[.H404];[Variables.$I$6];[Variables.$I$1];[.I404];[.J404];[.K404];[.L404];[.M404];[.N404];[.O404];[Variables.$I$2];[Variables.$I$6];[.P404];[Variables.$I$6];[.Q404];[Variables.$I$6];[.R404];[Variables.$I$6];[.S404];[Variables.$I$6];[.T404];IF([.U404]&lt;&gt;&quot;&quot;;CONCATENATE([Variables.$I$6];[.U404]);&quot;&quot;);[Variables.$I$2];[Variables.$I$6]);IF([.B404]&lt;&gt;&quot;&quot;;CONCATENATE(&quot;#&quot;;[.B404]);&quot;&quot;))" office:value-type="string" office:string-value="[&quot;a4_moria_fell_goblin_archer&quot;,&quot;Fell_Goblin_Archer_of_Moria&quot;,&quot;Fell_Goblin_Archers_of_Moria&quot;,tf_orc| tfg_ranged| tfg_armor| tfg_boots| tfg_helm| tf_no_capture_alive,0,0,fac_moria,[itm_orc_bughelm_good, itm_orc_beakhelm_good,itm_moria_armor_d,itm_moria_armor_c,itm_moria_armor_d, itm_evil_gauntlets_a,itm_orc_ragwrap,itm_uruk_bow,itm_orc_hook_arrow,itm_orc_falchion_heavy,itm_orc_pick,itm_moria_orc_shield_b,itm_moria_orc_shield_c,],attr_orc_tier_4,wp_orc_tier_bow_4,knows_common|knows_ironflesh_4|knows_athletics_7|knows_power_draw_4|knows_power_strike_3,orc_face5,orc_face6]," calcext:value-type="string">
            <text:p>["a4_moria_fell_goblin_archer","Fell_Goblin_Archer_of_Moria","Fell_Goblin_Archers_of_Moria",tf_orc| tfg_ranged| tfg_armor| tfg_boots| tfg_helm| tf_no_capture_alive,0,0,fac_moria,[itm_orc_bughelm_good, itm_orc_beakhelm_good,itm_moria_armor_d,itm_moria_armor_c,itm_moria_armor_d, itm_evil_gauntlets_a,itm_orc_ragwrap,itm_uruk_bow,itm_orc_hook_arrow,itm_orc_falchion_heavy,itm_orc_pick,itm_moria_orc_shield_b,itm_moria_orc_shield_c,],attr_orc_tier_4,wp_orc_tier_bow_4,knows_common|knows_ironflesh_4|knows_athletics_7|knows_power_draw_4|knows_power_strike_3,orc_face5,orc_face6],</text:p>
          </table:table-cell>
          <table:table-cell table:number-columns-repeated="16362"/>
        </table:table-row>
        <table:table-row table:style-name="ro1">
          <table:table-cell table:style-name="ce6" table:formula="of:=IF(AND([.B405]&lt;&gt;&quot;&quot;;[.C405]&lt;&gt;&quot;&quot;);CONCATENATE([Variables.$I$1];[Variables.$I$7];[.B405];[Variables.$I$7];[Variables.$I$6];[Variables.$I$7];[.C405];[Variables.$I$7];[Variables.$I$6];[Variables.$I$7];[.D405];[Variables.$I$7];[Variables.$I$6];[.E405];[Variables.$I$6];[.F405];[Variables.$I$6];[.G405];[Variables.$I$6];[.H405];[Variables.$I$6];[Variables.$I$1];[.I405];[.J405];[.K405];[.L405];[.M405];[.N405];[.O405];[Variables.$I$2];[Variables.$I$6];[.P405];[Variables.$I$6];[.Q405];[Variables.$I$6];[.R405];[Variables.$I$6];[.S405];[Variables.$I$6];[.T405];IF([.U405]&lt;&gt;&quot;&quot;;CONCATENATE([Variables.$I$6];[.U405]);&quot;&quot;);[Variables.$I$2];[Variables.$I$6]);IF([.B405]&lt;&gt;&quot;&quot;;CONCATENATE(&quot;#&quot;;[.B405]);&quot;&quot;))" office:value-type="string" office:string-value="#next two moved to end of file" calcext:value-type="string">
            <text:p>#next two moved to end of file</text:p>
          </table:table-cell>
          <table:table-cell table:style-name="ce5" office:value-type="string" calcext:value-type="string">
            <text:p>next two moved to end of file</text:p>
          </table:table-cell>
          <table:table-cell table:style-name="ce6" table:number-columns-repeated="19"/>
          <table:table-cell table:style-name="ce6" table:formula="of:=IF(AND([.B405]&lt;&gt;&quot;&quot;;[.C405]&lt;&gt;&quot;&quot;);CONCATENATE([Variables.$I$1];[Variables.$I$7];[.B405];[Variables.$I$7];[Variables.$I$6];[Variables.$I$7];[.C405];[Variables.$I$7];[Variables.$I$6];[Variables.$I$7];[.D405];[Variables.$I$7];[Variables.$I$6];[.E405];[Variables.$I$6];[.F405];[Variables.$I$6];[.G405];[Variables.$I$6];[.H405];[Variables.$I$6];[Variables.$I$1];[.I405];[.J405];[.K405];[.L405];[.M405];[.N405];[.O405];[Variables.$I$2];[Variables.$I$6];[.P405];[Variables.$I$6];[.Q405];[Variables.$I$6];[.R405];[Variables.$I$6];[.S405];[Variables.$I$6];[.T405];IF([.U405]&lt;&gt;&quot;&quot;;CONCATENATE([Variables.$I$6];[.U405]);&quot;&quot;);[Variables.$I$2];[Variables.$I$6]);IF([.B405]&lt;&gt;&quot;&quot;;CONCATENATE(&quot;#&quot;;[.B405]);&quot;&quot;))" office:value-type="string" office:string-value="#next two moved to end of file" calcext:value-type="string">
            <text:p>#next two moved to end of file</text:p>
          </table:table-cell>
          <table:table-cell table:number-columns-repeated="16362"/>
        </table:table-row>
        <table:table-row table:style-name="ro1">
          <table:table-cell table:style-name="ce6" table:formula="of:=IF(AND([.B406]&lt;&gt;&quot;&quot;;[.C406]&lt;&gt;&quot;&quot;);CONCATENATE([Variables.$I$1];[Variables.$I$7];[.B406];[Variables.$I$7];[Variables.$I$6];[Variables.$I$7];[.C406];[Variables.$I$7];[Variables.$I$6];[Variables.$I$7];[.D406];[Variables.$I$7];[Variables.$I$6];[.E406];[Variables.$I$6];[.F406];[Variables.$I$6];[.G406];[Variables.$I$6];[.H406];[Variables.$I$6];[Variables.$I$1];[.I406];[.J406];[.K406];[.L406];[.M406];[.N406];[.O406];[Variables.$I$2];[Variables.$I$6];[.P406];[Variables.$I$6];[.Q406];[Variables.$I$6];[.R406];[Variables.$I$6];[.S406];[Variables.$I$6];[.T406];IF([.U406]&lt;&gt;&quot;&quot;;CONCATENATE([Variables.$I$6];[.U406]);&quot;&quot;);[Variables.$I$2];[Variables.$I$6]);IF([.B406]&lt;&gt;&quot;&quot;;CONCATENATE(&quot;#&quot;;[.B406]);&quot;&quot;))" office:value-type="string" office:string-value="[&quot;i5_moria_deep_dweller&quot;,&quot;Deep-Dweller_of_Moria&quot;,&quot;Deep-Dwellers_of_Moria&quot;,tf_orc| tfg_armor| tfg_helm| tfg_boots| tf_no_capture_alive,0,0,fac_moria,[itm_orc_bughelm_lordly,itm_orc_bughelm_lordly,itm_uruk_helm_e,itm_uruk_helm_f,itm_moria_armor_e,itm_orc_greaves,itm_orc_mace_heavy,itm_dwarf_war_pick_old,itm_orc_javelin,itm_orc_javelin,itm_moria_orc_shield_b,itm_moria_orc_shield_c],attr_orc_tier_5,wp_orc_tier_5,knows_common|knows_athletics_7|knows_power_strike_6|knows_power_throw_5|knows_ironflesh_7,orc_face5,orc_face4]," calcext:value-type="string">
            <text:p>["i5_moria_deep_dweller","Deep-Dweller_of_Moria","Deep-Dwellers_of_Moria",tf_orc| tfg_armor| tfg_helm| tfg_boots| tf_no_capture_alive,0,0,fac_moria,[itm_orc_bughelm_lordly,itm_orc_bughelm_lordly,itm_uruk_helm_e,itm_uruk_helm_f,itm_moria_armor_e,itm_orc_greaves,itm_orc_mace_heavy,itm_dwarf_war_pick_old,itm_orc_javelin,itm_orc_javelin,itm_moria_orc_shield_b,itm_moria_orc_shield_c],attr_orc_tier_5,wp_orc_tier_5,knows_common|knows_athletics_7|knows_power_strike_6|knows_power_throw_5|knows_ironflesh_7,orc_face5,orc_face4],</text:p>
          </table:table-cell>
          <table:table-cell table:style-name="ce7" office:value-type="string" calcext:value-type="string">
            <text:p>i5_moria_deep_dweller</text:p>
          </table:table-cell>
          <table:table-cell table:style-name="ce7" office:value-type="string" calcext:value-type="string">
            <text:p>Deep-Dweller_of_Moria</text:p>
          </table:table-cell>
          <table:table-cell table:style-name="ce7" office:value-type="string" calcext:value-type="string">
            <text:p>Deep-Dwellers_of_Moria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ia</text:p>
          </table:table-cell>
          <table:table-cell table:style-name="ce11" office:value-type="string" calcext:value-type="string">
            <text:p>itm_orc_bughelm_lordly,itm_orc_bughelm_lordly,itm_uruk_helm_e,itm_uruk_helm_f,</text:p>
          </table:table-cell>
          <table:table-cell table:style-name="ce11" office:value-type="string" calcext:value-type="string">
            <text:p>itm_moria_armor_e,</text:p>
          </table:table-cell>
          <table:table-cell table:style-name="ce11"/>
          <table:table-cell table:style-name="ce11" office:value-type="string" calcext:value-type="string">
            <text:p>itm_orc_greaves,</text:p>
          </table:table-cell>
          <table:table-cell table:style-name="ce11" office:value-type="string" calcext:value-type="string">
            <text:p>itm_orc_mace_heavy,itm_dwarf_war_pick_old,</text:p>
          </table:table-cell>
          <table:table-cell table:style-name="ce11" office:value-type="string" calcext:value-type="string">
            <text:p>itm_orc_javelin,itm_orc_javelin,itm_moria_orc_shield_b,itm_moria_orc_shield_c</text:p>
          </table:table-cell>
          <table:table-cell table:style-name="ce11"/>
          <table:table-cell table:style-name="ce12" office:value-type="string" calcext:value-type="string">
            <text:p>attr_orc_tier_5</text:p>
          </table:table-cell>
          <table:table-cell table:style-name="ce12" office:value-type="string" calcext:value-type="string">
            <text:p>wp_orc_tier_5</text:p>
          </table:table-cell>
          <table:table-cell table:style-name="ce12" office:value-type="string" calcext:value-type="string">
            <text:p>knows_common|knows_athletics_7|knows_power_strike_6|knows_power_throw_5|knows_ironflesh_7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B406]&lt;&gt;&quot;&quot;;[.C406]&lt;&gt;&quot;&quot;);CONCATENATE([Variables.$I$1];[Variables.$I$7];[.B406];[Variables.$I$7];[Variables.$I$6];[Variables.$I$7];[.C406];[Variables.$I$7];[Variables.$I$6];[Variables.$I$7];[.D406];[Variables.$I$7];[Variables.$I$6];[.E406];[Variables.$I$6];[.F406];[Variables.$I$6];[.G406];[Variables.$I$6];[.H406];[Variables.$I$6];[Variables.$I$1];[.I406];[.J406];[.K406];[.L406];[.M406];[.N406];[.O406];[Variables.$I$2];[Variables.$I$6];[.P406];[Variables.$I$6];[.Q406];[Variables.$I$6];[.R406];[Variables.$I$6];[.S406];[Variables.$I$6];[.T406];IF([.U406]&lt;&gt;&quot;&quot;;CONCATENATE([Variables.$I$6];[.U406]);&quot;&quot;);[Variables.$I$2];[Variables.$I$6]);IF([.B406]&lt;&gt;&quot;&quot;;CONCATENATE(&quot;#&quot;;[.B406]);&quot;&quot;))" office:value-type="string" office:string-value="[&quot;i5_moria_deep_dweller&quot;,&quot;Deep-Dweller_of_Moria&quot;,&quot;Deep-Dwellers_of_Moria&quot;,tf_orc| tfg_armor| tfg_helm| tfg_boots| tf_no_capture_alive,0,0,fac_moria,[itm_orc_bughelm_lordly,itm_orc_bughelm_lordly,itm_uruk_helm_e,itm_uruk_helm_f,itm_moria_armor_e,itm_orc_greaves,itm_orc_mace_heavy,itm_dwarf_war_pick_old,itm_orc_javelin,itm_orc_javelin,itm_moria_orc_shield_b,itm_moria_orc_shield_c],attr_orc_tier_5,wp_orc_tier_5,knows_common|knows_athletics_7|knows_power_strike_6|knows_power_throw_5|knows_ironflesh_7,orc_face5,orc_face4]," calcext:value-type="string">
            <text:p>["i5_moria_deep_dweller","Deep-Dweller_of_Moria","Deep-Dwellers_of_Moria",tf_orc| tfg_armor| tfg_helm| tfg_boots| tf_no_capture_alive,0,0,fac_moria,[itm_orc_bughelm_lordly,itm_orc_bughelm_lordly,itm_uruk_helm_e,itm_uruk_helm_f,itm_moria_armor_e,itm_orc_greaves,itm_orc_mace_heavy,itm_dwarf_war_pick_old,itm_orc_javelin,itm_orc_javelin,itm_moria_orc_shield_b,itm_moria_orc_shield_c],attr_orc_tier_5,wp_orc_tier_5,knows_common|knows_athletics_7|knows_power_strike_6|knows_power_throw_5|knows_ironflesh_7,orc_face5,orc_face4],</text:p>
          </table:table-cell>
          <table:table-cell table:number-columns-repeated="16362"/>
        </table:table-row>
        <table:table-row table:style-name="ro1">
          <table:table-cell table:style-name="ce6" table:formula="of:=IF(AND([.B407]&lt;&gt;&quot;&quot;;[.C407]&lt;&gt;&quot;&quot;);CONCATENATE([Variables.$I$1];[Variables.$I$7];[.B407];[Variables.$I$7];[Variables.$I$6];[Variables.$I$7];[.C407];[Variables.$I$7];[Variables.$I$6];[Variables.$I$7];[.D407];[Variables.$I$7];[Variables.$I$6];[.E407];[Variables.$I$6];[.F407];[Variables.$I$6];[.G407];[Variables.$I$6];[.H407];[Variables.$I$6];[Variables.$I$1];[.I407];[.J407];[.K407];[.L407];[.M407];[.N407];[.O407];[Variables.$I$2];[Variables.$I$6];[.P407];[Variables.$I$6];[.Q407];[Variables.$I$6];[.R407];[Variables.$I$6];[.S407];[Variables.$I$6];[.T407];IF([.U407]&lt;&gt;&quot;&quot;;CONCATENATE([Variables.$I$6];[.U407]);&quot;&quot;);[Variables.$I$2];[Variables.$I$6]);IF([.B407]&lt;&gt;&quot;&quot;;CONCATENATE(&quot;#&quot;;[.B407]);&quot;&quot;))" office:value-type="string" office:string-value="[&quot;i5_moria_orc_chieftain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itm_marker_hp_shield,],attr_orc_tier_5,wp_orc_tier_5,knows_common|knows_athletics_5|knows_power_strike_4|knows_ironflesh_10|knows_shield_4,orc_face5,orc_face4]," calcext:value-type="string">
            <text:p>["i5_moria_orc_chieftain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itm_marker_hp_shield,],attr_orc_tier_5,wp_orc_tier_5,knows_common|knows_athletics_5|knows_power_strike_4|knows_ironflesh_10|knows_shield_4,orc_face5,orc_face4],</text:p>
          </table:table-cell>
          <table:table-cell table:style-name="ce7" office:value-type="string" calcext:value-type="string">
            <text:p>i5_moria_orc_chieftain</text:p>
          </table:table-cell>
          <table:table-cell table:style-name="ce7" office:value-type="string" calcext:value-type="string">
            <text:p>Orc_Chieftain_of_Moria</text:p>
          </table:table-cell>
          <table:table-cell table:style-name="ce7" office:value-type="string" calcext:value-type="string">
            <text:p>Orc_Chieftains_of_Moria</text:p>
          </table:table-cell>
          <table:table-cell table:style-name="ce8" office:value-type="string" calcext:value-type="string">
            <text:p>tf_orc| tfg_armor| tfg_helm| tfg_boots| tfg_shield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ia</text:p>
          </table:table-cell>
          <table:table-cell table:style-name="ce11" office:value-type="string" calcext:value-type="string">
            <text:p>itm_orc_beakhelm_lordly,itm_uruk_helm_c,itm_uruk_helm_d,itm_uruk_helm_f,</text:p>
          </table:table-cell>
          <table:table-cell table:style-name="ce11" office:value-type="string" calcext:value-type="string">
            <text:p>(itm_moria_armor_e, imod_sturdy),(itm_moria_armor_e, imod_reinforced),(itm_moria_armor_e, imod_lordly),</text:p>
          </table:table-cell>
          <table:table-cell table:style-name="ce11"/>
          <table:table-cell table:style-name="ce11" office:value-type="string" calcext:value-type="string">
            <text:p>itm_uruk_greaves, itm_orc_greaves,</text:p>
          </table:table-cell>
          <table:table-cell table:style-name="ce11" office:value-type="string" calcext:value-type="string">
            <text:p>itm_orc_sabre_heavy,itm_orc_scimitar_heavy,</text:p>
          </table:table-cell>
          <table:table-cell table:style-name="ce11" office:value-type="string" calcext:value-type="string">
            <text:p>itm_orc_skull_spear,itm_orc_simple_spear_heavy, itm_moria_orc_shield_a, (itm_orc_shield_c, imod_reinforced)</text:p>
          </table:table-cell>
          <table:table-cell table:style-name="ce11" office:value-type="string" calcext:value-type="string">
            <text:p>itm_marker_hp_shield,</text:p>
          </table:table-cell>
          <table:table-cell table:style-name="ce12" office:value-type="string" calcext:value-type="string">
            <text:p>attr_orc_tier_5</text:p>
          </table:table-cell>
          <table:table-cell table:style-name="ce12" office:value-type="string" calcext:value-type="string">
            <text:p>wp_orc_tier_5</text:p>
          </table:table-cell>
          <table:table-cell table:style-name="ce12" office:value-type="string" calcext:value-type="string">
            <text:p>knows_common|knows_athletics_5|knows_power_strike_4|knows_ironflesh_10|knows_shield_4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B407]&lt;&gt;&quot;&quot;;[.C407]&lt;&gt;&quot;&quot;);CONCATENATE([Variables.$I$1];[Variables.$I$7];[.B407];[Variables.$I$7];[Variables.$I$6];[Variables.$I$7];[.C407];[Variables.$I$7];[Variables.$I$6];[Variables.$I$7];[.D407];[Variables.$I$7];[Variables.$I$6];[.E407];[Variables.$I$6];[.F407];[Variables.$I$6];[.G407];[Variables.$I$6];[.H407];[Variables.$I$6];[Variables.$I$1];[.I407];[.J407];[.K407];[.L407];[.M407];[.N407];[.O407];[Variables.$I$2];[Variables.$I$6];[.P407];[Variables.$I$6];[.Q407];[Variables.$I$6];[.R407];[Variables.$I$6];[.S407];[Variables.$I$6];[.T407];IF([.U407]&lt;&gt;&quot;&quot;;CONCATENATE([Variables.$I$6];[.U407]);&quot;&quot;);[Variables.$I$2];[Variables.$I$6]);IF([.B407]&lt;&gt;&quot;&quot;;CONCATENATE(&quot;#&quot;;[.B407]);&quot;&quot;))" office:value-type="string" office:string-value="[&quot;i5_moria_orc_chieftain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itm_marker_hp_shield,],attr_orc_tier_5,wp_orc_tier_5,knows_common|knows_athletics_5|knows_power_strike_4|knows_ironflesh_10|knows_shield_4,orc_face5,orc_face4]," calcext:value-type="string">
            <text:p>["i5_moria_orc_chieftain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itm_marker_hp_shield,],attr_orc_tier_5,wp_orc_tier_5,knows_common|knows_athletics_5|knows_power_strike_4|knows_ironflesh_10|knows_shield_4,orc_face5,orc_face4],</text:p>
          </table:table-cell>
          <table:table-cell table:number-columns-repeated="16362"/>
        </table:table-row>
        <table:table-row table:style-name="ro1">
          <table:table-cell table:formula="of:=IF(AND([.B408]&lt;&gt;&quot;&quot;;[.C408]&lt;&gt;&quot;&quot;);CONCATENATE([Variables.$I$1];[Variables.$I$7];[.B408];[Variables.$I$7];[Variables.$I$6];[Variables.$I$7];[.C408];[Variables.$I$7];[Variables.$I$6];[Variables.$I$7];[.D408];[Variables.$I$7];[Variables.$I$6];[.E408];[Variables.$I$6];[.F408];[Variables.$I$6];[.G408];[Variables.$I$6];[.H408];[Variables.$I$6];[Variables.$I$1];[.I408];[.J408];[.K408];[.L408];[.M408];[.N408];[.O408];[Variables.$I$2];[Variables.$I$6];[.P408];[Variables.$I$6];[.Q408];[Variables.$I$6];[.R408];[Variables.$I$6];[.S408];[Variables.$I$6];[.T408];IF([.U408]&lt;&gt;&quot;&quot;;CONCATENATE([Variables.$I$6];[.U408]);&quot;&quot;);[Variables.$I$2];[Variables.$I$6]);IF([.B408]&lt;&gt;&quot;&quot;;CONCATENATE(&quot;#&quot;;[.B408]);&quot;&quot;))">
            <text:p/>
          </table:table-cell>
          <table:table-cell table:style-name="ce6" table:number-columns-repeated="20"/>
          <table:table-cell table:style-name="ce36" table:formula="of:=IF(AND([.B408]&lt;&gt;&quot;&quot;;[.C408]&lt;&gt;&quot;&quot;);CONCATENATE([Variables.$I$1];[Variables.$I$7];[.B408];[Variables.$I$7];[Variables.$I$6];[Variables.$I$7];[.C408];[Variables.$I$7];[Variables.$I$6];[Variables.$I$7];[.D408];[Variables.$I$7];[Variables.$I$6];[.E408];[Variables.$I$6];[.F408];[Variables.$I$6];[.G408];[Variables.$I$6];[.H408];[Variables.$I$6];[Variables.$I$1];[.I408];[.J408];[.K408];[.L408];[.M408];[.N408];[.O408];[Variables.$I$2];[Variables.$I$6];[.P408];[Variables.$I$6];[.Q408];[Variables.$I$6];[.R408];[Variables.$I$6];[.S408];[Variables.$I$6];[.T408];IF([.U408]&lt;&gt;&quot;&quot;;CONCATENATE([Variables.$I$6];[.U408]);&quot;&quot;);[Variables.$I$2];[Variables.$I$6]);IF([.B408]&lt;&gt;&quot;&quot;;CONCATENATE(&quot;#&quot;;[.B408]);&quot;&quot;))">
            <text:p/>
          </table:table-cell>
          <table:table-cell table:number-columns-repeated="16362"/>
        </table:table-row>
        <table:table-row table:style-name="ro1">
          <table:table-cell table:style-name="ce6" table:formula="of:=IF(AND([.B409]&lt;&gt;&quot;&quot;;[.C409]&lt;&gt;&quot;&quot;);CONCATENATE([Variables.$I$1];[Variables.$I$7];[.B409];[Variables.$I$7];[Variables.$I$6];[Variables.$I$7];[.C409];[Variables.$I$7];[Variables.$I$6];[Variables.$I$7];[.D409];[Variables.$I$7];[Variables.$I$6];[.E409];[Variables.$I$6];[.F409];[Variables.$I$6];[.G409];[Variables.$I$6];[.H409];[Variables.$I$6];[Variables.$I$1];[.I409];[.J409];[.K409];[.L409];[.M409];[.N409];[.O409];[Variables.$I$2];[Variables.$I$6];[.P409];[Variables.$I$6];[.Q409];[Variables.$I$6];[.R409];[Variables.$I$6];[.S409];[Variables.$I$6];[.T409];IF([.U409]&lt;&gt;&quot;&quot;;CONCATENATE([Variables.$I$6];[.U409]);&quot;&quot;);[Variables.$I$2];[Variables.$I$6]);IF([.B409]&lt;&gt;&quot;&quot;;CONCATENATE(&quot;#&quot;;[.B409]);&quot;&quot;))" office:value-type="string" office:string-value="#Gundabad" calcext:value-type="string">
            <text:p>#Gundabad</text:p>
          </table:table-cell>
          <table:table-cell table:style-name="ce5" office:value-type="string" calcext:value-type="string">
            <text:p>Gundabad</text:p>
          </table:table-cell>
          <table:table-cell table:style-name="ce6" table:number-columns-repeated="19"/>
          <table:table-cell table:style-name="ce6" table:formula="of:=IF(AND([.B409]&lt;&gt;&quot;&quot;;[.C409]&lt;&gt;&quot;&quot;);CONCATENATE([Variables.$I$1];[Variables.$I$7];[.B409];[Variables.$I$7];[Variables.$I$6];[Variables.$I$7];[.C409];[Variables.$I$7];[Variables.$I$6];[Variables.$I$7];[.D409];[Variables.$I$7];[Variables.$I$6];[.E409];[Variables.$I$6];[.F409];[Variables.$I$6];[.G409];[Variables.$I$6];[.H409];[Variables.$I$6];[Variables.$I$1];[.I409];[.J409];[.K409];[.L409];[.M409];[.N409];[.O409];[Variables.$I$2];[Variables.$I$6];[.P409];[Variables.$I$6];[.Q409];[Variables.$I$6];[.R409];[Variables.$I$6];[.S409];[Variables.$I$6];[.T409];IF([.U409]&lt;&gt;&quot;&quot;;CONCATENATE([Variables.$I$6];[.U409]);&quot;&quot;);[Variables.$I$2];[Variables.$I$6]);IF([.B409]&lt;&gt;&quot;&quot;;CONCATENATE(&quot;#&quot;;[.B409]);&quot;&quot;))" office:value-type="string" office:string-value="#Gundabad" calcext:value-type="string">
            <text:p>#Gundabad</text:p>
          </table:table-cell>
          <table:table-cell table:number-columns-repeated="16362"/>
        </table:table-row>
        <table:table-row table:style-name="ro1">
          <table:table-cell table:style-name="ce6" table:formula="of:=IF(AND([.B410]&lt;&gt;&quot;&quot;;[.C410]&lt;&gt;&quot;&quot;);CONCATENATE([Variables.$I$1];[Variables.$I$7];[.B410];[Variables.$I$7];[Variables.$I$6];[Variables.$I$7];[.C410];[Variables.$I$7];[Variables.$I$6];[Variables.$I$7];[.D410];[Variables.$I$7];[Variables.$I$6];[.E410];[Variables.$I$6];[.F410];[Variables.$I$6];[.G410];[Variables.$I$6];[.H410];[Variables.$I$6];[Variables.$I$1];[.I410];[.J410];[.K410];[.L410];[.M410];[.N410];[.O410];[Variables.$I$2];[Variables.$I$6];[.P410];[Variables.$I$6];[.Q410];[Variables.$I$6];[.R410];[Variables.$I$6];[.S410];[Variables.$I$6];[.T410];IF([.U410]&lt;&gt;&quot;&quot;;CONCATENATE([Variables.$I$6];[.U410]);&quot;&quot;);[Variables.$I$2];[Variables.$I$6]);IF([.B410]&lt;&gt;&quot;&quot;;CONCATENATE(&quot;#&quot;;[.B410]);&quot;&quot;))" office:value-type="string" office:string-value="[&quot;i1_gunda_goblin&quot;,&quot;Gundabad_Goblin&quot;,&quot;Gundabad_Goblins&quot;,tf_orc| tf_no_capture_alive,0,0,fac_gundabad,[itm_gundabad_helm_a,itm_orc_skullcap_bad,itm_gundabad_armor_a,itm_orc_tribal_a,itm_wood_club,itm_orc_slasher,itm_orc_sabre_b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" calcext:value-type="string">
            <text:p>["i1_gunda_goblin","Gundabad_Goblin","Gundabad_Goblins",tf_orc| tf_no_capture_alive,0,0,fac_gundabad,[itm_gundabad_helm_a,itm_orc_skullcap_bad,itm_gundabad_armor_a,itm_orc_tribal_a,itm_wood_club,itm_orc_slasher,itm_orc_sabre_b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</text:p>
          </table:table-cell>
          <table:table-cell table:style-name="ce7" office:value-type="string" calcext:value-type="string">
            <text:p>i1_gunda_goblin</text:p>
          </table:table-cell>
          <table:table-cell table:style-name="ce7" office:value-type="string" calcext:value-type="string">
            <text:p>Gundabad_Goblin</text:p>
          </table:table-cell>
          <table:table-cell table:style-name="ce7" office:value-type="string" calcext:value-type="string">
            <text:p>Gundabad_Goblins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undabad</text:p>
          </table:table-cell>
          <table:table-cell table:style-name="ce11" office:value-type="string" calcext:value-type="string">
            <text:p>itm_gundabad_helm_a,itm_orc_skullcap_bad,</text:p>
          </table:table-cell>
          <table:table-cell table:style-name="ce11" office:value-type="string" calcext:value-type="string">
            <text:p>itm_gundabad_armor_a,itm_orc_tribal_a,</text:p>
          </table:table-cell>
          <table:table-cell table:style-name="ce11" table:number-columns-repeated="2"/>
          <table:table-cell table:style-name="ce11" office:value-type="string" calcext:value-type="string">
            <text:p>itm_wood_club,itm_orc_slasher,itm_orc_sabre_b,itm_orc_simple_spear,itm_orc_simple_spear,itm_bone_cudgel,</text:p>
          </table:table-cell>
          <table:table-cell table:style-name="ce11" office:value-type="string" calcext:value-type="string">
            <text:p>itm_orc_bow,itm_orc_hook_arrow,</text:p>
          </table:table-cell>
          <table:table-cell table:style-name="ce11"/>
          <table:table-cell table:style-name="ce12" office:value-type="string" calcext:value-type="string">
            <text:p>attr_orc_tier_1</text:p>
          </table:table-cell>
          <table:table-cell table:style-name="ce12" office:value-type="string" calcext:value-type="string">
            <text:p>wp_orc_tier_1</text:p>
          </table:table-cell>
          <table:table-cell table:style-name="ce13" office:value-type="string" calcext:value-type="string">
            <text:p>knows_common|knows_power_strike_1|knows_power_throw_1|knows_athletics_4|knows_riding_1|knows_horse_archery_1|knows_looting_2|knows_tracking_1|knows_pathfinding_1|knows_spotting_1|knows_persuasion_1</text:p>
          </table:table-cell>
          <table:table-cell table:style-name="ce14" office:value-type="string" calcext:value-type="string">
            <text:p>orc_face1</text:p>
          </table:table-cell>
          <table:table-cell table:style-name="ce14" office:value-type="string" calcext:value-type="string">
            <text:p>orc_face2</text:p>
          </table:table-cell>
          <table:table-cell table:style-name="ce15"/>
          <table:table-cell table:style-name="ce6" table:formula="of:=IF(AND([.B410]&lt;&gt;&quot;&quot;;[.C410]&lt;&gt;&quot;&quot;);CONCATENATE([Variables.$I$1];[Variables.$I$7];[.B410];[Variables.$I$7];[Variables.$I$6];[Variables.$I$7];[.C410];[Variables.$I$7];[Variables.$I$6];[Variables.$I$7];[.D410];[Variables.$I$7];[Variables.$I$6];[.E410];[Variables.$I$6];[.F410];[Variables.$I$6];[.G410];[Variables.$I$6];[.H410];[Variables.$I$6];[Variables.$I$1];[.I410];[.J410];[.K410];[.L410];[.M410];[.N410];[.O410];[Variables.$I$2];[Variables.$I$6];[.P410];[Variables.$I$6];[.Q410];[Variables.$I$6];[.R410];[Variables.$I$6];[.S410];[Variables.$I$6];[.T410];IF([.U410]&lt;&gt;&quot;&quot;;CONCATENATE([Variables.$I$6];[.U410]);&quot;&quot;);[Variables.$I$2];[Variables.$I$6]);IF([.B410]&lt;&gt;&quot;&quot;;CONCATENATE(&quot;#&quot;;[.B410]);&quot;&quot;))" office:value-type="string" office:string-value="[&quot;i1_gunda_goblin&quot;,&quot;Gundabad_Goblin&quot;,&quot;Gundabad_Goblins&quot;,tf_orc| tf_no_capture_alive,0,0,fac_gundabad,[itm_gundabad_helm_a,itm_orc_skullcap_bad,itm_gundabad_armor_a,itm_orc_tribal_a,itm_wood_club,itm_orc_slasher,itm_orc_sabre_b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" calcext:value-type="string">
            <text:p>["i1_gunda_goblin","Gundabad_Goblin","Gundabad_Goblins",tf_orc| tf_no_capture_alive,0,0,fac_gundabad,[itm_gundabad_helm_a,itm_orc_skullcap_bad,itm_gundabad_armor_a,itm_orc_tribal_a,itm_wood_club,itm_orc_slasher,itm_orc_sabre_b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</text:p>
          </table:table-cell>
          <table:table-cell table:number-columns-repeated="16362"/>
        </table:table-row>
        <table:table-row table:style-name="ro1">
          <table:table-cell table:style-name="ce6" table:formula="of:=IF(AND([.B411]&lt;&gt;&quot;&quot;;[.C411]&lt;&gt;&quot;&quot;);CONCATENATE([Variables.$I$1];[Variables.$I$7];[.B411];[Variables.$I$7];[Variables.$I$6];[Variables.$I$7];[.C411];[Variables.$I$7];[Variables.$I$6];[Variables.$I$7];[.D411];[Variables.$I$7];[Variables.$I$6];[.E411];[Variables.$I$6];[.F411];[Variables.$I$6];[.G411];[Variables.$I$6];[.H411];[Variables.$I$6];[Variables.$I$1];[.I411];[.J411];[.K411];[.L411];[.M411];[.N411];[.O411];[Variables.$I$2];[Variables.$I$6];[.P411];[Variables.$I$6];[.Q411];[Variables.$I$6];[.R411];[Variables.$I$6];[.S411];[Variables.$I$6];[.T411];IF([.U411]&lt;&gt;&quot;&quot;;CONCATENATE([Variables.$I$6];[.U411]);&quot;&quot;);[Variables.$I$2];[Variables.$I$6]);IF([.B411]&lt;&gt;&quot;&quot;;CONCATENATE(&quot;#&quot;;[.B411]);&quot;&quot;))" office:value-type="string" office:string-value="[&quot;i2_gunda_orc&quot;,&quot;Gundabad_Orc&quot;,&quot;Gundabad_Orcs&quot;,tf_orc| tfg_armor| tf_no_capture_alive,0,0,fac_gundabad,[itm_gundabad_helm_a,itm_gundabad_helm_b,itm_orc_skullcap,itm_gundabad_armor_b,itm_gundabad_armor_c,itm_orc_ragwrap,itm_orc_slasher,itm_wood_club,itm_orc_simple_spear,itm_orc_skull_spear,itm_orc_axe,itm_orc_sabre_b,itm_orc_scimitar_b,itm_orc_scimitar_bad,itm_orc_sabre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" calcext:value-type="string">
            <text:p>["i2_gunda_orc","Gundabad_Orc","Gundabad_Orcs",tf_orc| tfg_armor| tf_no_capture_alive,0,0,fac_gundabad,[itm_gundabad_helm_a,itm_gundabad_helm_b,itm_orc_skullcap,itm_gundabad_armor_b,itm_gundabad_armor_c,itm_orc_ragwrap,itm_orc_slasher,itm_wood_club,itm_orc_simple_spear,itm_orc_skull_spear,itm_orc_axe,itm_orc_sabre_b,itm_orc_scimitar_b,itm_orc_scimitar_bad,itm_orc_sabre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</text:p>
          </table:table-cell>
          <table:table-cell table:style-name="ce7" office:value-type="string" calcext:value-type="string">
            <text:p>i2_gunda_orc</text:p>
          </table:table-cell>
          <table:table-cell table:style-name="ce7" office:value-type="string" calcext:value-type="string">
            <text:p>Gundabad_Orc</text:p>
          </table:table-cell>
          <table:table-cell table:style-name="ce7" office:value-type="string" calcext:value-type="string">
            <text:p>Gundabad_Orcs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undabad</text:p>
          </table:table-cell>
          <table:table-cell table:style-name="ce11" office:value-type="string" calcext:value-type="string">
            <text:p>itm_gundabad_helm_a,itm_gundabad_helm_b,itm_orc_skullcap,</text:p>
          </table:table-cell>
          <table:table-cell table:style-name="ce11" office:value-type="string" calcext:value-type="string">
            <text:p>itm_gundabad_armor_b,itm_gundabad_armor_c,</text:p>
          </table:table-cell>
          <table:table-cell table:style-name="ce11"/>
          <table:table-cell table:style-name="ce11" office:value-type="string" calcext:value-type="string">
            <text:p>itm_orc_ragwrap,</text:p>
          </table:table-cell>
          <table:table-cell table:style-name="ce11" office:value-type="string" calcext:value-type="string">
            <text:p>itm_orc_slasher,itm_wood_club,itm_orc_simple_spear,itm_orc_skull_spear,itm_orc_axe,itm_orc_sabre_b,itm_orc_scimitar_b,itm_orc_scimitar_bad,itm_orc_sabre_bad,</text:p>
          </table:table-cell>
          <table:table-cell table:style-name="ce11" office:value-type="string" calcext:value-type="string">
            <text:p>itm_orc_bow,itm_orc_hook_arrow,</text:p>
          </table:table-cell>
          <table:table-cell table:style-name="ce11" office:value-type="string" calcext:value-type="string">
            <text:p>itm_orc_shield_a,itm_orc_shield_b,</text:p>
          </table:table-cell>
          <table:table-cell table:style-name="ce12" office:value-type="string" calcext:value-type="string">
            <text:p>attr_orc_tier_2</text:p>
          </table:table-cell>
          <table:table-cell table:style-name="ce12" office:value-type="string" calcext:value-type="string">
            <text:p>wp_orc_tier_2</text:p>
          </table:table-cell>
          <table:table-cell table:style-name="ce13" office:value-type="string" calcext:value-type="string">
            <text:p>knows_common|knows_power_strike_2|knows_power_throw_2|knows_power_draw_1|knows_athletics_5|knows_riding_1|knows_horse_archery_1|knows_looting_2|knows_tracking_1|knows_pathfinding_1|knows_spotting_1|knows_persuasion_1</text:p>
          </table:table-cell>
          <table:table-cell table:style-name="ce14" office:value-type="string" calcext:value-type="string">
            <text:p>orc_face7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B411]&lt;&gt;&quot;&quot;;[.C411]&lt;&gt;&quot;&quot;);CONCATENATE([Variables.$I$1];[Variables.$I$7];[.B411];[Variables.$I$7];[Variables.$I$6];[Variables.$I$7];[.C411];[Variables.$I$7];[Variables.$I$6];[Variables.$I$7];[.D411];[Variables.$I$7];[Variables.$I$6];[.E411];[Variables.$I$6];[.F411];[Variables.$I$6];[.G411];[Variables.$I$6];[.H411];[Variables.$I$6];[Variables.$I$1];[.I411];[.J411];[.K411];[.L411];[.M411];[.N411];[.O411];[Variables.$I$2];[Variables.$I$6];[.P411];[Variables.$I$6];[.Q411];[Variables.$I$6];[.R411];[Variables.$I$6];[.S411];[Variables.$I$6];[.T411];IF([.U411]&lt;&gt;&quot;&quot;;CONCATENATE([Variables.$I$6];[.U411]);&quot;&quot;);[Variables.$I$2];[Variables.$I$6]);IF([.B411]&lt;&gt;&quot;&quot;;CONCATENATE(&quot;#&quot;;[.B411]);&quot;&quot;))" office:value-type="string" office:string-value="[&quot;i2_gunda_orc&quot;,&quot;Gundabad_Orc&quot;,&quot;Gundabad_Orcs&quot;,tf_orc| tfg_armor| tf_no_capture_alive,0,0,fac_gundabad,[itm_gundabad_helm_a,itm_gundabad_helm_b,itm_orc_skullcap,itm_gundabad_armor_b,itm_gundabad_armor_c,itm_orc_ragwrap,itm_orc_slasher,itm_wood_club,itm_orc_simple_spear,itm_orc_skull_spear,itm_orc_axe,itm_orc_sabre_b,itm_orc_scimitar_b,itm_orc_scimitar_bad,itm_orc_sabre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" calcext:value-type="string">
            <text:p>["i2_gunda_orc","Gundabad_Orc","Gundabad_Orcs",tf_orc| tfg_armor| tf_no_capture_alive,0,0,fac_gundabad,[itm_gundabad_helm_a,itm_gundabad_helm_b,itm_orc_skullcap,itm_gundabad_armor_b,itm_gundabad_armor_c,itm_orc_ragwrap,itm_orc_slasher,itm_wood_club,itm_orc_simple_spear,itm_orc_skull_spear,itm_orc_axe,itm_orc_sabre_b,itm_orc_scimitar_b,itm_orc_scimitar_bad,itm_orc_sabre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</text:p>
          </table:table-cell>
          <table:table-cell table:number-columns-repeated="16362"/>
        </table:table-row>
        <table:table-row table:style-name="ro1">
          <table:table-cell table:style-name="ce6" table:formula="of:=IF(AND([.B412]&lt;&gt;&quot;&quot;;[.C412]&lt;&gt;&quot;&quot;);CONCATENATE([Variables.$I$1];[Variables.$I$7];[.B412];[Variables.$I$7];[Variables.$I$6];[Variables.$I$7];[.C412];[Variables.$I$7];[Variables.$I$6];[Variables.$I$7];[.D412];[Variables.$I$7];[Variables.$I$6];[.E412];[Variables.$I$6];[.F412];[Variables.$I$6];[.G412];[Variables.$I$6];[.H412];[Variables.$I$6];[Variables.$I$1];[.I412];[.J412];[.K412];[.L412];[.M412];[.N412];[.O412];[Variables.$I$2];[Variables.$I$6];[.P412];[Variables.$I$6];[.Q412];[Variables.$I$6];[.R412];[Variables.$I$6];[.S412];[Variables.$I$6];[.T412];IF([.U412]&lt;&gt;&quot;&quot;;CONCATENATE([Variables.$I$6];[.U412]);&quot;&quot;);[Variables.$I$2];[Variables.$I$6]);IF([.B412]&lt;&gt;&quot;&quot;;CONCATENATE(&quot;#&quot;;[.B412]);&quot;&quot;))" office:value-type="string" office:string-value="[&quot;i3_gunda_orc_fighter&quot;,&quot;Gundabad_Orc_Fighter&quot;,&quot;Gundabad_Orc_Fighters&quot;,tf_orc| tfg_shield| tfg_armor| tfg_helm| tfg_boots| tf_no_capture_alive,0,0,fac_gundabad,[itm_gundabad_helm_c,itm_gundabad_helm_b, itm_orc_coif_bad,itm_gundabad_armor_d,itm_gundabad_armor_c, itm_evil_gauntlets_a,itm_orc_furboots,itm_orc_scimitar,itm_orc_sabre,itm_orc_skull_spear,itm_orc_scimitar_b_heavy,itm_orc_throwing_arrow,itm_orc_throwing_axes,itm_orc_throwing_axes,itm_orc_shield_b,itm_orc_shield_a,],attr_orc_tier_3,wp_orc_tier_3,knows_common|knows_athletics_7|knows_power_draw_2|knows_power_throw_2|knows_power_strike_3,orc_face5,orc_face6]," calcext:value-type="string">
            <text:p>["i3_gunda_orc_fighter","Gundabad_Orc_Fighter","Gundabad_Orc_Fighters",tf_orc| tfg_shield| tfg_armor| tfg_helm| tfg_boots| tf_no_capture_alive,0,0,fac_gundabad,[itm_gundabad_helm_c,itm_gundabad_helm_b, itm_orc_coif_bad,itm_gundabad_armor_d,itm_gundabad_armor_c, itm_evil_gauntlets_a,itm_orc_furboots,itm_orc_scimitar,itm_orc_sabre,itm_orc_skull_spear,itm_orc_scimitar_b_heavy,itm_orc_throwing_arrow,itm_orc_throwing_axes,itm_orc_throwing_axes,itm_orc_shield_b,itm_orc_shield_a,],attr_orc_tier_3,wp_orc_tier_3,knows_common|knows_athletics_7|knows_power_draw_2|knows_power_throw_2|knows_power_strike_3,orc_face5,orc_face6],</text:p>
          </table:table-cell>
          <table:table-cell table:style-name="ce7" office:value-type="string" calcext:value-type="string">
            <text:p>i3_gunda_orc_fighter</text:p>
          </table:table-cell>
          <table:table-cell table:style-name="ce7" office:value-type="string" calcext:value-type="string">
            <text:p>Gundabad_Orc_Fighter</text:p>
          </table:table-cell>
          <table:table-cell table:style-name="ce7" office:value-type="string" calcext:value-type="string">
            <text:p>Gundabad_Orc_Fighters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undabad</text:p>
          </table:table-cell>
          <table:table-cell table:style-name="ce11" office:value-type="string" calcext:value-type="string">
            <text:p>itm_gundabad_helm_c,itm_gundabad_helm_b, itm_orc_coif_bad,</text:p>
          </table:table-cell>
          <table:table-cell table:style-name="ce11" office:value-type="string" calcext:value-type="string">
            <text:p>itm_gundabad_armor_d,itm_gundabad_armor_c,</text:p>
          </table:table-cell>
          <table:table-cell table:style-name="ce11" office:value-type="string" calcext:value-type="string">
            <text:p><text:s/>itm_evil_gauntlets_a,</text:p>
          </table:table-cell>
          <table:table-cell table:style-name="ce11" office:value-type="string" calcext:value-type="string">
            <text:p>itm_orc_furboots,</text:p>
          </table:table-cell>
          <table:table-cell table:style-name="ce11" office:value-type="string" calcext:value-type="string">
            <text:p>itm_orc_scimitar,itm_orc_sabre,itm_orc_skull_spear,itm_orc_scimitar_b_heavy,</text:p>
          </table:table-cell>
          <table:table-cell table:style-name="ce11" office:value-type="string" calcext:value-type="string">
            <text:p>itm_orc_throwing_arrow,itm_orc_throwing_axes,itm_orc_throwing_axes,</text:p>
          </table:table-cell>
          <table:table-cell table:style-name="ce11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3</text:p>
          </table:table-cell>
          <table:table-cell table:style-name="ce12" office:value-type="string" calcext:value-type="string">
            <text:p>knows_common|knows_athletics_7|knows_power_draw_2|knows_power_throw_2|knows_power_strike_3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B412]&lt;&gt;&quot;&quot;;[.C412]&lt;&gt;&quot;&quot;);CONCATENATE([Variables.$I$1];[Variables.$I$7];[.B412];[Variables.$I$7];[Variables.$I$6];[Variables.$I$7];[.C412];[Variables.$I$7];[Variables.$I$6];[Variables.$I$7];[.D412];[Variables.$I$7];[Variables.$I$6];[.E412];[Variables.$I$6];[.F412];[Variables.$I$6];[.G412];[Variables.$I$6];[.H412];[Variables.$I$6];[Variables.$I$1];[.I412];[.J412];[.K412];[.L412];[.M412];[.N412];[.O412];[Variables.$I$2];[Variables.$I$6];[.P412];[Variables.$I$6];[.Q412];[Variables.$I$6];[.R412];[Variables.$I$6];[.S412];[Variables.$I$6];[.T412];IF([.U412]&lt;&gt;&quot;&quot;;CONCATENATE([Variables.$I$6];[.U412]);&quot;&quot;);[Variables.$I$2];[Variables.$I$6]);IF([.B412]&lt;&gt;&quot;&quot;;CONCATENATE(&quot;#&quot;;[.B412]);&quot;&quot;))" office:value-type="string" office:string-value="[&quot;i3_gunda_orc_fighter&quot;,&quot;Gundabad_Orc_Fighter&quot;,&quot;Gundabad_Orc_Fighters&quot;,tf_orc| tfg_shield| tfg_armor| tfg_helm| tfg_boots| tf_no_capture_alive,0,0,fac_gundabad,[itm_gundabad_helm_c,itm_gundabad_helm_b, itm_orc_coif_bad,itm_gundabad_armor_d,itm_gundabad_armor_c, itm_evil_gauntlets_a,itm_orc_furboots,itm_orc_scimitar,itm_orc_sabre,itm_orc_skull_spear,itm_orc_scimitar_b_heavy,itm_orc_throwing_arrow,itm_orc_throwing_axes,itm_orc_throwing_axes,itm_orc_shield_b,itm_orc_shield_a,],attr_orc_tier_3,wp_orc_tier_3,knows_common|knows_athletics_7|knows_power_draw_2|knows_power_throw_2|knows_power_strike_3,orc_face5,orc_face6]," calcext:value-type="string">
            <text:p>["i3_gunda_orc_fighter","Gundabad_Orc_Fighter","Gundabad_Orc_Fighters",tf_orc| tfg_shield| tfg_armor| tfg_helm| tfg_boots| tf_no_capture_alive,0,0,fac_gundabad,[itm_gundabad_helm_c,itm_gundabad_helm_b, itm_orc_coif_bad,itm_gundabad_armor_d,itm_gundabad_armor_c, itm_evil_gauntlets_a,itm_orc_furboots,itm_orc_scimitar,itm_orc_sabre,itm_orc_skull_spear,itm_orc_scimitar_b_heavy,itm_orc_throwing_arrow,itm_orc_throwing_axes,itm_orc_throwing_axes,itm_orc_shield_b,itm_orc_shield_a,],attr_orc_tier_3,wp_orc_tier_3,knows_common|knows_athletics_7|knows_power_draw_2|knows_power_throw_2|knows_power_strike_3,orc_face5,orc_face6],</text:p>
          </table:table-cell>
          <table:table-cell table:number-columns-repeated="16362"/>
        </table:table-row>
        <table:table-row table:style-name="ro1">
          <table:table-cell table:style-name="ce6" table:formula="of:=IF(AND([.B413]&lt;&gt;&quot;&quot;;[.C413]&lt;&gt;&quot;&quot;);CONCATENATE([Variables.$I$1];[Variables.$I$7];[.B413];[Variables.$I$7];[Variables.$I$6];[Variables.$I$7];[.C413];[Variables.$I$7];[Variables.$I$6];[Variables.$I$7];[.D413];[Variables.$I$7];[Variables.$I$6];[.E413];[Variables.$I$6];[.F413];[Variables.$I$6];[.G413];[Variables.$I$6];[.H413];[Variables.$I$6];[Variables.$I$1];[.I413];[.J413];[.K413];[.L413];[.M413];[.N413];[.O413];[Variables.$I$2];[Variables.$I$6];[.P413];[Variables.$I$6];[.Q413];[Variables.$I$6];[.R413];[Variables.$I$6];[.S413];[Variables.$I$6];[.T413];IF([.U413]&lt;&gt;&quot;&quot;;CONCATENATE([Variables.$I$6];[.U413]);&quot;&quot;);[Variables.$I$2];[Variables.$I$6]);IF([.B413]&lt;&gt;&quot;&quot;;CONCATENATE(&quot;#&quot;;[.B413]);&quot;&quot;))" office:value-type="string" office:string-value="[&quot;i4_gunda_orc_warrior&quot;,&quot;Gundabad_Orc_Warrior&quot;,&quot;Gundabad_Orc_Warriors&quot;,tf_orc| tfg_shield| tfg_armor| tfg_helm|tfg_boots| tf_no_capture_alive,0,0,fac_gundabad,[itm_gundabad_helm_c,itm_gundabad_helm_b, itm_orc_coif,itm_gundabad_armor_d,itm_gundabad_armor_c, itm_evil_gauntlets_a,itm_orc_furboots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" calcext:value-type="string">
            <text:p>["i4_gunda_orc_warrior","Gundabad_Orc_Warrior","Gundabad_Orc_Warriors",tf_orc| tfg_shield| tfg_armor| tfg_helm|tfg_boots| tf_no_capture_alive,0,0,fac_gundabad,[itm_gundabad_helm_c,itm_gundabad_helm_b, itm_orc_coif,itm_gundabad_armor_d,itm_gundabad_armor_c, itm_evil_gauntlets_a,itm_orc_furboots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</text:p>
          </table:table-cell>
          <table:table-cell table:style-name="ce7" office:value-type="string" calcext:value-type="string">
            <text:p>i4_gunda_orc_warrior</text:p>
          </table:table-cell>
          <table:table-cell table:style-name="ce7" office:value-type="string" calcext:value-type="string">
            <text:p>Gundabad_Orc_Warrior</text:p>
          </table:table-cell>
          <table:table-cell table:style-name="ce7" office:value-type="string" calcext:value-type="string">
            <text:p>Gundabad_Orc_Warrior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undabad</text:p>
          </table:table-cell>
          <table:table-cell table:style-name="ce11" office:value-type="string" calcext:value-type="string">
            <text:p>itm_gundabad_helm_c,itm_gundabad_helm_b, itm_orc_coif,</text:p>
          </table:table-cell>
          <table:table-cell table:style-name="ce11" office:value-type="string" calcext:value-type="string">
            <text:p>itm_gundabad_armor_d,itm_gundabad_armor_c,</text:p>
          </table:table-cell>
          <table:table-cell table:style-name="ce11" office:value-type="string" calcext:value-type="string">
            <text:p><text:s/>itm_evil_gauntlets_a,</text:p>
          </table:table-cell>
          <table:table-cell table:style-name="ce11" office:value-type="string" calcext:value-type="string">
            <text:p>itm_orc_furboots,</text:p>
          </table:table-cell>
          <table:table-cell table:style-name="ce11" office:value-type="string" calcext:value-type="string">
            <text:p>itm_orc_scimitar_heavy,itm_orc_sabre_heavy,itm_orc_skull_spear_heavy,</text:p>
          </table:table-cell>
          <table:table-cell table:style-name="ce11" office:value-type="string" calcext:value-type="string">
            <text:p>itm_orc_javelin,itm_orc_throwing_arrow,itm_orc_throwing_axes,</text:p>
          </table:table-cell>
          <table:table-cell table:style-name="ce11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athletics_8|knows_power_throw_3|knows_power_strike_4|knows_ironflesh_2|knows_shield_2</text:p>
          </table:table-cell>
          <table:table-cell table:style-name="ce14" office:value-type="string" calcext:value-type="string">
            <text:p>orc_face3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B413]&lt;&gt;&quot;&quot;;[.C413]&lt;&gt;&quot;&quot;);CONCATENATE([Variables.$I$1];[Variables.$I$7];[.B413];[Variables.$I$7];[Variables.$I$6];[Variables.$I$7];[.C413];[Variables.$I$7];[Variables.$I$6];[Variables.$I$7];[.D413];[Variables.$I$7];[Variables.$I$6];[.E413];[Variables.$I$6];[.F413];[Variables.$I$6];[.G413];[Variables.$I$6];[.H413];[Variables.$I$6];[Variables.$I$1];[.I413];[.J413];[.K413];[.L413];[.M413];[.N413];[.O413];[Variables.$I$2];[Variables.$I$6];[.P413];[Variables.$I$6];[.Q413];[Variables.$I$6];[.R413];[Variables.$I$6];[.S413];[Variables.$I$6];[.T413];IF([.U413]&lt;&gt;&quot;&quot;;CONCATENATE([Variables.$I$6];[.U413]);&quot;&quot;);[Variables.$I$2];[Variables.$I$6]);IF([.B413]&lt;&gt;&quot;&quot;;CONCATENATE(&quot;#&quot;;[.B413]);&quot;&quot;))" office:value-type="string" office:string-value="[&quot;i4_gunda_orc_warrior&quot;,&quot;Gundabad_Orc_Warrior&quot;,&quot;Gundabad_Orc_Warriors&quot;,tf_orc| tfg_shield| tfg_armor| tfg_helm|tfg_boots| tf_no_capture_alive,0,0,fac_gundabad,[itm_gundabad_helm_c,itm_gundabad_helm_b, itm_orc_coif,itm_gundabad_armor_d,itm_gundabad_armor_c, itm_evil_gauntlets_a,itm_orc_furboots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" calcext:value-type="string">
            <text:p>["i4_gunda_orc_warrior","Gundabad_Orc_Warrior","Gundabad_Orc_Warriors",tf_orc| tfg_shield| tfg_armor| tfg_helm|tfg_boots| tf_no_capture_alive,0,0,fac_gundabad,[itm_gundabad_helm_c,itm_gundabad_helm_b, itm_orc_coif,itm_gundabad_armor_d,itm_gundabad_armor_c, itm_evil_gauntlets_a,itm_orc_furboots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</text:p>
          </table:table-cell>
          <table:table-cell table:number-columns-repeated="16362"/>
        </table:table-row>
        <table:table-row table:style-name="ro1">
          <table:table-cell table:style-name="ce6" table:formula="of:=IF(AND([.B414]&lt;&gt;&quot;&quot;;[.C414]&lt;&gt;&quot;&quot;);CONCATENATE([Variables.$I$1];[Variables.$I$7];[.B414];[Variables.$I$7];[Variables.$I$6];[Variables.$I$7];[.C414];[Variables.$I$7];[Variables.$I$6];[Variables.$I$7];[.D414];[Variables.$I$7];[Variables.$I$6];[.E414];[Variables.$I$6];[.F414];[Variables.$I$6];[.G414];[Variables.$I$6];[.H414];[Variables.$I$6];[Variables.$I$1];[.I414];[.J414];[.K414];[.L414];[.M414];[.N414];[.O414];[Variables.$I$2];[Variables.$I$6];[.P414];[Variables.$I$6];[.Q414];[Variables.$I$6];[.R414];[Variables.$I$6];[.S414];[Variables.$I$6];[.T414];IF([.U414]&lt;&gt;&quot;&quot;;CONCATENATE([Variables.$I$6];[.U414]);&quot;&quot;);[Variables.$I$2];[Variables.$I$6]);IF([.B414]&lt;&gt;&quot;&quot;;CONCATENATE(&quot;#&quot;;[.B414]);&quot;&quot;))" office:value-type="string" office:string-value="[&quot;i5_gunda_orc_berserker&quot;,&quot;Gundabad_Orc_Berserker&quot;,&quot;Gundabad_Orc_Berserkers&quot;,tf_orc| tfg_armor|tfg_boots| tf_no_capture_alive,0,0,fac_gundabad,[itm_orc_skullhelm,itm_orc_skullhelm_bad,itm_gundabad_armor_d,itm_gundabad_armor_e, itm_evil_gauntlets_a,itm_orc_furboots,itm_orc_two_handed_axe,itm_orc_battle_axe,itm_orc_bastard_scimitar_bad,itm_orc_bastard_scimitar_heavy, itm_orc_skull_spear_heavy, itm_orc_club_b,itm_twohand_wood_club,itm_orc_sledgehammer,itm_marker_berserker,],attr_orc_tier_5,wp_orc_tier_5,knows_common|knows_athletics_10|knows_power_throw_6|knows_power_strike_7|knows_ironflesh_7,orc_face3,orc_face8]," calcext:value-type="string">
            <text:p>["i5_gunda_orc_berserker","Gundabad_Orc_Berserker","Gundabad_Orc_Berserkers",tf_orc| tfg_armor|tfg_boots| tf_no_capture_alive,0,0,fac_gundabad,[itm_orc_skullhelm,itm_orc_skullhelm_bad,itm_gundabad_armor_d,itm_gundabad_armor_e, itm_evil_gauntlets_a,itm_orc_furboots,itm_orc_two_handed_axe,itm_orc_battle_axe,itm_orc_bastard_scimitar_bad,itm_orc_bastard_scimitar_heavy, itm_orc_skull_spear_heavy, itm_orc_club_b,itm_twohand_wood_club,itm_orc_sledgehammer,itm_marker_berserker,],attr_orc_tier_5,wp_orc_tier_5,knows_common|knows_athletics_10|knows_power_throw_6|knows_power_strike_7|knows_ironflesh_7,orc_face3,orc_face8],</text:p>
          </table:table-cell>
          <table:table-cell table:style-name="ce7" office:value-type="string" calcext:value-type="string">
            <text:p>i5_gunda_orc_berserker</text:p>
          </table:table-cell>
          <table:table-cell table:style-name="ce7" office:value-type="string" calcext:value-type="string">
            <text:p>Gundabad_Orc_Berserker</text:p>
          </table:table-cell>
          <table:table-cell table:style-name="ce7" office:value-type="string" calcext:value-type="string">
            <text:p>Gundabad_Orc_Berserkers</text:p>
          </table:table-cell>
          <table:table-cell table:style-name="ce8" office:value-type="string" calcext:value-type="string">
            <text:p>tf_orc| tfg_armor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undabad</text:p>
          </table:table-cell>
          <table:table-cell table:style-name="ce11" office:value-type="string" calcext:value-type="string">
            <text:p>itm_orc_skullhelm,itm_orc_skullhelm_bad,</text:p>
          </table:table-cell>
          <table:table-cell table:style-name="ce11" office:value-type="string" calcext:value-type="string">
            <text:p>itm_gundabad_armor_d,itm_gundabad_armor_e,</text:p>
          </table:table-cell>
          <table:table-cell table:style-name="ce11" office:value-type="string" calcext:value-type="string">
            <text:p><text:s/>itm_evil_gauntlets_a,</text:p>
          </table:table-cell>
          <table:table-cell table:style-name="ce11" office:value-type="string" calcext:value-type="string">
            <text:p>itm_orc_furboots,</text:p>
          </table:table-cell>
          <table:table-cell table:style-name="ce11" office:value-type="string" calcext:value-type="string">
            <text:p>itm_orc_two_handed_axe,itm_orc_battle_axe,itm_orc_bastard_scimitar_bad,itm_orc_bastard_scimitar_heavy, itm_orc_skull_spear_heavy, itm_orc_club_b,itm_twohand_wood_club,itm_orc_sledgehammer,</text:p>
          </table:table-cell>
          <table:table-cell table:style-name="ce11"/>
          <table:table-cell table:style-name="ce11" office:value-type="string" calcext:value-type="string">
            <text:p>itm_marker_berserker,</text:p>
          </table:table-cell>
          <table:table-cell table:style-name="ce12" office:value-type="string" calcext:value-type="string">
            <text:p>attr_orc_tier_5</text:p>
          </table:table-cell>
          <table:table-cell table:style-name="ce12" office:value-type="string" calcext:value-type="string">
            <text:p>wp_orc_tier_5</text:p>
          </table:table-cell>
          <table:table-cell table:style-name="ce12" office:value-type="string" calcext:value-type="string">
            <text:p>knows_common|knows_athletics_10|knows_power_throw_6|knows_power_strike_7|knows_ironflesh_7</text:p>
          </table:table-cell>
          <table:table-cell table:style-name="ce14" office:value-type="string" calcext:value-type="string">
            <text:p>orc_face3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B414]&lt;&gt;&quot;&quot;;[.C414]&lt;&gt;&quot;&quot;);CONCATENATE([Variables.$I$1];[Variables.$I$7];[.B414];[Variables.$I$7];[Variables.$I$6];[Variables.$I$7];[.C414];[Variables.$I$7];[Variables.$I$6];[Variables.$I$7];[.D414];[Variables.$I$7];[Variables.$I$6];[.E414];[Variables.$I$6];[.F414];[Variables.$I$6];[.G414];[Variables.$I$6];[.H414];[Variables.$I$6];[Variables.$I$1];[.I414];[.J414];[.K414];[.L414];[.M414];[.N414];[.O414];[Variables.$I$2];[Variables.$I$6];[.P414];[Variables.$I$6];[.Q414];[Variables.$I$6];[.R414];[Variables.$I$6];[.S414];[Variables.$I$6];[.T414];IF([.U414]&lt;&gt;&quot;&quot;;CONCATENATE([Variables.$I$6];[.U414]);&quot;&quot;);[Variables.$I$2];[Variables.$I$6]);IF([.B414]&lt;&gt;&quot;&quot;;CONCATENATE(&quot;#&quot;;[.B414]);&quot;&quot;))" office:value-type="string" office:string-value="[&quot;i5_gunda_orc_berserker&quot;,&quot;Gundabad_Orc_Berserker&quot;,&quot;Gundabad_Orc_Berserkers&quot;,tf_orc| tfg_armor|tfg_boots| tf_no_capture_alive,0,0,fac_gundabad,[itm_orc_skullhelm,itm_orc_skullhelm_bad,itm_gundabad_armor_d,itm_gundabad_armor_e, itm_evil_gauntlets_a,itm_orc_furboots,itm_orc_two_handed_axe,itm_orc_battle_axe,itm_orc_bastard_scimitar_bad,itm_orc_bastard_scimitar_heavy, itm_orc_skull_spear_heavy, itm_orc_club_b,itm_twohand_wood_club,itm_orc_sledgehammer,itm_marker_berserker,],attr_orc_tier_5,wp_orc_tier_5,knows_common|knows_athletics_10|knows_power_throw_6|knows_power_strike_7|knows_ironflesh_7,orc_face3,orc_face8]," calcext:value-type="string">
            <text:p>["i5_gunda_orc_berserker","Gundabad_Orc_Berserker","Gundabad_Orc_Berserkers",tf_orc| tfg_armor|tfg_boots| tf_no_capture_alive,0,0,fac_gundabad,[itm_orc_skullhelm,itm_orc_skullhelm_bad,itm_gundabad_armor_d,itm_gundabad_armor_e, itm_evil_gauntlets_a,itm_orc_furboots,itm_orc_two_handed_axe,itm_orc_battle_axe,itm_orc_bastard_scimitar_bad,itm_orc_bastard_scimitar_heavy, itm_orc_skull_spear_heavy, itm_orc_club_b,itm_twohand_wood_club,itm_orc_sledgehammer,itm_marker_berserker,],attr_orc_tier_5,wp_orc_tier_5,knows_common|knows_athletics_10|knows_power_throw_6|knows_power_strike_7|knows_ironflesh_7,orc_face3,orc_face8],</text:p>
          </table:table-cell>
          <table:table-cell table:number-columns-repeated="16362"/>
        </table:table-row>
        <table:table-row table:style-name="ro1">
          <table:table-cell table:style-name="ce6" table:formula="of:=IF(AND([.B415]&lt;&gt;&quot;&quot;;[.C415]&lt;&gt;&quot;&quot;);CONCATENATE([Variables.$I$1];[Variables.$I$7];[.B415];[Variables.$I$7];[Variables.$I$6];[Variables.$I$7];[.C415];[Variables.$I$7];[Variables.$I$6];[Variables.$I$7];[.D415];[Variables.$I$7];[Variables.$I$6];[.E415];[Variables.$I$6];[.F415];[Variables.$I$6];[.G415];[Variables.$I$6];[.H415];[Variables.$I$6];[Variables.$I$1];[.I415];[.J415];[.K415];[.L415];[.M415];[.N415];[.O415];[Variables.$I$2];[Variables.$I$6];[.P415];[Variables.$I$6];[.Q415];[Variables.$I$6];[.R415];[Variables.$I$6];[.S415];[Variables.$I$6];[.T415];IF([.U415]&lt;&gt;&quot;&quot;;CONCATENATE([Variables.$I$6];[.U415]);&quot;&quot;);[Variables.$I$2];[Variables.$I$6]);IF([.B415]&lt;&gt;&quot;&quot;;CONCATENATE(&quot;#&quot;;[.B415]);&quot;&quot;))" office:value-type="string" office:string-value="[&quot;ca4_gunda_skirmisher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orc_hook_arrow,itm_orc_scimitar_bad, itm_orc_scimitar_b,itm_orc_sabre_bad,itm_warg_1c,itm_warg_1d,itm_warg_1b,itm_warg_1d,],attr_orc_tier_4,wp_orc_tier_bow_4,knows_common|knows_athletics_6|knows_horse_archery_3|knows_riding_4|knows_power_draw_3|knows_power_throw_3|knows_power_strike_1,orc_face1,orc_face6]," calcext:value-type="string">
            <text:p>["ca4_gunda_skirmisher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orc_hook_arrow,itm_orc_scimitar_bad, itm_orc_scimitar_b,itm_orc_sabre_bad,itm_warg_1c,itm_warg_1d,itm_warg_1b,itm_warg_1d,],attr_orc_tier_4,wp_orc_tier_bow_4,knows_common|knows_athletics_6|knows_horse_archery_3|knows_riding_4|knows_power_draw_3|knows_power_throw_3|knows_power_strike_1,orc_face1,orc_face6],</text:p>
          </table:table-cell>
          <table:table-cell table:style-name="ce7" office:value-type="string" calcext:value-type="string">
            <text:p>ca4_gunda_skirmisher</text:p>
          </table:table-cell>
          <table:table-cell table:style-name="ce7" office:value-type="string" calcext:value-type="string">
            <text:p>Gundabad_Skirmisher</text:p>
          </table:table-cell>
          <table:table-cell table:style-name="ce7" office:value-type="string" calcext:value-type="string">
            <text:p>Gundabad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undabad</text:p>
          </table:table-cell>
          <table:table-cell table:style-name="ce11" office:value-type="string" calcext:value-type="string">
            <text:p>itm_gundabad_helm_a,itm_gundabad_helm_b,</text:p>
          </table:table-cell>
          <table:table-cell table:style-name="ce11" office:value-type="string" calcext:value-type="string">
            <text:p>itm_gundabad_armor_b,itm_gundabad_armor_c,</text:p>
          </table:table-cell>
          <table:table-cell table:style-name="ce11"/>
          <table:table-cell table:style-name="ce11" office:value-type="string" calcext:value-type="string">
            <text:p>itm_orc_furboots,itm_orc_ragwrap,</text:p>
          </table:table-cell>
          <table:table-cell table:style-name="ce11" office:value-type="string" calcext:value-type="string">
            <text:p>itm_uruk_bow,itm_orc_hook_arrow,</text:p>
          </table:table-cell>
          <table:table-cell table:style-name="ce11" office:value-type="string" calcext:value-type="string">
            <text:p>itm_orc_scimitar_bad, itm_orc_scimitar_b,itm_orc_sabre_bad,</text:p>
          </table:table-cell>
          <table:table-cell table:style-name="ce11" office:value-type="string" calcext:value-type="string">
            <text:p>itm_warg_1c,itm_warg_1d,itm_warg_1b,itm_warg_1d,</text:p>
          </table:table-cell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bow_4</text:p>
          </table:table-cell>
          <table:table-cell table:style-name="ce12" office:value-type="string" calcext:value-type="string">
            <text:p>knows_common|knows_athletics_6|knows_horse_archery_3|knows_riding_4|knows_power_draw_3|knows_power_throw_3|knows_power_strike_1</text:p>
          </table:table-cell>
          <table:table-cell table:style-name="ce14" office:value-type="string" calcext:value-type="string">
            <text:p>orc_face1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B415]&lt;&gt;&quot;&quot;;[.C415]&lt;&gt;&quot;&quot;);CONCATENATE([Variables.$I$1];[Variables.$I$7];[.B415];[Variables.$I$7];[Variables.$I$6];[Variables.$I$7];[.C415];[Variables.$I$7];[Variables.$I$6];[Variables.$I$7];[.D415];[Variables.$I$7];[Variables.$I$6];[.E415];[Variables.$I$6];[.F415];[Variables.$I$6];[.G415];[Variables.$I$6];[.H415];[Variables.$I$6];[Variables.$I$1];[.I415];[.J415];[.K415];[.L415];[.M415];[.N415];[.O415];[Variables.$I$2];[Variables.$I$6];[.P415];[Variables.$I$6];[.Q415];[Variables.$I$6];[.R415];[Variables.$I$6];[.S415];[Variables.$I$6];[.T415];IF([.U415]&lt;&gt;&quot;&quot;;CONCATENATE([Variables.$I$6];[.U415]);&quot;&quot;);[Variables.$I$2];[Variables.$I$6]);IF([.B415]&lt;&gt;&quot;&quot;;CONCATENATE(&quot;#&quot;;[.B415]);&quot;&quot;))" office:value-type="string" office:string-value="[&quot;ca4_gunda_skirmisher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orc_hook_arrow,itm_orc_scimitar_bad, itm_orc_scimitar_b,itm_orc_sabre_bad,itm_warg_1c,itm_warg_1d,itm_warg_1b,itm_warg_1d,],attr_orc_tier_4,wp_orc_tier_bow_4,knows_common|knows_athletics_6|knows_horse_archery_3|knows_riding_4|knows_power_draw_3|knows_power_throw_3|knows_power_strike_1,orc_face1,orc_face6]," calcext:value-type="string">
            <text:p>["ca4_gunda_skirmisher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orc_hook_arrow,itm_orc_scimitar_bad, itm_orc_scimitar_b,itm_orc_sabre_bad,itm_warg_1c,itm_warg_1d,itm_warg_1b,itm_warg_1d,],attr_orc_tier_4,wp_orc_tier_bow_4,knows_common|knows_athletics_6|knows_horse_archery_3|knows_riding_4|knows_power_draw_3|knows_power_throw_3|knows_power_strike_1,orc_face1,orc_face6],</text:p>
          </table:table-cell>
          <table:table-cell table:number-columns-repeated="16362"/>
        </table:table-row>
        <table:table-row table:style-name="ro1">
          <table:table-cell table:style-name="ce6" table:formula="of:=IF(AND([.B416]&lt;&gt;&quot;&quot;;[.C416]&lt;&gt;&quot;&quot;);CONCATENATE([Variables.$I$1];[Variables.$I$7];[.B416];[Variables.$I$7];[Variables.$I$6];[Variables.$I$7];[.C416];[Variables.$I$7];[Variables.$I$6];[Variables.$I$7];[.D416];[Variables.$I$7];[Variables.$I$6];[.E416];[Variables.$I$6];[.F416];[Variables.$I$6];[.G416];[Variables.$I$6];[.H416];[Variables.$I$6];[Variables.$I$1];[.I416];[.J416];[.K416];[.L416];[.M416];[.N416];[.O416];[Variables.$I$2];[Variables.$I$6];[.P416];[Variables.$I$6];[.Q416];[Variables.$I$6];[.R416];[Variables.$I$6];[.S416];[Variables.$I$6];[.T416];IF([.U416]&lt;&gt;&quot;&quot;;CONCATENATE([Variables.$I$6];[.U416]);&quot;&quot;);[Variables.$I$2];[Variables.$I$6]);IF([.B416]&lt;&gt;&quot;&quot;;CONCATENATE(&quot;#&quot;;[.B416]);&quot;&quot;))" office:value-type="string" office:string-value="[&quot;ca5_gunda_clan_skirmisher&quot;,&quot;Goblin_North_Clan_Skirmisher&quot;,&quot;Goblin_North_Clan_Skirmishers&quot;,tf_orc| tf_mounted| tfg_ranged| tfg_armor| tfg_boots| tfg_horse| tf_no_capture_alive,0,0,fac_gundabad,[itm_gundabad_helm_d,itm_gundabad_helm_e,itm_gundabad_armor_d, itm_evil_gauntlets_a,itm_orc_furboots,itm_uruk_bow,itm_orc_hook_arrow,itm_orc_scimitar,itm_orc_scimitar_b_heavy,itm_orc_sabre,itm_warg_1d,itm_warg_1b,itm_warg_1d,],attr_orc_tier_5,wp_orc_tier_bow_5,knows_common|knows_athletics_7|knows_horse_archery_6|knows_riding_6|knows_power_draw_4|knows_power_throw_4|knows_power_strike_2,orc_face3,orc_face6]," calcext:value-type="string">
            <text:p>["ca5_gunda_clan_skirmisher","Goblin_North_Clan_Skirmisher","Goblin_North_Clan_Skirmishers",tf_orc| tf_mounted| tfg_ranged| tfg_armor| tfg_boots| tfg_horse| tf_no_capture_alive,0,0,fac_gundabad,[itm_gundabad_helm_d,itm_gundabad_helm_e,itm_gundabad_armor_d, itm_evil_gauntlets_a,itm_orc_furboots,itm_uruk_bow,itm_orc_hook_arrow,itm_orc_scimitar,itm_orc_scimitar_b_heavy,itm_orc_sabre,itm_warg_1d,itm_warg_1b,itm_warg_1d,],attr_orc_tier_5,wp_orc_tier_bow_5,knows_common|knows_athletics_7|knows_horse_archery_6|knows_riding_6|knows_power_draw_4|knows_power_throw_4|knows_power_strike_2,orc_face3,orc_face6],</text:p>
          </table:table-cell>
          <table:table-cell table:style-name="ce7" office:value-type="string" calcext:value-type="string">
            <text:p>ca5_gunda_clan_skirmisher</text:p>
          </table:table-cell>
          <table:table-cell table:style-name="ce7" office:value-type="string" calcext:value-type="string">
            <text:p>Goblin_North_Clan_Skirmisher</text:p>
          </table:table-cell>
          <table:table-cell table:style-name="ce7" office:value-type="string" calcext:value-type="string">
            <text:p>Goblin_North_Clan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undabad</text:p>
          </table:table-cell>
          <table:table-cell table:style-name="ce11" office:value-type="string" calcext:value-type="string">
            <text:p>itm_gundabad_helm_d,itm_gundabad_helm_e,</text:p>
          </table:table-cell>
          <table:table-cell table:style-name="ce11" office:value-type="string" calcext:value-type="string">
            <text:p>itm_gundabad_armor_d,</text:p>
          </table:table-cell>
          <table:table-cell table:style-name="ce11" office:value-type="string" calcext:value-type="string">
            <text:p><text:s/>itm_evil_gauntlets_a,</text:p>
          </table:table-cell>
          <table:table-cell table:style-name="ce11" office:value-type="string" calcext:value-type="string">
            <text:p>itm_orc_furboots,</text:p>
          </table:table-cell>
          <table:table-cell table:style-name="ce11" office:value-type="string" calcext:value-type="string">
            <text:p>itm_uruk_bow,itm_orc_hook_arrow,</text:p>
          </table:table-cell>
          <table:table-cell table:style-name="ce11" office:value-type="string" calcext:value-type="string">
            <text:p>itm_orc_scimitar,itm_orc_scimitar_b_heavy,itm_orc_sabre,</text:p>
          </table:table-cell>
          <table:table-cell table:style-name="ce11" office:value-type="string" calcext:value-type="string">
            <text:p>itm_warg_1d,itm_warg_1b,itm_warg_1d,</text:p>
          </table:table-cell>
          <table:table-cell table:style-name="ce12" office:value-type="string" calcext:value-type="string">
            <text:p>attr_orc_tier_5</text:p>
          </table:table-cell>
          <table:table-cell table:style-name="ce12" office:value-type="string" calcext:value-type="string">
            <text:p>wp_orc_tier_bow_5</text:p>
          </table:table-cell>
          <table:table-cell table:style-name="ce12" office:value-type="string" calcext:value-type="string">
            <text:p>knows_common|knows_athletics_7|knows_horse_archery_6|knows_riding_6|knows_power_draw_4|knows_power_throw_4|knows_power_strike_2</text:p>
          </table:table-cell>
          <table:table-cell table:style-name="ce14" office:value-type="string" calcext:value-type="string">
            <text:p>orc_face3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B416]&lt;&gt;&quot;&quot;;[.C416]&lt;&gt;&quot;&quot;);CONCATENATE([Variables.$I$1];[Variables.$I$7];[.B416];[Variables.$I$7];[Variables.$I$6];[Variables.$I$7];[.C416];[Variables.$I$7];[Variables.$I$6];[Variables.$I$7];[.D416];[Variables.$I$7];[Variables.$I$6];[.E416];[Variables.$I$6];[.F416];[Variables.$I$6];[.G416];[Variables.$I$6];[.H416];[Variables.$I$6];[Variables.$I$1];[.I416];[.J416];[.K416];[.L416];[.M416];[.N416];[.O416];[Variables.$I$2];[Variables.$I$6];[.P416];[Variables.$I$6];[.Q416];[Variables.$I$6];[.R416];[Variables.$I$6];[.S416];[Variables.$I$6];[.T416];IF([.U416]&lt;&gt;&quot;&quot;;CONCATENATE([Variables.$I$6];[.U416]);&quot;&quot;);[Variables.$I$2];[Variables.$I$6]);IF([.B416]&lt;&gt;&quot;&quot;;CONCATENATE(&quot;#&quot;;[.B416]);&quot;&quot;))" office:value-type="string" office:string-value="[&quot;ca5_gunda_clan_skirmisher&quot;,&quot;Goblin_North_Clan_Skirmisher&quot;,&quot;Goblin_North_Clan_Skirmishers&quot;,tf_orc| tf_mounted| tfg_ranged| tfg_armor| tfg_boots| tfg_horse| tf_no_capture_alive,0,0,fac_gundabad,[itm_gundabad_helm_d,itm_gundabad_helm_e,itm_gundabad_armor_d, itm_evil_gauntlets_a,itm_orc_furboots,itm_uruk_bow,itm_orc_hook_arrow,itm_orc_scimitar,itm_orc_scimitar_b_heavy,itm_orc_sabre,itm_warg_1d,itm_warg_1b,itm_warg_1d,],attr_orc_tier_5,wp_orc_tier_bow_5,knows_common|knows_athletics_7|knows_horse_archery_6|knows_riding_6|knows_power_draw_4|knows_power_throw_4|knows_power_strike_2,orc_face3,orc_face6]," calcext:value-type="string">
            <text:p>["ca5_gunda_clan_skirmisher","Goblin_North_Clan_Skirmisher","Goblin_North_Clan_Skirmishers",tf_orc| tf_mounted| tfg_ranged| tfg_armor| tfg_boots| tfg_horse| tf_no_capture_alive,0,0,fac_gundabad,[itm_gundabad_helm_d,itm_gundabad_helm_e,itm_gundabad_armor_d, itm_evil_gauntlets_a,itm_orc_furboots,itm_uruk_bow,itm_orc_hook_arrow,itm_orc_scimitar,itm_orc_scimitar_b_heavy,itm_orc_sabre,itm_warg_1d,itm_warg_1b,itm_warg_1d,],attr_orc_tier_5,wp_orc_tier_bow_5,knows_common|knows_athletics_7|knows_horse_archery_6|knows_riding_6|knows_power_draw_4|knows_power_throw_4|knows_power_strike_2,orc_face3,orc_face6],</text:p>
          </table:table-cell>
          <table:table-cell table:number-columns-repeated="16362"/>
        </table:table-row>
        <table:table-row table:style-name="ro1">
          <table:table-cell table:style-name="ce6" table:formula="of:=IF(AND([.B417]&lt;&gt;&quot;&quot;;[.C417]&lt;&gt;&quot;&quot;);CONCATENATE([Variables.$I$1];[Variables.$I$7];[.B417];[Variables.$I$7];[Variables.$I$6];[Variables.$I$7];[.C417];[Variables.$I$7];[Variables.$I$6];[Variables.$I$7];[.D417];[Variables.$I$7];[Variables.$I$6];[.E417];[Variables.$I$6];[.F417];[Variables.$I$6];[.G417];[Variables.$I$6];[.H417];[Variables.$I$6];[Variables.$I$1];[.I417];[.J417];[.K417];[.L417];[.M417];[.N417];[.O417];[Variables.$I$2];[Variables.$I$6];[.P417];[Variables.$I$6];[.Q417];[Variables.$I$6];[.R417];[Variables.$I$6];[.S417];[Variables.$I$6];[.T417];IF([.U417]&lt;&gt;&quot;&quot;;CONCATENATE([Variables.$I$6];[.U417]);&quot;&quot;);[Variables.$I$2];[Variables.$I$6]);IF([.B417]&lt;&gt;&quot;&quot;;CONCATENATE(&quot;#&quot;;[.B417]);&quot;&quot;))" office:value-type="string" office:string-value="[&quot;c3_gunda_goblin_rider&quot;,&quot;Gundabad_Goblin_Rider&quot;,&quot;Gundabad_Goblin_Riders&quot;,tf_orc| tf_mounted| tfg_armor| tfg_horse| tf_no_capture_alive,0,0,fac_gundabad,[itm_gundabad_helm_a,itm_orc_skullcap_bad,itm_gundabad_armor_b,itm_orc_ragwrap,itm_uruk_bow,itm_orc_hook_arrow,itm_wood_club,itm_twohand_wood_club,itm_orc_scimitar_b,itm_warg_1d,itm_warg_1b,itm_warg_1c,],attr_orc_tier_3,wp_orc_tier_3,knows_common|knows_athletics_5|knows_riding_3|knows_horse_archery_3|knows_power_throw_2|knows_power_draw_2|knows_power_strike_1,orc_face9,orc_face8]," calcext:value-type="string">
            <text:p>["c3_gunda_goblin_rider","Gundabad_Goblin_Rider","Gundabad_Goblin_Riders",tf_orc| tf_mounted| tfg_armor| tfg_horse| tf_no_capture_alive,0,0,fac_gundabad,[itm_gundabad_helm_a,itm_orc_skullcap_bad,itm_gundabad_armor_b,itm_orc_ragwrap,itm_uruk_bow,itm_orc_hook_arrow,itm_wood_club,itm_twohand_wood_club,itm_orc_scimitar_b,itm_warg_1d,itm_warg_1b,itm_warg_1c,],attr_orc_tier_3,wp_orc_tier_3,knows_common|knows_athletics_5|knows_riding_3|knows_horse_archery_3|knows_power_throw_2|knows_power_draw_2|knows_power_strike_1,orc_face9,orc_face8],</text:p>
          </table:table-cell>
          <table:table-cell table:style-name="ce7" office:value-type="string" calcext:value-type="string">
            <text:p>c3_gunda_goblin_rider</text:p>
          </table:table-cell>
          <table:table-cell table:style-name="ce7" office:value-type="string" calcext:value-type="string">
            <text:p>Gundabad_Goblin_Rider</text:p>
          </table:table-cell>
          <table:table-cell table:style-name="ce7" office:value-type="string" calcext:value-type="string">
            <text:p>Gundabad_Goblin_Riders</text:p>
          </table:table-cell>
          <table:table-cell table:style-name="ce8" office:value-type="string" calcext:value-type="string">
            <text:p>tf_orc| tf_mount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undabad</text:p>
          </table:table-cell>
          <table:table-cell table:style-name="ce11" office:value-type="string" calcext:value-type="string">
            <text:p>itm_gundabad_helm_a,itm_orc_skullcap_bad,</text:p>
          </table:table-cell>
          <table:table-cell table:style-name="ce11" office:value-type="string" calcext:value-type="string">
            <text:p>itm_gundabad_armor_b,</text:p>
          </table:table-cell>
          <table:table-cell table:style-name="ce11"/>
          <table:table-cell table:style-name="ce11" office:value-type="string" calcext:value-type="string">
            <text:p>itm_orc_ragwrap,</text:p>
          </table:table-cell>
          <table:table-cell table:style-name="ce11" office:value-type="string" calcext:value-type="string">
            <text:p>itm_uruk_bow,itm_orc_hook_arrow,</text:p>
          </table:table-cell>
          <table:table-cell table:style-name="ce11" office:value-type="string" calcext:value-type="string">
            <text:p>itm_wood_club,itm_twohand_wood_club,itm_orc_scimitar_b,</text:p>
          </table:table-cell>
          <table:table-cell table:style-name="ce11" office:value-type="string" calcext:value-type="string">
            <text:p>itm_warg_1d,itm_warg_1b,itm_warg_1c,</text:p>
          </table:table-cell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3</text:p>
          </table:table-cell>
          <table:table-cell table:style-name="ce12" office:value-type="string" calcext:value-type="string">
            <text:p>knows_common|knows_athletics_5|knows_riding_3|knows_horse_archery_3|knows_power_throw_2|knows_power_draw_2|knows_power_strike_1</text:p>
          </table:table-cell>
          <table:table-cell table:style-name="ce14" office:value-type="string" calcext:value-type="string">
            <text:p>orc_face9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B417]&lt;&gt;&quot;&quot;;[.C417]&lt;&gt;&quot;&quot;);CONCATENATE([Variables.$I$1];[Variables.$I$7];[.B417];[Variables.$I$7];[Variables.$I$6];[Variables.$I$7];[.C417];[Variables.$I$7];[Variables.$I$6];[Variables.$I$7];[.D417];[Variables.$I$7];[Variables.$I$6];[.E417];[Variables.$I$6];[.F417];[Variables.$I$6];[.G417];[Variables.$I$6];[.H417];[Variables.$I$6];[Variables.$I$1];[.I417];[.J417];[.K417];[.L417];[.M417];[.N417];[.O417];[Variables.$I$2];[Variables.$I$6];[.P417];[Variables.$I$6];[.Q417];[Variables.$I$6];[.R417];[Variables.$I$6];[.S417];[Variables.$I$6];[.T417];IF([.U417]&lt;&gt;&quot;&quot;;CONCATENATE([Variables.$I$6];[.U417]);&quot;&quot;);[Variables.$I$2];[Variables.$I$6]);IF([.B417]&lt;&gt;&quot;&quot;;CONCATENATE(&quot;#&quot;;[.B417]);&quot;&quot;))" office:value-type="string" office:string-value="[&quot;c3_gunda_goblin_rider&quot;,&quot;Gundabad_Goblin_Rider&quot;,&quot;Gundabad_Goblin_Riders&quot;,tf_orc| tf_mounted| tfg_armor| tfg_horse| tf_no_capture_alive,0,0,fac_gundabad,[itm_gundabad_helm_a,itm_orc_skullcap_bad,itm_gundabad_armor_b,itm_orc_ragwrap,itm_uruk_bow,itm_orc_hook_arrow,itm_wood_club,itm_twohand_wood_club,itm_orc_scimitar_b,itm_warg_1d,itm_warg_1b,itm_warg_1c,],attr_orc_tier_3,wp_orc_tier_3,knows_common|knows_athletics_5|knows_riding_3|knows_horse_archery_3|knows_power_throw_2|knows_power_draw_2|knows_power_strike_1,orc_face9,orc_face8]," calcext:value-type="string">
            <text:p>["c3_gunda_goblin_rider","Gundabad_Goblin_Rider","Gundabad_Goblin_Riders",tf_orc| tf_mounted| tfg_armor| tfg_horse| tf_no_capture_alive,0,0,fac_gundabad,[itm_gundabad_helm_a,itm_orc_skullcap_bad,itm_gundabad_armor_b,itm_orc_ragwrap,itm_uruk_bow,itm_orc_hook_arrow,itm_wood_club,itm_twohand_wood_club,itm_orc_scimitar_b,itm_warg_1d,itm_warg_1b,itm_warg_1c,],attr_orc_tier_3,wp_orc_tier_3,knows_common|knows_athletics_5|knows_riding_3|knows_horse_archery_3|knows_power_throw_2|knows_power_draw_2|knows_power_strike_1,orc_face9,orc_face8],</text:p>
          </table:table-cell>
          <table:table-cell table:number-columns-repeated="16362"/>
        </table:table-row>
        <table:table-row table:style-name="ro1">
          <table:table-cell table:style-name="ce6" table:formula="of:=IF(AND([.B418]&lt;&gt;&quot;&quot;;[.C418]&lt;&gt;&quot;&quot;);CONCATENATE([Variables.$I$1];[Variables.$I$7];[.B418];[Variables.$I$7];[Variables.$I$6];[Variables.$I$7];[.C418];[Variables.$I$7];[Variables.$I$6];[Variables.$I$7];[.D418];[Variables.$I$7];[Variables.$I$6];[.E418];[Variables.$I$6];[.F418];[Variables.$I$6];[.G418];[Variables.$I$6];[.H418];[Variables.$I$6];[Variables.$I$1];[.I418];[.J418];[.K418];[.L418];[.M418];[.N418];[.O418];[Variables.$I$2];[Variables.$I$6];[.P418];[Variables.$I$6];[.Q418];[Variables.$I$6];[.R418];[Variables.$I$6];[.S418];[Variables.$I$6];[.T418];IF([.U418]&lt;&gt;&quot;&quot;;CONCATENATE([Variables.$I$6];[.U418]);&quot;&quot;);[Variables.$I$2];[Variables.$I$6]);IF([.B418]&lt;&gt;&quot;&quot;;CONCATENATE(&quot;#&quot;;[.B418]);&quot;&quot;))" office:value-type="string" office:string-value="[&quot;c4_gunda_warg_rider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scimitar_heavy,itm_orc_sabre,itm_twohand_wood_club,itm_orc_club_b,itm_orc_bastard_scimitar_bad,itm_orc_shield_b,itm_orc_shield_b,itm_wargarmored_2b, itm_wargarmored_2c,],attr_orc_tier_4,wp_orc_tier_4,knows_common|knows_athletics_6|knows_riding_4|knows_power_strike_4|knows_ironflesh_4,orc_face1,orc_face6]," calcext:value-type="string">
            <text:p>["c4_gunda_warg_rider","Gundabad_Warg_Rider","Gundabad_Warg_Riders",tf_orc| tf_mounted| tfg_armor| tfg_horse| tfg_boots| tf_no_capture_alive,0,0,fac_gundabad,[itm_gundabad_helm_b,itm_gundabad_helm_c,itm_gundabad_armor_b,itm_gundabad_armor_b,itm_orc_furboots,itm_orc_ragwrap,itm_orc_scimitar_heavy,itm_orc_sabre,itm_twohand_wood_club,itm_orc_club_b,itm_orc_bastard_scimitar_bad,itm_orc_shield_b,itm_orc_shield_b,itm_wargarmored_2b, itm_wargarmored_2c,],attr_orc_tier_4,wp_orc_tier_4,knows_common|knows_athletics_6|knows_riding_4|knows_power_strike_4|knows_ironflesh_4,orc_face1,orc_face6],</text:p>
          </table:table-cell>
          <table:table-cell table:style-name="ce7" office:value-type="string" calcext:value-type="string">
            <text:p>c4_gunda_warg_rider</text:p>
          </table:table-cell>
          <table:table-cell table:style-name="ce7" office:value-type="string" calcext:value-type="string">
            <text:p>Gundabad_Warg_Rider</text:p>
          </table:table-cell>
          <table:table-cell table:style-name="ce7" office:value-type="string" calcext:value-type="string">
            <text:p>Gundabad_Warg_Riders</text:p>
          </table:table-cell>
          <table:table-cell table:style-name="ce8" office:value-type="string" calcext:value-type="string">
            <text:p>tf_orc| tf_mount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undabad</text:p>
          </table:table-cell>
          <table:table-cell table:style-name="ce11" office:value-type="string" calcext:value-type="string">
            <text:p>itm_gundabad_helm_b,itm_gundabad_helm_c,</text:p>
          </table:table-cell>
          <table:table-cell table:style-name="ce11" office:value-type="string" calcext:value-type="string">
            <text:p>itm_gundabad_armor_b,itm_gundabad_armor_b,</text:p>
          </table:table-cell>
          <table:table-cell table:style-name="ce11"/>
          <table:table-cell table:style-name="ce11" office:value-type="string" calcext:value-type="string">
            <text:p>itm_orc_furboots,itm_orc_ragwrap,</text:p>
          </table:table-cell>
          <table:table-cell table:style-name="ce11" office:value-type="string" calcext:value-type="string">
            <text:p>itm_orc_scimitar_heavy,itm_orc_sabre,itm_twohand_wood_club,itm_orc_club_b,itm_orc_bastard_scimitar_bad,</text:p>
          </table:table-cell>
          <table:table-cell table:style-name="ce11" office:value-type="string" calcext:value-type="string">
            <text:p>itm_orc_shield_b,itm_orc_shield_b,</text:p>
          </table:table-cell>
          <table:table-cell table:style-name="ce11" office:value-type="string" calcext:value-type="string">
            <text:p>itm_wargarmored_2b, itm_wargarmored_2c,</text:p>
          </table:table-cell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athletics_6|knows_riding_4|knows_power_strike_4|knows_ironflesh_4</text:p>
          </table:table-cell>
          <table:table-cell table:style-name="ce14" office:value-type="string" calcext:value-type="string">
            <text:p>orc_face1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B418]&lt;&gt;&quot;&quot;;[.C418]&lt;&gt;&quot;&quot;);CONCATENATE([Variables.$I$1];[Variables.$I$7];[.B418];[Variables.$I$7];[Variables.$I$6];[Variables.$I$7];[.C418];[Variables.$I$7];[Variables.$I$6];[Variables.$I$7];[.D418];[Variables.$I$7];[Variables.$I$6];[.E418];[Variables.$I$6];[.F418];[Variables.$I$6];[.G418];[Variables.$I$6];[.H418];[Variables.$I$6];[Variables.$I$1];[.I418];[.J418];[.K418];[.L418];[.M418];[.N418];[.O418];[Variables.$I$2];[Variables.$I$6];[.P418];[Variables.$I$6];[.Q418];[Variables.$I$6];[.R418];[Variables.$I$6];[.S418];[Variables.$I$6];[.T418];IF([.U418]&lt;&gt;&quot;&quot;;CONCATENATE([Variables.$I$6];[.U418]);&quot;&quot;);[Variables.$I$2];[Variables.$I$6]);IF([.B418]&lt;&gt;&quot;&quot;;CONCATENATE(&quot;#&quot;;[.B418]);&quot;&quot;))" office:value-type="string" office:string-value="[&quot;c4_gunda_warg_rider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scimitar_heavy,itm_orc_sabre,itm_twohand_wood_club,itm_orc_club_b,itm_orc_bastard_scimitar_bad,itm_orc_shield_b,itm_orc_shield_b,itm_wargarmored_2b, itm_wargarmored_2c,],attr_orc_tier_4,wp_orc_tier_4,knows_common|knows_athletics_6|knows_riding_4|knows_power_strike_4|knows_ironflesh_4,orc_face1,orc_face6]," calcext:value-type="string">
            <text:p>["c4_gunda_warg_rider","Gundabad_Warg_Rider","Gundabad_Warg_Riders",tf_orc| tf_mounted| tfg_armor| tfg_horse| tfg_boots| tf_no_capture_alive,0,0,fac_gundabad,[itm_gundabad_helm_b,itm_gundabad_helm_c,itm_gundabad_armor_b,itm_gundabad_armor_b,itm_orc_furboots,itm_orc_ragwrap,itm_orc_scimitar_heavy,itm_orc_sabre,itm_twohand_wood_club,itm_orc_club_b,itm_orc_bastard_scimitar_bad,itm_orc_shield_b,itm_orc_shield_b,itm_wargarmored_2b, itm_wargarmored_2c,],attr_orc_tier_4,wp_orc_tier_4,knows_common|knows_athletics_6|knows_riding_4|knows_power_strike_4|knows_ironflesh_4,orc_face1,orc_face6],</text:p>
          </table:table-cell>
          <table:table-cell table:number-columns-repeated="16362"/>
        </table:table-row>
        <table:table-row table:style-name="ro1">
          <table:table-cell table:style-name="ce6" table:formula="of:=IF(AND([.B419]&lt;&gt;&quot;&quot;;[.C419]&lt;&gt;&quot;&quot;);CONCATENATE([Variables.$I$1];[Variables.$I$7];[.B419];[Variables.$I$7];[Variables.$I$6];[Variables.$I$7];[.C419];[Variables.$I$7];[Variables.$I$6];[Variables.$I$7];[.D419];[Variables.$I$7];[Variables.$I$6];[.E419];[Variables.$I$6];[.F419];[Variables.$I$6];[.G419];[Variables.$I$6];[.H419];[Variables.$I$6];[Variables.$I$1];[.I419];[.J419];[.K419];[.L419];[.M419];[.N419];[.O419];[Variables.$I$2];[Variables.$I$6];[.P419];[Variables.$I$6];[.Q419];[Variables.$I$6];[.R419];[Variables.$I$6];[.S419];[Variables.$I$6];[.T419];IF([.U419]&lt;&gt;&quot;&quot;;CONCATENATE([Variables.$I$6];[.U419]);&quot;&quot;);[Variables.$I$2];[Variables.$I$6]);IF([.B419]&lt;&gt;&quot;&quot;;CONCATENATE(&quot;#&quot;;[.B419]);&quot;&quot;))" office:value-type="string" office:string-value="[&quot;c5_gunda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orc_bastard_scimitar,itm_orc_shield_b,itm_orc_shield_b,itm_wargarmored_3a,],attr_orc_tier_5,wp_orc_tier_5,knows_common|knows_athletics_7|knows_riding_6|knows_power_strike_5|knows_ironflesh_6,orc_face3,orc_face6]," calcext:value-type="string">
            <text:p>["c5_gunda_clan_rider","Goblin_North_Clan_Rider","Goblin_North_Clan_Riders"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orc_bastard_scimitar,itm_orc_shield_b,itm_orc_shield_b,itm_wargarmored_3a,],attr_orc_tier_5,wp_orc_tier_5,knows_common|knows_athletics_7|knows_riding_6|knows_power_strike_5|knows_ironflesh_6,orc_face3,orc_face6],</text:p>
          </table:table-cell>
          <table:table-cell table:style-name="ce7" office:value-type="string" calcext:value-type="string">
            <text:p>c5_gunda_clan_rider</text:p>
          </table:table-cell>
          <table:table-cell table:style-name="ce7" office:value-type="string" calcext:value-type="string">
            <text:p>Goblin_North_Clan_Rider</text:p>
          </table:table-cell>
          <table:table-cell table:style-name="ce7" office:value-type="string" calcext:value-type="string">
            <text:p>Goblin_North_Clan_Rider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undabad</text:p>
          </table:table-cell>
          <table:table-cell table:style-name="ce11" office:value-type="string" calcext:value-type="string">
            <text:p>itm_gundabad_helm_e,itm_gundabad_helm_d,</text:p>
          </table:table-cell>
          <table:table-cell table:style-name="ce11" office:value-type="string" calcext:value-type="string">
            <text:p>itm_gundabad_armor_d,itm_gundabad_armor_e,</text:p>
          </table:table-cell>
          <table:table-cell table:style-name="ce11" office:value-type="string" calcext:value-type="string">
            <text:p><text:s/>itm_evil_gauntlets_a,</text:p>
          </table:table-cell>
          <table:table-cell table:style-name="ce11" office:value-type="string" calcext:value-type="string">
            <text:p>itm_orc_furboots,</text:p>
          </table:table-cell>
          <table:table-cell table:style-name="ce11" office:value-type="string" calcext:value-type="string">
            <text:p>itm_orc_sabre_heavy,itm_orc_scimitar_heavy,itm_orc_skull_spear,itm_orc_club_b,itm_orc_club_b_heavy,itm_orc_bastard_scimitar,</text:p>
          </table:table-cell>
          <table:table-cell table:style-name="ce11" office:value-type="string" calcext:value-type="string">
            <text:p>itm_orc_shield_b,itm_orc_shield_b,</text:p>
          </table:table-cell>
          <table:table-cell table:style-name="ce11" office:value-type="string" calcext:value-type="string">
            <text:p>itm_wargarmored_3a,</text:p>
          </table:table-cell>
          <table:table-cell table:style-name="ce12" office:value-type="string" calcext:value-type="string">
            <text:p>attr_orc_tier_5</text:p>
          </table:table-cell>
          <table:table-cell table:style-name="ce12" office:value-type="string" calcext:value-type="string">
            <text:p>wp_orc_tier_5</text:p>
          </table:table-cell>
          <table:table-cell table:style-name="ce12" office:value-type="string" calcext:value-type="string">
            <text:p>knows_common|knows_athletics_7|knows_riding_6|knows_power_strike_5|knows_ironflesh_6</text:p>
          </table:table-cell>
          <table:table-cell table:style-name="ce14" office:value-type="string" calcext:value-type="string">
            <text:p>orc_face3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B419]&lt;&gt;&quot;&quot;;[.C419]&lt;&gt;&quot;&quot;);CONCATENATE([Variables.$I$1];[Variables.$I$7];[.B419];[Variables.$I$7];[Variables.$I$6];[Variables.$I$7];[.C419];[Variables.$I$7];[Variables.$I$6];[Variables.$I$7];[.D419];[Variables.$I$7];[Variables.$I$6];[.E419];[Variables.$I$6];[.F419];[Variables.$I$6];[.G419];[Variables.$I$6];[.H419];[Variables.$I$6];[Variables.$I$1];[.I419];[.J419];[.K419];[.L419];[.M419];[.N419];[.O419];[Variables.$I$2];[Variables.$I$6];[.P419];[Variables.$I$6];[.Q419];[Variables.$I$6];[.R419];[Variables.$I$6];[.S419];[Variables.$I$6];[.T419];IF([.U419]&lt;&gt;&quot;&quot;;CONCATENATE([Variables.$I$6];[.U419]);&quot;&quot;);[Variables.$I$2];[Variables.$I$6]);IF([.B419]&lt;&gt;&quot;&quot;;CONCATENATE(&quot;#&quot;;[.B419]);&quot;&quot;))" office:value-type="string" office:string-value="[&quot;c5_gunda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orc_bastard_scimitar,itm_orc_shield_b,itm_orc_shield_b,itm_wargarmored_3a,],attr_orc_tier_5,wp_orc_tier_5,knows_common|knows_athletics_7|knows_riding_6|knows_power_strike_5|knows_ironflesh_6,orc_face3,orc_face6]," calcext:value-type="string">
            <text:p>["c5_gunda_clan_rider","Goblin_North_Clan_Rider","Goblin_North_Clan_Riders"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orc_bastard_scimitar,itm_orc_shield_b,itm_orc_shield_b,itm_wargarmored_3a,],attr_orc_tier_5,wp_orc_tier_5,knows_common|knows_athletics_7|knows_riding_6|knows_power_strike_5|knows_ironflesh_6,orc_face3,orc_face6],</text:p>
          </table:table-cell>
          <table:table-cell table:number-columns-repeated="16362"/>
        </table:table-row>
        <table:table-row table:style-name="ro1">
          <table:table-cell table:style-name="ce6" table:formula="of:=IF(AND([.B420]&lt;&gt;&quot;&quot;;[.C420]&lt;&gt;&quot;&quot;);CONCATENATE([Variables.$I$1];[Variables.$I$7];[.B420];[Variables.$I$7];[Variables.$I$6];[Variables.$I$7];[.C420];[Variables.$I$7];[Variables.$I$6];[Variables.$I$7];[.D420];[Variables.$I$7];[Variables.$I$6];[.E420];[Variables.$I$6];[.F420];[Variables.$I$6];[.G420];[Variables.$I$6];[.H420];[Variables.$I$6];[Variables.$I$1];[.I420];[.J420];[.K420];[.L420];[.M420];[.N420];[.O420];[Variables.$I$2];[Variables.$I$6];[.P420];[Variables.$I$6];[.Q420];[Variables.$I$6];[.R420];[Variables.$I$6];[.S420];[Variables.$I$6];[.T420];IF([.U420]&lt;&gt;&quot;&quot;;CONCATENATE([Variables.$I$6];[.U420]);&quot;&quot;);[Variables.$I$2];[Variables.$I$6]);IF([.B420]&lt;&gt;&quot;&quot;;CONCATENATE(&quot;#&quot;;[.B420]);&quot;&quot;))" office:value-type="string" office:string-value="[&quot;i5_gunda_orc_champion&quot;,&quot;Gundabad_Orc_Champion&quot;,&quot;Gundabad_Orc_Champions&quot;,tf_orc| tfg_shield| tfg_armor| tfg_helm|tfg_boots| tf_no_capture_alive,0,0,fac_gundabad,[itm_gundabad_helm_c,itm_gundabad_helm_d, itm_gundabad_armor_d,itm_gundabad_armor_e, itm_evil_gauntlets_a,itm_orc_furboots,itm_orc_scimitar_heavy,itm_orc_sabre_heavy,itm_orc_club_b_heavy,itm_orc_bastard_scimitar,itm_orc_javelin,  itm_orc_throwing_axes,itm_orc_shield_b,itm_orc_shield_c,],attr_orc_tier_5,wp_orc_tier_4,knows_common|knows_athletics_8|knows_power_throw_6|knows_power_strike_5|knows_ironflesh_4|knows_shield_6,orc_face3,orc_face8]," calcext:value-type="string">
            <text:p>["i5_gunda_orc_champion","Gundabad_Orc_Champion","Gundabad_Orc_Champions",tf_orc| tfg_shield| tfg_armor| tfg_helm|tfg_boots| tf_no_capture_alive,0,0,fac_gundabad,[itm_gundabad_helm_c,itm_gundabad_helm_d, itm_gundabad_armor_d,itm_gundabad_armor_e, itm_evil_gauntlets_a,itm_orc_furboots,itm_orc_scimitar_heavy,itm_orc_sabre_heavy,itm_orc_club_b_heavy,itm_orc_bastard_scimitar,itm_orc_javelin, <text:s/>itm_orc_throwing_axes,itm_orc_shield_b,itm_orc_shield_c,],attr_orc_tier_5,wp_orc_tier_4,knows_common|knows_athletics_8|knows_power_throw_6|knows_power_strike_5|knows_ironflesh_4|knows_shield_6,orc_face3,orc_face8],</text:p>
          </table:table-cell>
          <table:table-cell table:style-name="ce7" office:value-type="string" calcext:value-type="string">
            <text:p>i5_gunda_orc_champion</text:p>
          </table:table-cell>
          <table:table-cell table:style-name="ce7" office:value-type="string" calcext:value-type="string">
            <text:p>Gundabad_Orc_Champion</text:p>
          </table:table-cell>
          <table:table-cell table:style-name="ce7" office:value-type="string" calcext:value-type="string">
            <text:p>Gundabad_Orc_Champion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undabad</text:p>
          </table:table-cell>
          <table:table-cell table:style-name="ce11" office:value-type="string" calcext:value-type="string">
            <text:p>itm_gundabad_helm_c,itm_gundabad_helm_d,</text:p>
          </table:table-cell>
          <table:table-cell table:style-name="ce11" office:value-type="string" calcext:value-type="string">
            <text:p><text:s/>itm_gundabad_armor_d,itm_gundabad_armor_e,</text:p>
          </table:table-cell>
          <table:table-cell table:style-name="ce11" office:value-type="string" calcext:value-type="string">
            <text:p><text:s/>itm_evil_gauntlets_a,</text:p>
          </table:table-cell>
          <table:table-cell table:style-name="ce11" office:value-type="string" calcext:value-type="string">
            <text:p>itm_orc_furboots,</text:p>
          </table:table-cell>
          <table:table-cell table:style-name="ce11" office:value-type="string" calcext:value-type="string">
            <text:p>itm_orc_scimitar_heavy,itm_orc_sabre_heavy,itm_orc_club_b_heavy,itm_orc_bastard_scimitar,</text:p>
          </table:table-cell>
          <table:table-cell table:style-name="ce11" office:value-type="string" calcext:value-type="string">
            <text:p>itm_orc_javelin, <text:s/>itm_orc_throwing_axes,</text:p>
          </table:table-cell>
          <table:table-cell table:style-name="ce11" office:value-type="string" calcext:value-type="string">
            <text:p>itm_orc_shield_b,itm_orc_shield_c,</text:p>
          </table:table-cell>
          <table:table-cell table:style-name="ce12" office:value-type="string" calcext:value-type="string">
            <text:p>attr_orc_tier_5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athletics_8|knows_power_throw_6|knows_power_strike_5|knows_ironflesh_4|knows_shield_6</text:p>
          </table:table-cell>
          <table:table-cell table:style-name="ce14" office:value-type="string" calcext:value-type="string">
            <text:p>orc_face3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B420]&lt;&gt;&quot;&quot;;[.C420]&lt;&gt;&quot;&quot;);CONCATENATE([Variables.$I$1];[Variables.$I$7];[.B420];[Variables.$I$7];[Variables.$I$6];[Variables.$I$7];[.C420];[Variables.$I$7];[Variables.$I$6];[Variables.$I$7];[.D420];[Variables.$I$7];[Variables.$I$6];[.E420];[Variables.$I$6];[.F420];[Variables.$I$6];[.G420];[Variables.$I$6];[.H420];[Variables.$I$6];[Variables.$I$1];[.I420];[.J420];[.K420];[.L420];[.M420];[.N420];[.O420];[Variables.$I$2];[Variables.$I$6];[.P420];[Variables.$I$6];[.Q420];[Variables.$I$6];[.R420];[Variables.$I$6];[.S420];[Variables.$I$6];[.T420];IF([.U420]&lt;&gt;&quot;&quot;;CONCATENATE([Variables.$I$6];[.U420]);&quot;&quot;);[Variables.$I$2];[Variables.$I$6]);IF([.B420]&lt;&gt;&quot;&quot;;CONCATENATE(&quot;#&quot;;[.B420]);&quot;&quot;))" office:value-type="string" office:string-value="[&quot;i5_gunda_orc_champion&quot;,&quot;Gundabad_Orc_Champion&quot;,&quot;Gundabad_Orc_Champions&quot;,tf_orc| tfg_shield| tfg_armor| tfg_helm|tfg_boots| tf_no_capture_alive,0,0,fac_gundabad,[itm_gundabad_helm_c,itm_gundabad_helm_d, itm_gundabad_armor_d,itm_gundabad_armor_e, itm_evil_gauntlets_a,itm_orc_furboots,itm_orc_scimitar_heavy,itm_orc_sabre_heavy,itm_orc_club_b_heavy,itm_orc_bastard_scimitar,itm_orc_javelin,  itm_orc_throwing_axes,itm_orc_shield_b,itm_orc_shield_c,],attr_orc_tier_5,wp_orc_tier_4,knows_common|knows_athletics_8|knows_power_throw_6|knows_power_strike_5|knows_ironflesh_4|knows_shield_6,orc_face3,orc_face8]," calcext:value-type="string">
            <text:p>["i5_gunda_orc_champion","Gundabad_Orc_Champion","Gundabad_Orc_Champions",tf_orc| tfg_shield| tfg_armor| tfg_helm|tfg_boots| tf_no_capture_alive,0,0,fac_gundabad,[itm_gundabad_helm_c,itm_gundabad_helm_d, itm_gundabad_armor_d,itm_gundabad_armor_e, itm_evil_gauntlets_a,itm_orc_furboots,itm_orc_scimitar_heavy,itm_orc_sabre_heavy,itm_orc_club_b_heavy,itm_orc_bastard_scimitar,itm_orc_javelin, <text:s/>itm_orc_throwing_axes,itm_orc_shield_b,itm_orc_shield_c,],attr_orc_tier_5,wp_orc_tier_4,knows_common|knows_athletics_8|knows_power_throw_6|knows_power_strike_5|knows_ironflesh_4|knows_shield_6,orc_face3,orc_face8],</text:p>
          </table:table-cell>
          <table:table-cell table:number-columns-repeated="16362"/>
        </table:table-row>
        <table:table-row table:style-name="ro1">
          <table:table-cell table:formula="of:=IF(AND([.B421]&lt;&gt;&quot;&quot;;[.C421]&lt;&gt;&quot;&quot;);CONCATENATE([Variables.$I$1];[Variables.$I$7];[.B421];[Variables.$I$7];[Variables.$I$6];[Variables.$I$7];[.C421];[Variables.$I$7];[Variables.$I$6];[Variables.$I$7];[.D421];[Variables.$I$7];[Variables.$I$6];[.E421];[Variables.$I$6];[.F421];[Variables.$I$6];[.G421];[Variables.$I$6];[.H421];[Variables.$I$6];[Variables.$I$1];[.I421];[.J421];[.K421];[.L421];[.M421];[.N421];[.O421];[Variables.$I$2];[Variables.$I$6];[.P421];[Variables.$I$6];[.Q421];[Variables.$I$6];[.R421];[Variables.$I$6];[.S421];[Variables.$I$6];[.T421];IF([.U421]&lt;&gt;&quot;&quot;;CONCATENATE([Variables.$I$6];[.U421]);&quot;&quot;);[Variables.$I$2];[Variables.$I$6]);IF([.B421]&lt;&gt;&quot;&quot;;CONCATENATE(&quot;#&quot;;[.B421]);&quot;&quot;))">
            <text:p/>
          </table:table-cell>
          <table:table-cell table:style-name="ce5"/>
          <table:table-cell table:style-name="ce6" table:number-columns-repeated="19"/>
          <table:table-cell table:style-name="ce36" table:formula="of:=IF(AND([.B421]&lt;&gt;&quot;&quot;;[.C421]&lt;&gt;&quot;&quot;);CONCATENATE([Variables.$I$1];[Variables.$I$7];[.B421];[Variables.$I$7];[Variables.$I$6];[Variables.$I$7];[.C421];[Variables.$I$7];[Variables.$I$6];[Variables.$I$7];[.D421];[Variables.$I$7];[Variables.$I$6];[.E421];[Variables.$I$6];[.F421];[Variables.$I$6];[.G421];[Variables.$I$6];[.H421];[Variables.$I$6];[Variables.$I$1];[.I421];[.J421];[.K421];[.L421];[.M421];[.N421];[.O421];[Variables.$I$2];[Variables.$I$6];[.P421];[Variables.$I$6];[.Q421];[Variables.$I$6];[.R421];[Variables.$I$6];[.S421];[Variables.$I$6];[.T421];IF([.U421]&lt;&gt;&quot;&quot;;CONCATENATE([Variables.$I$6];[.U421]);&quot;&quot;);[Variables.$I$2];[Variables.$I$6]);IF([.B421]&lt;&gt;&quot;&quot;;CONCATENATE(&quot;#&quot;;[.B421]);&quot;&quot;))">
            <text:p/>
          </table:table-cell>
          <table:table-cell table:number-columns-repeated="16362"/>
        </table:table-row>
        <table:table-row table:style-name="ro1">
          <table:table-cell table:style-name="ce6" table:formula="of:=IF(AND([.B422]&lt;&gt;&quot;&quot;;[.C422]&lt;&gt;&quot;&quot;);CONCATENATE([Variables.$I$1];[Variables.$I$7];[.B422];[Variables.$I$7];[Variables.$I$6];[Variables.$I$7];[.C422];[Variables.$I$7];[Variables.$I$6];[Variables.$I$7];[.D422];[Variables.$I$7];[Variables.$I$6];[.E422];[Variables.$I$6];[.F422];[Variables.$I$6];[.G422];[Variables.$I$6];[.H422];[Variables.$I$6];[Variables.$I$1];[.I422];[.J422];[.K422];[.L422];[.M422];[.N422];[.O422];[Variables.$I$2];[Variables.$I$6];[.P422];[Variables.$I$6];[.Q422];[Variables.$I$6];[.R422];[Variables.$I$6];[.S422];[Variables.$I$6];[.T422];IF([.U422]&lt;&gt;&quot;&quot;;CONCATENATE([Variables.$I$6];[.U422]);&quot;&quot;);[Variables.$I$2];[Variables.$I$6]);IF([.B422]&lt;&gt;&quot;&quot;;CONCATENATE(&quot;#&quot;;[.B422]);&quot;&quot;))" office:value-type="string" office:string-value="[&quot;i2_mordor_num_renegade&quot;,&quot;Black_Numenorean_Renegade&quot;,&quot;Black_Numenorean_Renegades&quot;,tf_evil_man| tfg_armor| tfg_boots,0,0,fac_mordor,[itm_hood_black_bad,itm_orc_coif_bad,itm_evil_light_armor, itm_evil_gauntlets_a, itm_orc_mittens,itm_uruk_ragwrap,itm_orc_simple_spear_heavy,itm_uruk_falchion_a,itm_orc_falchion,],attr_tier_2,wp_tier_2,knows_common|knows_power_strike_1|knows_power_throw_1|knows_weapon_master_1|knows_athletics_1|knows_riding_1|knows_trainer_2|knows_tactics_1|knows_spotting_1|knows_surgery_1|knows_first_aid_1|knows_leadership_2,mordor_man1,mordor_man2]," calcext:value-type="string">
            <text:p>["i2_mordor_num_renegade","Black_Numenorean_Renegade","Black_Numenorean_Renegades",tf_evil_man| tfg_armor| tfg_boots,0,0,fac_mordor,[itm_hood_black_bad,itm_orc_coif_bad,itm_evil_light_armor, itm_evil_gauntlets_a, itm_orc_mittens,itm_uruk_ragwrap,itm_orc_simple_spear_heavy,itm_uruk_falchion_a,itm_orc_falchion,],attr_tier_2,wp_tier_2,knows_common|knows_power_strike_1|knows_power_throw_1|knows_weapon_master_1|knows_athletics_1|knows_riding_1|knows_trainer_2|knows_tactics_1|knows_spotting_1|knows_surgery_1|knows_first_aid_1|knows_leadership_2,mordor_man1,mordor_man2],</text:p>
          </table:table-cell>
          <table:table-cell table:style-name="ce7" office:value-type="string" calcext:value-type="string">
            <text:p>i2_mordor_num_renegade</text:p>
          </table:table-cell>
          <table:table-cell table:style-name="ce7" office:value-type="string" calcext:value-type="string">
            <text:p>Black_Numenorean_Renegade</text:p>
          </table:table-cell>
          <table:table-cell table:style-name="ce7" office:value-type="string" calcext:value-type="string">
            <text:p>Black_Numenorean_Renegade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hood_black_bad,itm_orc_coif_bad,</text:p>
          </table:table-cell>
          <table:table-cell table:style-name="ce11" office:value-type="string" calcext:value-type="string">
            <text:p>itm_evil_light_armor,</text:p>
          </table:table-cell>
          <table:table-cell table:style-name="ce11" office:value-type="string" calcext:value-type="string">
            <text:p><text:s/>itm_evil_gauntlets_a, itm_orc_mittens,</text:p>
          </table:table-cell>
          <table:table-cell table:style-name="ce11" office:value-type="string" calcext:value-type="string">
            <text:p>itm_uruk_ragwrap,</text:p>
          </table:table-cell>
          <table:table-cell table:style-name="ce11" office:value-type="string" calcext:value-type="string">
            <text:p>itm_orc_simple_spear_heavy,itm_uruk_falchion_a,itm_orc_falchion,</text:p>
          </table:table-cell>
          <table:table-cell table:style-name="ce11" table:number-columns-repeated="2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power_strike_1|knows_power_throw_1|knows_weapon_master_1|knows_athletics_1|knows_riding_1|knows_trainer_2|knows_tactics_1|knows_spotting_1|knows_surgery_1|knows_first_aid_1|knows_leadership_2</text:p>
          </table:table-cell>
          <table:table-cell table:style-name="ce14" office:value-type="string" calcext:value-type="string">
            <text:p>mordor_man1</text:p>
          </table:table-cell>
          <table:table-cell table:style-name="ce14" office:value-type="string" calcext:value-type="string">
            <text:p>mordor_man2</text:p>
          </table:table-cell>
          <table:table-cell table:style-name="ce15"/>
          <table:table-cell table:style-name="ce6" table:formula="of:=IF(AND([.B422]&lt;&gt;&quot;&quot;;[.C422]&lt;&gt;&quot;&quot;);CONCATENATE([Variables.$I$1];[Variables.$I$7];[.B422];[Variables.$I$7];[Variables.$I$6];[Variables.$I$7];[.C422];[Variables.$I$7];[Variables.$I$6];[Variables.$I$7];[.D422];[Variables.$I$7];[Variables.$I$6];[.E422];[Variables.$I$6];[.F422];[Variables.$I$6];[.G422];[Variables.$I$6];[.H422];[Variables.$I$6];[Variables.$I$1];[.I422];[.J422];[.K422];[.L422];[.M422];[.N422];[.O422];[Variables.$I$2];[Variables.$I$6];[.P422];[Variables.$I$6];[.Q422];[Variables.$I$6];[.R422];[Variables.$I$6];[.S422];[Variables.$I$6];[.T422];IF([.U422]&lt;&gt;&quot;&quot;;CONCATENATE([Variables.$I$6];[.U422]);&quot;&quot;);[Variables.$I$2];[Variables.$I$6]);IF([.B422]&lt;&gt;&quot;&quot;;CONCATENATE(&quot;#&quot;;[.B422]);&quot;&quot;))" office:value-type="string" office:string-value="[&quot;i2_mordor_num_renegade&quot;,&quot;Black_Numenorean_Renegade&quot;,&quot;Black_Numenorean_Renegades&quot;,tf_evil_man| tfg_armor| tfg_boots,0,0,fac_mordor,[itm_hood_black_bad,itm_orc_coif_bad,itm_evil_light_armor, itm_evil_gauntlets_a, itm_orc_mittens,itm_uruk_ragwrap,itm_orc_simple_spear_heavy,itm_uruk_falchion_a,itm_orc_falchion,],attr_tier_2,wp_tier_2,knows_common|knows_power_strike_1|knows_power_throw_1|knows_weapon_master_1|knows_athletics_1|knows_riding_1|knows_trainer_2|knows_tactics_1|knows_spotting_1|knows_surgery_1|knows_first_aid_1|knows_leadership_2,mordor_man1,mordor_man2]," calcext:value-type="string">
            <text:p>["i2_mordor_num_renegade","Black_Numenorean_Renegade","Black_Numenorean_Renegades",tf_evil_man| tfg_armor| tfg_boots,0,0,fac_mordor,[itm_hood_black_bad,itm_orc_coif_bad,itm_evil_light_armor, itm_evil_gauntlets_a, itm_orc_mittens,itm_uruk_ragwrap,itm_orc_simple_spear_heavy,itm_uruk_falchion_a,itm_orc_falchion,],attr_tier_2,wp_tier_2,knows_common|knows_power_strike_1|knows_power_throw_1|knows_weapon_master_1|knows_athletics_1|knows_riding_1|knows_trainer_2|knows_tactics_1|knows_spotting_1|knows_surgery_1|knows_first_aid_1|knows_leadership_2,mordor_man1,mordor_man2],</text:p>
          </table:table-cell>
          <table:table-cell table:number-columns-repeated="16362"/>
        </table:table-row>
        <table:table-row table:style-name="ro1">
          <table:table-cell table:style-name="ce6" table:formula="of:=IF(AND([.B423]&lt;&gt;&quot;&quot;;[.C423]&lt;&gt;&quot;&quot;);CONCATENATE([Variables.$I$1];[Variables.$I$7];[.B423];[Variables.$I$7];[Variables.$I$6];[Variables.$I$7];[.C423];[Variables.$I$7];[Variables.$I$6];[Variables.$I$7];[.D423];[Variables.$I$7];[Variables.$I$6];[.E423];[Variables.$I$6];[.F423];[Variables.$I$6];[.G423];[Variables.$I$6];[.H423];[Variables.$I$6];[Variables.$I$1];[.I423];[.J423];[.K423];[.L423];[.M423];[.N423];[.O423];[Variables.$I$2];[Variables.$I$6];[.P423];[Variables.$I$6];[.Q423];[Variables.$I$6];[.R423];[Variables.$I$6];[.S423];[Variables.$I$6];[.T423];IF([.U423]&lt;&gt;&quot;&quot;;CONCATENATE([Variables.$I$6];[.U423]);&quot;&quot;);[Variables.$I$2];[Variables.$I$6]);IF([.B423]&lt;&gt;&quot;&quot;;CONCATENATE(&quot;#&quot;;[.B423]);&quot;&quot;))" office:value-type="string" office:string-value="[&quot;i3_mordor_num_warrior&quot;,&quot;Black_Numenorean_Warrior&quot;,&quot;Black_Numenorean_Warriors&quot;,tf_evil_man| tfg_shield| tfg_armor| tfg_helm| tfg_boots,0,0,fac_mordor,[itm_hood_black,itm_orc_coif,itm_evil_light_armor,itm_m_armor_a, itm_evil_gauntlets_a, itm_orc_mittens,itm_uruk_ragwrap,itm_mordor_sword,itm_uruk_pike_b,itm_orc_falchion_heavy,itm_mordor_orc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" calcext:value-type="string">
            <text:p>["i3_mordor_num_warrior","Black_Numenorean_Warrior","Black_Numenorean_Warriors",tf_evil_man| tfg_shield| tfg_armor| tfg_helm| tfg_boots,0,0,fac_mordor,[itm_hood_black,itm_orc_coif,itm_evil_light_armor,itm_m_armor_a, itm_evil_gauntlets_a, itm_orc_mittens,itm_uruk_ragwrap,itm_mordor_sword,itm_uruk_pike_b,itm_orc_falchion_heavy,itm_mordor_orc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</text:p>
          </table:table-cell>
          <table:table-cell table:style-name="ce7" office:value-type="string" calcext:value-type="string">
            <text:p>i3_mordor_num_warrior</text:p>
          </table:table-cell>
          <table:table-cell table:style-name="ce7" office:value-type="string" calcext:value-type="string">
            <text:p>Black_Numenorean_Warrior</text:p>
          </table:table-cell>
          <table:table-cell table:style-name="ce7" office:value-type="string" calcext:value-type="string">
            <text:p>Black_Numenorean_Warriors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hood_black,itm_orc_coif,</text:p>
          </table:table-cell>
          <table:table-cell table:style-name="ce11" office:value-type="string" calcext:value-type="string">
            <text:p>itm_evil_light_armor,itm_m_armor_a,</text:p>
          </table:table-cell>
          <table:table-cell table:style-name="ce11" office:value-type="string" calcext:value-type="string">
            <text:p><text:s/>itm_evil_gauntlets_a, itm_orc_mittens,</text:p>
          </table:table-cell>
          <table:table-cell table:style-name="ce11" office:value-type="string" calcext:value-type="string">
            <text:p>itm_uruk_ragwrap,</text:p>
          </table:table-cell>
          <table:table-cell table:style-name="ce11" office:value-type="string" calcext:value-type="string">
            <text:p>itm_mordor_sword,itm_uruk_pike_b,itm_orc_falchion_heavy,</text:p>
          </table:table-cell>
          <table:table-cell table:style-name="ce11" office:value-type="string" calcext:value-type="string">
            <text:p>itm_mordor_orc_shield_b,</text:p>
          </table:table-cell>
          <table:table-cell table:style-name="ce11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3" office:value-type="string" calcext:value-type="string">
            <text:p>knows_common|knows_ironflesh_2|knows_power_strike_2|knows_power_throw_1|knows_weapon_master_1|knows_athletics_1|knows_riding_2|knows_trainer_2|knows_tactics_1|knows_spotting_1|knows_surgery_1|knows_first_aid_1|knows_leadership_2</text:p>
          </table:table-cell>
          <table:table-cell table:style-name="ce14" office:value-type="string" calcext:value-type="string">
            <text:p>mordor_man1</text:p>
          </table:table-cell>
          <table:table-cell table:style-name="ce14" office:value-type="string" calcext:value-type="string">
            <text:p>mordor_man2</text:p>
          </table:table-cell>
          <table:table-cell table:style-name="ce15"/>
          <table:table-cell table:style-name="ce6" table:formula="of:=IF(AND([.B423]&lt;&gt;&quot;&quot;;[.C423]&lt;&gt;&quot;&quot;);CONCATENATE([Variables.$I$1];[Variables.$I$7];[.B423];[Variables.$I$7];[Variables.$I$6];[Variables.$I$7];[.C423];[Variables.$I$7];[Variables.$I$6];[Variables.$I$7];[.D423];[Variables.$I$7];[Variables.$I$6];[.E423];[Variables.$I$6];[.F423];[Variables.$I$6];[.G423];[Variables.$I$6];[.H423];[Variables.$I$6];[Variables.$I$1];[.I423];[.J423];[.K423];[.L423];[.M423];[.N423];[.O423];[Variables.$I$2];[Variables.$I$6];[.P423];[Variables.$I$6];[.Q423];[Variables.$I$6];[.R423];[Variables.$I$6];[.S423];[Variables.$I$6];[.T423];IF([.U423]&lt;&gt;&quot;&quot;;CONCATENATE([Variables.$I$6];[.U423]);&quot;&quot;);[Variables.$I$2];[Variables.$I$6]);IF([.B423]&lt;&gt;&quot;&quot;;CONCATENATE(&quot;#&quot;;[.B423]);&quot;&quot;))" office:value-type="string" office:string-value="[&quot;i3_mordor_num_warrior&quot;,&quot;Black_Numenorean_Warrior&quot;,&quot;Black_Numenorean_Warriors&quot;,tf_evil_man| tfg_shield| tfg_armor| tfg_helm| tfg_boots,0,0,fac_mordor,[itm_hood_black,itm_orc_coif,itm_evil_light_armor,itm_m_armor_a, itm_evil_gauntlets_a, itm_orc_mittens,itm_uruk_ragwrap,itm_mordor_sword,itm_uruk_pike_b,itm_orc_falchion_heavy,itm_mordor_orc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" calcext:value-type="string">
            <text:p>["i3_mordor_num_warrior","Black_Numenorean_Warrior","Black_Numenorean_Warriors",tf_evil_man| tfg_shield| tfg_armor| tfg_helm| tfg_boots,0,0,fac_mordor,[itm_hood_black,itm_orc_coif,itm_evil_light_armor,itm_m_armor_a, itm_evil_gauntlets_a, itm_orc_mittens,itm_uruk_ragwrap,itm_mordor_sword,itm_uruk_pike_b,itm_orc_falchion_heavy,itm_mordor_orc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</text:p>
          </table:table-cell>
          <table:table-cell table:number-columns-repeated="16362"/>
        </table:table-row>
        <table:table-row table:style-name="ro1">
          <table:table-cell table:style-name="ce6" table:formula="of:=IF(AND([.B424]&lt;&gt;&quot;&quot;;[.C424]&lt;&gt;&quot;&quot;);CONCATENATE([Variables.$I$1];[Variables.$I$7];[.B424];[Variables.$I$7];[Variables.$I$6];[Variables.$I$7];[.C424];[Variables.$I$7];[Variables.$I$6];[Variables.$I$7];[.D424];[Variables.$I$7];[Variables.$I$6];[.E424];[Variables.$I$6];[.F424];[Variables.$I$6];[.G424];[Variables.$I$6];[.H424];[Variables.$I$6];[Variables.$I$1];[.I424];[.J424];[.K424];[.L424];[.M424];[.N424];[.O424];[Variables.$I$2];[Variables.$I$6];[.P424];[Variables.$I$6];[.Q424];[Variables.$I$6];[.R424];[Variables.$I$6];[.S424];[Variables.$I$6];[.T424];IF([.U424]&lt;&gt;&quot;&quot;;CONCATENATE([Variables.$I$6];[.U424]);&quot;&quot;);[Variables.$I$2];[Variables.$I$6]);IF([.B424]&lt;&gt;&quot;&quot;;CONCATENATE(&quot;#&quot;;[.B424]);&quot;&quot;))" office:value-type="string" office:string-value="[&quot;i4_mordor_num_vet_warrior&quot;,&quot;Black_Numenorean_Veteran_Warrior&quot;,&quot;Black_Numenorean_Veteran_Warriors&quot;,tf_evil_man| tfg_gloves| tfg_shield| tfg_armor| tfg_helm| tfg_boots,0,0,fac_mordor,[itm_mordor_helm,itm_orc_coif_good,itm_m_armor_a,itm_m_armor_b, itm_evil_gauntlets_a, itm_orc_mittens,itm_uruk_greaves,itm_mordor_longsword,itm_mordor_sword,itm_mordor_man_shield_b,],attr_tier_4,wp_tier_4,knows_common|knows_athletics_2|knows_shield_3|knows_power_strike_4|knows_ironflesh_4,mordor_man1,mordor_man2]," calcext:value-type="string">
            <text:p>["i4_mordor_num_vet_warrior","Black_Numenorean_Veteran_Warrior","Black_Numenorean_Veteran_Warriors",tf_evil_man| tfg_gloves| tfg_shield| tfg_armor| tfg_helm| tfg_boots,0,0,fac_mordor,[itm_mordor_helm,itm_orc_coif_good,itm_m_armor_a,itm_m_armor_b, itm_evil_gauntlets_a, itm_orc_mittens,itm_uruk_greaves,itm_mordor_longsword,itm_mordor_sword,itm_mordor_man_shield_b,],attr_tier_4,wp_tier_4,knows_common|knows_athletics_2|knows_shield_3|knows_power_strike_4|knows_ironflesh_4,mordor_man1,mordor_man2],</text:p>
          </table:table-cell>
          <table:table-cell table:style-name="ce7" office:value-type="string" calcext:value-type="string">
            <text:p>i4_mordor_num_vet_warrior</text:p>
          </table:table-cell>
          <table:table-cell table:style-name="ce7" office:value-type="string" calcext:value-type="string">
            <text:p>Black_Numenorean_Veteran_Warrior</text:p>
          </table:table-cell>
          <table:table-cell table:style-name="ce7" office:value-type="string" calcext:value-type="string">
            <text:p>Black_Numenorean_Veteran_Warrior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mordor_helm,itm_orc_coif_good,</text:p>
          </table:table-cell>
          <table:table-cell table:style-name="ce11" office:value-type="string" calcext:value-type="string">
            <text:p>itm_m_armor_a,itm_m_armor_b,</text:p>
          </table:table-cell>
          <table:table-cell table:style-name="ce11" office:value-type="string" calcext:value-type="string">
            <text:p><text:s/>itm_evil_gauntlets_a, itm_orc_mittens,</text:p>
          </table:table-cell>
          <table:table-cell table:style-name="ce11" office:value-type="string" calcext:value-type="string">
            <text:p>itm_uruk_greaves,</text:p>
          </table:table-cell>
          <table:table-cell table:style-name="ce11" office:value-type="string" calcext:value-type="string">
            <text:p>itm_mordor_longsword,itm_mordor_sword,</text:p>
          </table:table-cell>
          <table:table-cell table:style-name="ce11" office:value-type="string" calcext:value-type="string">
            <text:p>itm_mordor_man_shield_b,</text:p>
          </table:table-cell>
          <table:table-cell table:style-name="ce11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2|knows_shield_3|knows_power_strike_4|knows_ironflesh_4</text:p>
          </table:table-cell>
          <table:table-cell table:style-name="ce14" office:value-type="string" calcext:value-type="string">
            <text:p>mordor_man1</text:p>
          </table:table-cell>
          <table:table-cell table:style-name="ce14" office:value-type="string" calcext:value-type="string">
            <text:p>mordor_man2</text:p>
          </table:table-cell>
          <table:table-cell table:style-name="ce15"/>
          <table:table-cell table:style-name="ce6" table:formula="of:=IF(AND([.B424]&lt;&gt;&quot;&quot;;[.C424]&lt;&gt;&quot;&quot;);CONCATENATE([Variables.$I$1];[Variables.$I$7];[.B424];[Variables.$I$7];[Variables.$I$6];[Variables.$I$7];[.C424];[Variables.$I$7];[Variables.$I$6];[Variables.$I$7];[.D424];[Variables.$I$7];[Variables.$I$6];[.E424];[Variables.$I$6];[.F424];[Variables.$I$6];[.G424];[Variables.$I$6];[.H424];[Variables.$I$6];[Variables.$I$1];[.I424];[.J424];[.K424];[.L424];[.M424];[.N424];[.O424];[Variables.$I$2];[Variables.$I$6];[.P424];[Variables.$I$6];[.Q424];[Variables.$I$6];[.R424];[Variables.$I$6];[.S424];[Variables.$I$6];[.T424];IF([.U424]&lt;&gt;&quot;&quot;;CONCATENATE([Variables.$I$6];[.U424]);&quot;&quot;);[Variables.$I$2];[Variables.$I$6]);IF([.B424]&lt;&gt;&quot;&quot;;CONCATENATE(&quot;#&quot;;[.B424]);&quot;&quot;))" office:value-type="string" office:string-value="[&quot;i4_mordor_num_vet_warrior&quot;,&quot;Black_Numenorean_Veteran_Warrior&quot;,&quot;Black_Numenorean_Veteran_Warriors&quot;,tf_evil_man| tfg_gloves| tfg_shield| tfg_armor| tfg_helm| tfg_boots,0,0,fac_mordor,[itm_mordor_helm,itm_orc_coif_good,itm_m_armor_a,itm_m_armor_b, itm_evil_gauntlets_a, itm_orc_mittens,itm_uruk_greaves,itm_mordor_longsword,itm_mordor_sword,itm_mordor_man_shield_b,],attr_tier_4,wp_tier_4,knows_common|knows_athletics_2|knows_shield_3|knows_power_strike_4|knows_ironflesh_4,mordor_man1,mordor_man2]," calcext:value-type="string">
            <text:p>["i4_mordor_num_vet_warrior","Black_Numenorean_Veteran_Warrior","Black_Numenorean_Veteran_Warriors",tf_evil_man| tfg_gloves| tfg_shield| tfg_armor| tfg_helm| tfg_boots,0,0,fac_mordor,[itm_mordor_helm,itm_orc_coif_good,itm_m_armor_a,itm_m_armor_b, itm_evil_gauntlets_a, itm_orc_mittens,itm_uruk_greaves,itm_mordor_longsword,itm_mordor_sword,itm_mordor_man_shield_b,],attr_tier_4,wp_tier_4,knows_common|knows_athletics_2|knows_shield_3|knows_power_strike_4|knows_ironflesh_4,mordor_man1,mordor_man2],</text:p>
          </table:table-cell>
          <table:table-cell table:number-columns-repeated="16362"/>
        </table:table-row>
        <table:table-row table:style-name="ro1">
          <table:table-cell table:style-name="ce6" table:formula="of:=IF(AND([.B425]&lt;&gt;&quot;&quot;;[.C425]&lt;&gt;&quot;&quot;);CONCATENATE([Variables.$I$1];[Variables.$I$7];[.B425];[Variables.$I$7];[Variables.$I$6];[Variables.$I$7];[.C425];[Variables.$I$7];[Variables.$I$6];[Variables.$I$7];[.D425];[Variables.$I$7];[Variables.$I$6];[.E425];[Variables.$I$6];[.F425];[Variables.$I$6];[.G425];[Variables.$I$6];[.H425];[Variables.$I$6];[Variables.$I$1];[.I425];[.J425];[.K425];[.L425];[.M425];[.N425];[.O425];[Variables.$I$2];[Variables.$I$6];[.P425];[Variables.$I$6];[.Q425];[Variables.$I$6];[.R425];[Variables.$I$6];[.S425];[Variables.$I$6];[.T425];IF([.U425]&lt;&gt;&quot;&quot;;CONCATENATE([Variables.$I$6];[.U425]);&quot;&quot;);[Variables.$I$2];[Variables.$I$6]);IF([.B425]&lt;&gt;&quot;&quot;;CONCATENATE(&quot;#&quot;;[.B425]);&quot;&quot;))" office:value-type="string" office:string-value="[&quot;i5_mordor_num_champion&quot;,&quot;Black_Numenorean_Champion&quot;,&quot;Black_Numenorean_Champions&quot;,tf_evil_man| tfg_gloves| tfg_shield| tfg_armor| tfg_helm| tfg_boots,0,0,fac_mordor,[itm_black_num_helm,itm_black_num_armor, itm_evil_gauntlets_b,itm_uruk_greaves,itm_mordor_longsword,itm_orc_mace,itm_mordor_man_shield_a,],attr_evil_tier_6,wp_tier_6,knows_common|knows_athletics_3|knows_shield_4|knows_power_strike_5|knows_ironflesh_5,mordor_man1,mordor_man2]," calcext:value-type="string">
            <text:p>["i5_mordor_num_champion","Black_Numenorean_Champion","Black_Numenorean_Champions",tf_evil_man| tfg_gloves| tfg_shield| tfg_armor| tfg_helm| tfg_boots,0,0,fac_mordor,[itm_black_num_helm,itm_black_num_armor, itm_evil_gauntlets_b,itm_uruk_greaves,itm_mordor_longsword,itm_orc_mace,itm_mordor_man_shield_a,],attr_evil_tier_6,wp_tier_6,knows_common|knows_athletics_3|knows_shield_4|knows_power_strike_5|knows_ironflesh_5,mordor_man1,mordor_man2],</text:p>
          </table:table-cell>
          <table:table-cell table:style-name="ce7" office:value-type="string" calcext:value-type="string">
            <text:p>i5_mordor_num_champion</text:p>
          </table:table-cell>
          <table:table-cell table:style-name="ce7" office:value-type="string" calcext:value-type="string">
            <text:p>Black_Numenorean_Champion</text:p>
          </table:table-cell>
          <table:table-cell table:style-name="ce7" office:value-type="string" calcext:value-type="string">
            <text:p>Black_Numenorean_Champion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black_num_helm,</text:p>
          </table:table-cell>
          <table:table-cell table:style-name="ce11" office:value-type="string" calcext:value-type="string">
            <text:p>itm_black_num_armor,</text:p>
          </table:table-cell>
          <table:table-cell table:style-name="ce11" office:value-type="string" calcext:value-type="string">
            <text:p><text:s/>itm_evil_gauntlets_b,</text:p>
          </table:table-cell>
          <table:table-cell table:style-name="ce11" office:value-type="string" calcext:value-type="string">
            <text:p>itm_uruk_greaves,</text:p>
          </table:table-cell>
          <table:table-cell table:style-name="ce11" office:value-type="string" calcext:value-type="string">
            <text:p>itm_mordor_longsword,itm_orc_mace,</text:p>
          </table:table-cell>
          <table:table-cell table:style-name="ce11" office:value-type="string" calcext:value-type="string">
            <text:p>itm_mordor_man_shield_a,</text:p>
          </table:table-cell>
          <table:table-cell table:style-name="ce11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3|knows_shield_4|knows_power_strike_5|knows_ironflesh_5</text:p>
          </table:table-cell>
          <table:table-cell table:style-name="ce14" office:value-type="string" calcext:value-type="string">
            <text:p>mordor_man1</text:p>
          </table:table-cell>
          <table:table-cell table:style-name="ce14" office:value-type="string" calcext:value-type="string">
            <text:p>mordor_man2</text:p>
          </table:table-cell>
          <table:table-cell table:style-name="ce15"/>
          <table:table-cell table:style-name="ce6" table:formula="of:=IF(AND([.B425]&lt;&gt;&quot;&quot;;[.C425]&lt;&gt;&quot;&quot;);CONCATENATE([Variables.$I$1];[Variables.$I$7];[.B425];[Variables.$I$7];[Variables.$I$6];[Variables.$I$7];[.C425];[Variables.$I$7];[Variables.$I$6];[Variables.$I$7];[.D425];[Variables.$I$7];[Variables.$I$6];[.E425];[Variables.$I$6];[.F425];[Variables.$I$6];[.G425];[Variables.$I$6];[.H425];[Variables.$I$6];[Variables.$I$1];[.I425];[.J425];[.K425];[.L425];[.M425];[.N425];[.O425];[Variables.$I$2];[Variables.$I$6];[.P425];[Variables.$I$6];[.Q425];[Variables.$I$6];[.R425];[Variables.$I$6];[.S425];[Variables.$I$6];[.T425];IF([.U425]&lt;&gt;&quot;&quot;;CONCATENATE([Variables.$I$6];[.U425]);&quot;&quot;);[Variables.$I$2];[Variables.$I$6]);IF([.B425]&lt;&gt;&quot;&quot;;CONCATENATE(&quot;#&quot;;[.B425]);&quot;&quot;))" office:value-type="string" office:string-value="[&quot;i5_mordor_num_champion&quot;,&quot;Black_Numenorean_Champion&quot;,&quot;Black_Numenorean_Champions&quot;,tf_evil_man| tfg_gloves| tfg_shield| tfg_armor| tfg_helm| tfg_boots,0,0,fac_mordor,[itm_black_num_helm,itm_black_num_armor, itm_evil_gauntlets_b,itm_uruk_greaves,itm_mordor_longsword,itm_orc_mace,itm_mordor_man_shield_a,],attr_evil_tier_6,wp_tier_6,knows_common|knows_athletics_3|knows_shield_4|knows_power_strike_5|knows_ironflesh_5,mordor_man1,mordor_man2]," calcext:value-type="string">
            <text:p>["i5_mordor_num_champion","Black_Numenorean_Champion","Black_Numenorean_Champions",tf_evil_man| tfg_gloves| tfg_shield| tfg_armor| tfg_helm| tfg_boots,0,0,fac_mordor,[itm_black_num_helm,itm_black_num_armor, itm_evil_gauntlets_b,itm_uruk_greaves,itm_mordor_longsword,itm_orc_mace,itm_mordor_man_shield_a,],attr_evil_tier_6,wp_tier_6,knows_common|knows_athletics_3|knows_shield_4|knows_power_strike_5|knows_ironflesh_5,mordor_man1,mordor_man2],</text:p>
          </table:table-cell>
          <table:table-cell table:number-columns-repeated="16362"/>
        </table:table-row>
        <table:table-row table:style-name="ro1">
          <table:table-cell table:style-name="ce6" table:formula="of:=IF(AND([.B426]&lt;&gt;&quot;&quot;;[.C426]&lt;&gt;&quot;&quot;);CONCATENATE([Variables.$I$1];[Variables.$I$7];[.B426];[Variables.$I$7];[Variables.$I$6];[Variables.$I$7];[.C426];[Variables.$I$7];[Variables.$I$6];[Variables.$I$7];[.D426];[Variables.$I$7];[Variables.$I$6];[.E426];[Variables.$I$6];[.F426];[Variables.$I$6];[.G426];[Variables.$I$6];[.H426];[Variables.$I$6];[Variables.$I$1];[.I426];[.J426];[.K426];[.L426];[.M426];[.N426];[.O426];[Variables.$I$2];[Variables.$I$6];[.P426];[Variables.$I$6];[.Q426];[Variables.$I$6];[.R426];[Variables.$I$6];[.S426];[Variables.$I$6];[.T426];IF([.U426]&lt;&gt;&quot;&quot;;CONCATENATE([Variables.$I$6];[.U426]);&quot;&quot;);[Variables.$I$2];[Variables.$I$6]);IF([.B426]&lt;&gt;&quot;&quot;;CONCATENATE(&quot;#&quot;;[.B426]);&quot;&quot;))" office:value-type="string" office:string-value="[&quot;i5_mordor_num_assassin&quot;,&quot;Black_Numenorean_Assassin&quot;,&quot;Black_Numenorean_Assassins&quot;,tf_evil_man| tfg_gloves| tfg_armor| tfg_boots,0,0,fac_mordor,[itm_mordor_helm,itm_hood_black,itm_hood_black_good,itm_m_armor_a,itm_m_armor_b,itm_black_num_armor, itm_evil_gauntlets_a,itm_uruk_chain_greaves,itm_corsair_throwing_dagger, itm_corsair_throwing_dagger, itm_corsair_throwing_dagger,itm_mordor_sword,itm_mordor_longsword,itm_marker_night_troop,],attr_evil_tier_6,wp_tier_6,knows_common|knows_athletics_7|knows_shield_2|knows_power_strike_6|knows_power_throw_8|knows_ironflesh_7,mordor_man1,mordor_man2]," calcext:value-type="string">
            <text:p>["i5_mordor_num_assassin","Black_Numenorean_Assassin","Black_Numenorean_Assassins",tf_evil_man| tfg_gloves| tfg_armor| tfg_boots,0,0,fac_mordor,[itm_mordor_helm,itm_hood_black,itm_hood_black_good,itm_m_armor_a,itm_m_armor_b,itm_black_num_armor, itm_evil_gauntlets_a,itm_uruk_chain_greaves,itm_corsair_throwing_dagger, itm_corsair_throwing_dagger, itm_corsair_throwing_dagger,itm_mordor_sword,itm_mordor_longsword,itm_marker_night_troop,],attr_evil_tier_6,wp_tier_6,knows_common|knows_athletics_7|knows_shield_2|knows_power_strike_6|knows_power_throw_8|knows_ironflesh_7,mordor_man1,mordor_man2],</text:p>
          </table:table-cell>
          <table:table-cell table:style-name="ce7" office:value-type="string" calcext:value-type="string">
            <text:p>i5_mordor_num_assassin</text:p>
          </table:table-cell>
          <table:table-cell table:style-name="ce7" office:value-type="string" calcext:value-type="string">
            <text:p>Black_Numenorean_Assassin</text:p>
          </table:table-cell>
          <table:table-cell table:style-name="ce7" office:value-type="string" calcext:value-type="string">
            <text:p>Black_Numenorean_Assassins</text:p>
          </table:table-cell>
          <table:table-cell table:style-name="ce8" office:value-type="string" calcext:value-type="string">
            <text:p>tf_evil_man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mordor_helm,itm_hood_black,itm_hood_black_good,</text:p>
          </table:table-cell>
          <table:table-cell table:style-name="ce11" office:value-type="string" calcext:value-type="string">
            <text:p>itm_m_armor_a,itm_m_armor_b,itm_black_num_armor,</text:p>
          </table:table-cell>
          <table:table-cell table:style-name="ce11" office:value-type="string" calcext:value-type="string">
            <text:p><text:s/>itm_evil_gauntlets_a,</text:p>
          </table:table-cell>
          <table:table-cell table:style-name="ce11" office:value-type="string" calcext:value-type="string">
            <text:p>itm_uruk_chain_greaves,</text:p>
          </table:table-cell>
          <table:table-cell table:style-name="ce11" office:value-type="string" calcext:value-type="string">
            <text:p>itm_corsair_throwing_dagger, itm_corsair_throwing_dagger, itm_corsair_throwing_dagger,</text:p>
          </table:table-cell>
          <table:table-cell table:style-name="ce11" office:value-type="string" calcext:value-type="string">
            <text:p>itm_mordor_sword,itm_mordor_longsword,</text:p>
          </table:table-cell>
          <table:table-cell table:style-name="ce11" office:value-type="string" calcext:value-type="string">
            <text:p>itm_marker_night_troop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7|knows_shield_2|knows_power_strike_6|knows_power_throw_8|knows_ironflesh_7</text:p>
          </table:table-cell>
          <table:table-cell table:style-name="ce14" office:value-type="string" calcext:value-type="string">
            <text:p>mordor_man1</text:p>
          </table:table-cell>
          <table:table-cell table:style-name="ce14" office:value-type="string" calcext:value-type="string">
            <text:p>mordor_man2</text:p>
          </table:table-cell>
          <table:table-cell table:style-name="ce15"/>
          <table:table-cell table:style-name="ce6" table:formula="of:=IF(AND([.B426]&lt;&gt;&quot;&quot;;[.C426]&lt;&gt;&quot;&quot;);CONCATENATE([Variables.$I$1];[Variables.$I$7];[.B426];[Variables.$I$7];[Variables.$I$6];[Variables.$I$7];[.C426];[Variables.$I$7];[Variables.$I$6];[Variables.$I$7];[.D426];[Variables.$I$7];[Variables.$I$6];[.E426];[Variables.$I$6];[.F426];[Variables.$I$6];[.G426];[Variables.$I$6];[.H426];[Variables.$I$6];[Variables.$I$1];[.I426];[.J426];[.K426];[.L426];[.M426];[.N426];[.O426];[Variables.$I$2];[Variables.$I$6];[.P426];[Variables.$I$6];[.Q426];[Variables.$I$6];[.R426];[Variables.$I$6];[.S426];[Variables.$I$6];[.T426];IF([.U426]&lt;&gt;&quot;&quot;;CONCATENATE([Variables.$I$6];[.U426]);&quot;&quot;);[Variables.$I$2];[Variables.$I$6]);IF([.B426]&lt;&gt;&quot;&quot;;CONCATENATE(&quot;#&quot;;[.B426]);&quot;&quot;))" office:value-type="string" office:string-value="[&quot;i5_mordor_num_assassin&quot;,&quot;Black_Numenorean_Assassin&quot;,&quot;Black_Numenorean_Assassins&quot;,tf_evil_man| tfg_gloves| tfg_armor| tfg_boots,0,0,fac_mordor,[itm_mordor_helm,itm_hood_black,itm_hood_black_good,itm_m_armor_a,itm_m_armor_b,itm_black_num_armor, itm_evil_gauntlets_a,itm_uruk_chain_greaves,itm_corsair_throwing_dagger, itm_corsair_throwing_dagger, itm_corsair_throwing_dagger,itm_mordor_sword,itm_mordor_longsword,itm_marker_night_troop,],attr_evil_tier_6,wp_tier_6,knows_common|knows_athletics_7|knows_shield_2|knows_power_strike_6|knows_power_throw_8|knows_ironflesh_7,mordor_man1,mordor_man2]," calcext:value-type="string">
            <text:p>["i5_mordor_num_assassin","Black_Numenorean_Assassin","Black_Numenorean_Assassins",tf_evil_man| tfg_gloves| tfg_armor| tfg_boots,0,0,fac_mordor,[itm_mordor_helm,itm_hood_black,itm_hood_black_good,itm_m_armor_a,itm_m_armor_b,itm_black_num_armor, itm_evil_gauntlets_a,itm_uruk_chain_greaves,itm_corsair_throwing_dagger, itm_corsair_throwing_dagger, itm_corsair_throwing_dagger,itm_mordor_sword,itm_mordor_longsword,itm_marker_night_troop,],attr_evil_tier_6,wp_tier_6,knows_common|knows_athletics_7|knows_shield_2|knows_power_strike_6|knows_power_throw_8|knows_ironflesh_7,mordor_man1,mordor_man2],</text:p>
          </table:table-cell>
          <table:table-cell table:number-columns-repeated="16362"/>
        </table:table-row>
        <table:table-row table:style-name="ro1">
          <table:table-cell table:style-name="ce6" table:formula="of:=IF(AND([.B427]&lt;&gt;&quot;&quot;;[.C427]&lt;&gt;&quot;&quot;);CONCATENATE([Variables.$I$1];[Variables.$I$7];[.B427];[Variables.$I$7];[Variables.$I$6];[Variables.$I$7];[.C427];[Variables.$I$7];[Variables.$I$6];[Variables.$I$7];[.D427];[Variables.$I$7];[Variables.$I$6];[.E427];[Variables.$I$6];[.F427];[Variables.$I$6];[.G427];[Variables.$I$6];[.H427];[Variables.$I$6];[Variables.$I$1];[.I427];[.J427];[.K427];[.L427];[.M427];[.N427];[.O427];[Variables.$I$2];[Variables.$I$6];[.P427];[Variables.$I$6];[.Q427];[Variables.$I$6];[.R427];[Variables.$I$6];[.S427];[Variables.$I$6];[.T427];IF([.U427]&lt;&gt;&quot;&quot;;CONCATENATE([Variables.$I$6];[.U427]);&quot;&quot;);[Variables.$I$2];[Variables.$I$6]);IF([.B427]&lt;&gt;&quot;&quot;;CONCATENATE(&quot;#&quot;;[.B427]);&quot;&quot;))" office:value-type="string" office:string-value="[&quot;c4_mordor_num_horseman&quot;,&quot;Black_Numenorean_Horseman&quot;,&quot;Black_Numenorean_Horsemen&quot;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" calcext:value-type="string">
            <text:p>["c4_mordor_num_horseman","Black_Numenorean_Horseman","Black_Numenorean_Horsemen"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</text:p>
          </table:table-cell>
          <table:table-cell table:style-name="ce7" office:value-type="string" calcext:value-type="string">
            <text:p>c4_mordor_num_horseman</text:p>
          </table:table-cell>
          <table:table-cell table:style-name="ce7" office:value-type="string" calcext:value-type="string">
            <text:p>Black_Numenorean_Horseman</text:p>
          </table:table-cell>
          <table:table-cell table:style-name="ce7" office:value-type="string" calcext:value-type="string">
            <text:p>Black_Numenorean_Horsemen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mordor_helm,</text:p>
          </table:table-cell>
          <table:table-cell table:style-name="ce11" office:value-type="string" calcext:value-type="string">
            <text:p>itm_m_armor_a,itm_m_armor_b,</text:p>
          </table:table-cell>
          <table:table-cell table:style-name="ce11" office:value-type="string" calcext:value-type="string">
            <text:p><text:s/>itm_evil_gauntlets_a,</text:p>
          </table:table-cell>
          <table:table-cell table:style-name="ce11" office:value-type="string" calcext:value-type="string">
            <text:p>itm_uruk_chain_greaves,</text:p>
          </table:table-cell>
          <table:table-cell table:style-name="ce11" office:value-type="string" calcext:value-type="string">
            <text:p>itm_mordor_longsword,itm_orc_simple_spear_heavy,</text:p>
          </table:table-cell>
          <table:table-cell table:style-name="ce11" office:value-type="string" calcext:value-type="string">
            <text:p>itm_mordor_man_shield_b,</text:p>
          </table:table-cell>
          <table:table-cell table:style-name="ce11" office:value-type="string" calcext:value-type="string">
            <text:p>itm_mordor_warhorse,</text:p>
          </table:table-cell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riding_4|knows_athletics_3|knows_shield_3|knows_power_strike_4|knows_ironflesh_4</text:p>
          </table:table-cell>
          <table:table-cell table:style-name="ce14" office:value-type="string" calcext:value-type="string">
            <text:p>mordor_man1</text:p>
          </table:table-cell>
          <table:table-cell table:style-name="ce14" office:value-type="string" calcext:value-type="string">
            <text:p>mordor_man2</text:p>
          </table:table-cell>
          <table:table-cell table:style-name="ce15"/>
          <table:table-cell table:style-name="ce6" table:formula="of:=IF(AND([.B427]&lt;&gt;&quot;&quot;;[.C427]&lt;&gt;&quot;&quot;);CONCATENATE([Variables.$I$1];[Variables.$I$7];[.B427];[Variables.$I$7];[Variables.$I$6];[Variables.$I$7];[.C427];[Variables.$I$7];[Variables.$I$6];[Variables.$I$7];[.D427];[Variables.$I$7];[Variables.$I$6];[.E427];[Variables.$I$6];[.F427];[Variables.$I$6];[.G427];[Variables.$I$6];[.H427];[Variables.$I$6];[Variables.$I$1];[.I427];[.J427];[.K427];[.L427];[.M427];[.N427];[.O427];[Variables.$I$2];[Variables.$I$6];[.P427];[Variables.$I$6];[.Q427];[Variables.$I$6];[.R427];[Variables.$I$6];[.S427];[Variables.$I$6];[.T427];IF([.U427]&lt;&gt;&quot;&quot;;CONCATENATE([Variables.$I$6];[.U427]);&quot;&quot;);[Variables.$I$2];[Variables.$I$6]);IF([.B427]&lt;&gt;&quot;&quot;;CONCATENATE(&quot;#&quot;;[.B427]);&quot;&quot;))" office:value-type="string" office:string-value="[&quot;c4_mordor_num_horseman&quot;,&quot;Black_Numenorean_Horseman&quot;,&quot;Black_Numenorean_Horsemen&quot;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" calcext:value-type="string">
            <text:p>["c4_mordor_num_horseman","Black_Numenorean_Horseman","Black_Numenorean_Horsemen"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</text:p>
          </table:table-cell>
          <table:table-cell table:number-columns-repeated="16362"/>
        </table:table-row>
        <table:table-row table:style-name="ro1">
          <table:table-cell table:style-name="ce6" table:formula="of:=IF(AND([.B428]&lt;&gt;&quot;&quot;;[.C428]&lt;&gt;&quot;&quot;);CONCATENATE([Variables.$I$1];[Variables.$I$7];[.B428];[Variables.$I$7];[Variables.$I$6];[Variables.$I$7];[.C428];[Variables.$I$7];[Variables.$I$6];[Variables.$I$7];[.D428];[Variables.$I$7];[Variables.$I$6];[.E428];[Variables.$I$6];[.F428];[Variables.$I$6];[.G428];[Variables.$I$6];[.H428];[Variables.$I$6];[Variables.$I$1];[.I428];[.J428];[.K428];[.L428];[.M428];[.N428];[.O428];[Variables.$I$2];[Variables.$I$6];[.P428];[Variables.$I$6];[.Q428];[Variables.$I$6];[.R428];[Variables.$I$6];[.S428];[Variables.$I$6];[.T428];IF([.U428]&lt;&gt;&quot;&quot;;CONCATENATE([Variables.$I$6];[.U428]);&quot;&quot;);[Variables.$I$2];[Variables.$I$6]);IF([.B428]&lt;&gt;&quot;&quot;;CONCATENATE(&quot;#&quot;;[.B428]);&quot;&quot;))" office:value-type="string" office:string-value="[&quot;c5_mordor_num_knight&quot;,&quot;Black_Numenorean_Horsemaster&quot;,&quot;Black_Numenorean_Horsemasters&quot;,tf_evil_man| tf_mounted| tfg_gloves| tfg_shield| tfg_armor| tfg_helm| tfg_horse| tfg_boots,0,0,fac_mordor,[itm_black_num_helm,itm_black_num_armor, itm_evil_gauntlets_b_good, itm_orc_mittens_good, itm_uruk_greaves,itm_mordor_longsword,itm_orc_simple_spear_heavy, itm_uruk_pike_b,itm_mordor_man_shield_a,itm_mordor_warhorse,],attr_evil_tier_6,wp_tier_6,knows_common|knows_riding_5|knows_athletics_3|knows_shield_4|knows_power_strike_5|knows_ironflesh_5,mordor_man1,mordor_man2]," calcext:value-type="string">
            <text:p>["c5_mordor_num_knight","Black_Numenorean_Horsemaster","Black_Numenorean_Horsemasters",tf_evil_man| tf_mounted| tfg_gloves| tfg_shield| tfg_armor| tfg_helm| tfg_horse| tfg_boots,0,0,fac_mordor,[itm_black_num_helm,itm_black_num_armor, itm_evil_gauntlets_b_good, itm_orc_mittens_good, itm_uruk_greaves,itm_mordor_longsword,itm_orc_simple_spear_heavy, itm_uruk_pike_b,itm_mordor_man_shield_a,itm_mordor_warhorse,],attr_evil_tier_6,wp_tier_6,knows_common|knows_riding_5|knows_athletics_3|knows_shield_4|knows_power_strike_5|knows_ironflesh_5,mordor_man1,mordor_man2],</text:p>
          </table:table-cell>
          <table:table-cell table:style-name="ce7" office:value-type="string" calcext:value-type="string">
            <text:p>c5_mordor_num_knight</text:p>
          </table:table-cell>
          <table:table-cell table:style-name="ce7" office:value-type="string" calcext:value-type="string">
            <text:p>Black_Numenorean_Horsemaster</text:p>
          </table:table-cell>
          <table:table-cell table:style-name="ce7" office:value-type="string" calcext:value-type="string">
            <text:p>Black_Numenorean_Horsemasters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black_num_helm,</text:p>
          </table:table-cell>
          <table:table-cell table:style-name="ce11" office:value-type="string" calcext:value-type="string">
            <text:p>itm_black_num_armor,</text:p>
          </table:table-cell>
          <table:table-cell table:style-name="ce11" office:value-type="string" calcext:value-type="string">
            <text:p><text:s/>itm_evil_gauntlets_b_good, itm_orc_mittens_good,</text:p>
          </table:table-cell>
          <table:table-cell table:style-name="ce11" office:value-type="string" calcext:value-type="string">
            <text:p><text:s/>itm_uruk_greaves,</text:p>
          </table:table-cell>
          <table:table-cell table:style-name="ce11" office:value-type="string" calcext:value-type="string">
            <text:p>itm_mordor_longsword,itm_orc_simple_spear_heavy, itm_uruk_pike_b,</text:p>
          </table:table-cell>
          <table:table-cell table:style-name="ce11" office:value-type="string" calcext:value-type="string">
            <text:p>itm_mordor_man_shield_a,</text:p>
          </table:table-cell>
          <table:table-cell table:style-name="ce11" office:value-type="string" calcext:value-type="string">
            <text:p>itm_mordor_warhorse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5|knows_athletics_3|knows_shield_4|knows_power_strike_5|knows_ironflesh_5</text:p>
          </table:table-cell>
          <table:table-cell table:style-name="ce14" office:value-type="string" calcext:value-type="string">
            <text:p>mordor_man1</text:p>
          </table:table-cell>
          <table:table-cell table:style-name="ce14" office:value-type="string" calcext:value-type="string">
            <text:p>mordor_man2</text:p>
          </table:table-cell>
          <table:table-cell table:style-name="ce15"/>
          <table:table-cell table:style-name="ce6" table:formula="of:=IF(AND([.B428]&lt;&gt;&quot;&quot;;[.C428]&lt;&gt;&quot;&quot;);CONCATENATE([Variables.$I$1];[Variables.$I$7];[.B428];[Variables.$I$7];[Variables.$I$6];[Variables.$I$7];[.C428];[Variables.$I$7];[Variables.$I$6];[Variables.$I$7];[.D428];[Variables.$I$7];[Variables.$I$6];[.E428];[Variables.$I$6];[.F428];[Variables.$I$6];[.G428];[Variables.$I$6];[.H428];[Variables.$I$6];[Variables.$I$1];[.I428];[.J428];[.K428];[.L428];[.M428];[.N428];[.O428];[Variables.$I$2];[Variables.$I$6];[.P428];[Variables.$I$6];[.Q428];[Variables.$I$6];[.R428];[Variables.$I$6];[.S428];[Variables.$I$6];[.T428];IF([.U428]&lt;&gt;&quot;&quot;;CONCATENATE([Variables.$I$6];[.U428]);&quot;&quot;);[Variables.$I$2];[Variables.$I$6]);IF([.B428]&lt;&gt;&quot;&quot;;CONCATENATE(&quot;#&quot;;[.B428]);&quot;&quot;))" office:value-type="string" office:string-value="[&quot;c5_mordor_num_knight&quot;,&quot;Black_Numenorean_Horsemaster&quot;,&quot;Black_Numenorean_Horsemasters&quot;,tf_evil_man| tf_mounted| tfg_gloves| tfg_shield| tfg_armor| tfg_helm| tfg_horse| tfg_boots,0,0,fac_mordor,[itm_black_num_helm,itm_black_num_armor, itm_evil_gauntlets_b_good, itm_orc_mittens_good, itm_uruk_greaves,itm_mordor_longsword,itm_orc_simple_spear_heavy, itm_uruk_pike_b,itm_mordor_man_shield_a,itm_mordor_warhorse,],attr_evil_tier_6,wp_tier_6,knows_common|knows_riding_5|knows_athletics_3|knows_shield_4|knows_power_strike_5|knows_ironflesh_5,mordor_man1,mordor_man2]," calcext:value-type="string">
            <text:p>["c5_mordor_num_knight","Black_Numenorean_Horsemaster","Black_Numenorean_Horsemasters",tf_evil_man| tf_mounted| tfg_gloves| tfg_shield| tfg_armor| tfg_helm| tfg_horse| tfg_boots,0,0,fac_mordor,[itm_black_num_helm,itm_black_num_armor, itm_evil_gauntlets_b_good, itm_orc_mittens_good, itm_uruk_greaves,itm_mordor_longsword,itm_orc_simple_spear_heavy, itm_uruk_pike_b,itm_mordor_man_shield_a,itm_mordor_warhorse,],attr_evil_tier_6,wp_tier_6,knows_common|knows_riding_5|knows_athletics_3|knows_shield_4|knows_power_strike_5|knows_ironflesh_5,mordor_man1,mordor_man2],</text:p>
          </table:table-cell>
          <table:table-cell table:number-columns-repeated="16362"/>
        </table:table-row>
        <table:table-row table:style-name="ro1">
          <table:table-cell table:formula="of:=IF(AND([.B429]&lt;&gt;&quot;&quot;;[.C429]&lt;&gt;&quot;&quot;);CONCATENATE([Variables.$I$1];[Variables.$I$7];[.B429];[Variables.$I$7];[Variables.$I$6];[Variables.$I$7];[.C429];[Variables.$I$7];[Variables.$I$6];[Variables.$I$7];[.D429];[Variables.$I$7];[Variables.$I$6];[.E429];[Variables.$I$6];[.F429];[Variables.$I$6];[.G429];[Variables.$I$6];[.H429];[Variables.$I$6];[Variables.$I$1];[.I429];[.J429];[.K429];[.L429];[.M429];[.N429];[.O429];[Variables.$I$2];[Variables.$I$6];[.P429];[Variables.$I$6];[.Q429];[Variables.$I$6];[.R429];[Variables.$I$6];[.S429];[Variables.$I$6];[.T429];IF([.U429]&lt;&gt;&quot;&quot;;CONCATENATE([Variables.$I$6];[.U429]);&quot;&quot;);[Variables.$I$2];[Variables.$I$6]);IF([.B429]&lt;&gt;&quot;&quot;;CONCATENATE(&quot;#&quot;;[.B429]);&quot;&quot;))">
            <text:p/>
          </table:table-cell>
          <table:table-cell table:style-name="ce6" table:number-columns-repeated="20"/>
          <table:table-cell table:style-name="ce36" table:formula="of:=IF(AND([.B429]&lt;&gt;&quot;&quot;;[.C429]&lt;&gt;&quot;&quot;);CONCATENATE([Variables.$I$1];[Variables.$I$7];[.B429];[Variables.$I$7];[Variables.$I$6];[Variables.$I$7];[.C429];[Variables.$I$7];[Variables.$I$6];[Variables.$I$7];[.D429];[Variables.$I$7];[Variables.$I$6];[.E429];[Variables.$I$6];[.F429];[Variables.$I$6];[.G429];[Variables.$I$6];[.H429];[Variables.$I$6];[Variables.$I$1];[.I429];[.J429];[.K429];[.L429];[.M429];[.N429];[.O429];[Variables.$I$2];[Variables.$I$6];[.P429];[Variables.$I$6];[.Q429];[Variables.$I$6];[.R429];[Variables.$I$6];[.S429];[Variables.$I$6];[.T429];IF([.U429]&lt;&gt;&quot;&quot;;CONCATENATE([Variables.$I$6];[.U429]);&quot;&quot;);[Variables.$I$2];[Variables.$I$6]);IF([.B429]&lt;&gt;&quot;&quot;;CONCATENATE(&quot;#&quot;;[.B429]);&quot;&quot;))">
            <text:p/>
          </table:table-cell>
          <table:table-cell table:number-columns-repeated="16362"/>
        </table:table-row>
        <table:table-row table:style-name="ro1">
          <table:table-cell table:style-name="ce6" table:formula="of:=IF(AND([.B430]&lt;&gt;&quot;&quot;;[.C430]&lt;&gt;&quot;&quot;);CONCATENATE([Variables.$I$1];[Variables.$I$7];[.B430];[Variables.$I$7];[Variables.$I$6];[Variables.$I$7];[.C430];[Variables.$I$7];[Variables.$I$6];[Variables.$I$7];[.D430];[Variables.$I$7];[Variables.$I$6];[.E430];[Variables.$I$6];[.F430];[Variables.$I$6];[.G430];[Variables.$I$6];[.H430];[Variables.$I$6];[Variables.$I$1];[.I430];[.J430];[.K430];[.L430];[.M430];[.N430];[.O430];[Variables.$I$2];[Variables.$I$6];[.P430];[Variables.$I$6];[.Q430];[Variables.$I$6];[.R430];[Variables.$I$6];[.S430];[Variables.$I$6];[.T430];IF([.U430]&lt;&gt;&quot;&quot;;CONCATENATE([Variables.$I$6];[.U430]);&quot;&quot;);[Variables.$I$2];[Variables.$I$6]);IF([.B430]&lt;&gt;&quot;&quot;;CONCATENATE(&quot;#&quot;;[.B430]);&quot;&quot;))" office:value-type="string" office:string-value="#Trolls  &amp; ents" calcext:value-type="string">
            <text:p>#Trolls <text:s/>&amp; ents</text:p>
          </table:table-cell>
          <table:table-cell table:style-name="ce5" office:value-type="string" calcext:value-type="string">
            <text:p>Trolls <text:s/>&amp; ents</text:p>
          </table:table-cell>
          <table:table-cell table:style-name="ce6" table:number-columns-repeated="19"/>
          <table:table-cell table:style-name="ce36" table:formula="of:=IF(AND([.B430]&lt;&gt;&quot;&quot;;[.C430]&lt;&gt;&quot;&quot;);CONCATENATE([Variables.$I$1];[Variables.$I$7];[.B430];[Variables.$I$7];[Variables.$I$6];[Variables.$I$7];[.C430];[Variables.$I$7];[Variables.$I$6];[Variables.$I$7];[.D430];[Variables.$I$7];[Variables.$I$6];[.E430];[Variables.$I$6];[.F430];[Variables.$I$6];[.G430];[Variables.$I$6];[.H430];[Variables.$I$6];[Variables.$I$1];[.I430];[.J430];[.K430];[.L430];[.M430];[.N430];[.O430];[Variables.$I$2];[Variables.$I$6];[.P430];[Variables.$I$6];[.Q430];[Variables.$I$6];[.R430];[Variables.$I$6];[.S430];[Variables.$I$6];[.T430];IF([.U430]&lt;&gt;&quot;&quot;;CONCATENATE([Variables.$I$6];[.U430]);&quot;&quot;);[Variables.$I$2];[Variables.$I$6]);IF([.B430]&lt;&gt;&quot;&quot;;CONCATENATE(&quot;#&quot;;[.B430]);&quot;&quot;))" office:value-type="string" office:string-value="#Trolls  &amp; ents" calcext:value-type="string">
            <text:p>#Trolls <text:s/>&amp; ents</text:p>
          </table:table-cell>
          <table:table-cell table:number-columns-repeated="16362"/>
        </table:table-row>
        <table:table-row table:style-name="ro1">
          <table:table-cell table:style-name="ce6" table:formula="of:=IF(AND([.B431]&lt;&gt;&quot;&quot;;[.C431]&lt;&gt;&quot;&quot;);CONCATENATE([Variables.$I$1];[Variables.$I$7];[.B431];[Variables.$I$7];[Variables.$I$6];[Variables.$I$7];[.C431];[Variables.$I$7];[Variables.$I$6];[Variables.$I$7];[.D431];[Variables.$I$7];[Variables.$I$6];[.E431];[Variables.$I$6];[.F431];[Variables.$I$6];[.G431];[Variables.$I$6];[.H431];[Variables.$I$6];[Variables.$I$1];[.I431];[.J431];[.K431];[.L431];[.M431];[.N431];[.O431];[Variables.$I$2];[Variables.$I$6];[.P431];[Variables.$I$6];[.Q431];[Variables.$I$6];[.R431];[Variables.$I$6];[.S431];[Variables.$I$6];[.T431];IF([.U431]&lt;&gt;&quot;&quot;;CONCATENATE([Variables.$I$6];[.U431]);&quot;&quot;);[Variables.$I$2];[Variables.$I$6]);IF([.B431]&lt;&gt;&quot;&quot;;CONCATENATE(&quot;#&quot;;[.B431]);&quot;&quot;))" office:value-type="string" office:string-value="[&quot;moria_troll&quot;,&quot;Cave_Troll&quot;,&quot;Cave_Trolls&quot;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8|knows_athletics_8,troll_face1,troll_face2]," calcext:value-type="string">
            <text:p>["moria_troll","Cave_Troll","Cave_Trolls"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8|knows_athletics_8,troll_face1,troll_face2],</text:p>
          </table:table-cell>
          <table:table-cell table:style-name="ce7" office:value-type="string" calcext:value-type="string">
            <text:p>moria_troll</text:p>
          </table:table-cell>
          <table:table-cell table:style-name="ce7" office:value-type="string" calcext:value-type="string">
            <text:p>Cave_Troll</text:p>
          </table:table-cell>
          <table:table-cell table:style-name="ce7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ia</text:p>
          </table:table-cell>
          <table:table-cell table:style-name="ce11" office:value-type="string" calcext:value-type="string">
            <text:p>itm_troll_head_a,itm_troll_head_b,itm_troll_head_c,</text:p>
          </table:table-cell>
          <table:table-cell table:style-name="ce11" office:value-type="string" calcext:value-type="string">
            <text:p>itm_troll_body,</text:p>
          </table:table-cell>
          <table:table-cell table:style-name="ce11" office:value-type="string" calcext:value-type="string">
            <text:p>itm_troll_hands,</text:p>
          </table:table-cell>
          <table:table-cell table:style-name="ce11" office:value-type="string" calcext:value-type="string">
            <text:p>itm_troll_feet,</text:p>
          </table:table-cell>
          <table:table-cell table:style-name="ce11" office:value-type="string" calcext:value-type="string">
            <text:p>itm_tree_trunk_club_b,itm_tree_trunk_invis,</text:p>
          </table:table-cell>
          <table:table-cell table:style-name="ce11" table:number-columns-repeated="2"/>
          <table:table-cell table:style-name="ce12" office:value-type="string" calcext:value-type="string">
            <text:p>str_25| agi_30| int_3| cha_3|level(36)</text:p>
          </table:table-cell>
          <table:table-cell table:style-name="ce12" office:value-type="string" calcext:value-type="string">
            <text:p>wp(75)</text:p>
          </table:table-cell>
          <table:table-cell table:style-name="ce12" office:value-type="string" calcext:value-type="string">
            <text:p>knows_power_strike_5|knows_ironflesh_8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B431]&lt;&gt;&quot;&quot;;[.C431]&lt;&gt;&quot;&quot;);CONCATENATE([Variables.$I$1];[Variables.$I$7];[.B431];[Variables.$I$7];[Variables.$I$6];[Variables.$I$7];[.C431];[Variables.$I$7];[Variables.$I$6];[Variables.$I$7];[.D431];[Variables.$I$7];[Variables.$I$6];[.E431];[Variables.$I$6];[.F431];[Variables.$I$6];[.G431];[Variables.$I$6];[.H431];[Variables.$I$6];[Variables.$I$1];[.I431];[.J431];[.K431];[.L431];[.M431];[.N431];[.O431];[Variables.$I$2];[Variables.$I$6];[.P431];[Variables.$I$6];[.Q431];[Variables.$I$6];[.R431];[Variables.$I$6];[.S431];[Variables.$I$6];[.T431];IF([.U431]&lt;&gt;&quot;&quot;;CONCATENATE([Variables.$I$6];[.U431]);&quot;&quot;);[Variables.$I$2];[Variables.$I$6]);IF([.B431]&lt;&gt;&quot;&quot;;CONCATENATE(&quot;#&quot;;[.B431]);&quot;&quot;))" office:value-type="string" office:string-value="[&quot;moria_troll&quot;,&quot;Cave_Troll&quot;,&quot;Cave_Trolls&quot;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8|knows_athletics_8,troll_face1,troll_face2]," calcext:value-type="string">
            <text:p>["moria_troll","Cave_Troll","Cave_Trolls"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8|knows_athletics_8,troll_face1,troll_face2],</text:p>
          </table:table-cell>
          <table:table-cell table:number-columns-repeated="16362"/>
        </table:table-row>
        <table:table-row table:style-name="ro1">
          <table:table-cell table:style-name="ce6" table:formula="of:=IF(AND([.B432]&lt;&gt;&quot;&quot;;[.C432]&lt;&gt;&quot;&quot;);CONCATENATE([Variables.$I$1];[Variables.$I$7];[.B432];[Variables.$I$7];[Variables.$I$6];[Variables.$I$7];[.C432];[Variables.$I$7];[Variables.$I$6];[Variables.$I$7];[.D432];[Variables.$I$7];[Variables.$I$6];[.E432];[Variables.$I$6];[.F432];[Variables.$I$6];[.G432];[Variables.$I$6];[.H432];[Variables.$I$6];[Variables.$I$1];[.I432];[.J432];[.K432];[.L432];[.M432];[.N432];[.O432];[Variables.$I$2];[Variables.$I$6];[.P432];[Variables.$I$6];[.Q432];[Variables.$I$6];[.R432];[Variables.$I$6];[.S432];[Variables.$I$6];[.T432];IF([.U432]&lt;&gt;&quot;&quot;;CONCATENATE([Variables.$I$6];[.U432]);&quot;&quot;);[Variables.$I$2];[Variables.$I$6]);IF([.B432]&lt;&gt;&quot;&quot;;CONCATENATE(&quot;#&quot;;[.B432]);&quot;&quot;))" office:value-type="string" office:string-value="[&quot;moria_vet_troll&quot;,&quot;Trained_Cave_Troll&quot;,&quot;Trained_Cave_Trolls&quot;,tf_troll| tfg_helm| tfg_boots| tfg_armor| tfg_gloves| tf_no_capture_alive,0,0,fac_moria,[itm_troll_head_a,itm_troll_head_b,itm_troll_head_c,itm_troll_body,itm_troll_hands,itm_troll_feet,itm_giant_club, itm_giant_sledgehammer,],str_25| agi_30| int_3| cha_3|level(37),wp(90),knows_power_strike_6|knows_ironflesh_11|knows_athletics_8,troll_face1,troll_face2]," calcext:value-type="string">
            <text:p>["moria_vet_troll","Trained_Cave_Troll","Trained_Cave_Trolls",tf_troll| tfg_helm| tfg_boots| tfg_armor| tfg_gloves| tf_no_capture_alive,0,0,fac_moria,[itm_troll_head_a,itm_troll_head_b,itm_troll_head_c,itm_troll_body,itm_troll_hands,itm_troll_feet,itm_giant_club, itm_giant_sledgehammer,],str_25| agi_30| int_3| cha_3|level(37),wp(90),knows_power_strike_6|knows_ironflesh_11|knows_athletics_8,troll_face1,troll_face2],</text:p>
          </table:table-cell>
          <table:table-cell table:style-name="ce7" office:value-type="string" calcext:value-type="string">
            <text:p>moria_vet_troll</text:p>
          </table:table-cell>
          <table:table-cell table:style-name="ce7" office:value-type="string" calcext:value-type="string">
            <text:p>Trained_Cave_Troll</text:p>
          </table:table-cell>
          <table:table-cell table:style-name="ce7" office:value-type="string" calcext:value-type="string">
            <text:p>Train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ia</text:p>
          </table:table-cell>
          <table:table-cell table:style-name="ce11" office:value-type="string" calcext:value-type="string">
            <text:p>itm_troll_head_a,itm_troll_head_b,itm_troll_head_c,</text:p>
          </table:table-cell>
          <table:table-cell table:style-name="ce11" office:value-type="string" calcext:value-type="string">
            <text:p>itm_troll_body,</text:p>
          </table:table-cell>
          <table:table-cell table:style-name="ce11" office:value-type="string" calcext:value-type="string">
            <text:p>itm_troll_hands,</text:p>
          </table:table-cell>
          <table:table-cell table:style-name="ce11" office:value-type="string" calcext:value-type="string">
            <text:p>itm_troll_feet,</text:p>
          </table:table-cell>
          <table:table-cell table:style-name="ce11" office:value-type="string" calcext:value-type="string">
            <text:p>itm_giant_club, itm_giant_sledgehammer,</text:p>
          </table:table-cell>
          <table:table-cell table:style-name="ce11" table:number-columns-repeated="2"/>
          <table:table-cell table:style-name="ce12" office:value-type="string" calcext:value-type="string">
            <text:p>str_25| agi_30| int_3| cha_3|level(37)</text:p>
          </table:table-cell>
          <table:table-cell table:style-name="ce12" office:value-type="string" calcext:value-type="string">
            <text:p>wp(90)</text:p>
          </table:table-cell>
          <table:table-cell table:style-name="ce12" office:value-type="string" calcext:value-type="string">
            <text:p>knows_power_strike_6|knows_ironflesh_11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B432]&lt;&gt;&quot;&quot;;[.C432]&lt;&gt;&quot;&quot;);CONCATENATE([Variables.$I$1];[Variables.$I$7];[.B432];[Variables.$I$7];[Variables.$I$6];[Variables.$I$7];[.C432];[Variables.$I$7];[Variables.$I$6];[Variables.$I$7];[.D432];[Variables.$I$7];[Variables.$I$6];[.E432];[Variables.$I$6];[.F432];[Variables.$I$6];[.G432];[Variables.$I$6];[.H432];[Variables.$I$6];[Variables.$I$1];[.I432];[.J432];[.K432];[.L432];[.M432];[.N432];[.O432];[Variables.$I$2];[Variables.$I$6];[.P432];[Variables.$I$6];[.Q432];[Variables.$I$6];[.R432];[Variables.$I$6];[.S432];[Variables.$I$6];[.T432];IF([.U432]&lt;&gt;&quot;&quot;;CONCATENATE([Variables.$I$6];[.U432]);&quot;&quot;);[Variables.$I$2];[Variables.$I$6]);IF([.B432]&lt;&gt;&quot;&quot;;CONCATENATE(&quot;#&quot;;[.B432]);&quot;&quot;))" office:value-type="string" office:string-value="[&quot;moria_vet_troll&quot;,&quot;Trained_Cave_Troll&quot;,&quot;Trained_Cave_Trolls&quot;,tf_troll| tfg_helm| tfg_boots| tfg_armor| tfg_gloves| tf_no_capture_alive,0,0,fac_moria,[itm_troll_head_a,itm_troll_head_b,itm_troll_head_c,itm_troll_body,itm_troll_hands,itm_troll_feet,itm_giant_club, itm_giant_sledgehammer,],str_25| agi_30| int_3| cha_3|level(37),wp(90),knows_power_strike_6|knows_ironflesh_11|knows_athletics_8,troll_face1,troll_face2]," calcext:value-type="string">
            <text:p>["moria_vet_troll","Trained_Cave_Troll","Trained_Cave_Trolls",tf_troll| tfg_helm| tfg_boots| tfg_armor| tfg_gloves| tf_no_capture_alive,0,0,fac_moria,[itm_troll_head_a,itm_troll_head_b,itm_troll_head_c,itm_troll_body,itm_troll_hands,itm_troll_feet,itm_giant_club, itm_giant_sledgehammer,],str_25| agi_30| int_3| cha_3|level(37),wp(90),knows_power_strike_6|knows_ironflesh_11|knows_athletics_8,troll_face1,troll_face2],</text:p>
          </table:table-cell>
          <table:table-cell table:number-columns-repeated="16362"/>
        </table:table-row>
        <table:table-row table:style-name="ro1">
          <table:table-cell table:style-name="ce6" table:formula="of:=IF(AND([.B433]&lt;&gt;&quot;&quot;;[.C433]&lt;&gt;&quot;&quot;);CONCATENATE([Variables.$I$1];[Variables.$I$7];[.B433];[Variables.$I$7];[Variables.$I$6];[Variables.$I$7];[.C433];[Variables.$I$7];[Variables.$I$6];[Variables.$I$7];[.D433];[Variables.$I$7];[Variables.$I$6];[.E433];[Variables.$I$6];[.F433];[Variables.$I$6];[.G433];[Variables.$I$6];[.H433];[Variables.$I$6];[Variables.$I$1];[.I433];[.J433];[.K433];[.L433];[.M433];[.N433];[.O433];[Variables.$I$2];[Variables.$I$6];[.P433];[Variables.$I$6];[.Q433];[Variables.$I$6];[.R433];[Variables.$I$6];[.S433];[Variables.$I$6];[.T433];IF([.U433]&lt;&gt;&quot;&quot;;CONCATENATE([Variables.$I$6];[.U433]);&quot;&quot;);[Variables.$I$2];[Variables.$I$6]);IF([.B433]&lt;&gt;&quot;&quot;;CONCATENATE(&quot;#&quot;;[.B433]);&quot;&quot;))" office:value-type="string" office:string-value="[&quot;moria_armored_troll&quot;,&quot;Armored_Cave_Troll&quot;,&quot;Armored_Cave_Trolls&quot;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" calcext:value-type="string">
            <text:p>["moria_armored_troll","Armored_Cave_Troll","Armored_Cave_Trolls"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</text:p>
          </table:table-cell>
          <table:table-cell table:style-name="ce7" office:value-type="string" calcext:value-type="string">
            <text:p>moria_armored_troll</text:p>
          </table:table-cell>
          <table:table-cell table:style-name="ce7" office:value-type="string" calcext:value-type="string">
            <text:p>Armored_Cave_Troll</text:p>
          </table:table-cell>
          <table:table-cell table:style-name="ce7" office:value-type="string" calcext:value-type="string">
            <text:p>Armor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ia</text:p>
          </table:table-cell>
          <table:table-cell table:style-name="ce11" office:value-type="string" calcext:value-type="string">
            <text:p>itm_isen_olog_head_a,</text:p>
          </table:table-cell>
          <table:table-cell table:style-name="ce11" office:value-type="string" calcext:value-type="string">
            <text:p>itm_troll_body,</text:p>
          </table:table-cell>
          <table:table-cell table:style-name="ce11" office:value-type="string" calcext:value-type="string">
            <text:p>itm_troll_hands,</text:p>
          </table:table-cell>
          <table:table-cell table:style-name="ce11" office:value-type="string" calcext:value-type="string">
            <text:p>itm_troll_feet,</text:p>
          </table:table-cell>
          <table:table-cell table:style-name="ce11" office:value-type="string" calcext:value-type="string">
            <text:p>itm_giant_mace_b,</text:p>
          </table:table-cell>
          <table:table-cell table:style-name="ce11" table:number-columns-repeated="2"/>
          <table:table-cell table:style-name="ce12" office:value-type="string" calcext:value-type="string">
            <text:p>str_25| agi_30| int_3| cha_3|level(55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6|knows_ironflesh_12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B433]&lt;&gt;&quot;&quot;;[.C433]&lt;&gt;&quot;&quot;);CONCATENATE([Variables.$I$1];[Variables.$I$7];[.B433];[Variables.$I$7];[Variables.$I$6];[Variables.$I$7];[.C433];[Variables.$I$7];[Variables.$I$6];[Variables.$I$7];[.D433];[Variables.$I$7];[Variables.$I$6];[.E433];[Variables.$I$6];[.F433];[Variables.$I$6];[.G433];[Variables.$I$6];[.H433];[Variables.$I$6];[Variables.$I$1];[.I433];[.J433];[.K433];[.L433];[.M433];[.N433];[.O433];[Variables.$I$2];[Variables.$I$6];[.P433];[Variables.$I$6];[.Q433];[Variables.$I$6];[.R433];[Variables.$I$6];[.S433];[Variables.$I$6];[.T433];IF([.U433]&lt;&gt;&quot;&quot;;CONCATENATE([Variables.$I$6];[.U433]);&quot;&quot;);[Variables.$I$2];[Variables.$I$6]);IF([.B433]&lt;&gt;&quot;&quot;;CONCATENATE(&quot;#&quot;;[.B433]);&quot;&quot;))" office:value-type="string" office:string-value="[&quot;moria_armored_troll&quot;,&quot;Armored_Cave_Troll&quot;,&quot;Armored_Cave_Trolls&quot;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" calcext:value-type="string">
            <text:p>["moria_armored_troll","Armored_Cave_Troll","Armored_Cave_Trolls"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</text:p>
          </table:table-cell>
          <table:table-cell table:number-columns-repeated="16362"/>
        </table:table-row>
        <table:table-row table:style-name="ro1">
          <table:table-cell table:style-name="ce6" table:formula="of:=IF(AND([.B434]&lt;&gt;&quot;&quot;;[.C434]&lt;&gt;&quot;&quot;);CONCATENATE([Variables.$I$1];[Variables.$I$7];[.B434];[Variables.$I$7];[Variables.$I$6];[Variables.$I$7];[.C434];[Variables.$I$7];[Variables.$I$6];[Variables.$I$7];[.D434];[Variables.$I$7];[Variables.$I$6];[.E434];[Variables.$I$6];[.F434];[Variables.$I$6];[.G434];[Variables.$I$6];[.H434];[Variables.$I$6];[Variables.$I$1];[.I434];[.J434];[.K434];[.L434];[.M434];[.N434];[.O434];[Variables.$I$2];[Variables.$I$6];[.P434];[Variables.$I$6];[.Q434];[Variables.$I$6];[.R434];[Variables.$I$6];[.S434];[Variables.$I$6];[.T434];IF([.U434]&lt;&gt;&quot;&quot;;CONCATENATE([Variables.$I$6];[.U434]);&quot;&quot;);[Variables.$I$2];[Variables.$I$6]);IF([.B434]&lt;&gt;&quot;&quot;;CONCATENATE(&quot;#&quot;;[.B434]);&quot;&quot;))" office:value-type="string" office:string-value="[&quot;gunda_troll&quot;,&quot;Mountain_Troll&quot;,&quot;Mountain_Trolls&quot;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" calcext:value-type="string">
            <text:p>["gunda_troll","Mountain_Troll","Mountain_Trolls"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</text:p>
          </table:table-cell>
          <table:table-cell table:style-name="ce7" office:value-type="string" calcext:value-type="string">
            <text:p>gunda_troll</text:p>
          </table:table-cell>
          <table:table-cell table:style-name="ce7" office:value-type="string" calcext:value-type="string">
            <text:p>Mountain_Troll</text:p>
          </table:table-cell>
          <table:table-cell table:style-name="ce7" office:value-type="string" calcext:value-type="string">
            <text:p>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undabad</text:p>
          </table:table-cell>
          <table:table-cell table:style-name="ce11" office:value-type="string" calcext:value-type="string">
            <text:p>itm_gunda_troll_head_a, itm_gunda_troll_head_b, itm_gunda_troll_head_c,</text:p>
          </table:table-cell>
          <table:table-cell table:style-name="ce11" office:value-type="string" calcext:value-type="string">
            <text:p>itm_gunda_troll_body,</text:p>
          </table:table-cell>
          <table:table-cell table:style-name="ce11" office:value-type="string" calcext:value-type="string">
            <text:p>itm_gunda_troll_hands,</text:p>
          </table:table-cell>
          <table:table-cell table:style-name="ce11" office:value-type="string" calcext:value-type="string">
            <text:p>itm_gunda_troll_feet,</text:p>
          </table:table-cell>
          <table:table-cell table:style-name="ce11" office:value-type="string" calcext:value-type="string">
            <text:p>itm_giant_bone_cudgel,itm_giant_sledgehammer,</text:p>
          </table:table-cell>
          <table:table-cell table:style-name="ce11" office:value-type="string" calcext:value-type="string">
            <text:p>itm_troll_shield_b,</text:p>
          </table:table-cell>
          <table:table-cell table:style-name="ce11"/>
          <table:table-cell table:style-name="ce12" office:value-type="string" calcext:value-type="string">
            <text:p>str_25| agi_30| int_3| cha_3|level(34)</text:p>
          </table:table-cell>
          <table:table-cell table:style-name="ce12" office:value-type="string" calcext:value-type="string">
            <text:p>wp(90)</text:p>
          </table:table-cell>
          <table:table-cell table:style-name="ce12" office:value-type="string" calcext:value-type="string">
            <text:p>knows_power_strike_6|knows_ironflesh_8|knows_athletics_8|knows_shield_6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B434]&lt;&gt;&quot;&quot;;[.C434]&lt;&gt;&quot;&quot;);CONCATENATE([Variables.$I$1];[Variables.$I$7];[.B434];[Variables.$I$7];[Variables.$I$6];[Variables.$I$7];[.C434];[Variables.$I$7];[Variables.$I$6];[Variables.$I$7];[.D434];[Variables.$I$7];[Variables.$I$6];[.E434];[Variables.$I$6];[.F434];[Variables.$I$6];[.G434];[Variables.$I$6];[.H434];[Variables.$I$6];[Variables.$I$1];[.I434];[.J434];[.K434];[.L434];[.M434];[.N434];[.O434];[Variables.$I$2];[Variables.$I$6];[.P434];[Variables.$I$6];[.Q434];[Variables.$I$6];[.R434];[Variables.$I$6];[.S434];[Variables.$I$6];[.T434];IF([.U434]&lt;&gt;&quot;&quot;;CONCATENATE([Variables.$I$6];[.U434]);&quot;&quot;);[Variables.$I$2];[Variables.$I$6]);IF([.B434]&lt;&gt;&quot;&quot;;CONCATENATE(&quot;#&quot;;[.B434]);&quot;&quot;))" office:value-type="string" office:string-value="[&quot;gunda_troll&quot;,&quot;Mountain_Troll&quot;,&quot;Mountain_Trolls&quot;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" calcext:value-type="string">
            <text:p>["gunda_troll","Mountain_Troll","Mountain_Trolls"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</text:p>
          </table:table-cell>
          <table:table-cell table:number-columns-repeated="16362"/>
        </table:table-row>
        <table:table-row table:style-name="ro1">
          <table:table-cell table:style-name="ce6" table:formula="of:=IF(AND([.B435]&lt;&gt;&quot;&quot;;[.C435]&lt;&gt;&quot;&quot;);CONCATENATE([Variables.$I$1];[Variables.$I$7];[.B435];[Variables.$I$7];[Variables.$I$6];[Variables.$I$7];[.C435];[Variables.$I$7];[Variables.$I$6];[Variables.$I$7];[.D435];[Variables.$I$7];[Variables.$I$6];[.E435];[Variables.$I$6];[.F435];[Variables.$I$6];[.G435];[Variables.$I$6];[.H435];[Variables.$I$6];[Variables.$I$1];[.I435];[.J435];[.K435];[.L435];[.M435];[.N435];[.O435];[Variables.$I$2];[Variables.$I$6];[.P435];[Variables.$I$6];[.Q435];[Variables.$I$6];[.R435];[Variables.$I$6];[.S435];[Variables.$I$6];[.T435];IF([.U435]&lt;&gt;&quot;&quot;;CONCATENATE([Variables.$I$6];[.U435]);&quot;&quot;);[Variables.$I$2];[Variables.$I$6]);IF([.B435]&lt;&gt;&quot;&quot;;CONCATENATE(&quot;#&quot;;[.B435]);&quot;&quot;))" office:value-type="string" office:string-value="[&quot;gunda_vet_troll&quot;,&quot;Trained_Mountain_Troll&quot;,&quot;Trained_Mountain_Trolls&quot;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5),wp(120)|wp_one_handed(120),knows_power_strike_9|knows_ironflesh_13|knows_athletics_8|knows_shield_8,troll_face1,troll_face2]," calcext:value-type="string">
            <text:p>["gunda_vet_troll","Trained_Mountain_Troll","Trained_Mountain_Trolls"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5),wp(120)|wp_one_handed(120),knows_power_strike_9|knows_ironflesh_13|knows_athletics_8|knows_shield_8,troll_face1,troll_face2],</text:p>
          </table:table-cell>
          <table:table-cell table:style-name="ce7" office:value-type="string" calcext:value-type="string">
            <text:p>gunda_vet_troll</text:p>
          </table:table-cell>
          <table:table-cell table:style-name="ce7" office:value-type="string" calcext:value-type="string">
            <text:p>Trained_Mountain_Troll</text:p>
          </table:table-cell>
          <table:table-cell table:style-name="ce7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tfg_shield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undabad</text:p>
          </table:table-cell>
          <table:table-cell table:style-name="ce11" office:value-type="string" calcext:value-type="string">
            <text:p>itm_gunda_troll_head_a, itm_gunda_troll_head_b, itm_gunda_troll_head_c,</text:p>
          </table:table-cell>
          <table:table-cell table:style-name="ce11" office:value-type="string" calcext:value-type="string">
            <text:p>itm_gunda_troll_body,</text:p>
          </table:table-cell>
          <table:table-cell table:style-name="ce11" office:value-type="string" calcext:value-type="string">
            <text:p>itm_gunda_troll_hands,</text:p>
          </table:table-cell>
          <table:table-cell table:style-name="ce11" office:value-type="string" calcext:value-type="string">
            <text:p>itm_gunda_troll_feet,</text:p>
          </table:table-cell>
          <table:table-cell table:style-name="ce11" office:value-type="string" calcext:value-type="string">
            <text:p>itm_giant_club, itm_giant_sledgehammer,</text:p>
          </table:table-cell>
          <table:table-cell table:style-name="ce11" office:value-type="string" calcext:value-type="string">
            <text:p>itm_troll_shield_b,</text:p>
          </table:table-cell>
          <table:table-cell table:style-name="ce11"/>
          <table:table-cell table:style-name="ce12" office:value-type="string" calcext:value-type="string">
            <text:p>str_25| agi_30| int_3| cha_3|level(35)</text:p>
          </table:table-cell>
          <table:table-cell table:style-name="ce12" office:value-type="string" calcext:value-type="string">
            <text:p>wp(120)|wp_one_handed(120)</text:p>
          </table:table-cell>
          <table:table-cell table:style-name="ce12" office:value-type="string" calcext:value-type="string">
            <text:p>knows_power_strike_9|knows_ironflesh_13|knows_athletics_8|knows_shield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B435]&lt;&gt;&quot;&quot;;[.C435]&lt;&gt;&quot;&quot;);CONCATENATE([Variables.$I$1];[Variables.$I$7];[.B435];[Variables.$I$7];[Variables.$I$6];[Variables.$I$7];[.C435];[Variables.$I$7];[Variables.$I$6];[Variables.$I$7];[.D435];[Variables.$I$7];[Variables.$I$6];[.E435];[Variables.$I$6];[.F435];[Variables.$I$6];[.G435];[Variables.$I$6];[.H435];[Variables.$I$6];[Variables.$I$1];[.I435];[.J435];[.K435];[.L435];[.M435];[.N435];[.O435];[Variables.$I$2];[Variables.$I$6];[.P435];[Variables.$I$6];[.Q435];[Variables.$I$6];[.R435];[Variables.$I$6];[.S435];[Variables.$I$6];[.T435];IF([.U435]&lt;&gt;&quot;&quot;;CONCATENATE([Variables.$I$6];[.U435]);&quot;&quot;);[Variables.$I$2];[Variables.$I$6]);IF([.B435]&lt;&gt;&quot;&quot;;CONCATENATE(&quot;#&quot;;[.B435]);&quot;&quot;))" office:value-type="string" office:string-value="[&quot;gunda_vet_troll&quot;,&quot;Trained_Mountain_Troll&quot;,&quot;Trained_Mountain_Trolls&quot;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5),wp(120)|wp_one_handed(120),knows_power_strike_9|knows_ironflesh_13|knows_athletics_8|knows_shield_8,troll_face1,troll_face2]," calcext:value-type="string">
            <text:p>["gunda_vet_troll","Trained_Mountain_Troll","Trained_Mountain_Trolls"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5),wp(120)|wp_one_handed(120),knows_power_strike_9|knows_ironflesh_13|knows_athletics_8|knows_shield_8,troll_face1,troll_face2],</text:p>
          </table:table-cell>
          <table:table-cell table:number-columns-repeated="16362"/>
        </table:table-row>
        <table:table-row table:style-name="ro1">
          <table:table-cell table:style-name="ce6" table:formula="of:=IF(AND([.B436]&lt;&gt;&quot;&quot;;[.C436]&lt;&gt;&quot;&quot;);CONCATENATE([Variables.$I$1];[Variables.$I$7];[.B436];[Variables.$I$7];[Variables.$I$6];[Variables.$I$7];[.C436];[Variables.$I$7];[Variables.$I$6];[Variables.$I$7];[.D436];[Variables.$I$7];[Variables.$I$6];[.E436];[Variables.$I$6];[.F436];[Variables.$I$6];[.G436];[Variables.$I$6];[.H436];[Variables.$I$6];[Variables.$I$1];[.I436];[.J436];[.K436];[.L436];[.M436];[.N436];[.O436];[Variables.$I$2];[Variables.$I$6];[.P436];[Variables.$I$6];[.Q436];[Variables.$I$6];[.R436];[Variables.$I$6];[.S436];[Variables.$I$6];[.T436];IF([.U436]&lt;&gt;&quot;&quot;;CONCATENATE([Variables.$I$6];[.U436]);&quot;&quot;);[Variables.$I$2];[Variables.$I$6]);IF([.B436]&lt;&gt;&quot;&quot;;CONCATENATE(&quot;#&quot;;[.B436]);&quot;&quot;))" office:value-type="string" office:string-value="[&quot;gunda_placeholder&quot;,&quot;Trained_Mountain_Troll&quot;,&quot;Trained_Mountain_Trolls&quot;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" calcext:value-type="string">
            <text:p>["gunda_placeholder","Trained_Mountain_Troll","Trained_Mountain_Trolls"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</text:p>
          </table:table-cell>
          <table:table-cell table:style-name="ce7" office:value-type="string" calcext:value-type="string">
            <text:p>gunda_placeholder</text:p>
          </table:table-cell>
          <table:table-cell table:style-name="ce7" office:value-type="string" calcext:value-type="string">
            <text:p>Trained_Mountain_Troll</text:p>
          </table:table-cell>
          <table:table-cell table:style-name="ce7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undabad</text:p>
          </table:table-cell>
          <table:table-cell table:style-name="ce11" office:value-type="string" calcext:value-type="string">
            <text:p>itm_gunda_troll_head_a, itm_gunda_troll_head_b, itm_gunda_troll_head_c,</text:p>
          </table:table-cell>
          <table:table-cell table:style-name="ce11" office:value-type="string" calcext:value-type="string">
            <text:p>itm_gunda_troll_body,</text:p>
          </table:table-cell>
          <table:table-cell table:style-name="ce11" office:value-type="string" calcext:value-type="string">
            <text:p>itm_gunda_troll_hands,</text:p>
          </table:table-cell>
          <table:table-cell table:style-name="ce11" office:value-type="string" calcext:value-type="string">
            <text:p>itm_gunda_troll_feet,</text:p>
          </table:table-cell>
          <table:table-cell table:style-name="ce11"/>
          <table:table-cell table:style-name="ce11" office:value-type="string" calcext:value-type="string">
            <text:p>itm_troll_shield_b,</text:p>
          </table:table-cell>
          <table:table-cell table:style-name="ce11"/>
          <table:table-cell table:style-name="ce12" office:value-type="string" calcext:value-type="string">
            <text:p>str_25| agi_30| int_3| cha_3|level(50)</text:p>
          </table:table-cell>
          <table:table-cell table:style-name="ce12" office:value-type="string" calcext:value-type="string">
            <text:p>wp(100)|wp_one_handed(120)</text:p>
          </table:table-cell>
          <table:table-cell table:style-name="ce12" office:value-type="string" calcext:value-type="string">
            <text:p>knows_power_strike_5|knows_ironflesh_10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B436]&lt;&gt;&quot;&quot;;[.C436]&lt;&gt;&quot;&quot;);CONCATENATE([Variables.$I$1];[Variables.$I$7];[.B436];[Variables.$I$7];[Variables.$I$6];[Variables.$I$7];[.C436];[Variables.$I$7];[Variables.$I$6];[Variables.$I$7];[.D436];[Variables.$I$7];[Variables.$I$6];[.E436];[Variables.$I$6];[.F436];[Variables.$I$6];[.G436];[Variables.$I$6];[.H436];[Variables.$I$6];[Variables.$I$1];[.I436];[.J436];[.K436];[.L436];[.M436];[.N436];[.O436];[Variables.$I$2];[Variables.$I$6];[.P436];[Variables.$I$6];[.Q436];[Variables.$I$6];[.R436];[Variables.$I$6];[.S436];[Variables.$I$6];[.T436];IF([.U436]&lt;&gt;&quot;&quot;;CONCATENATE([Variables.$I$6];[.U436]);&quot;&quot;);[Variables.$I$2];[Variables.$I$6]);IF([.B436]&lt;&gt;&quot;&quot;;CONCATENATE(&quot;#&quot;;[.B436]);&quot;&quot;))" office:value-type="string" office:string-value="[&quot;gunda_placeholder&quot;,&quot;Trained_Mountain_Troll&quot;,&quot;Trained_Mountain_Trolls&quot;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" calcext:value-type="string">
            <text:p>["gunda_placeholder","Trained_Mountain_Troll","Trained_Mountain_Trolls"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</text:p>
          </table:table-cell>
          <table:table-cell table:number-columns-repeated="16362"/>
        </table:table-row>
        <table:table-row table:style-name="ro1">
          <table:table-cell table:style-name="ce6" table:formula="of:=IF(AND([.B437]&lt;&gt;&quot;&quot;;[.C437]&lt;&gt;&quot;&quot;);CONCATENATE([Variables.$I$1];[Variables.$I$7];[.B437];[Variables.$I$7];[Variables.$I$6];[Variables.$I$7];[.C437];[Variables.$I$7];[Variables.$I$6];[Variables.$I$7];[.D437];[Variables.$I$7];[Variables.$I$6];[.E437];[Variables.$I$6];[.F437];[Variables.$I$6];[.G437];[Variables.$I$6];[.H437];[Variables.$I$6];[Variables.$I$1];[.I437];[.J437];[.K437];[.L437];[.M437];[.N437];[.O437];[Variables.$I$2];[Variables.$I$6];[.P437];[Variables.$I$6];[.Q437];[Variables.$I$6];[.R437];[Variables.$I$6];[.S437];[Variables.$I$6];[.T437];IF([.U437]&lt;&gt;&quot;&quot;;CONCATENATE([Variables.$I$6];[.U437]);&quot;&quot;);[Variables.$I$2];[Variables.$I$6]);IF([.B437]&lt;&gt;&quot;&quot;;CONCATENATE(&quot;#&quot;;[.B437]);&quot;&quot;))" office:value-type="string" office:string-value="[&quot;isen_troll&quot;,&quot;Isengard_Troll&quot;,&quot;Isengard_Trolls&quot;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7|knows_athletics_8,troll_face1,troll_face2]," calcext:value-type="string">
            <text:p>["isen_troll","Isengard_Troll","Isengard_Trolls"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7|knows_athletics_8,troll_face1,troll_face2],</text:p>
          </table:table-cell>
          <table:table-cell table:style-name="ce7" office:value-type="string" calcext:value-type="string">
            <text:p>isen_troll</text:p>
          </table:table-cell>
          <table:table-cell table:style-name="ce7" office:value-type="string" calcext:value-type="string">
            <text:p>Isengard_Troll</text:p>
          </table:table-cell>
          <table:table-cell table:style-name="ce7" office:value-type="string" calcext:value-type="string">
            <text:p>Isengar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sengard</text:p>
          </table:table-cell>
          <table:table-cell table:style-name="ce11" office:value-type="string" calcext:value-type="string">
            <text:p>itm_troll_head_a,itm_troll_head_b,itm_troll_head_c,</text:p>
          </table:table-cell>
          <table:table-cell table:style-name="ce11" office:value-type="string" calcext:value-type="string">
            <text:p>itm_troll_body,</text:p>
          </table:table-cell>
          <table:table-cell table:style-name="ce11" office:value-type="string" calcext:value-type="string">
            <text:p>itm_troll_hands,</text:p>
          </table:table-cell>
          <table:table-cell table:style-name="ce11" office:value-type="string" calcext:value-type="string">
            <text:p>itm_troll_feet,</text:p>
          </table:table-cell>
          <table:table-cell table:style-name="ce11" office:value-type="string" calcext:value-type="string">
            <text:p>itm_tree_trunk_club, itm_tree_trunk_invis,</text:p>
          </table:table-cell>
          <table:table-cell table:style-name="ce11" table:number-columns-repeated="2"/>
          <table:table-cell table:style-name="ce12" office:value-type="string" calcext:value-type="string">
            <text:p>str_25| agi_30| int_3| cha_3|level(38)</text:p>
          </table:table-cell>
          <table:table-cell table:style-name="ce12" office:value-type="string" calcext:value-type="string">
            <text:p>wp(75)</text:p>
          </table:table-cell>
          <table:table-cell table:style-name="ce12" office:value-type="string" calcext:value-type="string">
            <text:p>knows_power_strike_5|knows_ironflesh_7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B437]&lt;&gt;&quot;&quot;;[.C437]&lt;&gt;&quot;&quot;);CONCATENATE([Variables.$I$1];[Variables.$I$7];[.B437];[Variables.$I$7];[Variables.$I$6];[Variables.$I$7];[.C437];[Variables.$I$7];[Variables.$I$6];[Variables.$I$7];[.D437];[Variables.$I$7];[Variables.$I$6];[.E437];[Variables.$I$6];[.F437];[Variables.$I$6];[.G437];[Variables.$I$6];[.H437];[Variables.$I$6];[Variables.$I$1];[.I437];[.J437];[.K437];[.L437];[.M437];[.N437];[.O437];[Variables.$I$2];[Variables.$I$6];[.P437];[Variables.$I$6];[.Q437];[Variables.$I$6];[.R437];[Variables.$I$6];[.S437];[Variables.$I$6];[.T437];IF([.U437]&lt;&gt;&quot;&quot;;CONCATENATE([Variables.$I$6];[.U437]);&quot;&quot;);[Variables.$I$2];[Variables.$I$6]);IF([.B437]&lt;&gt;&quot;&quot;;CONCATENATE(&quot;#&quot;;[.B437]);&quot;&quot;))" office:value-type="string" office:string-value="[&quot;isen_troll&quot;,&quot;Isengard_Troll&quot;,&quot;Isengard_Trolls&quot;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7|knows_athletics_8,troll_face1,troll_face2]," calcext:value-type="string">
            <text:p>["isen_troll","Isengard_Troll","Isengard_Trolls"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7|knows_athletics_8,troll_face1,troll_face2],</text:p>
          </table:table-cell>
          <table:table-cell table:number-columns-repeated="16362"/>
        </table:table-row>
        <table:table-row table:style-name="ro1">
          <table:table-cell table:style-name="ce6" table:formula="of:=IF(AND([.B438]&lt;&gt;&quot;&quot;;[.C438]&lt;&gt;&quot;&quot;);CONCATENATE([Variables.$I$1];[Variables.$I$7];[.B438];[Variables.$I$7];[Variables.$I$6];[Variables.$I$7];[.C438];[Variables.$I$7];[Variables.$I$6];[Variables.$I$7];[.D438];[Variables.$I$7];[Variables.$I$6];[.E438];[Variables.$I$6];[.F438];[Variables.$I$6];[.G438];[Variables.$I$6];[.H438];[Variables.$I$6];[Variables.$I$1];[.I438];[.J438];[.K438];[.L438];[.M438];[.N438];[.O438];[Variables.$I$2];[Variables.$I$6];[.P438];[Variables.$I$6];[.Q438];[Variables.$I$6];[.R438];[Variables.$I$6];[.S438];[Variables.$I$6];[.T438];IF([.U438]&lt;&gt;&quot;&quot;;CONCATENATE([Variables.$I$6];[.U438]);&quot;&quot;);[Variables.$I$2];[Variables.$I$6]);IF([.B438]&lt;&gt;&quot;&quot;;CONCATENATE(&quot;#&quot;;[.B438]);&quot;&quot;))" office:value-type="string" office:string-value="[&quot;isen_vet_troll&quot;,&quot;Isengard_Trained_Troll&quot;,&quot;Isengard_Trained_Trolls&quot;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39),wp(85),knows_power_strike_5|knows_ironflesh_10|knows_athletics_8,troll_face1,troll_face2]," calcext:value-type="string">
            <text:p>["isen_vet_troll","Isengard_Trained_Troll","Isengard_Trained_Trolls"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39),wp(85),knows_power_strike_5|knows_ironflesh_10|knows_athletics_8,troll_face1,troll_face2],</text:p>
          </table:table-cell>
          <table:table-cell table:style-name="ce7" office:value-type="string" calcext:value-type="string">
            <text:p>isen_vet_troll</text:p>
          </table:table-cell>
          <table:table-cell table:style-name="ce7" office:value-type="string" calcext:value-type="string">
            <text:p>Isengard_Trained_Troll</text:p>
          </table:table-cell>
          <table:table-cell table:style-name="ce7" office:value-type="string" calcext:value-type="string">
            <text:p>Isengard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sengard</text:p>
          </table:table-cell>
          <table:table-cell table:style-name="ce11" office:value-type="string" calcext:value-type="string">
            <text:p>itm_troll_head_a,itm_troll_head_b,itm_troll_head_c,</text:p>
          </table:table-cell>
          <table:table-cell table:style-name="ce11" office:value-type="string" calcext:value-type="string">
            <text:p>itm_troll_body,</text:p>
          </table:table-cell>
          <table:table-cell table:style-name="ce11" office:value-type="string" calcext:value-type="string">
            <text:p>itm_troll_hands,</text:p>
          </table:table-cell>
          <table:table-cell table:style-name="ce11" office:value-type="string" calcext:value-type="string">
            <text:p>itm_troll_feet,</text:p>
          </table:table-cell>
          <table:table-cell table:style-name="ce11" office:value-type="string" calcext:value-type="string">
            <text:p>itm_tree_trunk_club_b, itm_troll_weapon_long, itm_troll_weapon_long,</text:p>
          </table:table-cell>
          <table:table-cell table:style-name="ce11" table:number-columns-repeated="2"/>
          <table:table-cell table:style-name="ce12" office:value-type="string" calcext:value-type="string">
            <text:p>str_25| agi_30| int_3| cha_3|level(39)</text:p>
          </table:table-cell>
          <table:table-cell table:style-name="ce12" office:value-type="string" calcext:value-type="string">
            <text:p>wp(85)</text:p>
          </table:table-cell>
          <table:table-cell table:style-name="ce12" office:value-type="string" calcext:value-type="string">
            <text:p>knows_power_strike_5|knows_ironflesh_10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B438]&lt;&gt;&quot;&quot;;[.C438]&lt;&gt;&quot;&quot;);CONCATENATE([Variables.$I$1];[Variables.$I$7];[.B438];[Variables.$I$7];[Variables.$I$6];[Variables.$I$7];[.C438];[Variables.$I$7];[Variables.$I$6];[Variables.$I$7];[.D438];[Variables.$I$7];[Variables.$I$6];[.E438];[Variables.$I$6];[.F438];[Variables.$I$6];[.G438];[Variables.$I$6];[.H438];[Variables.$I$6];[Variables.$I$1];[.I438];[.J438];[.K438];[.L438];[.M438];[.N438];[.O438];[Variables.$I$2];[Variables.$I$6];[.P438];[Variables.$I$6];[.Q438];[Variables.$I$6];[.R438];[Variables.$I$6];[.S438];[Variables.$I$6];[.T438];IF([.U438]&lt;&gt;&quot;&quot;;CONCATENATE([Variables.$I$6];[.U438]);&quot;&quot;);[Variables.$I$2];[Variables.$I$6]);IF([.B438]&lt;&gt;&quot;&quot;;CONCATENATE(&quot;#&quot;;[.B438]);&quot;&quot;))" office:value-type="string" office:string-value="[&quot;isen_vet_troll&quot;,&quot;Isengard_Trained_Troll&quot;,&quot;Isengard_Trained_Trolls&quot;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39),wp(85),knows_power_strike_5|knows_ironflesh_10|knows_athletics_8,troll_face1,troll_face2]," calcext:value-type="string">
            <text:p>["isen_vet_troll","Isengard_Trained_Troll","Isengard_Trained_Trolls"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39),wp(85),knows_power_strike_5|knows_ironflesh_10|knows_athletics_8,troll_face1,troll_face2],</text:p>
          </table:table-cell>
          <table:table-cell table:number-columns-repeated="16362"/>
        </table:table-row>
        <table:table-row table:style-name="ro1">
          <table:table-cell table:style-name="ce6" table:formula="of:=IF(AND([.B439]&lt;&gt;&quot;&quot;;[.C439]&lt;&gt;&quot;&quot;);CONCATENATE([Variables.$I$1];[Variables.$I$7];[.B439];[Variables.$I$7];[Variables.$I$6];[Variables.$I$7];[.C439];[Variables.$I$7];[Variables.$I$6];[Variables.$I$7];[.D439];[Variables.$I$7];[Variables.$I$6];[.E439];[Variables.$I$6];[.F439];[Variables.$I$6];[.G439];[Variables.$I$6];[.H439];[Variables.$I$6];[Variables.$I$1];[.I439];[.J439];[.K439];[.L439];[.M439];[.N439];[.O439];[Variables.$I$2];[Variables.$I$6];[.P439];[Variables.$I$6];[.Q439];[Variables.$I$6];[.R439];[Variables.$I$6];[.S439];[Variables.$I$6];[.T439];IF([.U439]&lt;&gt;&quot;&quot;;CONCATENATE([Variables.$I$6];[.U439]);&quot;&quot;);[Variables.$I$2];[Variables.$I$6]);IF([.B439]&lt;&gt;&quot;&quot;;CONCATENATE(&quot;#&quot;;[.B439]);&quot;&quot;))" office:value-type="string" office:string-value="[&quot;isen_armored_troll&quot;,&quot;Isengard_Armored_Troll&quot;,&quot;Isengard_Armored_Trolls&quot;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" calcext:value-type="string">
            <text:p>["isen_armored_troll","Isengard_Armored_Troll","Isengard_Armored_Trolls"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</text:p>
          </table:table-cell>
          <table:table-cell table:style-name="ce7" office:value-type="string" calcext:value-type="string">
            <text:p>isen_armored_troll</text:p>
          </table:table-cell>
          <table:table-cell table:style-name="ce7" office:value-type="string" calcext:value-type="string">
            <text:p>Isengard_Armored_Troll</text:p>
          </table:table-cell>
          <table:table-cell table:style-name="ce7" office:value-type="string" calcext:value-type="string">
            <text:p>Isengard_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sengard</text:p>
          </table:table-cell>
          <table:table-cell table:style-name="ce11" office:value-type="string" calcext:value-type="string">
            <text:p>itm_isen_olog_head_a,itm_isen_olog_head_b,itm_isen_olog_head_c,</text:p>
          </table:table-cell>
          <table:table-cell table:style-name="ce11" office:value-type="string" calcext:value-type="string">
            <text:p>itm_isen_olog_body,itm_isen_olog_body_b,</text:p>
          </table:table-cell>
          <table:table-cell table:style-name="ce11" office:value-type="string" calcext:value-type="string">
            <text:p>itm_isen_olog_hands,</text:p>
          </table:table-cell>
          <table:table-cell table:style-name="ce11" office:value-type="string" calcext:value-type="string">
            <text:p>itm_isen_olog_feet,</text:p>
          </table:table-cell>
          <table:table-cell table:style-name="ce11" office:value-type="string" calcext:value-type="string">
            <text:p>itm_giant_spiked_mace, itm_troll_weapon_long, itm_troll_weapon_long,</text:p>
          </table:table-cell>
          <table:table-cell table:style-name="ce11" table:number-columns-repeated="2"/>
          <table:table-cell table:style-name="ce12" office:value-type="string" calcext:value-type="string">
            <text:p>str_25| agi_30| int_3| cha_3|level(60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6|knows_ironflesh_12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B439]&lt;&gt;&quot;&quot;;[.C439]&lt;&gt;&quot;&quot;);CONCATENATE([Variables.$I$1];[Variables.$I$7];[.B439];[Variables.$I$7];[Variables.$I$6];[Variables.$I$7];[.C439];[Variables.$I$7];[Variables.$I$6];[Variables.$I$7];[.D439];[Variables.$I$7];[Variables.$I$6];[.E439];[Variables.$I$6];[.F439];[Variables.$I$6];[.G439];[Variables.$I$6];[.H439];[Variables.$I$6];[Variables.$I$1];[.I439];[.J439];[.K439];[.L439];[.M439];[.N439];[.O439];[Variables.$I$2];[Variables.$I$6];[.P439];[Variables.$I$6];[.Q439];[Variables.$I$6];[.R439];[Variables.$I$6];[.S439];[Variables.$I$6];[.T439];IF([.U439]&lt;&gt;&quot;&quot;;CONCATENATE([Variables.$I$6];[.U439]);&quot;&quot;);[Variables.$I$2];[Variables.$I$6]);IF([.B439]&lt;&gt;&quot;&quot;;CONCATENATE(&quot;#&quot;;[.B439]);&quot;&quot;))" office:value-type="string" office:string-value="[&quot;isen_armored_troll&quot;,&quot;Isengard_Armored_Troll&quot;,&quot;Isengard_Armored_Trolls&quot;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" calcext:value-type="string">
            <text:p>["isen_armored_troll","Isengard_Armored_Troll","Isengard_Armored_Trolls"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</text:p>
          </table:table-cell>
          <table:table-cell table:number-columns-repeated="16362"/>
        </table:table-row>
        <table:table-row table:style-name="ro1">
          <table:table-cell table:style-name="ce6" table:formula="of:=IF(AND([.B440]&lt;&gt;&quot;&quot;;[.C440]&lt;&gt;&quot;&quot;);CONCATENATE([Variables.$I$1];[Variables.$I$7];[.B440];[Variables.$I$7];[Variables.$I$6];[Variables.$I$7];[.C440];[Variables.$I$7];[Variables.$I$6];[Variables.$I$7];[.D440];[Variables.$I$7];[Variables.$I$6];[.E440];[Variables.$I$6];[.F440];[Variables.$I$6];[.G440];[Variables.$I$6];[.H440];[Variables.$I$6];[Variables.$I$1];[.I440];[.J440];[.K440];[.L440];[.M440];[.N440];[.O440];[Variables.$I$2];[Variables.$I$6];[.P440];[Variables.$I$6];[.Q440];[Variables.$I$6];[.R440];[Variables.$I$6];[.S440];[Variables.$I$6];[.T440];IF([.U440]&lt;&gt;&quot;&quot;;CONCATENATE([Variables.$I$6];[.U440]);&quot;&quot;);[Variables.$I$2];[Variables.$I$6]);IF([.B440]&lt;&gt;&quot;&quot;;CONCATENATE(&quot;#&quot;;[.B440]);&quot;&quot;))" office:value-type="string" office:string-value="[&quot;mordor_troll&quot;,&quot;Mordor_Troll&quot;,&quot;Mordor_Trolls&quot;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8|knows_athletics_8,troll_face1,troll_face2]," calcext:value-type="string">
            <text:p>["mordor_troll","Mordor_Troll","Mordor_Trolls"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8|knows_athletics_8,troll_face1,troll_face2],</text:p>
          </table:table-cell>
          <table:table-cell table:style-name="ce7" office:value-type="string" calcext:value-type="string">
            <text:p>mordor_troll</text:p>
          </table:table-cell>
          <table:table-cell table:style-name="ce7" office:value-type="string" calcext:value-type="string">
            <text:p>Mordor_Troll</text:p>
          </table:table-cell>
          <table:table-cell table:style-name="ce7" office:value-type="string" calcext:value-type="string">
            <text:p>Mordor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mordor_troll_head_a, itm_mordor_troll_head_b,</text:p>
          </table:table-cell>
          <table:table-cell table:style-name="ce11" office:value-type="string" calcext:value-type="string">
            <text:p>itm_mordor_troll_body,</text:p>
          </table:table-cell>
          <table:table-cell table:style-name="ce11" office:value-type="string" calcext:value-type="string">
            <text:p>itm_mordor_troll_hands,</text:p>
          </table:table-cell>
          <table:table-cell table:style-name="ce11" office:value-type="string" calcext:value-type="string">
            <text:p>itm_mordor_troll_feet,</text:p>
          </table:table-cell>
          <table:table-cell table:style-name="ce11" office:value-type="string" calcext:value-type="string">
            <text:p>itm_giant_club,</text:p>
          </table:table-cell>
          <table:table-cell table:style-name="ce11" table:number-columns-repeated="2"/>
          <table:table-cell table:style-name="ce12" office:value-type="string" calcext:value-type="string">
            <text:p>str_25| agi_30| int_3| cha_3|level(38)</text:p>
          </table:table-cell>
          <table:table-cell table:style-name="ce12" office:value-type="string" calcext:value-type="string">
            <text:p>wp(90)</text:p>
          </table:table-cell>
          <table:table-cell table:style-name="ce12" office:value-type="string" calcext:value-type="string">
            <text:p>knows_power_strike_5|knows_ironflesh_8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B440]&lt;&gt;&quot;&quot;;[.C440]&lt;&gt;&quot;&quot;);CONCATENATE([Variables.$I$1];[Variables.$I$7];[.B440];[Variables.$I$7];[Variables.$I$6];[Variables.$I$7];[.C440];[Variables.$I$7];[Variables.$I$6];[Variables.$I$7];[.D440];[Variables.$I$7];[Variables.$I$6];[.E440];[Variables.$I$6];[.F440];[Variables.$I$6];[.G440];[Variables.$I$6];[.H440];[Variables.$I$6];[Variables.$I$1];[.I440];[.J440];[.K440];[.L440];[.M440];[.N440];[.O440];[Variables.$I$2];[Variables.$I$6];[.P440];[Variables.$I$6];[.Q440];[Variables.$I$6];[.R440];[Variables.$I$6];[.S440];[Variables.$I$6];[.T440];IF([.U440]&lt;&gt;&quot;&quot;;CONCATENATE([Variables.$I$6];[.U440]);&quot;&quot;);[Variables.$I$2];[Variables.$I$6]);IF([.B440]&lt;&gt;&quot;&quot;;CONCATENATE(&quot;#&quot;;[.B440]);&quot;&quot;))" office:value-type="string" office:string-value="[&quot;mordor_troll&quot;,&quot;Mordor_Troll&quot;,&quot;Mordor_Trolls&quot;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8|knows_athletics_8,troll_face1,troll_face2]," calcext:value-type="string">
            <text:p>["mordor_troll","Mordor_Troll","Mordor_Trolls"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8|knows_athletics_8,troll_face1,troll_face2],</text:p>
          </table:table-cell>
          <table:table-cell table:number-columns-repeated="16362"/>
        </table:table-row>
        <table:table-row table:style-name="ro1">
          <table:table-cell table:style-name="ce6" table:formula="of:=IF(AND([.B441]&lt;&gt;&quot;&quot;;[.C441]&lt;&gt;&quot;&quot;);CONCATENATE([Variables.$I$1];[Variables.$I$7];[.B441];[Variables.$I$7];[Variables.$I$6];[Variables.$I$7];[.C441];[Variables.$I$7];[Variables.$I$6];[Variables.$I$7];[.D441];[Variables.$I$7];[Variables.$I$6];[.E441];[Variables.$I$6];[.F441];[Variables.$I$6];[.G441];[Variables.$I$6];[.H441];[Variables.$I$6];[Variables.$I$1];[.I441];[.J441];[.K441];[.L441];[.M441];[.N441];[.O441];[Variables.$I$2];[Variables.$I$6];[.P441];[Variables.$I$6];[.Q441];[Variables.$I$6];[.R441];[Variables.$I$6];[.S441];[Variables.$I$6];[.T441];IF([.U441]&lt;&gt;&quot;&quot;;CONCATENATE([Variables.$I$6];[.U441]);&quot;&quot;);[Variables.$I$2];[Variables.$I$6]);IF([.B441]&lt;&gt;&quot;&quot;;CONCATENATE(&quot;#&quot;;[.B441]);&quot;&quot;))" office:value-type="string" office:string-value="[&quot;mordor_vet_troll&quot;,&quot;Mordor_Trained_Troll&quot;,&quot;Mordor_Trained_Trolls&quot;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39),wp(100)|wp_one_handed(120),knows_power_strike_6|knows_ironflesh_12|knows_athletics_8|knows_shield_4,troll_face1,troll_face2]," calcext:value-type="string">
            <text:p>["mordor_vet_troll","Mordor_Trained_Troll","Mordor_Trained_Trolls"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39),wp(100)|wp_one_handed(120),knows_power_strike_6|knows_ironflesh_12|knows_athletics_8|knows_shield_4,troll_face1,troll_face2],</text:p>
          </table:table-cell>
          <table:table-cell table:style-name="ce7" office:value-type="string" calcext:value-type="string">
            <text:p>mordor_vet_troll</text:p>
          </table:table-cell>
          <table:table-cell table:style-name="ce7" office:value-type="string" calcext:value-type="string">
            <text:p>Mordor_Trained_Troll</text:p>
          </table:table-cell>
          <table:table-cell table:style-name="ce7" office:value-type="string" calcext:value-type="string">
            <text:p>Mordor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mordor_troll_head_a, itm_mordor_troll_head_b,</text:p>
          </table:table-cell>
          <table:table-cell table:style-name="ce11" office:value-type="string" calcext:value-type="string">
            <text:p>itm_mordor_troll_body,</text:p>
          </table:table-cell>
          <table:table-cell table:style-name="ce11" office:value-type="string" calcext:value-type="string">
            <text:p>itm_mordor_troll_hands,</text:p>
          </table:table-cell>
          <table:table-cell table:style-name="ce11" office:value-type="string" calcext:value-type="string">
            <text:p>itm_mordor_troll_feet,</text:p>
          </table:table-cell>
          <table:table-cell table:style-name="ce11" office:value-type="string" calcext:value-type="string">
            <text:p>itm_giant_mace_b,</text:p>
          </table:table-cell>
          <table:table-cell table:style-name="ce11" office:value-type="string" calcext:value-type="string">
            <text:p>itm_troll_shield_a,itm_troll_shield_a,</text:p>
          </table:table-cell>
          <table:table-cell table:style-name="ce11"/>
          <table:table-cell table:style-name="ce12" office:value-type="string" calcext:value-type="string">
            <text:p>str_25| agi_30| int_3| cha_3|level(39)</text:p>
          </table:table-cell>
          <table:table-cell table:style-name="ce12" office:value-type="string" calcext:value-type="string">
            <text:p>wp(100)|wp_one_handed(120)</text:p>
          </table:table-cell>
          <table:table-cell table:style-name="ce12" office:value-type="string" calcext:value-type="string">
            <text:p>knows_power_strike_6|knows_ironflesh_12|knows_athletics_8|knows_shield_4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B441]&lt;&gt;&quot;&quot;;[.C441]&lt;&gt;&quot;&quot;);CONCATENATE([Variables.$I$1];[Variables.$I$7];[.B441];[Variables.$I$7];[Variables.$I$6];[Variables.$I$7];[.C441];[Variables.$I$7];[Variables.$I$6];[Variables.$I$7];[.D441];[Variables.$I$7];[Variables.$I$6];[.E441];[Variables.$I$6];[.F441];[Variables.$I$6];[.G441];[Variables.$I$6];[.H441];[Variables.$I$6];[Variables.$I$1];[.I441];[.J441];[.K441];[.L441];[.M441];[.N441];[.O441];[Variables.$I$2];[Variables.$I$6];[.P441];[Variables.$I$6];[.Q441];[Variables.$I$6];[.R441];[Variables.$I$6];[.S441];[Variables.$I$6];[.T441];IF([.U441]&lt;&gt;&quot;&quot;;CONCATENATE([Variables.$I$6];[.U441]);&quot;&quot;);[Variables.$I$2];[Variables.$I$6]);IF([.B441]&lt;&gt;&quot;&quot;;CONCATENATE(&quot;#&quot;;[.B441]);&quot;&quot;))" office:value-type="string" office:string-value="[&quot;mordor_vet_troll&quot;,&quot;Mordor_Trained_Troll&quot;,&quot;Mordor_Trained_Trolls&quot;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39),wp(100)|wp_one_handed(120),knows_power_strike_6|knows_ironflesh_12|knows_athletics_8|knows_shield_4,troll_face1,troll_face2]," calcext:value-type="string">
            <text:p>["mordor_vet_troll","Mordor_Trained_Troll","Mordor_Trained_Trolls"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39),wp(100)|wp_one_handed(120),knows_power_strike_6|knows_ironflesh_12|knows_athletics_8|knows_shield_4,troll_face1,troll_face2],</text:p>
          </table:table-cell>
          <table:table-cell table:number-columns-repeated="16362"/>
        </table:table-row>
        <table:table-row table:style-name="ro1">
          <table:table-cell table:style-name="ce6" table:formula="of:=IF(AND([.B442]&lt;&gt;&quot;&quot;;[.C442]&lt;&gt;&quot;&quot;);CONCATENATE([Variables.$I$1];[Variables.$I$7];[.B442];[Variables.$I$7];[Variables.$I$6];[Variables.$I$7];[.C442];[Variables.$I$7];[Variables.$I$6];[Variables.$I$7];[.D442];[Variables.$I$7];[Variables.$I$6];[.E442];[Variables.$I$6];[.F442];[Variables.$I$6];[.G442];[Variables.$I$6];[.H442];[Variables.$I$6];[Variables.$I$1];[.I442];[.J442];[.K442];[.L442];[.M442];[.N442];[.O442];[Variables.$I$2];[Variables.$I$6];[.P442];[Variables.$I$6];[.Q442];[Variables.$I$6];[.R442];[Variables.$I$6];[.S442];[Variables.$I$6];[.T442];IF([.U442]&lt;&gt;&quot;&quot;;CONCATENATE([Variables.$I$6];[.U442]);&quot;&quot;);[Variables.$I$2];[Variables.$I$6]);IF([.B442]&lt;&gt;&quot;&quot;;CONCATENATE(&quot;#&quot;;[.B442]);&quot;&quot;))" office:value-type="string" office:string-value="[&quot;mordor_olog_hai&quot;,&quot;Olog_Hai_of_Mordor&quot;,&quot;Olog_Hai_of_Mordor&quot;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" calcext:value-type="string">
            <text:p>["mordor_olog_hai","Olog_Hai_of_Mordor","Olog_Hai_of_Mordor"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</text:p>
          </table:table-cell>
          <table:table-cell table:style-name="ce7" office:value-type="string" calcext:value-type="string">
            <text:p>mordor_olog_hai</text:p>
          </table:table-cell>
          <table:table-cell table:number-columns-repeated="2" table:style-name="ce7" office:value-type="string" calcext:value-type="string">
            <text:p>Olog_Hai_of_Mordor</text:p>
          </table:table-cell>
          <table:table-cell table:style-name="ce8" office:value-type="string" calcext:value-type="string">
            <text:p>tf_troll|tfg_shield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olog_head_a, itm_olog_head_b, itm_olog_head_c,</text:p>
          </table:table-cell>
          <table:table-cell table:style-name="ce11" office:value-type="string" calcext:value-type="string">
            <text:p>itm_olog_body,itm_olog_body_b,</text:p>
          </table:table-cell>
          <table:table-cell table:style-name="ce11" office:value-type="string" calcext:value-type="string">
            <text:p>itm_olog_hands,</text:p>
          </table:table-cell>
          <table:table-cell table:style-name="ce11" office:value-type="string" calcext:value-type="string">
            <text:p>itm_olog_feet,</text:p>
          </table:table-cell>
          <table:table-cell table:style-name="ce11" office:value-type="string" calcext:value-type="string">
            <text:p>itm_giant_spiked_mace,itm_giant_hammer,</text:p>
          </table:table-cell>
          <table:table-cell table:style-name="ce11" office:value-type="string" calcext:value-type="string">
            <text:p>itm_troll_shield_a,</text:p>
          </table:table-cell>
          <table:table-cell table:style-name="ce11"/>
          <table:table-cell table:style-name="ce12" office:value-type="string" calcext:value-type="string">
            <text:p>str_25| agi_30| int_3| cha_3|level(65)</text:p>
          </table:table-cell>
          <table:table-cell table:style-name="ce12" office:value-type="string" calcext:value-type="string">
            <text:p>wp(130)|wp_one_handed(150)</text:p>
          </table:table-cell>
          <table:table-cell table:style-name="ce12" office:value-type="string" calcext:value-type="string">
            <text:p>knows_power_strike_7|knows_ironflesh_13|knows_athletics_8|knows_shield_6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B442]&lt;&gt;&quot;&quot;;[.C442]&lt;&gt;&quot;&quot;);CONCATENATE([Variables.$I$1];[Variables.$I$7];[.B442];[Variables.$I$7];[Variables.$I$6];[Variables.$I$7];[.C442];[Variables.$I$7];[Variables.$I$6];[Variables.$I$7];[.D442];[Variables.$I$7];[Variables.$I$6];[.E442];[Variables.$I$6];[.F442];[Variables.$I$6];[.G442];[Variables.$I$6];[.H442];[Variables.$I$6];[Variables.$I$1];[.I442];[.J442];[.K442];[.L442];[.M442];[.N442];[.O442];[Variables.$I$2];[Variables.$I$6];[.P442];[Variables.$I$6];[.Q442];[Variables.$I$6];[.R442];[Variables.$I$6];[.S442];[Variables.$I$6];[.T442];IF([.U442]&lt;&gt;&quot;&quot;;CONCATENATE([Variables.$I$6];[.U442]);&quot;&quot;);[Variables.$I$2];[Variables.$I$6]);IF([.B442]&lt;&gt;&quot;&quot;;CONCATENATE(&quot;#&quot;;[.B442]);&quot;&quot;))" office:value-type="string" office:string-value="[&quot;mordor_olog_hai&quot;,&quot;Olog_Hai_of_Mordor&quot;,&quot;Olog_Hai_of_Mordor&quot;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" calcext:value-type="string">
            <text:p>["mordor_olog_hai","Olog_Hai_of_Mordor","Olog_Hai_of_Mordor"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</text:p>
          </table:table-cell>
          <table:table-cell table:number-columns-repeated="16362"/>
        </table:table-row>
        <table:table-row table:style-name="ro1">
          <table:table-cell table:style-name="ce6" table:formula="of:=IF(AND([.B443]&lt;&gt;&quot;&quot;;[.C443]&lt;&gt;&quot;&quot;);CONCATENATE([Variables.$I$1];[Variables.$I$7];[.B443];[Variables.$I$7];[Variables.$I$6];[Variables.$I$7];[.C443];[Variables.$I$7];[Variables.$I$6];[Variables.$I$7];[.D443];[Variables.$I$7];[Variables.$I$6];[.E443];[Variables.$I$6];[.F443];[Variables.$I$6];[.G443];[Variables.$I$6];[.H443];[Variables.$I$6];[Variables.$I$1];[.I443];[.J443];[.K443];[.L443];[.M443];[.N443];[.O443];[Variables.$I$2];[Variables.$I$6];[.P443];[Variables.$I$6];[.Q443];[Variables.$I$6];[.R443];[Variables.$I$6];[.S443];[Variables.$I$6];[.T443];IF([.U443]&lt;&gt;&quot;&quot;;CONCATENATE([Variables.$I$6];[.U443]);&quot;&quot;);[Variables.$I$2];[Variables.$I$6]);IF([.B443]&lt;&gt;&quot;&quot;;CONCATENATE(&quot;#&quot;;[.B443]);&quot;&quot;))" office:value-type="string" office:string-value="[&quot;troll_placeholder_1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1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style-name="ce7" office:value-type="string" calcext:value-type="string">
            <text:p>troll_placeholder_1</text:p>
          </table:table-cell>
          <table:table-cell table:style-name="ce7" office:value-type="string" calcext:value-type="string">
            <text:p>Cave_Troll</text:p>
          </table:table-cell>
          <table:table-cell table:style-name="ce7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ia</text:p>
          </table:table-cell>
          <table:table-cell table:style-name="ce11" office:value-type="string" calcext:value-type="string">
            <text:p>itm_troll_head_a,itm_troll_head_b,itm_troll_head_c,</text:p>
          </table:table-cell>
          <table:table-cell table:style-name="ce11" office:value-type="string" calcext:value-type="string">
            <text:p>itm_troll_body,</text:p>
          </table:table-cell>
          <table:table-cell table:style-name="ce11" office:value-type="string" calcext:value-type="string">
            <text:p>itm_troll_hands,</text:p>
          </table:table-cell>
          <table:table-cell table:style-name="ce11" office:value-type="string" calcext:value-type="string">
            <text:p>itm_troll_feet,</text:p>
          </table:table-cell>
          <table:table-cell table:style-name="ce11" office:value-type="string" calcext:value-type="string">
            <text:p>itm_tree_trunk_club_a,itm_tree_trunk_club_a,itm_tree_trunk_club_a,itm_tree_trunk_club_b,itm_tree_trunk_club_b,</text:p>
          </table:table-cell>
          <table:table-cell table:style-name="ce11" table:number-columns-repeated="2"/>
          <table:table-cell table:style-name="ce12" office:value-type="string" calcext:value-type="string">
            <text:p>str_25| agi_30| int_3| cha_3|level(40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5|knows_ironflesh_10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B443]&lt;&gt;&quot;&quot;;[.C443]&lt;&gt;&quot;&quot;);CONCATENATE([Variables.$I$1];[Variables.$I$7];[.B443];[Variables.$I$7];[Variables.$I$6];[Variables.$I$7];[.C443];[Variables.$I$7];[Variables.$I$6];[Variables.$I$7];[.D443];[Variables.$I$7];[Variables.$I$6];[.E443];[Variables.$I$6];[.F443];[Variables.$I$6];[.G443];[Variables.$I$6];[.H443];[Variables.$I$6];[Variables.$I$1];[.I443];[.J443];[.K443];[.L443];[.M443];[.N443];[.O443];[Variables.$I$2];[Variables.$I$6];[.P443];[Variables.$I$6];[.Q443];[Variables.$I$6];[.R443];[Variables.$I$6];[.S443];[Variables.$I$6];[.T443];IF([.U443]&lt;&gt;&quot;&quot;;CONCATENATE([Variables.$I$6];[.U443]);&quot;&quot;);[Variables.$I$2];[Variables.$I$6]);IF([.B443]&lt;&gt;&quot;&quot;;CONCATENATE(&quot;#&quot;;[.B443]);&quot;&quot;))" office:value-type="string" office:string-value="[&quot;troll_placeholder_1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1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16362"/>
        </table:table-row>
        <table:table-row table:style-name="ro1">
          <table:table-cell table:style-name="ce6" table:formula="of:=IF(AND([.B444]&lt;&gt;&quot;&quot;;[.C444]&lt;&gt;&quot;&quot;);CONCATENATE([Variables.$I$1];[Variables.$I$7];[.B444];[Variables.$I$7];[Variables.$I$6];[Variables.$I$7];[.C444];[Variables.$I$7];[Variables.$I$6];[Variables.$I$7];[.D444];[Variables.$I$7];[Variables.$I$6];[.E444];[Variables.$I$6];[.F444];[Variables.$I$6];[.G444];[Variables.$I$6];[.H444];[Variables.$I$6];[Variables.$I$1];[.I444];[.J444];[.K444];[.L444];[.M444];[.N444];[.O444];[Variables.$I$2];[Variables.$I$6];[.P444];[Variables.$I$6];[.Q444];[Variables.$I$6];[.R444];[Variables.$I$6];[.S444];[Variables.$I$6];[.T444];IF([.U444]&lt;&gt;&quot;&quot;;CONCATENATE([Variables.$I$6];[.U444]);&quot;&quot;);[Variables.$I$2];[Variables.$I$6]);IF([.B444]&lt;&gt;&quot;&quot;;CONCATENATE(&quot;#&quot;;[.B444]);&quot;&quot;))" office:value-type="string" office:string-value="[&quot;troll_placeholder_2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2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style-name="ce7" office:value-type="string" calcext:value-type="string">
            <text:p>troll_placeholder_2</text:p>
          </table:table-cell>
          <table:table-cell table:style-name="ce7" office:value-type="string" calcext:value-type="string">
            <text:p>Cave_Troll</text:p>
          </table:table-cell>
          <table:table-cell table:style-name="ce7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ia</text:p>
          </table:table-cell>
          <table:table-cell table:style-name="ce11" office:value-type="string" calcext:value-type="string">
            <text:p>itm_troll_head_a,itm_troll_head_b,itm_troll_head_c,</text:p>
          </table:table-cell>
          <table:table-cell table:style-name="ce11" office:value-type="string" calcext:value-type="string">
            <text:p>itm_troll_body,</text:p>
          </table:table-cell>
          <table:table-cell table:style-name="ce11" office:value-type="string" calcext:value-type="string">
            <text:p>itm_troll_hands,</text:p>
          </table:table-cell>
          <table:table-cell table:style-name="ce11" office:value-type="string" calcext:value-type="string">
            <text:p>itm_troll_feet,</text:p>
          </table:table-cell>
          <table:table-cell table:style-name="ce11" office:value-type="string" calcext:value-type="string">
            <text:p>itm_tree_trunk_club_a,itm_tree_trunk_club_a,itm_tree_trunk_club_a,itm_tree_trunk_club_b,itm_tree_trunk_club_b,</text:p>
          </table:table-cell>
          <table:table-cell table:style-name="ce11" table:number-columns-repeated="2"/>
          <table:table-cell table:style-name="ce12" office:value-type="string" calcext:value-type="string">
            <text:p>str_25| agi_30| int_3| cha_3|level(40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5|knows_ironflesh_10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B444]&lt;&gt;&quot;&quot;;[.C444]&lt;&gt;&quot;&quot;);CONCATENATE([Variables.$I$1];[Variables.$I$7];[.B444];[Variables.$I$7];[Variables.$I$6];[Variables.$I$7];[.C444];[Variables.$I$7];[Variables.$I$6];[Variables.$I$7];[.D444];[Variables.$I$7];[Variables.$I$6];[.E444];[Variables.$I$6];[.F444];[Variables.$I$6];[.G444];[Variables.$I$6];[.H444];[Variables.$I$6];[Variables.$I$1];[.I444];[.J444];[.K444];[.L444];[.M444];[.N444];[.O444];[Variables.$I$2];[Variables.$I$6];[.P444];[Variables.$I$6];[.Q444];[Variables.$I$6];[.R444];[Variables.$I$6];[.S444];[Variables.$I$6];[.T444];IF([.U444]&lt;&gt;&quot;&quot;;CONCATENATE([Variables.$I$6];[.U444]);&quot;&quot;);[Variables.$I$2];[Variables.$I$6]);IF([.B444]&lt;&gt;&quot;&quot;;CONCATENATE(&quot;#&quot;;[.B444]);&quot;&quot;))" office:value-type="string" office:string-value="[&quot;troll_placeholder_2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2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16362"/>
        </table:table-row>
        <table:table-row table:style-name="ro1">
          <table:table-cell table:style-name="ce6" table:formula="of:=IF(AND([.B445]&lt;&gt;&quot;&quot;;[.C445]&lt;&gt;&quot;&quot;);CONCATENATE([Variables.$I$1];[Variables.$I$7];[.B445];[Variables.$I$7];[Variables.$I$6];[Variables.$I$7];[.C445];[Variables.$I$7];[Variables.$I$6];[Variables.$I$7];[.D445];[Variables.$I$7];[Variables.$I$6];[.E445];[Variables.$I$6];[.F445];[Variables.$I$6];[.G445];[Variables.$I$6];[.H445];[Variables.$I$6];[Variables.$I$1];[.I445];[.J445];[.K445];[.L445];[.M445];[.N445];[.O445];[Variables.$I$2];[Variables.$I$6];[.P445];[Variables.$I$6];[.Q445];[Variables.$I$6];[.R445];[Variables.$I$6];[.S445];[Variables.$I$6];[.T445];IF([.U445]&lt;&gt;&quot;&quot;;CONCATENATE([Variables.$I$6];[.U445]);&quot;&quot;);[Variables.$I$2];[Variables.$I$6]);IF([.B445]&lt;&gt;&quot;&quot;;CONCATENATE(&quot;#&quot;;[.B445]);&quot;&quot;))" office:value-type="string" office:string-value="[&quot;troll_placeholder_3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3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style-name="ce7" office:value-type="string" calcext:value-type="string">
            <text:p>troll_placeholder_3</text:p>
          </table:table-cell>
          <table:table-cell table:style-name="ce7" office:value-type="string" calcext:value-type="string">
            <text:p>Cave_Troll</text:p>
          </table:table-cell>
          <table:table-cell table:style-name="ce7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ia</text:p>
          </table:table-cell>
          <table:table-cell table:style-name="ce11" office:value-type="string" calcext:value-type="string">
            <text:p>itm_troll_head_a,itm_troll_head_b,itm_troll_head_c,</text:p>
          </table:table-cell>
          <table:table-cell table:style-name="ce11" office:value-type="string" calcext:value-type="string">
            <text:p>itm_troll_body,</text:p>
          </table:table-cell>
          <table:table-cell table:style-name="ce11" office:value-type="string" calcext:value-type="string">
            <text:p>itm_troll_hands,</text:p>
          </table:table-cell>
          <table:table-cell table:style-name="ce11" office:value-type="string" calcext:value-type="string">
            <text:p>itm_troll_feet,</text:p>
          </table:table-cell>
          <table:table-cell table:style-name="ce11" office:value-type="string" calcext:value-type="string">
            <text:p>itm_tree_trunk_club_a,itm_tree_trunk_club_a,itm_tree_trunk_club_a,itm_tree_trunk_club_b,itm_tree_trunk_club_b,</text:p>
          </table:table-cell>
          <table:table-cell table:style-name="ce11" table:number-columns-repeated="2"/>
          <table:table-cell table:style-name="ce12" office:value-type="string" calcext:value-type="string">
            <text:p>str_25| agi_30| int_3| cha_3|level(40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5|knows_ironflesh_10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B445]&lt;&gt;&quot;&quot;;[.C445]&lt;&gt;&quot;&quot;);CONCATENATE([Variables.$I$1];[Variables.$I$7];[.B445];[Variables.$I$7];[Variables.$I$6];[Variables.$I$7];[.C445];[Variables.$I$7];[Variables.$I$6];[Variables.$I$7];[.D445];[Variables.$I$7];[Variables.$I$6];[.E445];[Variables.$I$6];[.F445];[Variables.$I$6];[.G445];[Variables.$I$6];[.H445];[Variables.$I$6];[Variables.$I$1];[.I445];[.J445];[.K445];[.L445];[.M445];[.N445];[.O445];[Variables.$I$2];[Variables.$I$6];[.P445];[Variables.$I$6];[.Q445];[Variables.$I$6];[.R445];[Variables.$I$6];[.S445];[Variables.$I$6];[.T445];IF([.U445]&lt;&gt;&quot;&quot;;CONCATENATE([Variables.$I$6];[.U445]);&quot;&quot;);[Variables.$I$2];[Variables.$I$6]);IF([.B445]&lt;&gt;&quot;&quot;;CONCATENATE(&quot;#&quot;;[.B445]);&quot;&quot;))" office:value-type="string" office:string-value="[&quot;troll_placeholder_3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3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16362"/>
        </table:table-row>
        <table:table-row table:style-name="ro1">
          <table:table-cell table:style-name="ce6" table:formula="of:=IF(AND([.B446]&lt;&gt;&quot;&quot;;[.C446]&lt;&gt;&quot;&quot;);CONCATENATE([Variables.$I$1];[Variables.$I$7];[.B446];[Variables.$I$7];[Variables.$I$6];[Variables.$I$7];[.C446];[Variables.$I$7];[Variables.$I$6];[Variables.$I$7];[.D446];[Variables.$I$7];[Variables.$I$6];[.E446];[Variables.$I$6];[.F446];[Variables.$I$6];[.G446];[Variables.$I$6];[.H446];[Variables.$I$6];[Variables.$I$1];[.I446];[.J446];[.K446];[.L446];[.M446];[.N446];[.O446];[Variables.$I$2];[Variables.$I$6];[.P446];[Variables.$I$6];[.Q446];[Variables.$I$6];[.R446];[Variables.$I$6];[.S446];[Variables.$I$6];[.T446];IF([.U446]&lt;&gt;&quot;&quot;;CONCATENATE([Variables.$I$6];[.U446]);&quot;&quot;);[Variables.$I$2];[Variables.$I$6]);IF([.B446]&lt;&gt;&quot;&quot;;CONCATENATE(&quot;#&quot;;[.B446]);&quot;&quot;))" office:value-type="string" office:string-value="[&quot;troll_placeholder_4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4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style-name="ce7" office:value-type="string" calcext:value-type="string">
            <text:p>troll_placeholder_4</text:p>
          </table:table-cell>
          <table:table-cell table:style-name="ce7" office:value-type="string" calcext:value-type="string">
            <text:p>Cave_Troll</text:p>
          </table:table-cell>
          <table:table-cell table:style-name="ce7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ia</text:p>
          </table:table-cell>
          <table:table-cell table:style-name="ce11" office:value-type="string" calcext:value-type="string">
            <text:p>itm_troll_head_a,itm_troll_head_b,itm_troll_head_c,</text:p>
          </table:table-cell>
          <table:table-cell table:style-name="ce11" office:value-type="string" calcext:value-type="string">
            <text:p>itm_troll_body,</text:p>
          </table:table-cell>
          <table:table-cell table:style-name="ce11" office:value-type="string" calcext:value-type="string">
            <text:p>itm_troll_hands,</text:p>
          </table:table-cell>
          <table:table-cell table:style-name="ce11" office:value-type="string" calcext:value-type="string">
            <text:p>itm_troll_feet,</text:p>
          </table:table-cell>
          <table:table-cell table:style-name="ce11" office:value-type="string" calcext:value-type="string">
            <text:p>itm_tree_trunk_club_a,itm_tree_trunk_club_a,itm_tree_trunk_club_a,itm_tree_trunk_club_b,itm_tree_trunk_club_b,</text:p>
          </table:table-cell>
          <table:table-cell table:style-name="ce11" table:number-columns-repeated="2"/>
          <table:table-cell table:style-name="ce12" office:value-type="string" calcext:value-type="string">
            <text:p>str_25| agi_30| int_3| cha_3|level(40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5|knows_ironflesh_10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B446]&lt;&gt;&quot;&quot;;[.C446]&lt;&gt;&quot;&quot;);CONCATENATE([Variables.$I$1];[Variables.$I$7];[.B446];[Variables.$I$7];[Variables.$I$6];[Variables.$I$7];[.C446];[Variables.$I$7];[Variables.$I$6];[Variables.$I$7];[.D446];[Variables.$I$7];[Variables.$I$6];[.E446];[Variables.$I$6];[.F446];[Variables.$I$6];[.G446];[Variables.$I$6];[.H446];[Variables.$I$6];[Variables.$I$1];[.I446];[.J446];[.K446];[.L446];[.M446];[.N446];[.O446];[Variables.$I$2];[Variables.$I$6];[.P446];[Variables.$I$6];[.Q446];[Variables.$I$6];[.R446];[Variables.$I$6];[.S446];[Variables.$I$6];[.T446];IF([.U446]&lt;&gt;&quot;&quot;;CONCATENATE([Variables.$I$6];[.U446]);&quot;&quot;);[Variables.$I$2];[Variables.$I$6]);IF([.B446]&lt;&gt;&quot;&quot;;CONCATENATE(&quot;#&quot;;[.B446]);&quot;&quot;))" office:value-type="string" office:string-value="[&quot;troll_placeholder_4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4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16362"/>
        </table:table-row>
        <table:table-row table:style-name="ro1">
          <table:table-cell table:style-name="ce6" table:formula="of:=IF(AND([.B447]&lt;&gt;&quot;&quot;;[.C447]&lt;&gt;&quot;&quot;);CONCATENATE([Variables.$I$1];[Variables.$I$7];[.B447];[Variables.$I$7];[Variables.$I$6];[Variables.$I$7];[.C447];[Variables.$I$7];[Variables.$I$6];[Variables.$I$7];[.D447];[Variables.$I$7];[Variables.$I$6];[.E447];[Variables.$I$6];[.F447];[Variables.$I$6];[.G447];[Variables.$I$6];[.H447];[Variables.$I$6];[Variables.$I$1];[.I447];[.J447];[.K447];[.L447];[.M447];[.N447];[.O447];[Variables.$I$2];[Variables.$I$6];[.P447];[Variables.$I$6];[.Q447];[Variables.$I$6];[.R447];[Variables.$I$6];[.S447];[Variables.$I$6];[.T447];IF([.U447]&lt;&gt;&quot;&quot;;CONCATENATE([Variables.$I$6];[.U447]);&quot;&quot;);[Variables.$I$2];[Variables.$I$6]);IF([.B447]&lt;&gt;&quot;&quot;;CONCATENATE(&quot;#&quot;;[.B447]);&quot;&quot;))" office:value-type="string" office:string-value="[&quot;troll_placeholder_5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5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style-name="ce7" office:value-type="string" calcext:value-type="string">
            <text:p>troll_placeholder_5</text:p>
          </table:table-cell>
          <table:table-cell table:style-name="ce7" office:value-type="string" calcext:value-type="string">
            <text:p>Cave_Troll</text:p>
          </table:table-cell>
          <table:table-cell table:style-name="ce7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ia</text:p>
          </table:table-cell>
          <table:table-cell table:style-name="ce11" office:value-type="string" calcext:value-type="string">
            <text:p>itm_troll_head_a,itm_troll_head_b,itm_troll_head_c,</text:p>
          </table:table-cell>
          <table:table-cell table:style-name="ce11" office:value-type="string" calcext:value-type="string">
            <text:p>itm_troll_body,</text:p>
          </table:table-cell>
          <table:table-cell table:style-name="ce11" office:value-type="string" calcext:value-type="string">
            <text:p>itm_troll_hands,</text:p>
          </table:table-cell>
          <table:table-cell table:style-name="ce11" office:value-type="string" calcext:value-type="string">
            <text:p>itm_troll_feet,</text:p>
          </table:table-cell>
          <table:table-cell table:style-name="ce11" office:value-type="string" calcext:value-type="string">
            <text:p>itm_tree_trunk_club_a,itm_tree_trunk_club_a,itm_tree_trunk_club_a,itm_tree_trunk_club_b,itm_tree_trunk_club_b,</text:p>
          </table:table-cell>
          <table:table-cell table:style-name="ce11" table:number-columns-repeated="2"/>
          <table:table-cell table:style-name="ce12" office:value-type="string" calcext:value-type="string">
            <text:p>str_25| agi_30| int_3| cha_3|level(40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5|knows_ironflesh_10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B447]&lt;&gt;&quot;&quot;;[.C447]&lt;&gt;&quot;&quot;);CONCATENATE([Variables.$I$1];[Variables.$I$7];[.B447];[Variables.$I$7];[Variables.$I$6];[Variables.$I$7];[.C447];[Variables.$I$7];[Variables.$I$6];[Variables.$I$7];[.D447];[Variables.$I$7];[Variables.$I$6];[.E447];[Variables.$I$6];[.F447];[Variables.$I$6];[.G447];[Variables.$I$6];[.H447];[Variables.$I$6];[Variables.$I$1];[.I447];[.J447];[.K447];[.L447];[.M447];[.N447];[.O447];[Variables.$I$2];[Variables.$I$6];[.P447];[Variables.$I$6];[.Q447];[Variables.$I$6];[.R447];[Variables.$I$6];[.S447];[Variables.$I$6];[.T447];IF([.U447]&lt;&gt;&quot;&quot;;CONCATENATE([Variables.$I$6];[.U447]);&quot;&quot;);[Variables.$I$2];[Variables.$I$6]);IF([.B447]&lt;&gt;&quot;&quot;;CONCATENATE(&quot;#&quot;;[.B447]);&quot;&quot;))" office:value-type="string" office:string-value="[&quot;troll_placeholder_5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5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16362"/>
        </table:table-row>
        <table:table-row table:style-name="ro1">
          <table:table-cell table:style-name="ce6" table:formula="of:=IF(AND([.B448]&lt;&gt;&quot;&quot;;[.C448]&lt;&gt;&quot;&quot;);CONCATENATE([Variables.$I$1];[Variables.$I$7];[.B448];[Variables.$I$7];[Variables.$I$6];[Variables.$I$7];[.C448];[Variables.$I$7];[Variables.$I$6];[Variables.$I$7];[.D448];[Variables.$I$7];[Variables.$I$6];[.E448];[Variables.$I$6];[.F448];[Variables.$I$6];[.G448];[Variables.$I$6];[.H448];[Variables.$I$6];[Variables.$I$1];[.I448];[.J448];[.K448];[.L448];[.M448];[.N448];[.O448];[Variables.$I$2];[Variables.$I$6];[.P448];[Variables.$I$6];[.Q448];[Variables.$I$6];[.R448];[Variables.$I$6];[.S448];[Variables.$I$6];[.T448];IF([.U448]&lt;&gt;&quot;&quot;;CONCATENATE([Variables.$I$6];[.U448]);&quot;&quot;);[Variables.$I$2];[Variables.$I$6]);IF([.B448]&lt;&gt;&quot;&quot;;CONCATENATE(&quot;#&quot;;[.B448]);&quot;&quot;))" office:value-type="string" office:string-value="[&quot;troll_placeholder_6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6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style-name="ce7" office:value-type="string" calcext:value-type="string">
            <text:p>troll_placeholder_6</text:p>
          </table:table-cell>
          <table:table-cell table:style-name="ce7" office:value-type="string" calcext:value-type="string">
            <text:p>Cave_Troll</text:p>
          </table:table-cell>
          <table:table-cell table:style-name="ce7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ia</text:p>
          </table:table-cell>
          <table:table-cell table:style-name="ce11" office:value-type="string" calcext:value-type="string">
            <text:p>itm_troll_head_a,itm_troll_head_b,itm_troll_head_c,</text:p>
          </table:table-cell>
          <table:table-cell table:style-name="ce11" office:value-type="string" calcext:value-type="string">
            <text:p>itm_troll_body,</text:p>
          </table:table-cell>
          <table:table-cell table:style-name="ce11" office:value-type="string" calcext:value-type="string">
            <text:p>itm_troll_hands,</text:p>
          </table:table-cell>
          <table:table-cell table:style-name="ce11" office:value-type="string" calcext:value-type="string">
            <text:p>itm_troll_feet,</text:p>
          </table:table-cell>
          <table:table-cell table:style-name="ce11" office:value-type="string" calcext:value-type="string">
            <text:p>itm_tree_trunk_club_a,itm_tree_trunk_club_a,itm_tree_trunk_club_a,itm_tree_trunk_club_b,itm_tree_trunk_club_b,</text:p>
          </table:table-cell>
          <table:table-cell table:style-name="ce11" table:number-columns-repeated="2"/>
          <table:table-cell table:style-name="ce12" office:value-type="string" calcext:value-type="string">
            <text:p>str_25| agi_30| int_3| cha_3|level(40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5|knows_ironflesh_10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B448]&lt;&gt;&quot;&quot;;[.C448]&lt;&gt;&quot;&quot;);CONCATENATE([Variables.$I$1];[Variables.$I$7];[.B448];[Variables.$I$7];[Variables.$I$6];[Variables.$I$7];[.C448];[Variables.$I$7];[Variables.$I$6];[Variables.$I$7];[.D448];[Variables.$I$7];[Variables.$I$6];[.E448];[Variables.$I$6];[.F448];[Variables.$I$6];[.G448];[Variables.$I$6];[.H448];[Variables.$I$6];[Variables.$I$1];[.I448];[.J448];[.K448];[.L448];[.M448];[.N448];[.O448];[Variables.$I$2];[Variables.$I$6];[.P448];[Variables.$I$6];[.Q448];[Variables.$I$6];[.R448];[Variables.$I$6];[.S448];[Variables.$I$6];[.T448];IF([.U448]&lt;&gt;&quot;&quot;;CONCATENATE([Variables.$I$6];[.U448]);&quot;&quot;);[Variables.$I$2];[Variables.$I$6]);IF([.B448]&lt;&gt;&quot;&quot;;CONCATENATE(&quot;#&quot;;[.B448]);&quot;&quot;))" office:value-type="string" office:string-value="[&quot;troll_placeholder_6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6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16362"/>
        </table:table-row>
        <table:table-row table:style-name="ro1">
          <table:table-cell table:style-name="ce6" table:formula="of:=IF(AND([.B449]&lt;&gt;&quot;&quot;;[.C449]&lt;&gt;&quot;&quot;);CONCATENATE([Variables.$I$1];[Variables.$I$7];[.B449];[Variables.$I$7];[Variables.$I$6];[Variables.$I$7];[.C449];[Variables.$I$7];[Variables.$I$6];[Variables.$I$7];[.D449];[Variables.$I$7];[Variables.$I$6];[.E449];[Variables.$I$6];[.F449];[Variables.$I$6];[.G449];[Variables.$I$6];[.H449];[Variables.$I$6];[Variables.$I$1];[.I449];[.J449];[.K449];[.L449];[.M449];[.N449];[.O449];[Variables.$I$2];[Variables.$I$6];[.P449];[Variables.$I$6];[.Q449];[Variables.$I$6];[.R449];[Variables.$I$6];[.S449];[Variables.$I$6];[.T449];IF([.U449]&lt;&gt;&quot;&quot;;CONCATENATE([Variables.$I$6];[.U449]);&quot;&quot;);[Variables.$I$2];[Variables.$I$6]);IF([.B449]&lt;&gt;&quot;&quot;;CONCATENATE(&quot;#&quot;;[.B449]);&quot;&quot;))" office:value-type="string" office:string-value="[&quot;wild_troll&quot;,&quot;Wild_Cave_Troll&quot;,&quot;Wild_Cave_Trolls&quot;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" calcext:value-type="string">
            <text:p>["wild_troll","Wild_Cave_Troll","Wild_Cave_Trolls"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</text:p>
          </table:table-cell>
          <table:table-cell table:style-name="ce7" office:value-type="string" calcext:value-type="string">
            <text:p>wild_troll</text:p>
          </table:table-cell>
          <table:table-cell table:style-name="ce7" office:value-type="string" calcext:value-type="string">
            <text:p>Wild_Cave_Troll</text:p>
          </table:table-cell>
          <table:table-cell table:style-name="ce7" office:value-type="string" calcext:value-type="string">
            <text:p>Wil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tribal_orcs</text:p>
          </table:table-cell>
          <table:table-cell table:style-name="ce11" office:value-type="string" calcext:value-type="string">
            <text:p>itm_troll_head_a,itm_troll_head_b,itm_troll_head_c,</text:p>
          </table:table-cell>
          <table:table-cell table:style-name="ce11" office:value-type="string" calcext:value-type="string">
            <text:p>itm_troll_body,</text:p>
          </table:table-cell>
          <table:table-cell table:style-name="ce11" office:value-type="string" calcext:value-type="string">
            <text:p>itm_troll_hands,</text:p>
          </table:table-cell>
          <table:table-cell table:style-name="ce11" office:value-type="string" calcext:value-type="string">
            <text:p>itm_troll_feet,</text:p>
          </table:table-cell>
          <table:table-cell table:style-name="ce11" office:value-type="string" calcext:value-type="string">
            <text:p>itm_tree_trunk_club_b,itm_tree_trunk_invis,</text:p>
          </table:table-cell>
          <table:table-cell table:style-name="ce11" table:number-columns-repeated="2"/>
          <table:table-cell table:style-name="ce12" office:value-type="string" calcext:value-type="string">
            <text:p>str_25| agi_30| int_3| cha_3|level(40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5|knows_ironflesh_10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B449]&lt;&gt;&quot;&quot;;[.C449]&lt;&gt;&quot;&quot;);CONCATENATE([Variables.$I$1];[Variables.$I$7];[.B449];[Variables.$I$7];[Variables.$I$6];[Variables.$I$7];[.C449];[Variables.$I$7];[Variables.$I$6];[Variables.$I$7];[.D449];[Variables.$I$7];[Variables.$I$6];[.E449];[Variables.$I$6];[.F449];[Variables.$I$6];[.G449];[Variables.$I$6];[.H449];[Variables.$I$6];[Variables.$I$1];[.I449];[.J449];[.K449];[.L449];[.M449];[.N449];[.O449];[Variables.$I$2];[Variables.$I$6];[.P449];[Variables.$I$6];[.Q449];[Variables.$I$6];[.R449];[Variables.$I$6];[.S449];[Variables.$I$6];[.T449];IF([.U449]&lt;&gt;&quot;&quot;;CONCATENATE([Variables.$I$6];[.U449]);&quot;&quot;);[Variables.$I$2];[Variables.$I$6]);IF([.B449]&lt;&gt;&quot;&quot;;CONCATENATE(&quot;#&quot;;[.B449]);&quot;&quot;))" office:value-type="string" office:string-value="[&quot;wild_troll&quot;,&quot;Wild_Cave_Troll&quot;,&quot;Wild_Cave_Trolls&quot;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" calcext:value-type="string">
            <text:p>["wild_troll","Wild_Cave_Troll","Wild_Cave_Trolls"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</text:p>
          </table:table-cell>
          <table:table-cell table:number-columns-repeated="16362"/>
        </table:table-row>
        <table:table-row table:style-name="ro1">
          <table:table-cell table:style-name="ce6" table:formula="of:=IF(AND([.B450]&lt;&gt;&quot;&quot;;[.C450]&lt;&gt;&quot;&quot;);CONCATENATE([Variables.$I$1];[Variables.$I$7];[.B450];[Variables.$I$7];[Variables.$I$6];[Variables.$I$7];[.C450];[Variables.$I$7];[Variables.$I$6];[Variables.$I$7];[.D450];[Variables.$I$7];[Variables.$I$6];[.E450];[Variables.$I$6];[.F450];[Variables.$I$6];[.G450];[Variables.$I$6];[.H450];[Variables.$I$6];[Variables.$I$1];[.I450];[.J450];[.K450];[.L450];[.M450];[.N450];[.O450];[Variables.$I$2];[Variables.$I$6];[.P450];[Variables.$I$6];[.Q450];[Variables.$I$6];[.R450];[Variables.$I$6];[.S450];[Variables.$I$6];[.T450];IF([.U450]&lt;&gt;&quot;&quot;;CONCATENATE([Variables.$I$6];[.U450]);&quot;&quot;);[Variables.$I$2];[Variables.$I$6]);IF([.B450]&lt;&gt;&quot;&quot;;CONCATENATE(&quot;#&quot;;[.B450]);&quot;&quot;))" office:value-type="string" office:string-value="[&quot;ent&quot;,&quot;Ent&quot;,&quot;Ents&quot;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" calcext:value-type="string">
            <text:p>["ent","Ent","Ents"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</text:p>
          </table:table-cell>
          <table:table-cell table:style-name="ce7" office:value-type="string" calcext:value-type="string">
            <text:p>ent</text:p>
          </table:table-cell>
          <table:table-cell table:style-name="ce7" office:value-type="string" calcext:value-type="string">
            <text:p>Ent</text:p>
          </table:table-cell>
          <table:table-cell table:style-name="ce7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commoners</text:p>
          </table:table-cell>
          <table:table-cell table:style-name="ce11" office:value-type="string" calcext:value-type="string">
            <text:p>itm_ent_head, itm_ent_head_2, itm_ent_head_3,</text:p>
          </table:table-cell>
          <table:table-cell table:style-name="ce11" office:value-type="string" calcext:value-type="string">
            <text:p>itm_ent_body,</text:p>
          </table:table-cell>
          <table:table-cell table:style-name="ce11" office:value-type="string" calcext:value-type="string">
            <text:p>itm_ent_hands,</text:p>
          </table:table-cell>
          <table:table-cell table:style-name="ce11" office:value-type="string" calcext:value-type="string">
            <text:p>itm_ent_feet_boots,</text:p>
          </table:table-cell>
          <table:table-cell table:style-name="ce11" office:value-type="string" calcext:value-type="string">
            <text:p>itm_tree_trunk_invis,</text:p>
          </table:table-cell>
          <table:table-cell table:style-name="ce11"/>
          <table:table-cell table:style-name="ce11" office:value-type="string" calcext:value-type="string">
            <text:p>itm_ent_water,</text:p>
          </table:table-cell>
          <table:table-cell table:style-name="ce12" office:value-type="string" calcext:value-type="string">
            <text:p>str_25| agi_30| int_3| cha_3|level(63)</text:p>
          </table:table-cell>
          <table:table-cell table:style-name="ce12" office:value-type="string" calcext:value-type="string">
            <text:p>wp(250)</text:p>
          </table:table-cell>
          <table:table-cell table:style-name="ce12" office:value-type="string" calcext:value-type="string">
            <text:p>knows_power_strike_15|knows_ironflesh_15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B450]&lt;&gt;&quot;&quot;;[.C450]&lt;&gt;&quot;&quot;);CONCATENATE([Variables.$I$1];[Variables.$I$7];[.B450];[Variables.$I$7];[Variables.$I$6];[Variables.$I$7];[.C450];[Variables.$I$7];[Variables.$I$6];[Variables.$I$7];[.D450];[Variables.$I$7];[Variables.$I$6];[.E450];[Variables.$I$6];[.F450];[Variables.$I$6];[.G450];[Variables.$I$6];[.H450];[Variables.$I$6];[Variables.$I$1];[.I450];[.J450];[.K450];[.L450];[.M450];[.N450];[.O450];[Variables.$I$2];[Variables.$I$6];[.P450];[Variables.$I$6];[.Q450];[Variables.$I$6];[.R450];[Variables.$I$6];[.S450];[Variables.$I$6];[.T450];IF([.U450]&lt;&gt;&quot;&quot;;CONCATENATE([Variables.$I$6];[.U450]);&quot;&quot;);[Variables.$I$2];[Variables.$I$6]);IF([.B450]&lt;&gt;&quot;&quot;;CONCATENATE(&quot;#&quot;;[.B450]);&quot;&quot;))" office:value-type="string" office:string-value="[&quot;ent&quot;,&quot;Ent&quot;,&quot;Ents&quot;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" calcext:value-type="string">
            <text:p>["ent","Ent","Ents"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</text:p>
          </table:table-cell>
          <table:table-cell table:number-columns-repeated="16362"/>
        </table:table-row>
        <table:table-row table:style-name="ro1">
          <table:table-cell table:formula="of:=IF(AND([.B451]&lt;&gt;&quot;&quot;;[.C451]&lt;&gt;&quot;&quot;);CONCATENATE([Variables.$I$1];[Variables.$I$7];[.B451];[Variables.$I$7];[Variables.$I$6];[Variables.$I$7];[.C451];[Variables.$I$7];[Variables.$I$6];[Variables.$I$7];[.D451];[Variables.$I$7];[Variables.$I$6];[.E451];[Variables.$I$6];[.F451];[Variables.$I$6];[.G451];[Variables.$I$6];[.H451];[Variables.$I$6];[Variables.$I$1];[.I451];[.J451];[.K451];[.L451];[.M451];[.N451];[.O451];[Variables.$I$2];[Variables.$I$6];[.P451];[Variables.$I$6];[.Q451];[Variables.$I$6];[.R451];[Variables.$I$6];[.S451];[Variables.$I$6];[.T451];IF([.U451]&lt;&gt;&quot;&quot;;CONCATENATE([Variables.$I$6];[.U451]);&quot;&quot;);[Variables.$I$2];[Variables.$I$6]);IF([.B451]&lt;&gt;&quot;&quot;;CONCATENATE(&quot;#&quot;;[.B451]);&quot;&quot;))">
            <text:p/>
          </table:table-cell>
          <table:table-cell table:style-name="ce7" table:number-columns-repeated="3"/>
          <table:table-cell table:style-name="ce8"/>
          <table:table-cell table:style-name="ce9" table:number-columns-repeated="2"/>
          <table:table-cell table:style-name="ce10"/>
          <table:table-cell table:style-name="ce11" table:number-columns-repeated="7"/>
          <table:table-cell table:style-name="ce12" table:number-columns-repeated="3"/>
          <table:table-cell table:style-name="ce14" table:number-columns-repeated="2"/>
          <table:table-cell table:style-name="ce15"/>
          <table:table-cell table:style-name="ce36" table:formula="of:=IF(AND([.B451]&lt;&gt;&quot;&quot;;[.C451]&lt;&gt;&quot;&quot;);CONCATENATE([Variables.$I$1];[Variables.$I$7];[.B451];[Variables.$I$7];[Variables.$I$6];[Variables.$I$7];[.C451];[Variables.$I$7];[Variables.$I$6];[Variables.$I$7];[.D451];[Variables.$I$7];[Variables.$I$6];[.E451];[Variables.$I$6];[.F451];[Variables.$I$6];[.G451];[Variables.$I$6];[.H451];[Variables.$I$6];[Variables.$I$1];[.I451];[.J451];[.K451];[.L451];[.M451];[.N451];[.O451];[Variables.$I$2];[Variables.$I$6];[.P451];[Variables.$I$6];[.Q451];[Variables.$I$6];[.R451];[Variables.$I$6];[.S451];[Variables.$I$6];[.T451];IF([.U451]&lt;&gt;&quot;&quot;;CONCATENATE([Variables.$I$6];[.U451]);&quot;&quot;);[Variables.$I$2];[Variables.$I$6]);IF([.B451]&lt;&gt;&quot;&quot;;CONCATENATE(&quot;#&quot;;[.B451]);&quot;&quot;))">
            <text:p/>
          </table:table-cell>
          <table:table-cell table:number-columns-repeated="16362"/>
        </table:table-row>
        <table:table-row table:style-name="ro1">
          <table:table-cell table:formula="of:=IF(AND([.B452]&lt;&gt;&quot;&quot;;[.C452]&lt;&gt;&quot;&quot;);CONCATENATE([Variables.$I$1];[Variables.$I$7];[.B452];[Variables.$I$7];[Variables.$I$6];[Variables.$I$7];[.C452];[Variables.$I$7];[Variables.$I$6];[Variables.$I$7];[.D452];[Variables.$I$7];[Variables.$I$6];[.E452];[Variables.$I$6];[.F452];[Variables.$I$6];[.G452];[Variables.$I$6];[.H452];[Variables.$I$6];[Variables.$I$1];[.I452];[.J452];[.K452];[.L452];[.M452];[.N452];[.O452];[Variables.$I$2];[Variables.$I$6];[.P452];[Variables.$I$6];[.Q452];[Variables.$I$6];[.R452];[Variables.$I$6];[.S452];[Variables.$I$6];[.T452];IF([.U452]&lt;&gt;&quot;&quot;;CONCATENATE([Variables.$I$6];[.U452]);&quot;&quot;);[Variables.$I$2];[Variables.$I$6]);IF([.B452]&lt;&gt;&quot;&quot;;CONCATENATE(&quot;#&quot;;[.B452]);&quot;&quot;))">
            <text:p/>
          </table:table-cell>
          <table:table-cell table:style-name="ce7" table:number-columns-repeated="3"/>
          <table:table-cell table:style-name="ce8"/>
          <table:table-cell table:style-name="ce9" table:number-columns-repeated="2"/>
          <table:table-cell table:style-name="ce10"/>
          <table:table-cell table:style-name="ce11" table:number-columns-repeated="7"/>
          <table:table-cell table:style-name="ce12" table:number-columns-repeated="3"/>
          <table:table-cell table:style-name="ce14" table:number-columns-repeated="2"/>
          <table:table-cell table:style-name="ce15"/>
          <table:table-cell table:style-name="ce36" table:formula="of:=IF(AND([.B452]&lt;&gt;&quot;&quot;;[.C452]&lt;&gt;&quot;&quot;);CONCATENATE([Variables.$I$1];[Variables.$I$7];[.B452];[Variables.$I$7];[Variables.$I$6];[Variables.$I$7];[.C452];[Variables.$I$7];[Variables.$I$6];[Variables.$I$7];[.D452];[Variables.$I$7];[Variables.$I$6];[.E452];[Variables.$I$6];[.F452];[Variables.$I$6];[.G452];[Variables.$I$6];[.H452];[Variables.$I$6];[Variables.$I$1];[.I452];[.J452];[.K452];[.L452];[.M452];[.N452];[.O452];[Variables.$I$2];[Variables.$I$6];[.P452];[Variables.$I$6];[.Q452];[Variables.$I$6];[.R452];[Variables.$I$6];[.S452];[Variables.$I$6];[.T452];IF([.U452]&lt;&gt;&quot;&quot;;CONCATENATE([Variables.$I$6];[.U452]);&quot;&quot;);[Variables.$I$2];[Variables.$I$6]);IF([.B452]&lt;&gt;&quot;&quot;;CONCATENATE(&quot;#&quot;;[.B452]);&quot;&quot;))">
            <text:p/>
          </table:table-cell>
          <table:table-cell table:number-columns-repeated="16362"/>
        </table:table-row>
        <table:table-row table:style-name="ro1">
          <table:table-cell table:formula="of:=IF(AND([.B453]&lt;&gt;&quot;&quot;;[.C453]&lt;&gt;&quot;&quot;);CONCATENATE([Variables.$I$1];[Variables.$I$7];[.B453];[Variables.$I$7];[Variables.$I$6];[Variables.$I$7];[.C453];[Variables.$I$7];[Variables.$I$6];[Variables.$I$7];[.D453];[Variables.$I$7];[Variables.$I$6];[.E453];[Variables.$I$6];[.F453];[Variables.$I$6];[.G453];[Variables.$I$6];[.H453];[Variables.$I$6];[Variables.$I$1];[.I453];[.J453];[.K453];[.L453];[.M453];[.N453];[.O453];[Variables.$I$2];[Variables.$I$6];[.P453];[Variables.$I$6];[.Q453];[Variables.$I$6];[.R453];[Variables.$I$6];[.S453];[Variables.$I$6];[.T453];IF([.U453]&lt;&gt;&quot;&quot;;CONCATENATE([Variables.$I$6];[.U453]);&quot;&quot;);[Variables.$I$2];[Variables.$I$6]);IF([.B453]&lt;&gt;&quot;&quot;;CONCATENATE(&quot;#&quot;;[.B453]);&quot;&quot;))">
            <text:p/>
          </table:table-cell>
          <table:table-cell table:style-name="ce7" table:number-columns-repeated="3"/>
          <table:table-cell table:style-name="ce8"/>
          <table:table-cell table:style-name="ce9" table:number-columns-repeated="2"/>
          <table:table-cell table:style-name="ce10"/>
          <table:table-cell table:style-name="ce11" table:number-columns-repeated="7"/>
          <table:table-cell table:style-name="ce12" table:number-columns-repeated="3"/>
          <table:table-cell table:style-name="ce14" table:number-columns-repeated="2"/>
          <table:table-cell table:style-name="ce15"/>
          <table:table-cell table:style-name="ce36" table:formula="of:=IF(AND([.B453]&lt;&gt;&quot;&quot;;[.C453]&lt;&gt;&quot;&quot;);CONCATENATE([Variables.$I$1];[Variables.$I$7];[.B453];[Variables.$I$7];[Variables.$I$6];[Variables.$I$7];[.C453];[Variables.$I$7];[Variables.$I$6];[Variables.$I$7];[.D453];[Variables.$I$7];[Variables.$I$6];[.E453];[Variables.$I$6];[.F453];[Variables.$I$6];[.G453];[Variables.$I$6];[.H453];[Variables.$I$6];[Variables.$I$1];[.I453];[.J453];[.K453];[.L453];[.M453];[.N453];[.O453];[Variables.$I$2];[Variables.$I$6];[.P453];[Variables.$I$6];[.Q453];[Variables.$I$6];[.R453];[Variables.$I$6];[.S453];[Variables.$I$6];[.T453];IF([.U453]&lt;&gt;&quot;&quot;;CONCATENATE([Variables.$I$6];[.U453]);&quot;&quot;);[Variables.$I$2];[Variables.$I$6]);IF([.B453]&lt;&gt;&quot;&quot;;CONCATENATE(&quot;#&quot;;[.B453]);&quot;&quot;))">
            <text:p/>
          </table:table-cell>
          <table:table-cell table:number-columns-repeated="16362"/>
        </table:table-row>
        <table:table-row table:style-name="ro1">
          <table:table-cell table:formula="of:=IF(AND([.B454]&lt;&gt;&quot;&quot;;[.C454]&lt;&gt;&quot;&quot;);CONCATENATE([Variables.$I$1];[Variables.$I$7];[.B454];[Variables.$I$7];[Variables.$I$6];[Variables.$I$7];[.C454];[Variables.$I$7];[Variables.$I$6];[Variables.$I$7];[.D454];[Variables.$I$7];[Variables.$I$6];[.E454];[Variables.$I$6];[.F454];[Variables.$I$6];[.G454];[Variables.$I$6];[.H454];[Variables.$I$6];[Variables.$I$1];[.I454];[.J454];[.K454];[.L454];[.M454];[.N454];[.O454];[Variables.$I$2];[Variables.$I$6];[.P454];[Variables.$I$6];[.Q454];[Variables.$I$6];[.R454];[Variables.$I$6];[.S454];[Variables.$I$6];[.T454];IF([.U454]&lt;&gt;&quot;&quot;;CONCATENATE([Variables.$I$6];[.U454]);&quot;&quot;);[Variables.$I$2];[Variables.$I$6]);IF([.B454]&lt;&gt;&quot;&quot;;CONCATENATE(&quot;#&quot;;[.B454]);&quot;&quot;))">
            <text:p/>
          </table:table-cell>
          <table:table-cell table:style-name="ce6" table:number-columns-repeated="20"/>
          <table:table-cell table:style-name="ce36" table:formula="of:=IF(AND([.B454]&lt;&gt;&quot;&quot;;[.C454]&lt;&gt;&quot;&quot;);CONCATENATE([Variables.$I$1];[Variables.$I$7];[.B454];[Variables.$I$7];[Variables.$I$6];[Variables.$I$7];[.C454];[Variables.$I$7];[Variables.$I$6];[Variables.$I$7];[.D454];[Variables.$I$7];[Variables.$I$6];[.E454];[Variables.$I$6];[.F454];[Variables.$I$6];[.G454];[Variables.$I$6];[.H454];[Variables.$I$6];[Variables.$I$1];[.I454];[.J454];[.K454];[.L454];[.M454];[.N454];[.O454];[Variables.$I$2];[Variables.$I$6];[.P454];[Variables.$I$6];[.Q454];[Variables.$I$6];[.R454];[Variables.$I$6];[.S454];[Variables.$I$6];[.T454];IF([.U454]&lt;&gt;&quot;&quot;;CONCATENATE([Variables.$I$6];[.U454]);&quot;&quot;);[Variables.$I$2];[Variables.$I$6]);IF([.B454]&lt;&gt;&quot;&quot;;CONCATENATE(&quot;#&quot;;[.B454]);&quot;&quot;))">
            <text:p/>
          </table:table-cell>
          <table:table-cell table:number-columns-repeated="16362"/>
        </table:table-row>
        <table:table-row table:style-name="ro1">
          <table:table-cell table:style-name="ce6" table:formula="of:=IF(AND([.B455]&lt;&gt;&quot;&quot;;[.C455]&lt;&gt;&quot;&quot;);CONCATENATE([Variables.$I$1];[Variables.$I$7];[.B455];[Variables.$I$7];[Variables.$I$6];[Variables.$I$7];[.C455];[Variables.$I$7];[Variables.$I$6];[Variables.$I$7];[.D455];[Variables.$I$7];[Variables.$I$6];[.E455];[Variables.$I$6];[.F455];[Variables.$I$6];[.G455];[Variables.$I$6];[.H455];[Variables.$I$6];[Variables.$I$1];[.I455];[.J455];[.K455];[.L455];[.M455];[.N455];[.O455];[Variables.$I$2];[Variables.$I$6];[.P455];[Variables.$I$6];[.Q455];[Variables.$I$6];[.R455];[Variables.$I$6];[.S455];[Variables.$I$6];[.T455];IF([.U455]&lt;&gt;&quot;&quot;;CONCATENATE([Variables.$I$6];[.U455]);&quot;&quot;);[Variables.$I$2];[Variables.$I$6]);IF([.B455]&lt;&gt;&quot;&quot;;CONCATENATE(&quot;#&quot;;[.B455]);&quot;&quot;))" office:value-type="string" office:string-value="##captains" calcext:value-type="string">
            <text:p>##captains</text:p>
          </table:table-cell>
          <table:table-cell table:style-name="ce5" office:value-type="string" calcext:value-type="string">
            <text:p>#captains</text:p>
          </table:table-cell>
          <table:table-cell table:style-name="ce6" table:number-columns-repeated="19"/>
          <table:table-cell table:style-name="ce36" table:formula="of:=IF(AND([.B455]&lt;&gt;&quot;&quot;;[.C455]&lt;&gt;&quot;&quot;);CONCATENATE([Variables.$I$1];[Variables.$I$7];[.B455];[Variables.$I$7];[Variables.$I$6];[Variables.$I$7];[.C455];[Variables.$I$7];[Variables.$I$6];[Variables.$I$7];[.D455];[Variables.$I$7];[Variables.$I$6];[.E455];[Variables.$I$6];[.F455];[Variables.$I$6];[.G455];[Variables.$I$6];[.H455];[Variables.$I$6];[Variables.$I$1];[.I455];[.J455];[.K455];[.L455];[.M455];[.N455];[.O455];[Variables.$I$2];[Variables.$I$6];[.P455];[Variables.$I$6];[.Q455];[Variables.$I$6];[.R455];[Variables.$I$6];[.S455];[Variables.$I$6];[.T455];IF([.U455]&lt;&gt;&quot;&quot;;CONCATENATE([Variables.$I$6];[.U455]);&quot;&quot;);[Variables.$I$2];[Variables.$I$6]);IF([.B455]&lt;&gt;&quot;&quot;;CONCATENATE(&quot;#&quot;;[.B455]);&quot;&quot;))" office:value-type="string" office:string-value="##captains" calcext:value-type="string">
            <text:p>##captains</text:p>
          </table:table-cell>
          <table:table-cell table:number-columns-repeated="16362"/>
        </table:table-row>
        <table:table-row table:style-name="ro1">
          <table:table-cell table:style-name="ce6" table:formula="of:=IF(AND([.B456]&lt;&gt;&quot;&quot;;[.C456]&lt;&gt;&quot;&quot;);CONCATENATE([Variables.$I$1];[Variables.$I$7];[.B456];[Variables.$I$7];[Variables.$I$6];[Variables.$I$7];[.C456];[Variables.$I$7];[Variables.$I$6];[Variables.$I$7];[.D456];[Variables.$I$7];[Variables.$I$6];[.E456];[Variables.$I$6];[.F456];[Variables.$I$6];[.G456];[Variables.$I$6];[.H456];[Variables.$I$6];[Variables.$I$1];[.I456];[.J456];[.K456];[.L456];[.M456];[.N456];[.O456];[Variables.$I$2];[Variables.$I$6];[.P456];[Variables.$I$6];[.Q456];[Variables.$I$6];[.R456];[Variables.$I$6];[.S456];[Variables.$I$6];[.T456];IF([.U456]&lt;&gt;&quot;&quot;;CONCATENATE([Variables.$I$6];[.U456]);&quot;&quot;);[Variables.$I$2];[Variables.$I$6]);IF([.B456]&lt;&gt;&quot;&quot;;CONCATENATE(&quot;#&quot;;[.B456]);&quot;&quot;))" office:value-type="string" office:string-value="[&quot;greenwood_captain&quot;,&quot;Greenwood_Captain&quot;,&quot;Greenwood_Captains&quot;,tf_woodelf| tfg_gloves| tfg_shield| tfg_armor| tfg_helm| tfg_boots |tfg_polearm| tf_no_capture_alive,0,0,fac_woodelf,[itm_mirkwood_helm_d_good,itm_mirkwood_heavy_scale_cloak,itm_leather_gloves_reward,itm_mirkwood_boots,itm_mirkwood_great_spear,itm_mirkwood_sword,itm_mirkwood_bow,itm_woodelf_arrows,],attr_elf_tier_6,wp_elf_tier_6,knows_common|knows_athletics_8|knows_power_strike_7|knows_ironflesh_7,mirkwood_elf_face_1,mirkwood_elf_face_2]," calcext:value-type="string">
            <text:p>["greenwood_captain","Greenwood_Captain","Greenwood_Captains",tf_woodelf| tfg_gloves| tfg_shield| tfg_armor| tfg_helm| tfg_boots |tfg_polearm| tf_no_capture_alive,0,0,fac_woodelf,[itm_mirkwood_helm_d_good,itm_mirkwood_heavy_scale_cloak,itm_leather_gloves_reward,itm_mirkwood_boots,itm_mirkwood_great_spear,itm_mirkwood_sword,itm_mirkwood_bow,itm_woodelf_arrows,],attr_elf_tier_6,wp_elf_tier_6,knows_common|knows_athletics_8|knows_power_strike_7|knows_ironflesh_7,mirkwood_elf_face_1,mirkwood_elf_face_2],</text:p>
          </table:table-cell>
          <table:table-cell table:style-name="ce7" office:value-type="string" calcext:value-type="string">
            <text:p>greenwood_captain</text:p>
          </table:table-cell>
          <table:table-cell table:style-name="ce7" office:value-type="string" calcext:value-type="string">
            <text:p>Greenwood_Captain</text:p>
          </table:table-cell>
          <table:table-cell table:style-name="ce7" office:value-type="string" calcext:value-type="string">
            <text:p>Greenwood_Captain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woodelf</text:p>
          </table:table-cell>
          <table:table-cell table:style-name="ce19" office:value-type="string" calcext:value-type="string">
            <text:p>itm_mirkwood_helm_d_good,</text:p>
          </table:table-cell>
          <table:table-cell table:style-name="ce19" office:value-type="string" calcext:value-type="string">
            <text:p>itm_mirkwood_heavy_scale_cloak,</text:p>
          </table:table-cell>
          <table:table-cell table:style-name="ce11" office:value-type="string" calcext:value-type="string">
            <text:p>itm_leather_gloves_reward,</text:p>
          </table:table-cell>
          <table:table-cell table:style-name="ce19" office:value-type="string" calcext:value-type="string">
            <text:p>itm_mirkwood_boots,</text:p>
          </table:table-cell>
          <table:table-cell table:style-name="ce19" office:value-type="string" calcext:value-type="string">
            <text:p>itm_mirkwood_great_spear,itm_mirkwood_sword,</text:p>
          </table:table-cell>
          <table:table-cell table:style-name="ce19" office:value-type="string" calcext:value-type="string">
            <text:p>itm_mirkwood_bow,itm_woodelf_arrows,</text:p>
          </table:table-cell>
          <table:table-cell table:style-name="ce19"/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elf_tier_6</text:p>
          </table:table-cell>
          <table:table-cell table:style-name="ce12" office:value-type="string" calcext:value-type="string">
            <text:p>knows_common|knows_athletics_8|knows_power_strike_7|knows_ironflesh_7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32" table:formula="of:=IF(AND([.B456]&lt;&gt;&quot;&quot;;[.C456]&lt;&gt;&quot;&quot;);CONCATENATE([Variables.$I$1];[Variables.$I$7];[.B456];[Variables.$I$7];[Variables.$I$6];[Variables.$I$7];[.C456];[Variables.$I$7];[Variables.$I$6];[Variables.$I$7];[.D456];[Variables.$I$7];[Variables.$I$6];[.E456];[Variables.$I$6];[.F456];[Variables.$I$6];[.G456];[Variables.$I$6];[.H456];[Variables.$I$6];[Variables.$I$1];[.I456];[.J456];[.K456];[.L456];[.M456];[.N456];[.O456];[Variables.$I$2];[Variables.$I$6];[.P456];[Variables.$I$6];[.Q456];[Variables.$I$6];[.R456];[Variables.$I$6];[.S456];[Variables.$I$6];[.T456];IF([.U456]&lt;&gt;&quot;&quot;;CONCATENATE([Variables.$I$6];[.U456]);&quot;&quot;);[Variables.$I$2];[Variables.$I$6]);IF([.B456]&lt;&gt;&quot;&quot;;CONCATENATE(&quot;#&quot;;[.B456]);&quot;&quot;))" office:value-type="string" office:string-value="[&quot;greenwood_captain&quot;,&quot;Greenwood_Captain&quot;,&quot;Greenwood_Captains&quot;,tf_woodelf| tfg_gloves| tfg_shield| tfg_armor| tfg_helm| tfg_boots |tfg_polearm| tf_no_capture_alive,0,0,fac_woodelf,[itm_mirkwood_helm_d_good,itm_mirkwood_heavy_scale_cloak,itm_leather_gloves_reward,itm_mirkwood_boots,itm_mirkwood_great_spear,itm_mirkwood_sword,itm_mirkwood_bow,itm_woodelf_arrows,],attr_elf_tier_6,wp_elf_tier_6,knows_common|knows_athletics_8|knows_power_strike_7|knows_ironflesh_7,mirkwood_elf_face_1,mirkwood_elf_face_2]," calcext:value-type="string">
            <text:p>["greenwood_captain","Greenwood_Captain","Greenwood_Captains",tf_woodelf| tfg_gloves| tfg_shield| tfg_armor| tfg_helm| tfg_boots |tfg_polearm| tf_no_capture_alive,0,0,fac_woodelf,[itm_mirkwood_helm_d_good,itm_mirkwood_heavy_scale_cloak,itm_leather_gloves_reward,itm_mirkwood_boots,itm_mirkwood_great_spear,itm_mirkwood_sword,itm_mirkwood_bow,itm_woodelf_arrows,],attr_elf_tier_6,wp_elf_tier_6,knows_common|knows_athletics_8|knows_power_strike_7|knows_ironflesh_7,mirkwood_elf_face_1,mirkwood_elf_face_2],</text:p>
          </table:table-cell>
          <table:table-cell table:number-columns-repeated="16362"/>
        </table:table-row>
        <table:table-row table:style-name="ro1">
          <table:table-cell table:style-name="ce6" table:formula="of:=IF(AND([.B457]&lt;&gt;&quot;&quot;;[.C457]&lt;&gt;&quot;&quot;);CONCATENATE([Variables.$I$1];[Variables.$I$7];[.B457];[Variables.$I$7];[Variables.$I$6];[Variables.$I$7];[.C457];[Variables.$I$7];[Variables.$I$6];[Variables.$I$7];[.D457];[Variables.$I$7];[Variables.$I$6];[.E457];[Variables.$I$6];[.F457];[Variables.$I$6];[.G457];[Variables.$I$6];[.H457];[Variables.$I$6];[Variables.$I$1];[.I457];[.J457];[.K457];[.L457];[.M457];[.N457];[.O457];[Variables.$I$2];[Variables.$I$6];[.P457];[Variables.$I$6];[.Q457];[Variables.$I$6];[.R457];[Variables.$I$6];[.S457];[Variables.$I$6];[.T457];IF([.U457]&lt;&gt;&quot;&quot;;CONCATENATE([Variables.$I$6];[.U457]);&quot;&quot;);[Variables.$I$2];[Variables.$I$6]);IF([.B457]&lt;&gt;&quot;&quot;;CONCATENATE(&quot;#&quot;;[.B457]);&quot;&quot;))" office:value-type="string" office:string-value="[&quot;lorien_captain&quot;,&quot;Lothlorien_Captain&quot;,&quot;Lothlorien_Captains&quot;,tf_lorien| tf_mounted| tfg_ranged| tfg_shield| tfg_gloves| tfg_shield| tfg_armor| tfg_helm| tfg_boots| tf_no_capture_alive,0,0,fac_lorien,[itm_lorien_helm_b_good,itm_lorien_heavy_good_cloak,itm_leather_gloves_reward,itm_lorien_boots,(itm_lorien_bow_reward, imod_balanced), itm_elven_arrows,itm_lorien_sword_c,],attr_elf_tier_6,wp_melee(460)|wp_archery(320),knows_common|knows_athletics_9|knows_shield_5|knows_power_draw_6|knows_power_strike_6|knows_ironflesh_7,lorien_elf_face_1,lorien_elf_face_2]," calcext:value-type="string">
            <text:p>["lorien_captain","Lothlorien_Captain","Lothlorien_Captains",tf_lorien| tf_mounted| tfg_ranged| tfg_shield| tfg_gloves| tfg_shield| tfg_armor| tfg_helm| tfg_boots| tf_no_capture_alive,0,0,fac_lorien,[itm_lorien_helm_b_good,itm_lorien_heavy_good_cloak,itm_leather_gloves_reward,itm_lorien_boots,(itm_lorien_bow_reward, imod_balanced), itm_elven_arrows,itm_lorien_sword_c,],attr_elf_tier_6,wp_melee(460)|wp_archery(320),knows_common|knows_athletics_9|knows_shield_5|knows_power_draw_6|knows_power_strike_6|knows_ironflesh_7,lorien_elf_face_1,lorien_elf_face_2],</text:p>
          </table:table-cell>
          <table:table-cell table:style-name="ce7" office:value-type="string" calcext:value-type="string">
            <text:p>lorien_captain</text:p>
          </table:table-cell>
          <table:table-cell table:style-name="ce7" office:value-type="string" calcext:value-type="string">
            <text:p>Lothlorien_Captain</text:p>
          </table:table-cell>
          <table:table-cell table:style-name="ce7" office:value-type="string" calcext:value-type="string">
            <text:p>Lothlorien_Captai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lorien</text:p>
          </table:table-cell>
          <table:table-cell table:style-name="ce19" office:value-type="string" calcext:value-type="string">
            <text:p>itm_lorien_helm_b_good,</text:p>
          </table:table-cell>
          <table:table-cell table:style-name="ce19" office:value-type="string" calcext:value-type="string">
            <text:p>itm_lorien_heavy_good_cloak,</text:p>
          </table:table-cell>
          <table:table-cell table:style-name="ce11" office:value-type="string" calcext:value-type="string">
            <text:p>itm_leather_gloves_reward,</text:p>
          </table:table-cell>
          <table:table-cell table:style-name="ce19" office:value-type="string" calcext:value-type="string">
            <text:p>itm_lorien_boots,</text:p>
          </table:table-cell>
          <table:table-cell table:style-name="ce19" office:value-type="string" calcext:value-type="string">
            <text:p>(itm_lorien_bow_reward, imod_balanced), itm_elven_arrows,</text:p>
          </table:table-cell>
          <table:table-cell table:style-name="ce11" office:value-type="string" calcext:value-type="string">
            <text:p>itm_lorien_sword_c,</text:p>
          </table:table-cell>
          <table:table-cell table:style-name="ce11"/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melee(460)|wp_archery(320)</text:p>
          </table:table-cell>
          <table:table-cell table:style-name="ce12" office:value-type="string" calcext:value-type="string">
            <text:p>knows_common|knows_athletics_9|knows_shield_5|knows_power_draw_6|knows_power_strike_6|knows_ironflesh_7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32" table:formula="of:=IF(AND([.B457]&lt;&gt;&quot;&quot;;[.C457]&lt;&gt;&quot;&quot;);CONCATENATE([Variables.$I$1];[Variables.$I$7];[.B457];[Variables.$I$7];[Variables.$I$6];[Variables.$I$7];[.C457];[Variables.$I$7];[Variables.$I$6];[Variables.$I$7];[.D457];[Variables.$I$7];[Variables.$I$6];[.E457];[Variables.$I$6];[.F457];[Variables.$I$6];[.G457];[Variables.$I$6];[.H457];[Variables.$I$6];[Variables.$I$1];[.I457];[.J457];[.K457];[.L457];[.M457];[.N457];[.O457];[Variables.$I$2];[Variables.$I$6];[.P457];[Variables.$I$6];[.Q457];[Variables.$I$6];[.R457];[Variables.$I$6];[.S457];[Variables.$I$6];[.T457];IF([.U457]&lt;&gt;&quot;&quot;;CONCATENATE([Variables.$I$6];[.U457]);&quot;&quot;);[Variables.$I$2];[Variables.$I$6]);IF([.B457]&lt;&gt;&quot;&quot;;CONCATENATE(&quot;#&quot;;[.B457]);&quot;&quot;))" office:value-type="string" office:string-value="[&quot;lorien_captain&quot;,&quot;Lothlorien_Captain&quot;,&quot;Lothlorien_Captains&quot;,tf_lorien| tf_mounted| tfg_ranged| tfg_shield| tfg_gloves| tfg_shield| tfg_armor| tfg_helm| tfg_boots| tf_no_capture_alive,0,0,fac_lorien,[itm_lorien_helm_b_good,itm_lorien_heavy_good_cloak,itm_leather_gloves_reward,itm_lorien_boots,(itm_lorien_bow_reward, imod_balanced), itm_elven_arrows,itm_lorien_sword_c,],attr_elf_tier_6,wp_melee(460)|wp_archery(320),knows_common|knows_athletics_9|knows_shield_5|knows_power_draw_6|knows_power_strike_6|knows_ironflesh_7,lorien_elf_face_1,lorien_elf_face_2]," calcext:value-type="string">
            <text:p>["lorien_captain","Lothlorien_Captain","Lothlorien_Captains",tf_lorien| tf_mounted| tfg_ranged| tfg_shield| tfg_gloves| tfg_shield| tfg_armor| tfg_helm| tfg_boots| tf_no_capture_alive,0,0,fac_lorien,[itm_lorien_helm_b_good,itm_lorien_heavy_good_cloak,itm_leather_gloves_reward,itm_lorien_boots,(itm_lorien_bow_reward, imod_balanced), itm_elven_arrows,itm_lorien_sword_c,],attr_elf_tier_6,wp_melee(460)|wp_archery(320),knows_common|knows_athletics_9|knows_shield_5|knows_power_draw_6|knows_power_strike_6|knows_ironflesh_7,lorien_elf_face_1,lorien_elf_face_2],</text:p>
          </table:table-cell>
          <table:table-cell table:number-columns-repeated="16362"/>
        </table:table-row>
        <table:table-row table:style-name="ro1">
          <table:table-cell table:style-name="ce6" table:formula="of:=IF(AND([.B458]&lt;&gt;&quot;&quot;;[.C458]&lt;&gt;&quot;&quot;);CONCATENATE([Variables.$I$1];[Variables.$I$7];[.B458];[Variables.$I$7];[Variables.$I$6];[Variables.$I$7];[.C458];[Variables.$I$7];[Variables.$I$6];[Variables.$I$7];[.D458];[Variables.$I$7];[Variables.$I$6];[.E458];[Variables.$I$6];[.F458];[Variables.$I$6];[.G458];[Variables.$I$6];[.H458];[Variables.$I$6];[Variables.$I$1];[.I458];[.J458];[.K458];[.L458];[.M458];[.N458];[.O458];[Variables.$I$2];[Variables.$I$6];[.P458];[Variables.$I$6];[.Q458];[Variables.$I$6];[.R458];[Variables.$I$6];[.S458];[Variables.$I$6];[.T458];IF([.U458]&lt;&gt;&quot;&quot;;CONCATENATE([Variables.$I$6];[.U458]);&quot;&quot;);[Variables.$I$2];[Variables.$I$6]);IF([.B458]&lt;&gt;&quot;&quot;;CONCATENATE(&quot;#&quot;;[.B458]);&quot;&quot;))" office:value-type="string" office:string-value="[&quot;riv_captain&quot;,&quot;Rivendell_Elf_Lord&quot;,&quot;Rivendell_Elf_Lords&quot;,tf_imladris| tfg_ranged| tf_mounted| tfg_gloves| tfg_armor| tfg_helm| tfg_horse| tfg_boots| tf_no_capture_alive,0,0,fac_imladris,[itm_riv_helm_c,itm_riv_tiara,itm_riv_armor_reward,itm_leather_gloves_reward,itm_riv_boots,(itm_lorien_bow_reward, imod_balanced)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" calcext:value-type="string">
            <text:p>["riv_captain","Rivendell_Elf_Lord","Rivendell_Elf_Lords",tf_imladris| tfg_ranged| tf_mounted| tfg_gloves| tfg_armor| tfg_helm| tfg_horse| tfg_boots| tf_no_capture_alive,0,0,fac_imladris,[itm_riv_helm_c,itm_riv_tiara,itm_riv_armor_reward,itm_leather_gloves_reward,itm_riv_boots,(itm_lorien_bow_reward, imod_balanced)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</text:p>
          </table:table-cell>
          <table:table-cell table:style-name="ce7" office:value-type="string" calcext:value-type="string">
            <text:p>riv_captain</text:p>
          </table:table-cell>
          <table:table-cell table:style-name="ce7" office:value-type="string" calcext:value-type="string">
            <text:p>Rivendell_Elf_Lord</text:p>
          </table:table-cell>
          <table:table-cell table:style-name="ce7" office:value-type="string" calcext:value-type="string">
            <text:p>Rivendell_Elf_Lord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mladris</text:p>
          </table:table-cell>
          <table:table-cell table:style-name="ce11" office:value-type="string" calcext:value-type="string">
            <text:p>itm_riv_helm_c,itm_riv_tiara,</text:p>
          </table:table-cell>
          <table:table-cell table:style-name="ce11" office:value-type="string" calcext:value-type="string">
            <text:p>itm_riv_armor_reward,</text:p>
          </table:table-cell>
          <table:table-cell table:style-name="ce11" office:value-type="string" calcext:value-type="string">
            <text:p>itm_leather_gloves_reward,</text:p>
          </table:table-cell>
          <table:table-cell table:style-name="ce11" office:value-type="string" calcext:value-type="string">
            <text:p>itm_riv_boots,</text:p>
          </table:table-cell>
          <table:table-cell table:style-name="ce11" office:value-type="string" calcext:value-type="string">
            <text:p>(itm_lorien_bow_reward, imod_balanced), itm_elven_arrows,</text:p>
          </table:table-cell>
          <table:table-cell table:style-name="ce11" office:value-type="string" calcext:value-type="string">
            <text:p>itm_riv_bas_sword,itm_riv_shield_b_good,itm_riv_spear,itm_riv_riding_sword,</text:p>
          </table:table-cell>
          <table:table-cell table:style-name="ce11" office:value-type="string" calcext:value-type="string">
            <text:p>itm_riv_warhorse2,</text:p>
          </table:table-cell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elf_tier_6</text:p>
          </table:table-cell>
          <table:table-cell table:style-name="ce12" office:value-type="string" calcext:value-type="string">
            <text:p>knows_common|knows_riding_6|knows_shield_4|knows_horse_archery_9|knows_athletics_5|knows_power_draw_5|knows_power_strike_5|knows_ironflesh_4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32" table:formula="of:=IF(AND([.B458]&lt;&gt;&quot;&quot;;[.C458]&lt;&gt;&quot;&quot;);CONCATENATE([Variables.$I$1];[Variables.$I$7];[.B458];[Variables.$I$7];[Variables.$I$6];[Variables.$I$7];[.C458];[Variables.$I$7];[Variables.$I$6];[Variables.$I$7];[.D458];[Variables.$I$7];[Variables.$I$6];[.E458];[Variables.$I$6];[.F458];[Variables.$I$6];[.G458];[Variables.$I$6];[.H458];[Variables.$I$6];[Variables.$I$1];[.I458];[.J458];[.K458];[.L458];[.M458];[.N458];[.O458];[Variables.$I$2];[Variables.$I$6];[.P458];[Variables.$I$6];[.Q458];[Variables.$I$6];[.R458];[Variables.$I$6];[.S458];[Variables.$I$6];[.T458];IF([.U458]&lt;&gt;&quot;&quot;;CONCATENATE([Variables.$I$6];[.U458]);&quot;&quot;);[Variables.$I$2];[Variables.$I$6]);IF([.B458]&lt;&gt;&quot;&quot;;CONCATENATE(&quot;#&quot;;[.B458]);&quot;&quot;))" office:value-type="string" office:string-value="[&quot;riv_captain&quot;,&quot;Rivendell_Elf_Lord&quot;,&quot;Rivendell_Elf_Lords&quot;,tf_imladris| tfg_ranged| tf_mounted| tfg_gloves| tfg_armor| tfg_helm| tfg_horse| tfg_boots| tf_no_capture_alive,0,0,fac_imladris,[itm_riv_helm_c,itm_riv_tiara,itm_riv_armor_reward,itm_leather_gloves_reward,itm_riv_boots,(itm_lorien_bow_reward, imod_balanced)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" calcext:value-type="string">
            <text:p>["riv_captain","Rivendell_Elf_Lord","Rivendell_Elf_Lords",tf_imladris| tfg_ranged| tf_mounted| tfg_gloves| tfg_armor| tfg_helm| tfg_horse| tfg_boots| tf_no_capture_alive,0,0,fac_imladris,[itm_riv_helm_c,itm_riv_tiara,itm_riv_armor_reward,itm_leather_gloves_reward,itm_riv_boots,(itm_lorien_bow_reward, imod_balanced)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</text:p>
          </table:table-cell>
          <table:table-cell table:number-columns-repeated="16362"/>
        </table:table-row>
        <table:table-row table:style-name="ro1">
          <table:table-cell table:style-name="ce6" table:formula="of:=IF(AND([.B459]&lt;&gt;&quot;&quot;;[.C459]&lt;&gt;&quot;&quot;);CONCATENATE([Variables.$I$1];[Variables.$I$7];[.B459];[Variables.$I$7];[Variables.$I$6];[Variables.$I$7];[.C459];[Variables.$I$7];[Variables.$I$6];[Variables.$I$7];[.D459];[Variables.$I$7];[Variables.$I$6];[.E459];[Variables.$I$6];[.F459];[Variables.$I$6];[.G459];[Variables.$I$6];[.H459];[Variables.$I$6];[Variables.$I$1];[.I459];[.J459];[.K459];[.L459];[.M459];[.N459];[.O459];[Variables.$I$2];[Variables.$I$6];[.P459];[Variables.$I$6];[.Q459];[Variables.$I$6];[.R459];[Variables.$I$6];[.S459];[Variables.$I$6];[.T459];IF([.U459]&lt;&gt;&quot;&quot;;CONCATENATE([Variables.$I$6];[.U459]);&quot;&quot;);[Variables.$I$2];[Variables.$I$6]);IF([.B459]&lt;&gt;&quot;&quot;;CONCATENATE(&quot;#&quot;;[.B459]);&quot;&quot;))" office:value-type="string" office:string-value="[&quot;arnor_captain&quot;,&quot;Captain_of_Arnor&quot;,&quot;Captains_of_Arnor&quot;,tf_dunedain| tf_mounted| tfg_gloves| tfg_shield| tfg_armor| tfg_helm| tfg_horse| tfg_boots |tfg_polearm,0,0,fac_imladris,[itm_arnor_helm_c_good,itm_arnor_heavy_good_cloak,itm_mail_mittens,itm_arnor_greaves,itm_leather_boots_dark,itm_lance,itm_arnor_sword_c,itm_arnor_shield_c,itm_dunedain_warhorse_heavy,],attr_tier_6,wp_elf_tier_5,knows_common|knows_riding_5|knows_shield_3|knows_athletics_6|knows_power_strike_7|knows_ironflesh_7,arnor_face_older_1,arnor_face_older_2]," calcext:value-type="string">
            <text:p>["arnor_captain","Captain_of_Arnor","Captains_of_Arnor",tf_dunedain| tf_mounted| tfg_gloves| tfg_shield| tfg_armor| tfg_helm| tfg_horse| tfg_boots |tfg_polearm,0,0,fac_imladris,[itm_arnor_helm_c_good,itm_arnor_heavy_good_cloak,itm_mail_mittens,itm_arnor_greaves,itm_leather_boots_dark,itm_lance,itm_arnor_sword_c,itm_arnor_shield_c,itm_dunedain_warhorse_heavy,],attr_tier_6,wp_elf_tier_5,knows_common|knows_riding_5|knows_shield_3|knows_athletics_6|knows_power_strike_7|knows_ironflesh_7,arnor_face_older_1,arnor_face_older_2],</text:p>
          </table:table-cell>
          <table:table-cell table:style-name="ce7" office:value-type="string" calcext:value-type="string">
            <text:p>arnor_captain</text:p>
          </table:table-cell>
          <table:table-cell table:style-name="ce7" office:value-type="string" calcext:value-type="string">
            <text:p>Captain_of_Arnor</text:p>
          </table:table-cell>
          <table:table-cell table:style-name="ce7" office:value-type="string" calcext:value-type="string">
            <text:p>Captain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mladris</text:p>
          </table:table-cell>
          <table:table-cell table:style-name="ce11" office:value-type="string" calcext:value-type="string">
            <text:p>itm_arnor_helm_c_good,</text:p>
          </table:table-cell>
          <table:table-cell table:style-name="ce11" office:value-type="string" calcext:value-type="string">
            <text:p>itm_arnor_heavy_good_cloak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arnor_greaves,itm_leather_boots_dark,</text:p>
          </table:table-cell>
          <table:table-cell table:style-name="ce11" office:value-type="string" calcext:value-type="string">
            <text:p>itm_lance,</text:p>
          </table:table-cell>
          <table:table-cell table:style-name="ce30" office:value-type="string" calcext:value-type="string">
            <text:p>itm_arnor_sword_c,itm_arnor_shield_c,</text:p>
          </table:table-cell>
          <table:table-cell table:style-name="ce11" office:value-type="string" calcext:value-type="string">
            <text:p>itm_dunedain_warhorse_heavy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elf_tier_5</text:p>
          </table:table-cell>
          <table:table-cell table:style-name="ce12" office:value-type="string" calcext:value-type="string">
            <text:p>knows_common|knows_riding_5|knows_shield_3|knows_athletics_6|knows_power_strike_7|knows_ironflesh_7</text:p>
          </table:table-cell>
          <table:table-cell table:style-name="ce14" office:value-type="string" calcext:value-type="string">
            <text:p>arnor_face_older_1</text:p>
          </table:table-cell>
          <table:table-cell table:style-name="ce14" office:value-type="string" calcext:value-type="string">
            <text:p>arnor_face_older_2</text:p>
          </table:table-cell>
          <table:table-cell table:style-name="ce15"/>
          <table:table-cell table:style-name="ce32" table:formula="of:=IF(AND([.B459]&lt;&gt;&quot;&quot;;[.C459]&lt;&gt;&quot;&quot;);CONCATENATE([Variables.$I$1];[Variables.$I$7];[.B459];[Variables.$I$7];[Variables.$I$6];[Variables.$I$7];[.C459];[Variables.$I$7];[Variables.$I$6];[Variables.$I$7];[.D459];[Variables.$I$7];[Variables.$I$6];[.E459];[Variables.$I$6];[.F459];[Variables.$I$6];[.G459];[Variables.$I$6];[.H459];[Variables.$I$6];[Variables.$I$1];[.I459];[.J459];[.K459];[.L459];[.M459];[.N459];[.O459];[Variables.$I$2];[Variables.$I$6];[.P459];[Variables.$I$6];[.Q459];[Variables.$I$6];[.R459];[Variables.$I$6];[.S459];[Variables.$I$6];[.T459];IF([.U459]&lt;&gt;&quot;&quot;;CONCATENATE([Variables.$I$6];[.U459]);&quot;&quot;);[Variables.$I$2];[Variables.$I$6]);IF([.B459]&lt;&gt;&quot;&quot;;CONCATENATE(&quot;#&quot;;[.B459]);&quot;&quot;))" office:value-type="string" office:string-value="[&quot;arnor_captain&quot;,&quot;Captain_of_Arnor&quot;,&quot;Captains_of_Arnor&quot;,tf_dunedain| tf_mounted| tfg_gloves| tfg_shield| tfg_armor| tfg_helm| tfg_horse| tfg_boots |tfg_polearm,0,0,fac_imladris,[itm_arnor_helm_c_good,itm_arnor_heavy_good_cloak,itm_mail_mittens,itm_arnor_greaves,itm_leather_boots_dark,itm_lance,itm_arnor_sword_c,itm_arnor_shield_c,itm_dunedain_warhorse_heavy,],attr_tier_6,wp_elf_tier_5,knows_common|knows_riding_5|knows_shield_3|knows_athletics_6|knows_power_strike_7|knows_ironflesh_7,arnor_face_older_1,arnor_face_older_2]," calcext:value-type="string">
            <text:p>["arnor_captain","Captain_of_Arnor","Captains_of_Arnor",tf_dunedain| tf_mounted| tfg_gloves| tfg_shield| tfg_armor| tfg_helm| tfg_horse| tfg_boots |tfg_polearm,0,0,fac_imladris,[itm_arnor_helm_c_good,itm_arnor_heavy_good_cloak,itm_mail_mittens,itm_arnor_greaves,itm_leather_boots_dark,itm_lance,itm_arnor_sword_c,itm_arnor_shield_c,itm_dunedain_warhorse_heavy,],attr_tier_6,wp_elf_tier_5,knows_common|knows_riding_5|knows_shield_3|knows_athletics_6|knows_power_strike_7|knows_ironflesh_7,arnor_face_older_1,arnor_face_older_2],</text:p>
          </table:table-cell>
          <table:table-cell table:number-columns-repeated="16362"/>
        </table:table-row>
        <table:table-row table:style-name="ro1">
          <table:table-cell table:style-name="ce6" table:formula="of:=IF(AND([.B460]&lt;&gt;&quot;&quot;;[.C460]&lt;&gt;&quot;&quot;);CONCATENATE([Variables.$I$1];[Variables.$I$7];[.B460];[Variables.$I$7];[Variables.$I$6];[Variables.$I$7];[.C460];[Variables.$I$7];[Variables.$I$6];[Variables.$I$7];[.D460];[Variables.$I$7];[Variables.$I$6];[.E460];[Variables.$I$6];[.F460];[Variables.$I$6];[.G460];[Variables.$I$6];[.H460];[Variables.$I$6];[Variables.$I$1];[.I460];[.J460];[.K460];[.L460];[.M460];[.N460];[.O460];[Variables.$I$2];[Variables.$I$6];[.P460];[Variables.$I$6];[.Q460];[Variables.$I$6];[.R460];[Variables.$I$6];[.S460];[Variables.$I$6];[.T460];IF([.U460]&lt;&gt;&quot;&quot;;CONCATENATE([Variables.$I$6];[.U460]);&quot;&quot;);[Variables.$I$2];[Variables.$I$6]);IF([.B460]&lt;&gt;&quot;&quot;;CONCATENATE(&quot;#&quot;;[.B460]);&quot;&quot;))" office:value-type="string" office:string-value="[&quot;arnor_ranger_captain&quot;,&quot;Ranger_Captain_of_Arnor&quot;,&quot;Ranger_Captains_of_Arnor&quot;,tf_dunedain| tfg_ranged| tfg_gloves| tfg_armor| tfg_boots,0,0,fac_imladris,[itm_arnor_helm_c_bad,itm_arnor_med_b_good_cloak,itm_leather_gloves,itm_leather_boots,itm_leather_boots_dark_bad,itm_elven_bow,itm_ithilien_arrows,itm_arnor_sword_f,itm_arnor_sword_a,],attr_tier_6,wp_melee(360)|wp_archery(300),knows_common|knows_athletics_8|knows_shield_3|knows_power_draw_5|knows_power_strike_6|knows_ironflesh_6,arnor_face_older_1,arnor_face_older_2]," calcext:value-type="string">
            <text:p>["arnor_ranger_captain","Ranger_Captain_of_Arnor","Ranger_Captains_of_Arnor",tf_dunedain| tfg_ranged| tfg_gloves| tfg_armor| tfg_boots,0,0,fac_imladris,[itm_arnor_helm_c_bad,itm_arnor_med_b_good_cloak,itm_leather_gloves,itm_leather_boots,itm_leather_boots_dark_bad,itm_elven_bow,itm_ithilien_arrows,itm_arnor_sword_f,itm_arnor_sword_a,],attr_tier_6,wp_melee(360)|wp_archery(300),knows_common|knows_athletics_8|knows_shield_3|knows_power_draw_5|knows_power_strike_6|knows_ironflesh_6,arnor_face_older_1,arnor_face_older_2],</text:p>
          </table:table-cell>
          <table:table-cell table:style-name="ce7" office:value-type="string" calcext:value-type="string">
            <text:p>arnor_ranger_captain</text:p>
          </table:table-cell>
          <table:table-cell table:style-name="ce7" office:value-type="string" calcext:value-type="string">
            <text:p>Ranger_Captain_of_Arnor</text:p>
          </table:table-cell>
          <table:table-cell table:style-name="ce7" office:value-type="string" calcext:value-type="string">
            <text:p>Ranger_Captains_of_Arnor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mladris</text:p>
          </table:table-cell>
          <table:table-cell table:style-name="ce11" office:value-type="string" calcext:value-type="string">
            <text:p>itm_arnor_helm_c_bad,</text:p>
          </table:table-cell>
          <table:table-cell table:style-name="ce11" office:value-type="string" calcext:value-type="string">
            <text:p>itm_arnor_med_b_good_cloak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leather_boots,itm_leather_boots_dark_bad,</text:p>
          </table:table-cell>
          <table:table-cell table:style-name="ce11" office:value-type="string" calcext:value-type="string">
            <text:p>itm_elven_bow,itm_ithilien_arrows,</text:p>
          </table:table-cell>
          <table:table-cell table:style-name="ce11" office:value-type="string" calcext:value-type="string">
            <text:p>itm_arnor_sword_f,itm_arnor_sword_a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melee(360)|wp_archery(300)</text:p>
          </table:table-cell>
          <table:table-cell table:style-name="ce12" office:value-type="string" calcext:value-type="string">
            <text:p>knows_common|knows_athletics_8|knows_shield_3|knows_power_draw_5|knows_power_strike_6|knows_ironflesh_6</text:p>
          </table:table-cell>
          <table:table-cell table:style-name="ce14" office:value-type="string" calcext:value-type="string">
            <text:p>arnor_face_older_1</text:p>
          </table:table-cell>
          <table:table-cell table:style-name="ce14" office:value-type="string" calcext:value-type="string">
            <text:p>arnor_face_older_2</text:p>
          </table:table-cell>
          <table:table-cell table:style-name="ce15"/>
          <table:table-cell table:style-name="ce32" table:formula="of:=IF(AND([.B460]&lt;&gt;&quot;&quot;;[.C460]&lt;&gt;&quot;&quot;);CONCATENATE([Variables.$I$1];[Variables.$I$7];[.B460];[Variables.$I$7];[Variables.$I$6];[Variables.$I$7];[.C460];[Variables.$I$7];[Variables.$I$6];[Variables.$I$7];[.D460];[Variables.$I$7];[Variables.$I$6];[.E460];[Variables.$I$6];[.F460];[Variables.$I$6];[.G460];[Variables.$I$6];[.H460];[Variables.$I$6];[Variables.$I$1];[.I460];[.J460];[.K460];[.L460];[.M460];[.N460];[.O460];[Variables.$I$2];[Variables.$I$6];[.P460];[Variables.$I$6];[.Q460];[Variables.$I$6];[.R460];[Variables.$I$6];[.S460];[Variables.$I$6];[.T460];IF([.U460]&lt;&gt;&quot;&quot;;CONCATENATE([Variables.$I$6];[.U460]);&quot;&quot;);[Variables.$I$2];[Variables.$I$6]);IF([.B460]&lt;&gt;&quot;&quot;;CONCATENATE(&quot;#&quot;;[.B460]);&quot;&quot;))" office:value-type="string" office:string-value="[&quot;arnor_ranger_captain&quot;,&quot;Ranger_Captain_of_Arnor&quot;,&quot;Ranger_Captains_of_Arnor&quot;,tf_dunedain| tfg_ranged| tfg_gloves| tfg_armor| tfg_boots,0,0,fac_imladris,[itm_arnor_helm_c_bad,itm_arnor_med_b_good_cloak,itm_leather_gloves,itm_leather_boots,itm_leather_boots_dark_bad,itm_elven_bow,itm_ithilien_arrows,itm_arnor_sword_f,itm_arnor_sword_a,],attr_tier_6,wp_melee(360)|wp_archery(300),knows_common|knows_athletics_8|knows_shield_3|knows_power_draw_5|knows_power_strike_6|knows_ironflesh_6,arnor_face_older_1,arnor_face_older_2]," calcext:value-type="string">
            <text:p>["arnor_ranger_captain","Ranger_Captain_of_Arnor","Ranger_Captains_of_Arnor",tf_dunedain| tfg_ranged| tfg_gloves| tfg_armor| tfg_boots,0,0,fac_imladris,[itm_arnor_helm_c_bad,itm_arnor_med_b_good_cloak,itm_leather_gloves,itm_leather_boots,itm_leather_boots_dark_bad,itm_elven_bow,itm_ithilien_arrows,itm_arnor_sword_f,itm_arnor_sword_a,],attr_tier_6,wp_melee(360)|wp_archery(300),knows_common|knows_athletics_8|knows_shield_3|knows_power_draw_5|knows_power_strike_6|knows_ironflesh_6,arnor_face_older_1,arnor_face_older_2],</text:p>
          </table:table-cell>
          <table:table-cell table:number-columns-repeated="16362"/>
        </table:table-row>
        <table:table-row table:style-name="ro1">
          <table:table-cell table:style-name="ce6" table:formula="of:=IF(AND([.B461]&lt;&gt;&quot;&quot;;[.C461]&lt;&gt;&quot;&quot;);CONCATENATE([Variables.$I$1];[Variables.$I$7];[.B461];[Variables.$I$7];[Variables.$I$6];[Variables.$I$7];[.C461];[Variables.$I$7];[Variables.$I$6];[Variables.$I$7];[.D461];[Variables.$I$7];[Variables.$I$6];[.E461];[Variables.$I$6];[.F461];[Variables.$I$6];[.G461];[Variables.$I$6];[.H461];[Variables.$I$6];[Variables.$I$1];[.I461];[.J461];[.K461];[.L461];[.M461];[.N461];[.O461];[Variables.$I$2];[Variables.$I$6];[.P461];[Variables.$I$6];[.Q461];[Variables.$I$6];[.R461];[Variables.$I$6];[.S461];[Variables.$I$6];[.T461];IF([.U461]&lt;&gt;&quot;&quot;;CONCATENATE([Variables.$I$6];[.U461]);&quot;&quot;);[Variables.$I$2];[Variables.$I$6]);IF([.B461]&lt;&gt;&quot;&quot;;CONCATENATE(&quot;#&quot;;[.B461]);&quot;&quot;))" office:value-type="string" office:string-value="[&quot;rohan_captain&quot;,&quot;Captain_of_Rohan&quot;,&quot;Captains_of_Rohan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9|knows_shield_3|knows_power_strike_8|knows_ironflesh_8,rohan_face_old_1,rohan_face_older_2]," calcext:value-type="string">
            <text:p>["rohan_captain","Captain_of_Rohan","Captains_of_Rohan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9|knows_shield_3|knows_power_strike_8|knows_ironflesh_8,rohan_face_old_1,rohan_face_older_2],</text:p>
          </table:table-cell>
          <table:table-cell table:style-name="ce7" office:value-type="string" calcext:value-type="string">
            <text:p>rohan_captain</text:p>
          </table:table-cell>
          <table:table-cell table:style-name="ce7" office:value-type="string" calcext:value-type="string">
            <text:p>Captain_of_Rohan</text:p>
          </table:table-cell>
          <table:table-cell table:style-name="ce7" office:value-type="string" calcext:value-type="string">
            <text:p>Captain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ohan</text:p>
          </table:table-cell>
          <table:table-cell table:style-name="ce11" office:value-type="string" calcext:value-type="string">
            <text:p>itm_rohan_inf_helmet_b_lordly,itm_rohan_archer_helmet_c_lordly,</text:p>
          </table:table-cell>
          <table:table-cell table:style-name="ce11" office:value-type="string" calcext:value-type="string">
            <text:p>itm_rohan_guard_good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rohirrim_war_greaves,</text:p>
          </table:table-cell>
          <table:table-cell table:style-name="ce11" office:value-type="string" calcext:value-type="string">
            <text:p>itm_rohan_lance_banner_sun,itm_rohan_lance_banner_horse,</text:p>
          </table:table-cell>
          <table:table-cell table:style-name="ce11" office:value-type="string" calcext:value-type="string">
            <text:p>itm_rohirrim_long_hafted_axe,itm_rohan_sword_c,itm_rohan_shield_g,</text:p>
          </table:table-cell>
          <table:table-cell table:style-name="ce11" office:value-type="string" calcext:value-type="string">
            <text:p>itm_thengel_warhorse_heavy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9|knows_shield_3|knows_power_strike_8|knows_ironflesh_8</text:p>
          </table:table-cell>
          <table:table-cell table:style-name="ce14" office:value-type="string" calcext:value-type="string">
            <text:p>rohan_face_old_1</text:p>
          </table:table-cell>
          <table:table-cell table:style-name="ce14" office:value-type="string" calcext:value-type="string">
            <text:p>rohan_face_older_2</text:p>
          </table:table-cell>
          <table:table-cell table:style-name="ce15"/>
          <table:table-cell table:style-name="ce32" table:formula="of:=IF(AND([.B461]&lt;&gt;&quot;&quot;;[.C461]&lt;&gt;&quot;&quot;);CONCATENATE([Variables.$I$1];[Variables.$I$7];[.B461];[Variables.$I$7];[Variables.$I$6];[Variables.$I$7];[.C461];[Variables.$I$7];[Variables.$I$6];[Variables.$I$7];[.D461];[Variables.$I$7];[Variables.$I$6];[.E461];[Variables.$I$6];[.F461];[Variables.$I$6];[.G461];[Variables.$I$6];[.H461];[Variables.$I$6];[Variables.$I$1];[.I461];[.J461];[.K461];[.L461];[.M461];[.N461];[.O461];[Variables.$I$2];[Variables.$I$6];[.P461];[Variables.$I$6];[.Q461];[Variables.$I$6];[.R461];[Variables.$I$6];[.S461];[Variables.$I$6];[.T461];IF([.U461]&lt;&gt;&quot;&quot;;CONCATENATE([Variables.$I$6];[.U461]);&quot;&quot;);[Variables.$I$2];[Variables.$I$6]);IF([.B461]&lt;&gt;&quot;&quot;;CONCATENATE(&quot;#&quot;;[.B461]);&quot;&quot;))" office:value-type="string" office:string-value="[&quot;rohan_captain&quot;,&quot;Captain_of_Rohan&quot;,&quot;Captains_of_Rohan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9|knows_shield_3|knows_power_strike_8|knows_ironflesh_8,rohan_face_old_1,rohan_face_older_2]," calcext:value-type="string">
            <text:p>["rohan_captain","Captain_of_Rohan","Captains_of_Rohan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9|knows_shield_3|knows_power_strike_8|knows_ironflesh_8,rohan_face_old_1,rohan_face_older_2],</text:p>
          </table:table-cell>
          <table:table-cell table:number-columns-repeated="16362"/>
        </table:table-row>
        <table:table-row table:style-name="ro1">
          <table:table-cell table:style-name="ce6" table:formula="of:=IF(AND([.B462]&lt;&gt;&quot;&quot;;[.C462]&lt;&gt;&quot;&quot;);CONCATENATE([Variables.$I$1];[Variables.$I$7];[.B462];[Variables.$I$7];[Variables.$I$6];[Variables.$I$7];[.C462];[Variables.$I$7];[Variables.$I$6];[Variables.$I$7];[.D462];[Variables.$I$7];[Variables.$I$6];[.E462];[Variables.$I$6];[.F462];[Variables.$I$6];[.G462];[Variables.$I$6];[.H462];[Variables.$I$6];[Variables.$I$1];[.I462];[.J462];[.K462];[.L462];[.M462];[.N462];[.O462];[Variables.$I$2];[Variables.$I$6];[.P462];[Variables.$I$6];[.Q462];[Variables.$I$6];[.R462];[Variables.$I$6];[.S462];[Variables.$I$6];[.T462];IF([.U462]&lt;&gt;&quot;&quot;;CONCATENATE([Variables.$I$6];[.U462]);&quot;&quot;);[Variables.$I$2];[Variables.$I$6]);IF([.B462]&lt;&gt;&quot;&quot;;CONCATENATE(&quot;#&quot;;[.B462]);&quot;&quot;))" office:value-type="string" office:string-value="[&quot;beorning_captain&quot;,&quot;Beorning_Chieftain&quot;,&quot;Beorning_Chieftains&quot;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7|knows_ironflesh_10|knows_shield_7|knows_power_throw_4,beorn_face1,beorn_face2]," calcext:value-type="string">
            <text:p>["beorning_captain","Beorning_Chieftain","Beorning_Chieftains"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7|knows_ironflesh_10|knows_shield_7|knows_power_throw_4,beorn_face1,beorn_face2],</text:p>
          </table:table-cell>
          <table:table-cell table:style-name="ce7" office:value-type="string" calcext:value-type="string">
            <text:p>beorning_captain</text:p>
          </table:table-cell>
          <table:table-cell table:style-name="ce7" office:value-type="string" calcext:value-type="string">
            <text:p>Beorning_Chieftain</text:p>
          </table:table-cell>
          <table:table-cell table:style-name="ce7" office:value-type="string" calcext:value-type="string">
            <text:p>Beorning_Chieftain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beorn</text:p>
          </table:table-cell>
          <table:table-cell table:style-name="ce11" office:value-type="string" calcext:value-type="string">
            <text:p>itm_beorn_helmet,</text:p>
          </table:table-cell>
          <table:table-cell table:style-name="ce11" office:value-type="string" calcext:value-type="string">
            <text:p>itm_beorn_chief,</text:p>
          </table:table-cell>
          <table:table-cell table:style-name="ce11" office:value-type="string" calcext:value-type="string">
            <text:p>itm_leather_gloves_good,</text:p>
          </table:table-cell>
          <table:table-cell table:style-name="ce11" office:value-type="string" calcext:value-type="string">
            <text:p>itm_leather_boots, itm_leather_boots_dark,itm_splinted_greaves,</text:p>
          </table:table-cell>
          <table:table-cell table:style-name="ce11" office:value-type="string" calcext:value-type="string">
            <text:p>itm_beorn_axe_reward,</text:p>
          </table:table-cell>
          <table:table-cell table:style-name="ce11" office:value-type="string" calcext:value-type="string">
            <text:p>itm_beorn_shield_reward,itm_rohirrim_throwing_axe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5|knows_power_strike_7|knows_ironflesh_10|knows_shield_7|knows_power_throw_4</text:p>
          </table:table-cell>
          <table:table-cell table:style-name="ce14" office:value-type="string" calcext:value-type="string">
            <text:p>beorn_face1</text:p>
          </table:table-cell>
          <table:table-cell table:style-name="ce14" office:value-type="string" calcext:value-type="string">
            <text:p>beorn_face2</text:p>
          </table:table-cell>
          <table:table-cell table:style-name="ce15"/>
          <table:table-cell table:style-name="ce32" table:formula="of:=IF(AND([.B462]&lt;&gt;&quot;&quot;;[.C462]&lt;&gt;&quot;&quot;);CONCATENATE([Variables.$I$1];[Variables.$I$7];[.B462];[Variables.$I$7];[Variables.$I$6];[Variables.$I$7];[.C462];[Variables.$I$7];[Variables.$I$6];[Variables.$I$7];[.D462];[Variables.$I$7];[Variables.$I$6];[.E462];[Variables.$I$6];[.F462];[Variables.$I$6];[.G462];[Variables.$I$6];[.H462];[Variables.$I$6];[Variables.$I$1];[.I462];[.J462];[.K462];[.L462];[.M462];[.N462];[.O462];[Variables.$I$2];[Variables.$I$6];[.P462];[Variables.$I$6];[.Q462];[Variables.$I$6];[.R462];[Variables.$I$6];[.S462];[Variables.$I$6];[.T462];IF([.U462]&lt;&gt;&quot;&quot;;CONCATENATE([Variables.$I$6];[.U462]);&quot;&quot;);[Variables.$I$2];[Variables.$I$6]);IF([.B462]&lt;&gt;&quot;&quot;;CONCATENATE(&quot;#&quot;;[.B462]);&quot;&quot;))" office:value-type="string" office:string-value="[&quot;beorning_captain&quot;,&quot;Beorning_Chieftain&quot;,&quot;Beorning_Chieftains&quot;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7|knows_ironflesh_10|knows_shield_7|knows_power_throw_4,beorn_face1,beorn_face2]," calcext:value-type="string">
            <text:p>["beorning_captain","Beorning_Chieftain","Beorning_Chieftains"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7|knows_ironflesh_10|knows_shield_7|knows_power_throw_4,beorn_face1,beorn_face2],</text:p>
          </table:table-cell>
          <table:table-cell table:number-columns-repeated="16362"/>
        </table:table-row>
        <table:table-row table:style-name="ro3">
          <table:table-cell table:style-name="ce6" table:formula="of:=IF(AND([.B463]&lt;&gt;&quot;&quot;;[.C463]&lt;&gt;&quot;&quot;);CONCATENATE([Variables.$I$1];[Variables.$I$7];[.B463];[Variables.$I$7];[Variables.$I$6];[Variables.$I$7];[.C463];[Variables.$I$7];[Variables.$I$6];[Variables.$I$7];[.D463];[Variables.$I$7];[Variables.$I$6];[.E463];[Variables.$I$6];[.F463];[Variables.$I$6];[.G463];[Variables.$I$6];[.H463];[Variables.$I$6];[Variables.$I$1];[.I463];[.J463];[.K463];[.L463];[.M463];[.N463];[.O463];[Variables.$I$2];[Variables.$I$6];[.P463];[Variables.$I$6];[.Q463];[Variables.$I$6];[.R463];[Variables.$I$6];[.S463];[Variables.$I$6];[.T463];IF([.U463]&lt;&gt;&quot;&quot;;CONCATENATE([Variables.$I$6];[.U463]);&quot;&quot;);[Variables.$I$2];[Variables.$I$6]);IF([.B463]&lt;&gt;&quot;&quot;;CONCATENATE(&quot;#&quot;;[.B463]);&quot;&quot;))" office:value-type="string" office:string-value="[&quot;woodmen_captain&quot;,&quot;Woodmen_Chieftain&quot;,&quot;Woodmen_Chieftains&quot;,tfg_armor| tfg_helm| tfg_boots| tfg_gloves,0,0,fac_beorn,[itm_north_leather_skullcap_good, itm_north_skullcap, itm_north_nasal_helm_good,itm_woodmen_heavy_cloak,itm_leather_gloves_good,itm_evil_gauntlets_a_good,itm_leather_boots,itm_2_handed_axe,itm_elven_bow,itm_arrows,],attr_tier_6,wp_elf_tier_bow_4,knows_common|knows_athletics_7|knows_shield_5|knows_power_draw_6|knows_power_strike_5|knows_ironflesh_6,rohan_face_middle_1,rohan_face_old_2]," calcext:value-type="string">
            <text:p>["woodmen_captain","Woodmen_Chieftain","Woodmen_Chieftains",tfg_armor| tfg_helm| tfg_boots| tfg_gloves,0,0,fac_beorn,[itm_north_leather_skullcap_good, itm_north_skullcap, itm_north_nasal_helm_good,itm_woodmen_heavy_cloak,itm_leather_gloves_good,itm_evil_gauntlets_a_good,itm_leather_boots,itm_2_handed_axe,itm_elven_bow,itm_arrows,],attr_tier_6,wp_elf_tier_bow_4,knows_common|knows_athletics_7|knows_shield_5|knows_power_draw_6|knows_power_strike_5|knows_ironflesh_6,rohan_face_middle_1,rohan_face_old_2],</text:p>
          </table:table-cell>
          <table:table-cell table:style-name="ce7" office:value-type="string" calcext:value-type="string">
            <text:p>woodmen_captain</text:p>
          </table:table-cell>
          <table:table-cell table:style-name="ce7" office:value-type="string" calcext:value-type="string">
            <text:p>Woodmen_Chieftain</text:p>
          </table:table-cell>
          <table:table-cell table:style-name="ce7" office:value-type="string" calcext:value-type="string">
            <text:p>Woodmen_Chieftains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beorn</text:p>
          </table:table-cell>
          <table:table-cell table:style-name="ce11" office:value-type="string" calcext:value-type="string">
            <text:p>itm_north_leather_skullcap_good, itm_north_skullcap, itm_north_nasal_helm_good,</text:p>
          </table:table-cell>
          <table:table-cell table:style-name="ce11" office:value-type="string" calcext:value-type="string">
            <text:p>itm_woodmen_heavy_cloak,</text:p>
          </table:table-cell>
          <table:table-cell table:style-name="ce11" office:value-type="string" calcext:value-type="string">
            <text:p>itm_leather_gloves_good,itm_evil_gauntlets_a_good,</text:p>
          </table:table-cell>
          <table:table-cell table:style-name="ce11" office:value-type="string" calcext:value-type="string">
            <text:p>itm_leather_boots,</text:p>
          </table:table-cell>
          <table:table-cell table:style-name="ce11" office:value-type="string" calcext:value-type="string">
            <text:p>itm_2_handed_axe,</text:p>
          </table:table-cell>
          <table:table-cell table:style-name="ce11" office:value-type="string" calcext:value-type="string">
            <text:p>itm_elven_bow,itm_arrows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elf_tier_bow_4</text:p>
          </table:table-cell>
          <table:table-cell table:style-name="ce12" office:value-type="string" calcext:value-type="string">
            <text:p>knows_common|knows_athletics_7|knows_shield_5|knows_power_draw_6|knows_power_strike_5|knows_ironflesh_6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32" table:formula="of:=IF(AND([.B463]&lt;&gt;&quot;&quot;;[.C463]&lt;&gt;&quot;&quot;);CONCATENATE([Variables.$I$1];[Variables.$I$7];[.B463];[Variables.$I$7];[Variables.$I$6];[Variables.$I$7];[.C463];[Variables.$I$7];[Variables.$I$6];[Variables.$I$7];[.D463];[Variables.$I$7];[Variables.$I$6];[.E463];[Variables.$I$6];[.F463];[Variables.$I$6];[.G463];[Variables.$I$6];[.H463];[Variables.$I$6];[Variables.$I$1];[.I463];[.J463];[.K463];[.L463];[.M463];[.N463];[.O463];[Variables.$I$2];[Variables.$I$6];[.P463];[Variables.$I$6];[.Q463];[Variables.$I$6];[.R463];[Variables.$I$6];[.S463];[Variables.$I$6];[.T463];IF([.U463]&lt;&gt;&quot;&quot;;CONCATENATE([Variables.$I$6];[.U463]);&quot;&quot;);[Variables.$I$2];[Variables.$I$6]);IF([.B463]&lt;&gt;&quot;&quot;;CONCATENATE(&quot;#&quot;;[.B463]);&quot;&quot;))" office:value-type="string" office:string-value="[&quot;woodmen_captain&quot;,&quot;Woodmen_Chieftain&quot;,&quot;Woodmen_Chieftains&quot;,tfg_armor| tfg_helm| tfg_boots| tfg_gloves,0,0,fac_beorn,[itm_north_leather_skullcap_good, itm_north_skullcap, itm_north_nasal_helm_good,itm_woodmen_heavy_cloak,itm_leather_gloves_good,itm_evil_gauntlets_a_good,itm_leather_boots,itm_2_handed_axe,itm_elven_bow,itm_arrows,],attr_tier_6,wp_elf_tier_bow_4,knows_common|knows_athletics_7|knows_shield_5|knows_power_draw_6|knows_power_strike_5|knows_ironflesh_6,rohan_face_middle_1,rohan_face_old_2]," calcext:value-type="string">
            <text:p>["woodmen_captain","Woodmen_Chieftain","Woodmen_Chieftains",tfg_armor| tfg_helm| tfg_boots| tfg_gloves,0,0,fac_beorn,[itm_north_leather_skullcap_good, itm_north_skullcap, itm_north_nasal_helm_good,itm_woodmen_heavy_cloak,itm_leather_gloves_good,itm_evil_gauntlets_a_good,itm_leather_boots,itm_2_handed_axe,itm_elven_bow,itm_arrows,],attr_tier_6,wp_elf_tier_bow_4,knows_common|knows_athletics_7|knows_shield_5|knows_power_draw_6|knows_power_strike_5|knows_ironflesh_6,rohan_face_middle_1,rohan_face_old_2],</text:p>
          </table:table-cell>
          <table:table-cell table:number-columns-repeated="16362"/>
        </table:table-row>
        <table:table-row table:style-name="ro1">
          <table:table-cell table:style-name="ce6" table:formula="of:=IF(AND([.B464]&lt;&gt;&quot;&quot;;[.C464]&lt;&gt;&quot;&quot;);CONCATENATE([Variables.$I$1];[Variables.$I$7];[.B464];[Variables.$I$7];[Variables.$I$6];[Variables.$I$7];[.C464];[Variables.$I$7];[Variables.$I$6];[Variables.$I$7];[.D464];[Variables.$I$7];[Variables.$I$6];[.E464];[Variables.$I$6];[.F464];[Variables.$I$6];[.G464];[Variables.$I$6];[.H464];[Variables.$I$6];[Variables.$I$1];[.I464];[.J464];[.K464];[.L464];[.M464];[.N464];[.O464];[Variables.$I$2];[Variables.$I$6];[.P464];[Variables.$I$6];[.Q464];[Variables.$I$6];[.R464];[Variables.$I$6];[.S464];[Variables.$I$6];[.T464];IF([.U464]&lt;&gt;&quot;&quot;;CONCATENATE([Variables.$I$6];[.U464]);&quot;&quot;);[Variables.$I$2];[Variables.$I$6]);IF([.B464]&lt;&gt;&quot;&quot;;CONCATENATE(&quot;#&quot;;[.B464]);&quot;&quot;))" office:value-type="string" office:string-value="[&quot;isen_captain&quot;,&quot;Captain_of_Isengard&quot;,&quot;Captains_of_Isengard&quot;,tf_urukhai|tf_mounted| tfg_shield| tfg_armor| tfg_helm| tfg_boots| tf_no_capture_alive,0,0,fac_isengard,[itm_isen_uruk_helm_d,itm_isen_uruk_heavy_reward,itm_evil_gauntlets_b,itm_uruk_chain_greaves,itm_isengard_sword,itm_isen_uruk_shield_b,],attr_evil_tier_6,wp_tier_6,knows_common|knows_athletics_3|knows_power_strike_6|knows_ironflesh_6,uruk_hai_face1,uruk_hai_face2]," calcext:value-type="string">
            <text:p>["isen_captain","Captain_of_Isengard","Captains_of_Isengard",tf_urukhai|tf_mounted| tfg_shield| tfg_armor| tfg_helm| tfg_boots| tf_no_capture_alive,0,0,fac_isengard,[itm_isen_uruk_helm_d,itm_isen_uruk_heavy_reward,itm_evil_gauntlets_b,itm_uruk_chain_greaves,itm_isengard_sword,itm_isen_uruk_shield_b,],attr_evil_tier_6,wp_tier_6,knows_common|knows_athletics_3|knows_power_strike_6|knows_ironflesh_6,uruk_hai_face1,uruk_hai_face2],</text:p>
          </table:table-cell>
          <table:table-cell table:style-name="ce7" office:value-type="string" calcext:value-type="string">
            <text:p>isen_captain</text:p>
          </table:table-cell>
          <table:table-cell table:style-name="ce7" office:value-type="string" calcext:value-type="string">
            <text:p>Captain_of_Isengard</text:p>
          </table:table-cell>
          <table:table-cell table:style-name="ce7" office:value-type="string" calcext:value-type="string">
            <text:p>Captains_of_Isengard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sengard</text:p>
          </table:table-cell>
          <table:table-cell table:style-name="ce11" office:value-type="string" calcext:value-type="string">
            <text:p>itm_isen_uruk_helm_d,</text:p>
          </table:table-cell>
          <table:table-cell table:style-name="ce11" office:value-type="string" calcext:value-type="string">
            <text:p>itm_isen_uruk_heavy_reward,</text:p>
          </table:table-cell>
          <table:table-cell table:style-name="ce11" office:value-type="string" calcext:value-type="string">
            <text:p>itm_evil_gauntlets_b,</text:p>
          </table:table-cell>
          <table:table-cell table:style-name="ce11" office:value-type="string" calcext:value-type="string">
            <text:p>itm_uruk_chain_greaves,</text:p>
          </table:table-cell>
          <table:table-cell table:style-name="ce11" office:value-type="string" calcext:value-type="string">
            <text:p>itm_isengard_sword,</text:p>
          </table:table-cell>
          <table:table-cell table:style-name="ce11" office:value-type="string" calcext:value-type="string">
            <text:p>itm_isen_uruk_shield_b,</text:p>
          </table:table-cell>
          <table:table-cell table:style-name="ce11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3|knows_power_strike_6|knows_ironflesh_6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32" table:formula="of:=IF(AND([.B464]&lt;&gt;&quot;&quot;;[.C464]&lt;&gt;&quot;&quot;);CONCATENATE([Variables.$I$1];[Variables.$I$7];[.B464];[Variables.$I$7];[Variables.$I$6];[Variables.$I$7];[.C464];[Variables.$I$7];[Variables.$I$6];[Variables.$I$7];[.D464];[Variables.$I$7];[Variables.$I$6];[.E464];[Variables.$I$6];[.F464];[Variables.$I$6];[.G464];[Variables.$I$6];[.H464];[Variables.$I$6];[Variables.$I$1];[.I464];[.J464];[.K464];[.L464];[.M464];[.N464];[.O464];[Variables.$I$2];[Variables.$I$6];[.P464];[Variables.$I$6];[.Q464];[Variables.$I$6];[.R464];[Variables.$I$6];[.S464];[Variables.$I$6];[.T464];IF([.U464]&lt;&gt;&quot;&quot;;CONCATENATE([Variables.$I$6];[.U464]);&quot;&quot;);[Variables.$I$2];[Variables.$I$6]);IF([.B464]&lt;&gt;&quot;&quot;;CONCATENATE(&quot;#&quot;;[.B464]);&quot;&quot;))" office:value-type="string" office:string-value="[&quot;isen_captain&quot;,&quot;Captain_of_Isengard&quot;,&quot;Captains_of_Isengard&quot;,tf_urukhai|tf_mounted| tfg_shield| tfg_armor| tfg_helm| tfg_boots| tf_no_capture_alive,0,0,fac_isengard,[itm_isen_uruk_helm_d,itm_isen_uruk_heavy_reward,itm_evil_gauntlets_b,itm_uruk_chain_greaves,itm_isengard_sword,itm_isen_uruk_shield_b,],attr_evil_tier_6,wp_tier_6,knows_common|knows_athletics_3|knows_power_strike_6|knows_ironflesh_6,uruk_hai_face1,uruk_hai_face2]," calcext:value-type="string">
            <text:p>["isen_captain","Captain_of_Isengard","Captains_of_Isengard",tf_urukhai|tf_mounted| tfg_shield| tfg_armor| tfg_helm| tfg_boots| tf_no_capture_alive,0,0,fac_isengard,[itm_isen_uruk_helm_d,itm_isen_uruk_heavy_reward,itm_evil_gauntlets_b,itm_uruk_chain_greaves,itm_isengard_sword,itm_isen_uruk_shield_b,],attr_evil_tier_6,wp_tier_6,knows_common|knows_athletics_3|knows_power_strike_6|knows_ironflesh_6,uruk_hai_face1,uruk_hai_face2],</text:p>
          </table:table-cell>
          <table:table-cell table:number-columns-repeated="16362"/>
        </table:table-row>
        <table:table-row table:style-name="ro1">
          <table:table-cell table:style-name="ce6" table:formula="of:=IF(AND([.B465]&lt;&gt;&quot;&quot;;[.C465]&lt;&gt;&quot;&quot;);CONCATENATE([Variables.$I$1];[Variables.$I$7];[.B465];[Variables.$I$7];[Variables.$I$6];[Variables.$I$7];[.C465];[Variables.$I$7];[Variables.$I$6];[Variables.$I$7];[.D465];[Variables.$I$7];[Variables.$I$6];[.E465];[Variables.$I$6];[.F465];[Variables.$I$6];[.G465];[Variables.$I$6];[.H465];[Variables.$I$6];[Variables.$I$1];[.I465];[.J465];[.K465];[.L465];[.M465];[.N465];[.O465];[Variables.$I$2];[Variables.$I$6];[.P465];[Variables.$I$6];[.Q465];[Variables.$I$6];[.R465];[Variables.$I$6];[.S465];[Variables.$I$6];[.T465];IF([.U465]&lt;&gt;&quot;&quot;;CONCATENATE([Variables.$I$6];[.U465]);&quot;&quot;);[Variables.$I$2];[Variables.$I$6]);IF([.B465]&lt;&gt;&quot;&quot;;CONCATENATE(&quot;#&quot;;[.B465]);&quot;&quot;))" office:value-type="string" office:string-value="[&quot;isen_tracker_captain&quot;,&quot;Isengard_Tracker_Captain&quot;,&quot;Isengard_Tracker_Captains&quot;,tf_urukhai|tf_mounted| tfg_shield| tfg_armor| tfg_helm| tfg_boots| tf_no_capture_alive,0,0,fac_isengard,[itm_isen_tracker_helm_good,itm_isen_uruk_heavy_b_good, itm_isen_uruk_heavy_c,itm_evil_gauntlets_b,itm_uruk_chain_greaves,itm_isengard_large_bow,itm_isengard_arrow,itm_isengard_heavy_axe,itm_isengard_heavy_sword,],attr_evil_tier_6,wp_elf_tier_bow_4,knows_common|knows_athletics_7|knows_power_draw_6|knows_power_strike_5|knows_ironflesh_6,uruk_hai_face1,uruk_hai_face2]," calcext:value-type="string">
            <text:p>["isen_tracker_captain","Isengard_Tracker_Captain","Isengard_Tracker_Captains",tf_urukhai|tf_mounted| tfg_shield| tfg_armor| tfg_helm| tfg_boots| tf_no_capture_alive,0,0,fac_isengard,[itm_isen_tracker_helm_good,itm_isen_uruk_heavy_b_good, itm_isen_uruk_heavy_c,itm_evil_gauntlets_b,itm_uruk_chain_greaves,itm_isengard_large_bow,itm_isengard_arrow,itm_isengard_heavy_axe,itm_isengard_heavy_sword,],attr_evil_tier_6,wp_elf_tier_bow_4,knows_common|knows_athletics_7|knows_power_draw_6|knows_power_strike_5|knows_ironflesh_6,uruk_hai_face1,uruk_hai_face2],</text:p>
          </table:table-cell>
          <table:table-cell table:style-name="ce7" office:value-type="string" calcext:value-type="string">
            <text:p>isen_tracker_captain</text:p>
          </table:table-cell>
          <table:table-cell table:style-name="ce7" office:value-type="string" calcext:value-type="string">
            <text:p>Isengard_Tracker_Captain</text:p>
          </table:table-cell>
          <table:table-cell table:style-name="ce7" office:value-type="string" calcext:value-type="string">
            <text:p>Isengard_Tracker_Captai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sengard</text:p>
          </table:table-cell>
          <table:table-cell table:style-name="ce11" office:value-type="string" calcext:value-type="string">
            <text:p>itm_isen_tracker_helm_good,</text:p>
          </table:table-cell>
          <table:table-cell table:style-name="ce11" office:value-type="string" calcext:value-type="string">
            <text:p>itm_isen_uruk_heavy_b_good, itm_isen_uruk_heavy_c,</text:p>
          </table:table-cell>
          <table:table-cell table:style-name="ce11" office:value-type="string" calcext:value-type="string">
            <text:p>itm_evil_gauntlets_b,</text:p>
          </table:table-cell>
          <table:table-cell table:style-name="ce11" office:value-type="string" calcext:value-type="string">
            <text:p>itm_uruk_chain_greaves,</text:p>
          </table:table-cell>
          <table:table-cell table:style-name="ce11" office:value-type="string" calcext:value-type="string">
            <text:p>itm_isengard_large_bow,itm_isengard_arrow,</text:p>
          </table:table-cell>
          <table:table-cell table:style-name="ce11" office:value-type="string" calcext:value-type="string">
            <text:p>itm_isengard_heavy_axe,itm_isengard_heavy_sword,</text:p>
          </table:table-cell>
          <table:table-cell table:style-name="ce11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elf_tier_bow_4</text:p>
          </table:table-cell>
          <table:table-cell table:style-name="ce12" office:value-type="string" calcext:value-type="string">
            <text:p>knows_common|knows_athletics_7|knows_power_draw_6|knows_power_strike_5|knows_ironflesh_6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32" table:formula="of:=IF(AND([.B465]&lt;&gt;&quot;&quot;;[.C465]&lt;&gt;&quot;&quot;);CONCATENATE([Variables.$I$1];[Variables.$I$7];[.B465];[Variables.$I$7];[Variables.$I$6];[Variables.$I$7];[.C465];[Variables.$I$7];[Variables.$I$6];[Variables.$I$7];[.D465];[Variables.$I$7];[Variables.$I$6];[.E465];[Variables.$I$6];[.F465];[Variables.$I$6];[.G465];[Variables.$I$6];[.H465];[Variables.$I$6];[Variables.$I$1];[.I465];[.J465];[.K465];[.L465];[.M465];[.N465];[.O465];[Variables.$I$2];[Variables.$I$6];[.P465];[Variables.$I$6];[.Q465];[Variables.$I$6];[.R465];[Variables.$I$6];[.S465];[Variables.$I$6];[.T465];IF([.U465]&lt;&gt;&quot;&quot;;CONCATENATE([Variables.$I$6];[.U465]);&quot;&quot;);[Variables.$I$2];[Variables.$I$6]);IF([.B465]&lt;&gt;&quot;&quot;;CONCATENATE(&quot;#&quot;;[.B465]);&quot;&quot;))" office:value-type="string" office:string-value="[&quot;isen_tracker_captain&quot;,&quot;Isengard_Tracker_Captain&quot;,&quot;Isengard_Tracker_Captains&quot;,tf_urukhai|tf_mounted| tfg_shield| tfg_armor| tfg_helm| tfg_boots| tf_no_capture_alive,0,0,fac_isengard,[itm_isen_tracker_helm_good,itm_isen_uruk_heavy_b_good, itm_isen_uruk_heavy_c,itm_evil_gauntlets_b,itm_uruk_chain_greaves,itm_isengard_large_bow,itm_isengard_arrow,itm_isengard_heavy_axe,itm_isengard_heavy_sword,],attr_evil_tier_6,wp_elf_tier_bow_4,knows_common|knows_athletics_7|knows_power_draw_6|knows_power_strike_5|knows_ironflesh_6,uruk_hai_face1,uruk_hai_face2]," calcext:value-type="string">
            <text:p>["isen_tracker_captain","Isengard_Tracker_Captain","Isengard_Tracker_Captains",tf_urukhai|tf_mounted| tfg_shield| tfg_armor| tfg_helm| tfg_boots| tf_no_capture_alive,0,0,fac_isengard,[itm_isen_tracker_helm_good,itm_isen_uruk_heavy_b_good, itm_isen_uruk_heavy_c,itm_evil_gauntlets_b,itm_uruk_chain_greaves,itm_isengard_large_bow,itm_isengard_arrow,itm_isengard_heavy_axe,itm_isengard_heavy_sword,],attr_evil_tier_6,wp_elf_tier_bow_4,knows_common|knows_athletics_7|knows_power_draw_6|knows_power_strike_5|knows_ironflesh_6,uruk_hai_face1,uruk_hai_face2],</text:p>
          </table:table-cell>
          <table:table-cell table:number-columns-repeated="16362"/>
        </table:table-row>
        <table:table-row table:style-name="ro1">
          <table:table-cell table:style-name="ce6" table:formula="of:=IF(AND([.B466]&lt;&gt;&quot;&quot;;[.C466]&lt;&gt;&quot;&quot;);CONCATENATE([Variables.$I$1];[Variables.$I$7];[.B466];[Variables.$I$7];[Variables.$I$6];[Variables.$I$7];[.C466];[Variables.$I$7];[Variables.$I$6];[Variables.$I$7];[.D466];[Variables.$I$7];[Variables.$I$6];[.E466];[Variables.$I$6];[.F466];[Variables.$I$6];[.G466];[Variables.$I$6];[.H466];[Variables.$I$6];[Variables.$I$1];[.I466];[.J466];[.K466];[.L466];[.M466];[.N466];[.O466];[Variables.$I$2];[Variables.$I$6];[.P466];[Variables.$I$6];[.Q466];[Variables.$I$6];[.R466];[Variables.$I$6];[.S466];[Variables.$I$6];[.T466];IF([.U466]&lt;&gt;&quot;&quot;;CONCATENATE([Variables.$I$6];[.U466]);&quot;&quot;);[Variables.$I$2];[Variables.$I$6]);IF([.B466]&lt;&gt;&quot;&quot;;CONCATENATE(&quot;#&quot;;[.B466]);&quot;&quot;))" office:value-type="string" office:string-value="[&quot;mordor_uruk_captain&quot;,&quot;Mordor_Uruk_Captain&quot;,&quot;Mordor_Uruk_Captains&quot;,tf_uruk| tfg_gloves| tfg_shield| tfg_armor| tfg_helm| tfg_boots| tf_no_capture_alive,0,0,fac_mordor,[itm_uruk_helm_e,itm_m_uruk_heavy_c_good,itm_evil_gauntlets_b,itm_uruk_chain_greaves,itm_orc_two_handed_axe_heavy,itm_uruk_falchion_a,itm_orc_bastard_scimitar,itm_mordor_uruk_shield_c,],attr_evil_tier_6,wp_tier_6,knows_common|knows_athletics_4|knows_power_strike_7|knows_ironflesh_9,uruk_hai_face1,uruk_hai_face2]," calcext:value-type="string">
            <text:p>["mordor_uruk_captain","Mordor_Uruk_Captain","Mordor_Uruk_Captains",tf_uruk| tfg_gloves| tfg_shield| tfg_armor| tfg_helm| tfg_boots| tf_no_capture_alive,0,0,fac_mordor,[itm_uruk_helm_e,itm_m_uruk_heavy_c_good,itm_evil_gauntlets_b,itm_uruk_chain_greaves,itm_orc_two_handed_axe_heavy,itm_uruk_falchion_a,itm_orc_bastard_scimitar,itm_mordor_uruk_shield_c,],attr_evil_tier_6,wp_tier_6,knows_common|knows_athletics_4|knows_power_strike_7|knows_ironflesh_9,uruk_hai_face1,uruk_hai_face2],</text:p>
          </table:table-cell>
          <table:table-cell table:style-name="ce7" office:value-type="string" calcext:value-type="string">
            <text:p>mordor_uruk_captain</text:p>
          </table:table-cell>
          <table:table-cell table:style-name="ce7" office:value-type="string" calcext:value-type="string">
            <text:p>Mordor_Uruk_Captain</text:p>
          </table:table-cell>
          <table:table-cell table:style-name="ce7" office:value-type="string" calcext:value-type="string">
            <text:p>Mordor_Uruk_Captains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uruk_helm_e,</text:p>
          </table:table-cell>
          <table:table-cell table:style-name="ce11" office:value-type="string" calcext:value-type="string">
            <text:p>itm_m_uruk_heavy_c_good,</text:p>
          </table:table-cell>
          <table:table-cell table:style-name="ce11" office:value-type="string" calcext:value-type="string">
            <text:p>itm_evil_gauntlets_b,</text:p>
          </table:table-cell>
          <table:table-cell table:style-name="ce11" office:value-type="string" calcext:value-type="string">
            <text:p>itm_uruk_chain_greaves,</text:p>
          </table:table-cell>
          <table:table-cell table:style-name="ce11" office:value-type="string" calcext:value-type="string">
            <text:p>itm_orc_two_handed_axe_heavy,</text:p>
          </table:table-cell>
          <table:table-cell table:style-name="ce11" office:value-type="string" calcext:value-type="string">
            <text:p>itm_uruk_falchion_a,itm_orc_bastard_scimitar,itm_mordor_uruk_shield_c,</text:p>
          </table:table-cell>
          <table:table-cell table:style-name="ce11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4|knows_power_strike_7|knows_ironflesh_9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32" table:formula="of:=IF(AND([.B466]&lt;&gt;&quot;&quot;;[.C466]&lt;&gt;&quot;&quot;);CONCATENATE([Variables.$I$1];[Variables.$I$7];[.B466];[Variables.$I$7];[Variables.$I$6];[Variables.$I$7];[.C466];[Variables.$I$7];[Variables.$I$6];[Variables.$I$7];[.D466];[Variables.$I$7];[Variables.$I$6];[.E466];[Variables.$I$6];[.F466];[Variables.$I$6];[.G466];[Variables.$I$6];[.H466];[Variables.$I$6];[Variables.$I$1];[.I466];[.J466];[.K466];[.L466];[.M466];[.N466];[.O466];[Variables.$I$2];[Variables.$I$6];[.P466];[Variables.$I$6];[.Q466];[Variables.$I$6];[.R466];[Variables.$I$6];[.S466];[Variables.$I$6];[.T466];IF([.U466]&lt;&gt;&quot;&quot;;CONCATENATE([Variables.$I$6];[.U466]);&quot;&quot;);[Variables.$I$2];[Variables.$I$6]);IF([.B466]&lt;&gt;&quot;&quot;;CONCATENATE(&quot;#&quot;;[.B466]);&quot;&quot;))" office:value-type="string" office:string-value="[&quot;mordor_uruk_captain&quot;,&quot;Mordor_Uruk_Captain&quot;,&quot;Mordor_Uruk_Captains&quot;,tf_uruk| tfg_gloves| tfg_shield| tfg_armor| tfg_helm| tfg_boots| tf_no_capture_alive,0,0,fac_mordor,[itm_uruk_helm_e,itm_m_uruk_heavy_c_good,itm_evil_gauntlets_b,itm_uruk_chain_greaves,itm_orc_two_handed_axe_heavy,itm_uruk_falchion_a,itm_orc_bastard_scimitar,itm_mordor_uruk_shield_c,],attr_evil_tier_6,wp_tier_6,knows_common|knows_athletics_4|knows_power_strike_7|knows_ironflesh_9,uruk_hai_face1,uruk_hai_face2]," calcext:value-type="string">
            <text:p>["mordor_uruk_captain","Mordor_Uruk_Captain","Mordor_Uruk_Captains",tf_uruk| tfg_gloves| tfg_shield| tfg_armor| tfg_helm| tfg_boots| tf_no_capture_alive,0,0,fac_mordor,[itm_uruk_helm_e,itm_m_uruk_heavy_c_good,itm_evil_gauntlets_b,itm_uruk_chain_greaves,itm_orc_two_handed_axe_heavy,itm_uruk_falchion_a,itm_orc_bastard_scimitar,itm_mordor_uruk_shield_c,],attr_evil_tier_6,wp_tier_6,knows_common|knows_athletics_4|knows_power_strike_7|knows_ironflesh_9,uruk_hai_face1,uruk_hai_face2],</text:p>
          </table:table-cell>
          <table:table-cell table:number-columns-repeated="16362"/>
        </table:table-row>
        <table:table-row table:style-name="ro1">
          <table:table-cell table:style-name="ce6" table:formula="of:=IF(AND([.B467]&lt;&gt;&quot;&quot;;[.C467]&lt;&gt;&quot;&quot;);CONCATENATE([Variables.$I$1];[Variables.$I$7];[.B467];[Variables.$I$7];[Variables.$I$6];[Variables.$I$7];[.C467];[Variables.$I$7];[Variables.$I$6];[Variables.$I$7];[.D467];[Variables.$I$7];[Variables.$I$6];[.E467];[Variables.$I$6];[.F467];[Variables.$I$6];[.G467];[Variables.$I$6];[.H467];[Variables.$I$6];[Variables.$I$1];[.I467];[.J467];[.K467];[.L467];[.M467];[.N467];[.O467];[Variables.$I$2];[Variables.$I$6];[.P467];[Variables.$I$6];[.Q467];[Variables.$I$6];[.R467];[Variables.$I$6];[.S467];[Variables.$I$6];[.T467];IF([.U467]&lt;&gt;&quot;&quot;;CONCATENATE([Variables.$I$6];[.U467]);&quot;&quot;);[Variables.$I$2];[Variables.$I$6]);IF([.B467]&lt;&gt;&quot;&quot;;CONCATENATE(&quot;#&quot;;[.B467]);&quot;&quot;))" office:value-type="string" office:string-value="[&quot;mordor_captain&quot;,&quot;Captain_of_Mordor&quot;,&quot;Captains_of_Mordor&quot;,tf_evil_man| tf_mounted| tfg_gloves| tfg_shield| tfg_armor| tfg_helm| tfg_horse| tfg_boots,0,0,fac_mordor,[itm_mordor_cap_helm,itm_m_cap_armor, itm_evil_gauntlets_b, itm_uruk_greaves,itm_mordor_longsword,itm_orc_simple_spear_heavy, itm_uruk_pike_b,itm_mordor_man_shield_a,itm_mordor_warhorse2,],attr_evil_tier_6,wp_tier_6,knows_common|knows_riding_5|knows_athletics_3|knows_shield_4|knows_power_strike_6|knows_ironflesh_6,mordor_man1,mordor_man2]," calcext:value-type="string">
            <text:p>["mordor_captain","Captain_of_Mordor","Captains_of_Mordor",tf_evil_man| tf_mounted| tfg_gloves| tfg_shield| tfg_armor| tfg_helm| tfg_horse| tfg_boots,0,0,fac_mordor,[itm_mordor_cap_helm,itm_m_cap_armor, itm_evil_gauntlets_b, itm_uruk_greaves,itm_mordor_longsword,itm_orc_simple_spear_heavy, itm_uruk_pike_b,itm_mordor_man_shield_a,itm_mordor_warhorse2,],attr_evil_tier_6,wp_tier_6,knows_common|knows_riding_5|knows_athletics_3|knows_shield_4|knows_power_strike_6|knows_ironflesh_6,mordor_man1,mordor_man2],</text:p>
          </table:table-cell>
          <table:table-cell table:style-name="ce7" office:value-type="string" calcext:value-type="string">
            <text:p>mordor_captain</text:p>
          </table:table-cell>
          <table:table-cell table:style-name="ce7" office:value-type="string" calcext:value-type="string">
            <text:p>Captain_of_Mordor</text:p>
          </table:table-cell>
          <table:table-cell table:style-name="ce7" office:value-type="string" calcext:value-type="string">
            <text:p>Captains_of_Mordor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mordor_cap_helm,</text:p>
          </table:table-cell>
          <table:table-cell table:style-name="ce11" office:value-type="string" calcext:value-type="string">
            <text:p>itm_m_cap_armor,</text:p>
          </table:table-cell>
          <table:table-cell table:style-name="ce11" office:value-type="string" calcext:value-type="string">
            <text:p><text:s/>itm_evil_gauntlets_b,</text:p>
          </table:table-cell>
          <table:table-cell table:style-name="ce11" office:value-type="string" calcext:value-type="string">
            <text:p><text:s/>itm_uruk_greaves,</text:p>
          </table:table-cell>
          <table:table-cell table:style-name="ce11" office:value-type="string" calcext:value-type="string">
            <text:p>itm_mordor_longsword,itm_orc_simple_spear_heavy, itm_uruk_pike_b,</text:p>
          </table:table-cell>
          <table:table-cell table:style-name="ce11" office:value-type="string" calcext:value-type="string">
            <text:p>itm_mordor_man_shield_a,</text:p>
          </table:table-cell>
          <table:table-cell table:style-name="ce11" office:value-type="string" calcext:value-type="string">
            <text:p>itm_mordor_warhorse2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5|knows_athletics_3|knows_shield_4|knows_power_strike_6|knows_ironflesh_6</text:p>
          </table:table-cell>
          <table:table-cell table:style-name="ce14" office:value-type="string" calcext:value-type="string">
            <text:p>mordor_man1</text:p>
          </table:table-cell>
          <table:table-cell table:style-name="ce14" office:value-type="string" calcext:value-type="string">
            <text:p>mordor_man2</text:p>
          </table:table-cell>
          <table:table-cell table:style-name="ce15"/>
          <table:table-cell table:style-name="ce32" table:formula="of:=IF(AND([.B467]&lt;&gt;&quot;&quot;;[.C467]&lt;&gt;&quot;&quot;);CONCATENATE([Variables.$I$1];[Variables.$I$7];[.B467];[Variables.$I$7];[Variables.$I$6];[Variables.$I$7];[.C467];[Variables.$I$7];[Variables.$I$6];[Variables.$I$7];[.D467];[Variables.$I$7];[Variables.$I$6];[.E467];[Variables.$I$6];[.F467];[Variables.$I$6];[.G467];[Variables.$I$6];[.H467];[Variables.$I$6];[Variables.$I$1];[.I467];[.J467];[.K467];[.L467];[.M467];[.N467];[.O467];[Variables.$I$2];[Variables.$I$6];[.P467];[Variables.$I$6];[.Q467];[Variables.$I$6];[.R467];[Variables.$I$6];[.S467];[Variables.$I$6];[.T467];IF([.U467]&lt;&gt;&quot;&quot;;CONCATENATE([Variables.$I$6];[.U467]);&quot;&quot;);[Variables.$I$2];[Variables.$I$6]);IF([.B467]&lt;&gt;&quot;&quot;;CONCATENATE(&quot;#&quot;;[.B467]);&quot;&quot;))" office:value-type="string" office:string-value="[&quot;mordor_captain&quot;,&quot;Captain_of_Mordor&quot;,&quot;Captains_of_Mordor&quot;,tf_evil_man| tf_mounted| tfg_gloves| tfg_shield| tfg_armor| tfg_helm| tfg_horse| tfg_boots,0,0,fac_mordor,[itm_mordor_cap_helm,itm_m_cap_armor, itm_evil_gauntlets_b, itm_uruk_greaves,itm_mordor_longsword,itm_orc_simple_spear_heavy, itm_uruk_pike_b,itm_mordor_man_shield_a,itm_mordor_warhorse2,],attr_evil_tier_6,wp_tier_6,knows_common|knows_riding_5|knows_athletics_3|knows_shield_4|knows_power_strike_6|knows_ironflesh_6,mordor_man1,mordor_man2]," calcext:value-type="string">
            <text:p>["mordor_captain","Captain_of_Mordor","Captains_of_Mordor",tf_evil_man| tf_mounted| tfg_gloves| tfg_shield| tfg_armor| tfg_helm| tfg_horse| tfg_boots,0,0,fac_mordor,[itm_mordor_cap_helm,itm_m_cap_armor, itm_evil_gauntlets_b, itm_uruk_greaves,itm_mordor_longsword,itm_orc_simple_spear_heavy, itm_uruk_pike_b,itm_mordor_man_shield_a,itm_mordor_warhorse2,],attr_evil_tier_6,wp_tier_6,knows_common|knows_riding_5|knows_athletics_3|knows_shield_4|knows_power_strike_6|knows_ironflesh_6,mordor_man1,mordor_man2],</text:p>
          </table:table-cell>
          <table:table-cell table:number-columns-repeated="16362"/>
        </table:table-row>
        <table:table-row table:style-name="ro1">
          <table:table-cell table:style-name="ce6" table:formula="of:=IF(AND([.B468]&lt;&gt;&quot;&quot;;[.C468]&lt;&gt;&quot;&quot;);CONCATENATE([Variables.$I$1];[Variables.$I$7];[.B468];[Variables.$I$7];[Variables.$I$6];[Variables.$I$7];[.C468];[Variables.$I$7];[Variables.$I$6];[Variables.$I$7];[.D468];[Variables.$I$7];[Variables.$I$6];[.E468];[Variables.$I$6];[.F468];[Variables.$I$6];[.G468];[Variables.$I$6];[.H468];[Variables.$I$6];[Variables.$I$1];[.I468];[.J468];[.K468];[.L468];[.M468];[.N468];[.O468];[Variables.$I$2];[Variables.$I$6];[.P468];[Variables.$I$6];[.Q468];[Variables.$I$6];[.R468];[Variables.$I$6];[.S468];[Variables.$I$6];[.T468];IF([.U468]&lt;&gt;&quot;&quot;;CONCATENATE([Variables.$I$6];[.U468]);&quot;&quot;);[Variables.$I$2];[Variables.$I$6]);IF([.B468]&lt;&gt;&quot;&quot;;CONCATENATE(&quot;#&quot;;[.B468]);&quot;&quot;))" office:value-type="string" office:string-value="[&quot;umbar_captain&quot;,&quot;Captain_of_Umbar&quot;,&quot;Captains_of_Umbar&quot;,tfg_gloves| tfg_armor| tfg_helm| tfg_boots|tfg_shield,0,0,fac_umbar,[itm_umb_helm_b_good,itm_umb_helm_a_good,itm_umb_armor_f_good, itm_evil_gauntlets_b,itm_corsair_boots,itm_kraken,itm_umb_shield_d,],attr_evil_tier_6,wp_tier_6,knows_common|knows_athletics_6|knows_shield_2|knows_power_throw_4|knows_power_strike_5|knows_ironflesh_5,bandit_face1,bandit_face2]," calcext:value-type="string">
            <text:p>["umbar_captain","Captain_of_Umbar","Captains_of_Umbar",tfg_gloves| tfg_armor| tfg_helm| tfg_boots|tfg_shield,0,0,fac_umbar,[itm_umb_helm_b_good,itm_umb_helm_a_good,itm_umb_armor_f_good, itm_evil_gauntlets_b,itm_corsair_boots,itm_kraken,itm_umb_shield_d,],attr_evil_tier_6,wp_tier_6,knows_common|knows_athletics_6|knows_shield_2|knows_power_throw_4|knows_power_strike_5|knows_ironflesh_5,bandit_face1,bandit_face2],</text:p>
          </table:table-cell>
          <table:table-cell table:style-name="ce7" office:value-type="string" calcext:value-type="string">
            <text:p>umbar_captain</text:p>
          </table:table-cell>
          <table:table-cell table:style-name="ce7" office:value-type="string" calcext:value-type="string">
            <text:p>Captain_of_Umbar</text:p>
          </table:table-cell>
          <table:table-cell table:style-name="ce7" office:value-type="string" calcext:value-type="string">
            <text:p>Captains_of_Umbar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umbar</text:p>
          </table:table-cell>
          <table:table-cell table:style-name="ce11" office:value-type="string" calcext:value-type="string">
            <text:p>itm_umb_helm_b_good,itm_umb_helm_a_good,</text:p>
          </table:table-cell>
          <table:table-cell table:style-name="ce11" office:value-type="string" calcext:value-type="string">
            <text:p>itm_umb_armor_f_good,</text:p>
          </table:table-cell>
          <table:table-cell table:style-name="ce11" office:value-type="string" calcext:value-type="string">
            <text:p><text:s/>itm_evil_gauntlets_b,</text:p>
          </table:table-cell>
          <table:table-cell table:style-name="ce11" office:value-type="string" calcext:value-type="string">
            <text:p>itm_corsair_boots,</text:p>
          </table:table-cell>
          <table:table-cell table:style-name="ce11" office:value-type="string" calcext:value-type="string">
            <text:p>itm_kraken,</text:p>
          </table:table-cell>
          <table:table-cell table:style-name="ce11" office:value-type="string" calcext:value-type="string">
            <text:p>itm_umb_shield_d,</text:p>
          </table:table-cell>
          <table:table-cell table:style-name="ce11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6|knows_shield_2|knows_power_throw_4|knows_power_strike_5|knows_ironflesh_5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32" table:formula="of:=IF(AND([.B468]&lt;&gt;&quot;&quot;;[.C468]&lt;&gt;&quot;&quot;);CONCATENATE([Variables.$I$1];[Variables.$I$7];[.B468];[Variables.$I$7];[Variables.$I$6];[Variables.$I$7];[.C468];[Variables.$I$7];[Variables.$I$6];[Variables.$I$7];[.D468];[Variables.$I$7];[Variables.$I$6];[.E468];[Variables.$I$6];[.F468];[Variables.$I$6];[.G468];[Variables.$I$6];[.H468];[Variables.$I$6];[Variables.$I$1];[.I468];[.J468];[.K468];[.L468];[.M468];[.N468];[.O468];[Variables.$I$2];[Variables.$I$6];[.P468];[Variables.$I$6];[.Q468];[Variables.$I$6];[.R468];[Variables.$I$6];[.S468];[Variables.$I$6];[.T468];IF([.U468]&lt;&gt;&quot;&quot;;CONCATENATE([Variables.$I$6];[.U468]);&quot;&quot;);[Variables.$I$2];[Variables.$I$6]);IF([.B468]&lt;&gt;&quot;&quot;;CONCATENATE(&quot;#&quot;;[.B468]);&quot;&quot;))" office:value-type="string" office:string-value="[&quot;umbar_captain&quot;,&quot;Captain_of_Umbar&quot;,&quot;Captains_of_Umbar&quot;,tfg_gloves| tfg_armor| tfg_helm| tfg_boots|tfg_shield,0,0,fac_umbar,[itm_umb_helm_b_good,itm_umb_helm_a_good,itm_umb_armor_f_good, itm_evil_gauntlets_b,itm_corsair_boots,itm_kraken,itm_umb_shield_d,],attr_evil_tier_6,wp_tier_6,knows_common|knows_athletics_6|knows_shield_2|knows_power_throw_4|knows_power_strike_5|knows_ironflesh_5,bandit_face1,bandit_face2]," calcext:value-type="string">
            <text:p>["umbar_captain","Captain_of_Umbar","Captains_of_Umbar",tfg_gloves| tfg_armor| tfg_helm| tfg_boots|tfg_shield,0,0,fac_umbar,[itm_umb_helm_b_good,itm_umb_helm_a_good,itm_umb_armor_f_good, itm_evil_gauntlets_b,itm_corsair_boots,itm_kraken,itm_umb_shield_d,],attr_evil_tier_6,wp_tier_6,knows_common|knows_athletics_6|knows_shield_2|knows_power_throw_4|knows_power_strike_5|knows_ironflesh_5,bandit_face1,bandit_face2],</text:p>
          </table:table-cell>
          <table:table-cell table:number-columns-repeated="16362"/>
        </table:table-row>
        <table:table-row table:style-name="ro1">
          <table:table-cell table:style-name="ce6" table:formula="of:=IF(AND([.B469]&lt;&gt;&quot;&quot;;[.C469]&lt;&gt;&quot;&quot;);CONCATENATE([Variables.$I$1];[Variables.$I$7];[.B469];[Variables.$I$7];[Variables.$I$6];[Variables.$I$7];[.C469];[Variables.$I$7];[Variables.$I$6];[Variables.$I$7];[.D469];[Variables.$I$7];[Variables.$I$6];[.E469];[Variables.$I$6];[.F469];[Variables.$I$6];[.G469];[Variables.$I$6];[.H469];[Variables.$I$6];[Variables.$I$1];[.I469];[.J469];[.K469];[.L469];[.M469];[.N469];[.O469];[Variables.$I$2];[Variables.$I$6];[.P469];[Variables.$I$6];[.Q469];[Variables.$I$6];[.R469];[Variables.$I$6];[.S469];[Variables.$I$6];[.T469];IF([.U469]&lt;&gt;&quot;&quot;;CONCATENATE([Variables.$I$6];[.U469]);&quot;&quot;);[Variables.$I$2];[Variables.$I$6]);IF([.B469]&lt;&gt;&quot;&quot;;CONCATENATE(&quot;#&quot;;[.B469]);&quot;&quot;))" office:value-type="string" office:string-value="[&quot;khand_captain&quot;,&quot;Variag_War_Chief&quot;,&quot;Variag_War_Chiefs&quot;,tf_evil_man| tf_mounted| tfg_shield| tfg_armor| tfg_helm| tfg_horse| tfg_boots,0,0,fac_khand,[itm_khand_inf_helm_a_good, itm_khand_cav_helm_a_good,itm_khand_noble_lam,itm_mail_mittens,itm_splinted_greaves_good,itm_khand_mace1, itm_khand_mace2,itm_easterling_round_horseman,itm_variag_kataphrakt,],attr_evil_tier_6,wp_tier_6,knows_common|knows_ironflesh_7|knows_power_strike_5|knows_shield_3|knows_riding_7,khand_man1,khand_man2]," calcext:value-type="string">
            <text:p>["khand_captain","Variag_War_Chief","Variag_War_Chiefs",tf_evil_man| tf_mounted| tfg_shield| tfg_armor| tfg_helm| tfg_horse| tfg_boots,0,0,fac_khand,[itm_khand_inf_helm_a_good, itm_khand_cav_helm_a_good,itm_khand_noble_lam,itm_mail_mittens,itm_splinted_greaves_good,itm_khand_mace1, itm_khand_mace2,itm_easterling_round_horseman,itm_variag_kataphrakt,],attr_evil_tier_6,wp_tier_6,knows_common|knows_ironflesh_7|knows_power_strike_5|knows_shield_3|knows_riding_7,khand_man1,khand_man2],</text:p>
          </table:table-cell>
          <table:table-cell table:style-name="ce7" office:value-type="string" calcext:value-type="string">
            <text:p>khand_captain</text:p>
          </table:table-cell>
          <table:table-cell table:style-name="ce7" office:value-type="string" calcext:value-type="string">
            <text:p>Variag_War_Chief</text:p>
          </table:table-cell>
          <table:table-cell table:style-name="ce7" office:value-type="string" calcext:value-type="string">
            <text:p>Variag_War_Chiefs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khand</text:p>
          </table:table-cell>
          <table:table-cell table:style-name="ce11" office:value-type="string" calcext:value-type="string">
            <text:p>itm_khand_inf_helm_a_good, itm_khand_cav_helm_a_good,</text:p>
          </table:table-cell>
          <table:table-cell table:style-name="ce11" office:value-type="string" calcext:value-type="string">
            <text:p>itm_khand_noble_lam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splinted_greaves_good,</text:p>
          </table:table-cell>
          <table:table-cell table:style-name="ce11" office:value-type="string" calcext:value-type="string">
            <text:p>itm_khand_mace1, itm_khand_mace2,</text:p>
          </table:table-cell>
          <table:table-cell table:style-name="ce11" office:value-type="string" calcext:value-type="string">
            <text:p>itm_easterling_round_horseman,</text:p>
          </table:table-cell>
          <table:table-cell table:style-name="ce11" office:value-type="string" calcext:value-type="string">
            <text:p>itm_variag_kataphrakt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ironflesh_7|knows_power_strike_5|knows_shield_3|knows_riding_7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32" table:formula="of:=IF(AND([.B469]&lt;&gt;&quot;&quot;;[.C469]&lt;&gt;&quot;&quot;);CONCATENATE([Variables.$I$1];[Variables.$I$7];[.B469];[Variables.$I$7];[Variables.$I$6];[Variables.$I$7];[.C469];[Variables.$I$7];[Variables.$I$6];[Variables.$I$7];[.D469];[Variables.$I$7];[Variables.$I$6];[.E469];[Variables.$I$6];[.F469];[Variables.$I$6];[.G469];[Variables.$I$6];[.H469];[Variables.$I$6];[Variables.$I$1];[.I469];[.J469];[.K469];[.L469];[.M469];[.N469];[.O469];[Variables.$I$2];[Variables.$I$6];[.P469];[Variables.$I$6];[.Q469];[Variables.$I$6];[.R469];[Variables.$I$6];[.S469];[Variables.$I$6];[.T469];IF([.U469]&lt;&gt;&quot;&quot;;CONCATENATE([Variables.$I$6];[.U469]);&quot;&quot;);[Variables.$I$2];[Variables.$I$6]);IF([.B469]&lt;&gt;&quot;&quot;;CONCATENATE(&quot;#&quot;;[.B469]);&quot;&quot;))" office:value-type="string" office:string-value="[&quot;khand_captain&quot;,&quot;Variag_War_Chief&quot;,&quot;Variag_War_Chiefs&quot;,tf_evil_man| tf_mounted| tfg_shield| tfg_armor| tfg_helm| tfg_horse| tfg_boots,0,0,fac_khand,[itm_khand_inf_helm_a_good, itm_khand_cav_helm_a_good,itm_khand_noble_lam,itm_mail_mittens,itm_splinted_greaves_good,itm_khand_mace1, itm_khand_mace2,itm_easterling_round_horseman,itm_variag_kataphrakt,],attr_evil_tier_6,wp_tier_6,knows_common|knows_ironflesh_7|knows_power_strike_5|knows_shield_3|knows_riding_7,khand_man1,khand_man2]," calcext:value-type="string">
            <text:p>["khand_captain","Variag_War_Chief","Variag_War_Chiefs",tf_evil_man| tf_mounted| tfg_shield| tfg_armor| tfg_helm| tfg_horse| tfg_boots,0,0,fac_khand,[itm_khand_inf_helm_a_good, itm_khand_cav_helm_a_good,itm_khand_noble_lam,itm_mail_mittens,itm_splinted_greaves_good,itm_khand_mace1, itm_khand_mace2,itm_easterling_round_horseman,itm_variag_kataphrakt,],attr_evil_tier_6,wp_tier_6,knows_common|knows_ironflesh_7|knows_power_strike_5|knows_shield_3|knows_riding_7,khand_man1,khand_man2],</text:p>
          </table:table-cell>
          <table:table-cell table:number-columns-repeated="16362"/>
        </table:table-row>
        <table:table-row table:style-name="ro1">
          <table:table-cell table:style-name="ce6" table:formula="of:=IF(AND([.B470]&lt;&gt;&quot;&quot;;[.C470]&lt;&gt;&quot;&quot;);CONCATENATE([Variables.$I$1];[Variables.$I$7];[.B470];[Variables.$I$7];[Variables.$I$6];[Variables.$I$7];[.C470];[Variables.$I$7];[Variables.$I$6];[Variables.$I$7];[.D470];[Variables.$I$7];[Variables.$I$6];[.E470];[Variables.$I$6];[.F470];[Variables.$I$6];[.G470];[Variables.$I$6];[.H470];[Variables.$I$6];[Variables.$I$1];[.I470];[.J470];[.K470];[.L470];[.M470];[.N470];[.O470];[Variables.$I$2];[Variables.$I$6];[.P470];[Variables.$I$6];[.Q470];[Variables.$I$6];[.R470];[Variables.$I$6];[.S470];[Variables.$I$6];[.T470];IF([.U470]&lt;&gt;&quot;&quot;;CONCATENATE([Variables.$I$6];[.U470]);&quot;&quot;);[Variables.$I$2];[Variables.$I$6]);IF([.B470]&lt;&gt;&quot;&quot;;CONCATENATE(&quot;#&quot;;[.B470]);&quot;&quot;))" office:value-type="string" office:string-value="[&quot;rhun_captain&quot;,&quot;Rhun_Chieftain&quot;,&quot;Rhun_Chieftains&quot;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7|knows_power_strike_6|knows_riding_7,rhun_man1,rhun_man2]," calcext:value-type="string">
            <text:p>["rhun_captain","Rhun_Chieftain","Rhun_Chieftains"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7|knows_power_strike_6|knows_riding_7,rhun_man1,rhun_man2],</text:p>
          </table:table-cell>
          <table:table-cell table:style-name="ce7" office:value-type="string" calcext:value-type="string">
            <text:p>rhun_captain</text:p>
          </table:table-cell>
          <table:table-cell table:style-name="ce7" office:value-type="string" calcext:value-type="string">
            <text:p>Rhun_Chieftain</text:p>
          </table:table-cell>
          <table:table-cell table:style-name="ce7" office:value-type="string" calcext:value-type="string">
            <text:p>Rhun_Chieftains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hun</text:p>
          </table:table-cell>
          <table:table-cell table:style-name="ce11" office:value-type="string" calcext:value-type="string">
            <text:p>itm_rhun_helm_chieftain,</text:p>
          </table:table-cell>
          <table:table-cell table:style-name="ce11" office:value-type="string" calcext:value-type="string">
            <text:p>itm_rhun_armor_p_good,itm_rhun_armor_k_good,</text:p>
          </table:table-cell>
          <table:table-cell table:style-name="ce11" office:value-type="string" calcext:value-type="string">
            <text:p>itm_evil_gauntlets_b_good,</text:p>
          </table:table-cell>
          <table:table-cell table:style-name="ce11" office:value-type="string" calcext:value-type="string">
            <text:p>itm_splinted_greaves_good,</text:p>
          </table:table-cell>
          <table:table-cell table:style-name="ce11" office:value-type="string" calcext:value-type="string">
            <text:p>itm_rhun_sword,itm_rhun_greatfalchion,</text:p>
          </table:table-cell>
          <table:table-cell table:style-name="ce11" office:value-type="string" calcext:value-type="string">
            <text:p>itm_rhun_bull3_shield,</text:p>
          </table:table-cell>
          <table:table-cell table:style-name="ce11" office:value-type="string" calcext:value-type="string">
            <text:p>itm_rhun_horse_g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ironflesh_7|knows_power_strike_6|knows_riding_7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32" table:formula="of:=IF(AND([.B470]&lt;&gt;&quot;&quot;;[.C470]&lt;&gt;&quot;&quot;);CONCATENATE([Variables.$I$1];[Variables.$I$7];[.B470];[Variables.$I$7];[Variables.$I$6];[Variables.$I$7];[.C470];[Variables.$I$7];[Variables.$I$6];[Variables.$I$7];[.D470];[Variables.$I$7];[Variables.$I$6];[.E470];[Variables.$I$6];[.F470];[Variables.$I$6];[.G470];[Variables.$I$6];[.H470];[Variables.$I$6];[Variables.$I$1];[.I470];[.J470];[.K470];[.L470];[.M470];[.N470];[.O470];[Variables.$I$2];[Variables.$I$6];[.P470];[Variables.$I$6];[.Q470];[Variables.$I$6];[.R470];[Variables.$I$6];[.S470];[Variables.$I$6];[.T470];IF([.U470]&lt;&gt;&quot;&quot;;CONCATENATE([Variables.$I$6];[.U470]);&quot;&quot;);[Variables.$I$2];[Variables.$I$6]);IF([.B470]&lt;&gt;&quot;&quot;;CONCATENATE(&quot;#&quot;;[.B470]);&quot;&quot;))" office:value-type="string" office:string-value="[&quot;rhun_captain&quot;,&quot;Rhun_Chieftain&quot;,&quot;Rhun_Chieftains&quot;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7|knows_power_strike_6|knows_riding_7,rhun_man1,rhun_man2]," calcext:value-type="string">
            <text:p>["rhun_captain","Rhun_Chieftain","Rhun_Chieftains"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7|knows_power_strike_6|knows_riding_7,rhun_man1,rhun_man2],</text:p>
          </table:table-cell>
          <table:table-cell table:number-columns-repeated="16362"/>
        </table:table-row>
        <table:table-row table:style-name="ro1">
          <table:table-cell table:style-name="ce6" table:formula="of:=IF(AND([.B471]&lt;&gt;&quot;&quot;;[.C471]&lt;&gt;&quot;&quot;);CONCATENATE([Variables.$I$1];[Variables.$I$7];[.B471];[Variables.$I$7];[Variables.$I$6];[Variables.$I$7];[.C471];[Variables.$I$7];[Variables.$I$6];[Variables.$I$7];[.D471];[Variables.$I$7];[Variables.$I$6];[.E471];[Variables.$I$6];[.F471];[Variables.$I$6];[.G471];[Variables.$I$6];[.H471];[Variables.$I$6];[Variables.$I$1];[.I471];[.J471];[.K471];[.L471];[.M471];[.N471];[.O471];[Variables.$I$2];[Variables.$I$6];[.P471];[Variables.$I$6];[.Q471];[Variables.$I$6];[.R471];[Variables.$I$6];[.S471];[Variables.$I$6];[.T471];IF([.U471]&lt;&gt;&quot;&quot;;CONCATENATE([Variables.$I$6];[.U471]);&quot;&quot;);[Variables.$I$2];[Variables.$I$6]);IF([.B471]&lt;&gt;&quot;&quot;;CONCATENATE(&quot;#&quot;;[.B471]);&quot;&quot;))" office:value-type="string" office:string-value="[&quot;moria_captain&quot;,&quot;Uruk_Chieftain_of_Moria&quot;,&quot;Uruk_Chieftains_of_Moria&quot;,tf_uruk| tfg_gloves| tfg_shield| tfg_armor| tfg_helm| tfg_boots| tf_no_capture_alive,0,0,fac_moria,[itm_uruk_helm_e,itm_m_uruk_heavy_c_good,itm_evil_gauntlets_b,itm_uruk_chain_greaves,itm_orc_two_handed_axe_heavy,itm_uruk_falchion_a,itm_orc_bastard_scimitar,itm_mordor_uruk_shield_a,],attr_evil_tier_6,wp_tier_6,knows_common|knows_athletics_5|knows_power_strike_7|knows_ironflesh_9,uruk_hai_face1,uruk_hai_face2]," calcext:value-type="string">
            <text:p>["moria_captain","Uruk_Chieftain_of_Moria","Uruk_Chieftains_of_Moria",tf_uruk| tfg_gloves| tfg_shield| tfg_armor| tfg_helm| tfg_boots| tf_no_capture_alive,0,0,fac_moria,[itm_uruk_helm_e,itm_m_uruk_heavy_c_good,itm_evil_gauntlets_b,itm_uruk_chain_greaves,itm_orc_two_handed_axe_heavy,itm_uruk_falchion_a,itm_orc_bastard_scimitar,itm_mordor_uruk_shield_a,],attr_evil_tier_6,wp_tier_6,knows_common|knows_athletics_5|knows_power_strike_7|knows_ironflesh_9,uruk_hai_face1,uruk_hai_face2],</text:p>
          </table:table-cell>
          <table:table-cell table:style-name="ce7" office:value-type="string" calcext:value-type="string">
            <text:p>moria_captain</text:p>
          </table:table-cell>
          <table:table-cell table:style-name="ce7" office:value-type="string" calcext:value-type="string">
            <text:p>Uruk_Chieftain_of_Moria</text:p>
          </table:table-cell>
          <table:table-cell table:style-name="ce7" office:value-type="string" calcext:value-type="string">
            <text:p>Uruk_Chieftains_of_Moria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ia</text:p>
          </table:table-cell>
          <table:table-cell table:style-name="ce11" office:value-type="string" calcext:value-type="string">
            <text:p>itm_uruk_helm_e,</text:p>
          </table:table-cell>
          <table:table-cell table:style-name="ce11" office:value-type="string" calcext:value-type="string">
            <text:p>itm_m_uruk_heavy_c_good,</text:p>
          </table:table-cell>
          <table:table-cell table:style-name="ce11" office:value-type="string" calcext:value-type="string">
            <text:p>itm_evil_gauntlets_b,</text:p>
          </table:table-cell>
          <table:table-cell table:style-name="ce11" office:value-type="string" calcext:value-type="string">
            <text:p>itm_uruk_chain_greaves,</text:p>
          </table:table-cell>
          <table:table-cell table:style-name="ce11" office:value-type="string" calcext:value-type="string">
            <text:p>itm_orc_two_handed_axe_heavy,</text:p>
          </table:table-cell>
          <table:table-cell table:style-name="ce11" office:value-type="string" calcext:value-type="string">
            <text:p>itm_uruk_falchion_a,itm_orc_bastard_scimitar,itm_mordor_uruk_shield_a,</text:p>
          </table:table-cell>
          <table:table-cell table:style-name="ce11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5|knows_power_strike_7|knows_ironflesh_9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32" table:formula="of:=IF(AND([.B471]&lt;&gt;&quot;&quot;;[.C471]&lt;&gt;&quot;&quot;);CONCATENATE([Variables.$I$1];[Variables.$I$7];[.B471];[Variables.$I$7];[Variables.$I$6];[Variables.$I$7];[.C471];[Variables.$I$7];[Variables.$I$6];[Variables.$I$7];[.D471];[Variables.$I$7];[Variables.$I$6];[.E471];[Variables.$I$6];[.F471];[Variables.$I$6];[.G471];[Variables.$I$6];[.H471];[Variables.$I$6];[Variables.$I$1];[.I471];[.J471];[.K471];[.L471];[.M471];[.N471];[.O471];[Variables.$I$2];[Variables.$I$6];[.P471];[Variables.$I$6];[.Q471];[Variables.$I$6];[.R471];[Variables.$I$6];[.S471];[Variables.$I$6];[.T471];IF([.U471]&lt;&gt;&quot;&quot;;CONCATENATE([Variables.$I$6];[.U471]);&quot;&quot;);[Variables.$I$2];[Variables.$I$6]);IF([.B471]&lt;&gt;&quot;&quot;;CONCATENATE(&quot;#&quot;;[.B471]);&quot;&quot;))" office:value-type="string" office:string-value="[&quot;moria_captain&quot;,&quot;Uruk_Chieftain_of_Moria&quot;,&quot;Uruk_Chieftains_of_Moria&quot;,tf_uruk| tfg_gloves| tfg_shield| tfg_armor| tfg_helm| tfg_boots| tf_no_capture_alive,0,0,fac_moria,[itm_uruk_helm_e,itm_m_uruk_heavy_c_good,itm_evil_gauntlets_b,itm_uruk_chain_greaves,itm_orc_two_handed_axe_heavy,itm_uruk_falchion_a,itm_orc_bastard_scimitar,itm_mordor_uruk_shield_a,],attr_evil_tier_6,wp_tier_6,knows_common|knows_athletics_5|knows_power_strike_7|knows_ironflesh_9,uruk_hai_face1,uruk_hai_face2]," calcext:value-type="string">
            <text:p>["moria_captain","Uruk_Chieftain_of_Moria","Uruk_Chieftains_of_Moria",tf_uruk| tfg_gloves| tfg_shield| tfg_armor| tfg_helm| tfg_boots| tf_no_capture_alive,0,0,fac_moria,[itm_uruk_helm_e,itm_m_uruk_heavy_c_good,itm_evil_gauntlets_b,itm_uruk_chain_greaves,itm_orc_two_handed_axe_heavy,itm_uruk_falchion_a,itm_orc_bastard_scimitar,itm_mordor_uruk_shield_a,],attr_evil_tier_6,wp_tier_6,knows_common|knows_athletics_5|knows_power_strike_7|knows_ironflesh_9,uruk_hai_face1,uruk_hai_face2],</text:p>
          </table:table-cell>
          <table:table-cell table:number-columns-repeated="16362"/>
        </table:table-row>
        <table:table-row table:style-name="ro1">
          <table:table-cell table:style-name="ce6" table:formula="of:=IF(AND([.B472]&lt;&gt;&quot;&quot;;[.C472]&lt;&gt;&quot;&quot;);CONCATENATE([Variables.$I$1];[Variables.$I$7];[.B472];[Variables.$I$7];[Variables.$I$6];[Variables.$I$7];[.C472];[Variables.$I$7];[Variables.$I$6];[Variables.$I$7];[.D472];[Variables.$I$7];[Variables.$I$6];[.E472];[Variables.$I$6];[.F472];[Variables.$I$6];[.G472];[Variables.$I$6];[.H472];[Variables.$I$6];[Variables.$I$1];[.I472];[.J472];[.K472];[.L472];[.M472];[.N472];[.O472];[Variables.$I$2];[Variables.$I$6];[.P472];[Variables.$I$6];[.Q472];[Variables.$I$6];[.R472];[Variables.$I$6];[.S472];[Variables.$I$6];[.T472];IF([.U472]&lt;&gt;&quot;&quot;;CONCATENATE([Variables.$I$6];[.U472]);&quot;&quot;);[Variables.$I$2];[Variables.$I$6]);IF([.B472]&lt;&gt;&quot;&quot;;CONCATENATE(&quot;#&quot;;[.B472]);&quot;&quot;))" office:value-type="string" office:string-value="[&quot;dwarf_captain&quot;,&quot;Dwarf_Captain&quot;,&quot;Dwarf_Captains&quot;,tf_dwarf| tfg_armor| tfg_gloves| tfg_shield| tfg_helm| tfg_boots,0,0,fac_dwarf,[itm_dwarf_helm_sallet_lordly,itm_dwarf_armor_c,itm_mail_mittens,itm_dwarf_scale_boots,itm_dwarf_great_axe,itm_dwarf_throwing_axe,itm_dwarf_throwing_axe,itm_dwarf_shield_b_good,],attr_dwarf_tier_6,wp_dwarf_tier_6,knows_common_dwarf|knows_athletics_4|knows_power_throw_7|knows_power_strike_8|knows_ironflesh_10|knows_shield_6,dwarf_face_7,dwarf_face_7]," calcext:value-type="string">
            <text:p>["dwarf_captain","Dwarf_Captain","Dwarf_Captains",tf_dwarf| tfg_armor| tfg_gloves| tfg_shield| tfg_helm| tfg_boots,0,0,fac_dwarf,[itm_dwarf_helm_sallet_lordly,itm_dwarf_armor_c,itm_mail_mittens,itm_dwarf_scale_boots,itm_dwarf_great_axe,itm_dwarf_throwing_axe,itm_dwarf_throwing_axe,itm_dwarf_shield_b_good,],attr_dwarf_tier_6,wp_dwarf_tier_6,knows_common_dwarf|knows_athletics_4|knows_power_throw_7|knows_power_strike_8|knows_ironflesh_10|knows_shield_6,dwarf_face_7,dwarf_face_7],</text:p>
          </table:table-cell>
          <table:table-cell table:style-name="ce7" office:value-type="string" calcext:value-type="string">
            <text:p>dwarf_captain</text:p>
          </table:table-cell>
          <table:table-cell table:style-name="ce7" office:value-type="string" calcext:value-type="string">
            <text:p>Dwarf_Captain</text:p>
          </table:table-cell>
          <table:table-cell table:style-name="ce7" office:value-type="string" calcext:value-type="string">
            <text:p>Dwarf_Captain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warf</text:p>
          </table:table-cell>
          <table:table-cell table:style-name="ce11" office:value-type="string" calcext:value-type="string">
            <text:p>itm_dwarf_helm_sallet_lordly,</text:p>
          </table:table-cell>
          <table:table-cell table:style-name="ce11" office:value-type="string" calcext:value-type="string">
            <text:p>itm_dwarf_armor_c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dwarf_scale_boots,</text:p>
          </table:table-cell>
          <table:table-cell table:style-name="ce11" office:value-type="string" calcext:value-type="string">
            <text:p>itm_dwarf_great_axe,</text:p>
          </table:table-cell>
          <table:table-cell table:style-name="ce11" office:value-type="string" calcext:value-type="string">
            <text:p>itm_dwarf_throwing_axe,itm_dwarf_throwing_axe,itm_dwarf_shield_b_good,</text:p>
          </table:table-cell>
          <table:table-cell table:style-name="ce11"/>
          <table:table-cell table:style-name="ce12" office:value-type="string" calcext:value-type="string">
            <text:p>attr_dwarf_tier_6</text:p>
          </table:table-cell>
          <table:table-cell table:style-name="ce12" office:value-type="string" calcext:value-type="string">
            <text:p>wp_dwarf_tier_6</text:p>
          </table:table-cell>
          <table:table-cell table:style-name="ce12" office:value-type="string" calcext:value-type="string">
            <text:p>knows_common_dwarf|knows_athletics_4|knows_power_throw_7|knows_power_strike_8|knows_ironflesh_10|knows_shield_6</text:p>
          </table:table-cell>
          <table:table-cell table:number-columns-repeated="2" table:style-name="ce14" office:value-type="string" calcext:value-type="string">
            <text:p>dwarf_face_7</text:p>
          </table:table-cell>
          <table:table-cell table:style-name="ce15"/>
          <table:table-cell table:style-name="ce32" table:formula="of:=IF(AND([.B472]&lt;&gt;&quot;&quot;;[.C472]&lt;&gt;&quot;&quot;);CONCATENATE([Variables.$I$1];[Variables.$I$7];[.B472];[Variables.$I$7];[Variables.$I$6];[Variables.$I$7];[.C472];[Variables.$I$7];[Variables.$I$6];[Variables.$I$7];[.D472];[Variables.$I$7];[Variables.$I$6];[.E472];[Variables.$I$6];[.F472];[Variables.$I$6];[.G472];[Variables.$I$6];[.H472];[Variables.$I$6];[Variables.$I$1];[.I472];[.J472];[.K472];[.L472];[.M472];[.N472];[.O472];[Variables.$I$2];[Variables.$I$6];[.P472];[Variables.$I$6];[.Q472];[Variables.$I$6];[.R472];[Variables.$I$6];[.S472];[Variables.$I$6];[.T472];IF([.U472]&lt;&gt;&quot;&quot;;CONCATENATE([Variables.$I$6];[.U472]);&quot;&quot;);[Variables.$I$2];[Variables.$I$6]);IF([.B472]&lt;&gt;&quot;&quot;;CONCATENATE(&quot;#&quot;;[.B472]);&quot;&quot;))" office:value-type="string" office:string-value="[&quot;dwarf_captain&quot;,&quot;Dwarf_Captain&quot;,&quot;Dwarf_Captains&quot;,tf_dwarf| tfg_armor| tfg_gloves| tfg_shield| tfg_helm| tfg_boots,0,0,fac_dwarf,[itm_dwarf_helm_sallet_lordly,itm_dwarf_armor_c,itm_mail_mittens,itm_dwarf_scale_boots,itm_dwarf_great_axe,itm_dwarf_throwing_axe,itm_dwarf_throwing_axe,itm_dwarf_shield_b_good,],attr_dwarf_tier_6,wp_dwarf_tier_6,knows_common_dwarf|knows_athletics_4|knows_power_throw_7|knows_power_strike_8|knows_ironflesh_10|knows_shield_6,dwarf_face_7,dwarf_face_7]," calcext:value-type="string">
            <text:p>["dwarf_captain","Dwarf_Captain","Dwarf_Captains",tf_dwarf| tfg_armor| tfg_gloves| tfg_shield| tfg_helm| tfg_boots,0,0,fac_dwarf,[itm_dwarf_helm_sallet_lordly,itm_dwarf_armor_c,itm_mail_mittens,itm_dwarf_scale_boots,itm_dwarf_great_axe,itm_dwarf_throwing_axe,itm_dwarf_throwing_axe,itm_dwarf_shield_b_good,],attr_dwarf_tier_6,wp_dwarf_tier_6,knows_common_dwarf|knows_athletics_4|knows_power_throw_7|knows_power_strike_8|knows_ironflesh_10|knows_shield_6,dwarf_face_7,dwarf_face_7],</text:p>
          </table:table-cell>
          <table:table-cell table:number-columns-repeated="16362"/>
        </table:table-row>
        <table:table-row table:style-name="ro1">
          <table:table-cell table:style-name="ce6" table:formula="of:=IF(AND([.B473]&lt;&gt;&quot;&quot;;[.C473]&lt;&gt;&quot;&quot;);CONCATENATE([Variables.$I$1];[Variables.$I$7];[.B473];[Variables.$I$7];[Variables.$I$6];[Variables.$I$7];[.C473];[Variables.$I$7];[Variables.$I$6];[Variables.$I$7];[.D473];[Variables.$I$7];[Variables.$I$6];[.E473];[Variables.$I$6];[.F473];[Variables.$I$6];[.G473];[Variables.$I$6];[.H473];[Variables.$I$6];[Variables.$I$1];[.I473];[.J473];[.K473];[.L473];[.M473];[.N473];[.O473];[Variables.$I$2];[Variables.$I$6];[.P473];[Variables.$I$6];[.Q473];[Variables.$I$6];[.R473];[Variables.$I$6];[.S473];[Variables.$I$6];[.T473];IF([.U473]&lt;&gt;&quot;&quot;;CONCATENATE([Variables.$I$6];[.U473]);&quot;&quot;);[Variables.$I$2];[Variables.$I$6]);IF([.B473]&lt;&gt;&quot;&quot;;CONCATENATE(&quot;#&quot;;[.B473]);&quot;&quot;))" office:value-type="string" office:string-value="[&quot;dale_captain&quot;,&quot;Captain_of_Dale&quot;,&quot;Captains_of_Dale&quot;,tfg_shield| tfg_boots| tfg_armor| tfg_helm,0,0,fac_dale,[itm_dale_helmet_c, itm_dale_helmet_c_good, itm_dale_helmet_e,itm_dale_heavy_a_good,itm_dale_heavy_b_pelt,itm_evil_gauntlets_a,itm_splinted_greaves,itm_dale_sword_broad,itm_dale_shield_b_good,],attr_tier_6,wp_tier_6,knows_common|knows_athletics_5|knows_power_strike_6|knows_ironflesh_7|knows_shield_7,swadian_face_middle_1,swadian_face_older_2]," calcext:value-type="string">
            <text:p>["dale_captain","Captain_of_Dale","Captains_of_Dale",tfg_shield| tfg_boots| tfg_armor| tfg_helm,0,0,fac_dale,[itm_dale_helmet_c, itm_dale_helmet_c_good, itm_dale_helmet_e,itm_dale_heavy_a_good,itm_dale_heavy_b_pelt,itm_evil_gauntlets_a,itm_splinted_greaves,itm_dale_sword_broad,itm_dale_shield_b_good,],attr_tier_6,wp_tier_6,knows_common|knows_athletics_5|knows_power_strike_6|knows_ironflesh_7|knows_shield_7,swadian_face_middle_1,swadian_face_older_2],</text:p>
          </table:table-cell>
          <table:table-cell table:style-name="ce7" office:value-type="string" calcext:value-type="string">
            <text:p>dale_captain</text:p>
          </table:table-cell>
          <table:table-cell table:style-name="ce7" office:value-type="string" calcext:value-type="string">
            <text:p>Captain_of_Dale</text:p>
          </table:table-cell>
          <table:table-cell table:style-name="ce7" office:value-type="string" calcext:value-type="string">
            <text:p>Captains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ale</text:p>
          </table:table-cell>
          <table:table-cell table:style-name="ce11" office:value-type="string" calcext:value-type="string">
            <text:p>itm_dale_helmet_c, itm_dale_helmet_c_good, itm_dale_helmet_e,</text:p>
          </table:table-cell>
          <table:table-cell table:style-name="ce11" office:value-type="string" calcext:value-type="string">
            <text:p>itm_dale_heavy_a_good,itm_dale_heavy_b_pelt,</text:p>
          </table:table-cell>
          <table:table-cell table:style-name="ce11" office:value-type="string" calcext:value-type="string">
            <text:p>itm_evil_gauntlets_a,</text:p>
          </table:table-cell>
          <table:table-cell table:style-name="ce11" office:value-type="string" calcext:value-type="string">
            <text:p>itm_splinted_greaves,</text:p>
          </table:table-cell>
          <table:table-cell table:style-name="ce11" office:value-type="string" calcext:value-type="string">
            <text:p>itm_dale_sword_broad,</text:p>
          </table:table-cell>
          <table:table-cell table:style-name="ce11" office:value-type="string" calcext:value-type="string">
            <text:p>itm_dale_shield_b_good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5|knows_power_strike_6|knows_ironflesh_7|knows_shield_7</text:p>
          </table:table-cell>
          <table:table-cell table:style-name="ce14" office:value-type="string" calcext:value-type="string">
            <text:p>swadian_face_middle_1</text:p>
          </table:table-cell>
          <table:table-cell table:style-name="ce14" office:value-type="string" calcext:value-type="string">
            <text:p>swadian_face_older_2</text:p>
          </table:table-cell>
          <table:table-cell table:style-name="ce15"/>
          <table:table-cell table:style-name="ce32" table:formula="of:=IF(AND([.B473]&lt;&gt;&quot;&quot;;[.C473]&lt;&gt;&quot;&quot;);CONCATENATE([Variables.$I$1];[Variables.$I$7];[.B473];[Variables.$I$7];[Variables.$I$6];[Variables.$I$7];[.C473];[Variables.$I$7];[Variables.$I$6];[Variables.$I$7];[.D473];[Variables.$I$7];[Variables.$I$6];[.E473];[Variables.$I$6];[.F473];[Variables.$I$6];[.G473];[Variables.$I$6];[.H473];[Variables.$I$6];[Variables.$I$1];[.I473];[.J473];[.K473];[.L473];[.M473];[.N473];[.O473];[Variables.$I$2];[Variables.$I$6];[.P473];[Variables.$I$6];[.Q473];[Variables.$I$6];[.R473];[Variables.$I$6];[.S473];[Variables.$I$6];[.T473];IF([.U473]&lt;&gt;&quot;&quot;;CONCATENATE([Variables.$I$6];[.U473]);&quot;&quot;);[Variables.$I$2];[Variables.$I$6]);IF([.B473]&lt;&gt;&quot;&quot;;CONCATENATE(&quot;#&quot;;[.B473]);&quot;&quot;))" office:value-type="string" office:string-value="[&quot;dale_captain&quot;,&quot;Captain_of_Dale&quot;,&quot;Captains_of_Dale&quot;,tfg_shield| tfg_boots| tfg_armor| tfg_helm,0,0,fac_dale,[itm_dale_helmet_c, itm_dale_helmet_c_good, itm_dale_helmet_e,itm_dale_heavy_a_good,itm_dale_heavy_b_pelt,itm_evil_gauntlets_a,itm_splinted_greaves,itm_dale_sword_broad,itm_dale_shield_b_good,],attr_tier_6,wp_tier_6,knows_common|knows_athletics_5|knows_power_strike_6|knows_ironflesh_7|knows_shield_7,swadian_face_middle_1,swadian_face_older_2]," calcext:value-type="string">
            <text:p>["dale_captain","Captain_of_Dale","Captains_of_Dale",tfg_shield| tfg_boots| tfg_armor| tfg_helm,0,0,fac_dale,[itm_dale_helmet_c, itm_dale_helmet_c_good, itm_dale_helmet_e,itm_dale_heavy_a_good,itm_dale_heavy_b_pelt,itm_evil_gauntlets_a,itm_splinted_greaves,itm_dale_sword_broad,itm_dale_shield_b_good,],attr_tier_6,wp_tier_6,knows_common|knows_athletics_5|knows_power_strike_6|knows_ironflesh_7|knows_shield_7,swadian_face_middle_1,swadian_face_older_2],</text:p>
          </table:table-cell>
          <table:table-cell table:number-columns-repeated="16362"/>
        </table:table-row>
        <table:table-row table:style-name="ro1">
          <table:table-cell table:style-name="ce6" table:formula="of:=IF(AND([.B474]&lt;&gt;&quot;&quot;;[.C474]&lt;&gt;&quot;&quot;);CONCATENATE([Variables.$I$1];[Variables.$I$7];[.B474];[Variables.$I$7];[Variables.$I$6];[Variables.$I$7];[.C474];[Variables.$I$7];[Variables.$I$6];[Variables.$I$7];[.D474];[Variables.$I$7];[Variables.$I$6];[.E474];[Variables.$I$6];[.F474];[Variables.$I$6];[.G474];[Variables.$I$6];[.H474];[Variables.$I$6];[Variables.$I$1];[.I474];[.J474];[.K474];[.L474];[.M474];[.N474];[.O474];[Variables.$I$2];[Variables.$I$6];[.P474];[Variables.$I$6];[.Q474];[Variables.$I$6];[.R474];[Variables.$I$6];[.S474];[Variables.$I$6];[.T474];IF([.U474]&lt;&gt;&quot;&quot;;CONCATENATE([Variables.$I$6];[.U474]);&quot;&quot;);[Variables.$I$2];[Variables.$I$6]);IF([.B474]&lt;&gt;&quot;&quot;;CONCATENATE(&quot;#&quot;;[.B474]);&quot;&quot;))" office:value-type="string" office:string-value="[&quot;harad_captain&quot;,&quot;Haradrim_Noble&quot;,&quot;Haradrim_Nobles&quot;,tf_harad| tf_mounted| tfg_shield| tfg_armor| tfg_helm| tfg_horse| tfg_boots|tfg_polearm,0,0,fac_harad,[itm_harad_dragon_helm,itm_harad_heavy_good,itm_leather_gloves,itm_harad_lamellar_greaves,itm_harad_long_spear,itm_harad_heavy_sword_good,itm_harad_yellow_shield,itm_harad_warhorse],attr_evil_tier_6,wp_tier_6,knows_common|knows_ironflesh_7|knows_power_strike_5|knows_shield_3|knows_riding_7,haradrim_face_1,haradrim_face_2]," calcext:value-type="string">
            <text:p>["harad_captain","Haradrim_Noble","Haradrim_Nobles",tf_harad| tf_mounted| tfg_shield| tfg_armor| tfg_helm| tfg_horse| tfg_boots|tfg_polearm,0,0,fac_harad,[itm_harad_dragon_helm,itm_harad_heavy_good,itm_leather_gloves,itm_harad_lamellar_greaves,itm_harad_long_spear,itm_harad_heavy_sword_good,itm_harad_yellow_shield,itm_harad_warhorse],attr_evil_tier_6,wp_tier_6,knows_common|knows_ironflesh_7|knows_power_strike_5|knows_shield_3|knows_riding_7,haradrim_face_1,haradrim_face_2],</text:p>
          </table:table-cell>
          <table:table-cell table:style-name="ce7" office:value-type="string" calcext:value-type="string">
            <text:p>harad_captain</text:p>
          </table:table-cell>
          <table:table-cell table:style-name="ce7" office:value-type="string" calcext:value-type="string">
            <text:p>Haradrim_Noble</text:p>
          </table:table-cell>
          <table:table-cell table:style-name="ce7" office:value-type="string" calcext:value-type="string">
            <text:p>Haradrim_Nobles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harad</text:p>
          </table:table-cell>
          <table:table-cell table:style-name="ce11" office:value-type="string" calcext:value-type="string">
            <text:p>itm_harad_dragon_helm,</text:p>
          </table:table-cell>
          <table:table-cell table:style-name="ce11" office:value-type="string" calcext:value-type="string">
            <text:p>itm_harad_heavy_good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harad_lamellar_greaves,</text:p>
          </table:table-cell>
          <table:table-cell table:style-name="ce11" office:value-type="string" calcext:value-type="string">
            <text:p>itm_harad_long_spear,itm_harad_heavy_sword_good,</text:p>
          </table:table-cell>
          <table:table-cell table:style-name="ce11" office:value-type="string" calcext:value-type="string">
            <text:p>itm_harad_yellow_shield,</text:p>
          </table:table-cell>
          <table:table-cell table:style-name="ce11" office:value-type="string" calcext:value-type="string">
            <text:p>itm_harad_warhorse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ironflesh_7|knows_power_strike_5|knows_shield_3|knows_riding_7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32" table:formula="of:=IF(AND([.B474]&lt;&gt;&quot;&quot;;[.C474]&lt;&gt;&quot;&quot;);CONCATENATE([Variables.$I$1];[Variables.$I$7];[.B474];[Variables.$I$7];[Variables.$I$6];[Variables.$I$7];[.C474];[Variables.$I$7];[Variables.$I$6];[Variables.$I$7];[.D474];[Variables.$I$7];[Variables.$I$6];[.E474];[Variables.$I$6];[.F474];[Variables.$I$6];[.G474];[Variables.$I$6];[.H474];[Variables.$I$6];[Variables.$I$1];[.I474];[.J474];[.K474];[.L474];[.M474];[.N474];[.O474];[Variables.$I$2];[Variables.$I$6];[.P474];[Variables.$I$6];[.Q474];[Variables.$I$6];[.R474];[Variables.$I$6];[.S474];[Variables.$I$6];[.T474];IF([.U474]&lt;&gt;&quot;&quot;;CONCATENATE([Variables.$I$6];[.U474]);&quot;&quot;);[Variables.$I$2];[Variables.$I$6]);IF([.B474]&lt;&gt;&quot;&quot;;CONCATENATE(&quot;#&quot;;[.B474]);&quot;&quot;))" office:value-type="string" office:string-value="[&quot;harad_captain&quot;,&quot;Haradrim_Noble&quot;,&quot;Haradrim_Nobles&quot;,tf_harad| tf_mounted| tfg_shield| tfg_armor| tfg_helm| tfg_horse| tfg_boots|tfg_polearm,0,0,fac_harad,[itm_harad_dragon_helm,itm_harad_heavy_good,itm_leather_gloves,itm_harad_lamellar_greaves,itm_harad_long_spear,itm_harad_heavy_sword_good,itm_harad_yellow_shield,itm_harad_warhorse],attr_evil_tier_6,wp_tier_6,knows_common|knows_ironflesh_7|knows_power_strike_5|knows_shield_3|knows_riding_7,haradrim_face_1,haradrim_face_2]," calcext:value-type="string">
            <text:p>["harad_captain","Haradrim_Noble","Haradrim_Nobles",tf_harad| tf_mounted| tfg_shield| tfg_armor| tfg_helm| tfg_horse| tfg_boots|tfg_polearm,0,0,fac_harad,[itm_harad_dragon_helm,itm_harad_heavy_good,itm_leather_gloves,itm_harad_lamellar_greaves,itm_harad_long_spear,itm_harad_heavy_sword_good,itm_harad_yellow_shield,itm_harad_warhorse],attr_evil_tier_6,wp_tier_6,knows_common|knows_ironflesh_7|knows_power_strike_5|knows_shield_3|knows_riding_7,haradrim_face_1,haradrim_face_2],</text:p>
          </table:table-cell>
          <table:table-cell table:number-columns-repeated="16362"/>
        </table:table-row>
        <table:table-row table:style-name="ro1">
          <table:table-cell table:style-name="ce6" table:formula="of:=IF(AND([.B475]&lt;&gt;&quot;&quot;;[.C475]&lt;&gt;&quot;&quot;);CONCATENATE([Variables.$I$1];[Variables.$I$7];[.B475];[Variables.$I$7];[Variables.$I$6];[Variables.$I$7];[.C475];[Variables.$I$7];[Variables.$I$6];[Variables.$I$7];[.D475];[Variables.$I$7];[Variables.$I$6];[.E475];[Variables.$I$6];[.F475];[Variables.$I$6];[.G475];[Variables.$I$6];[.H475];[Variables.$I$6];[Variables.$I$1];[.I475];[.J475];[.K475];[.L475];[.M475];[.N475];[.O475];[Variables.$I$2];[Variables.$I$6];[.P475];[Variables.$I$6];[.Q475];[Variables.$I$6];[.R475];[Variables.$I$6];[.S475];[Variables.$I$6];[.T475];IF([.U475]&lt;&gt;&quot;&quot;;CONCATENATE([Variables.$I$6];[.U475]);&quot;&quot;);[Variables.$I$2];[Variables.$I$6]);IF([.B475]&lt;&gt;&quot;&quot;;CONCATENATE(&quot;#&quot;;[.B475]);&quot;&quot;))" office:value-type="string" office:string-value="[&quot;a5_dun_night_wolf2&quot;,&quot;Dunnish_Night_Wolf&quot;,&quot;Dunnish_Night_Wolf&quot;,tf_dunland| tf_randomize_face| tfg_shield| tfg_armor| tfg_boots| tfg_ranged,0,0,fac_dunland,[itm_dun_helm_a, itm_wilderness_cowl,itm_dunland_mail_1, itm_dunland_chieftain_bad,itm_fur_gloves_reward,itm_dunland_wolfboots,itm_leather_boots_dark,itm_dunnish_axe,itm_dunnish_war_axe,itm_dunland_javelin,itm_dunland_javelin,itm_dunland_javelin,itm_dunland_javelin,itm_dunland_javelin,itm_dun_shield_a,],attr_evil_tier_6,wp_tier_5,knows_common|knows_athletics_7|knows_shield_3|knows_power_strike_3|knows_ironflesh_2|knows_power_throw_7,dunland_face1,dunland_face2]," calcext:value-type="string">
            <text:p>["a5_dun_night_wolf2","Dunnish_Night_Wolf","Dunnish_Night_Wolf",tf_dunland| tf_randomize_face| tfg_shield| tfg_armor| tfg_boots| tfg_ranged,0,0,fac_dunland,[itm_dun_helm_a, itm_wilderness_cowl,itm_dunland_mail_1, itm_dunland_chieftain_bad,itm_fur_gloves_reward,itm_dunland_wolfboots,itm_leather_boots_dark,itm_dunnish_axe,itm_dunnish_war_axe,itm_dunland_javelin,itm_dunland_javelin,itm_dunland_javelin,itm_dunland_javelin,itm_dunland_javelin,itm_dun_shield_a,],attr_evil_tier_6,wp_tier_5,knows_common|knows_athletics_7|knows_shield_3|knows_power_strike_3|knows_ironflesh_2|knows_power_throw_7,dunland_face1,dunland_face2],</text:p>
          </table:table-cell>
          <table:table-cell table:style-name="ce7" office:value-type="string" calcext:value-type="string">
            <text:p>a5_dun_night_wolf2</text:p>
          </table:table-cell>
          <table:table-cell table:number-columns-repeated="2" table:style-name="ce7" office:value-type="string" calcext:value-type="string">
            <text:p>Dunnish_Night_Wolf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unland</text:p>
          </table:table-cell>
          <table:table-cell table:style-name="ce11" office:value-type="string" calcext:value-type="string">
            <text:p>itm_dun_helm_a, itm_wilderness_cowl,</text:p>
          </table:table-cell>
          <table:table-cell table:style-name="ce11" office:value-type="string" calcext:value-type="string">
            <text:p>itm_dunland_mail_1, itm_dunland_chieftain_bad,</text:p>
          </table:table-cell>
          <table:table-cell table:style-name="ce11" office:value-type="string" calcext:value-type="string">
            <text:p>itm_fur_gloves_reward,</text:p>
          </table:table-cell>
          <table:table-cell table:style-name="ce11" office:value-type="string" calcext:value-type="string">
            <text:p>itm_dunland_wolfboots,itm_leather_boots_dark,</text:p>
          </table:table-cell>
          <table:table-cell table:style-name="ce11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1" office:value-type="string" calcext:value-type="string">
            <text:p>itm_dun_shield_a,</text:p>
          </table:table-cell>
          <table:table-cell table:style-name="ce11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7|knows_shield_3|knows_power_strike_3|knows_ironflesh_2|knows_power_throw_7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32" table:formula="of:=IF(AND([.B475]&lt;&gt;&quot;&quot;;[.C475]&lt;&gt;&quot;&quot;);CONCATENATE([Variables.$I$1];[Variables.$I$7];[.B475];[Variables.$I$7];[Variables.$I$6];[Variables.$I$7];[.C475];[Variables.$I$7];[Variables.$I$6];[Variables.$I$7];[.D475];[Variables.$I$7];[Variables.$I$6];[.E475];[Variables.$I$6];[.F475];[Variables.$I$6];[.G475];[Variables.$I$6];[.H475];[Variables.$I$6];[Variables.$I$1];[.I475];[.J475];[.K475];[.L475];[.M475];[.N475];[.O475];[Variables.$I$2];[Variables.$I$6];[.P475];[Variables.$I$6];[.Q475];[Variables.$I$6];[.R475];[Variables.$I$6];[.S475];[Variables.$I$6];[.T475];IF([.U475]&lt;&gt;&quot;&quot;;CONCATENATE([Variables.$I$6];[.U475]);&quot;&quot;);[Variables.$I$2];[Variables.$I$6]);IF([.B475]&lt;&gt;&quot;&quot;;CONCATENATE(&quot;#&quot;;[.B475]);&quot;&quot;))" office:value-type="string" office:string-value="[&quot;a5_dun_night_wolf2&quot;,&quot;Dunnish_Night_Wolf&quot;,&quot;Dunnish_Night_Wolf&quot;,tf_dunland| tf_randomize_face| tfg_shield| tfg_armor| tfg_boots| tfg_ranged,0,0,fac_dunland,[itm_dun_helm_a, itm_wilderness_cowl,itm_dunland_mail_1, itm_dunland_chieftain_bad,itm_fur_gloves_reward,itm_dunland_wolfboots,itm_leather_boots_dark,itm_dunnish_axe,itm_dunnish_war_axe,itm_dunland_javelin,itm_dunland_javelin,itm_dunland_javelin,itm_dunland_javelin,itm_dunland_javelin,itm_dun_shield_a,],attr_evil_tier_6,wp_tier_5,knows_common|knows_athletics_7|knows_shield_3|knows_power_strike_3|knows_ironflesh_2|knows_power_throw_7,dunland_face1,dunland_face2]," calcext:value-type="string">
            <text:p>["a5_dun_night_wolf2","Dunnish_Night_Wolf","Dunnish_Night_Wolf",tf_dunland| tf_randomize_face| tfg_shield| tfg_armor| tfg_boots| tfg_ranged,0,0,fac_dunland,[itm_dun_helm_a, itm_wilderness_cowl,itm_dunland_mail_1, itm_dunland_chieftain_bad,itm_fur_gloves_reward,itm_dunland_wolfboots,itm_leather_boots_dark,itm_dunnish_axe,itm_dunnish_war_axe,itm_dunland_javelin,itm_dunland_javelin,itm_dunland_javelin,itm_dunland_javelin,itm_dunland_javelin,itm_dun_shield_a,],attr_evil_tier_6,wp_tier_5,knows_common|knows_athletics_7|knows_shield_3|knows_power_strike_3|knows_ironflesh_2|knows_power_throw_7,dunland_face1,dunland_face2],</text:p>
          </table:table-cell>
          <table:table-cell table:number-columns-repeated="16362"/>
        </table:table-row>
        <table:table-row table:style-name="ro1">
          <table:table-cell table:style-name="ce6" table:formula="of:=IF(AND([.B476]&lt;&gt;&quot;&quot;;[.C476]&lt;&gt;&quot;&quot;);CONCATENATE([Variables.$I$1];[Variables.$I$7];[.B476];[Variables.$I$7];[Variables.$I$6];[Variables.$I$7];[.C476];[Variables.$I$7];[Variables.$I$6];[Variables.$I$7];[.D476];[Variables.$I$7];[Variables.$I$6];[.E476];[Variables.$I$6];[.F476];[Variables.$I$6];[.G476];[Variables.$I$6];[.H476];[Variables.$I$6];[Variables.$I$1];[.I476];[.J476];[.K476];[.L476];[.M476];[.N476];[.O476];[Variables.$I$2];[Variables.$I$6];[.P476];[Variables.$I$6];[.Q476];[Variables.$I$6];[.R476];[Variables.$I$6];[.S476];[Variables.$I$6];[.T476];IF([.U476]&lt;&gt;&quot;&quot;;CONCATENATE([Variables.$I$6];[.U476]);&quot;&quot;);[Variables.$I$2];[Variables.$I$6]);IF([.B476]&lt;&gt;&quot;&quot;;CONCATENATE(&quot;#&quot;;[.B476]);&quot;&quot;))" office:value-type="string" office:string-value="[&quot;dun_captain&quot;,&quot;Dunnish_Hetman&quot;,&quot;Dunnish_Hetmen&quot;,tf_dunland| tf_randomize_face| tfg_shield| tfg_armor| tfg_helm| tfg_boots,0,0,fac_dunland,[itm_dun_helm_a, itm_dun_helm_c,itm_dunland_mail_1_good, itm_dunland_mail_2_good,itm_dunland_chieftain_good,itm_leather_gloves,itm_fur_gloves_reward,itm_dunland_wolfboots,itm_leather_boots_dark,itm_dunnish_war_axe,itm_dun_berserker,itm_dun_shield_a,],attr_evil_tier_6,wp_tier_6,knows_common|knows_athletics_8|knows_shield_5|knows_power_strike_6|knows_ironflesh_6,dunland_face1,dunland_face2]," calcext:value-type="string">
            <text:p>["dun_captain","Dunnish_Hetman","Dunnish_Hetmen",tf_dunland| tf_randomize_face| tfg_shield| tfg_armor| tfg_helm| tfg_boots,0,0,fac_dunland,[itm_dun_helm_a, itm_dun_helm_c,itm_dunland_mail_1_good, itm_dunland_mail_2_good,itm_dunland_chieftain_good,itm_leather_gloves,itm_fur_gloves_reward,itm_dunland_wolfboots,itm_leather_boots_dark,itm_dunnish_war_axe,itm_dun_berserker,itm_dun_shield_a,],attr_evil_tier_6,wp_tier_6,knows_common|knows_athletics_8|knows_shield_5|knows_power_strike_6|knows_ironflesh_6,dunland_face1,dunland_face2],</text:p>
          </table:table-cell>
          <table:table-cell table:style-name="ce7" office:value-type="string" calcext:value-type="string">
            <text:p>dun_captain</text:p>
          </table:table-cell>
          <table:table-cell table:style-name="ce7" office:value-type="string" calcext:value-type="string">
            <text:p>Dunnish_Hetman</text:p>
          </table:table-cell>
          <table:table-cell table:style-name="ce7" office:value-type="string" calcext:value-type="string">
            <text:p>Dunnish_Hetmen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unland</text:p>
          </table:table-cell>
          <table:table-cell table:style-name="ce11" office:value-type="string" calcext:value-type="string">
            <text:p>itm_dun_helm_a, itm_dun_helm_c,</text:p>
          </table:table-cell>
          <table:table-cell table:style-name="ce11" office:value-type="string" calcext:value-type="string">
            <text:p>itm_dunland_mail_1_good, itm_dunland_mail_2_good,itm_dunland_chieftain_good,</text:p>
          </table:table-cell>
          <table:table-cell table:style-name="ce11" office:value-type="string" calcext:value-type="string">
            <text:p>itm_leather_gloves,itm_fur_gloves_reward,</text:p>
          </table:table-cell>
          <table:table-cell table:style-name="ce11" office:value-type="string" calcext:value-type="string">
            <text:p>itm_dunland_wolfboots,itm_leather_boots_dark,</text:p>
          </table:table-cell>
          <table:table-cell table:style-name="ce11" office:value-type="string" calcext:value-type="string">
            <text:p>itm_dunnish_war_axe,itm_dun_berserker,</text:p>
          </table:table-cell>
          <table:table-cell table:style-name="ce11" office:value-type="string" calcext:value-type="string">
            <text:p>itm_dun_shield_a,</text:p>
          </table:table-cell>
          <table:table-cell table:style-name="ce11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8|knows_shield_5|knows_power_strike_6|knows_ironflesh_6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32" table:formula="of:=IF(AND([.B476]&lt;&gt;&quot;&quot;;[.C476]&lt;&gt;&quot;&quot;);CONCATENATE([Variables.$I$1];[Variables.$I$7];[.B476];[Variables.$I$7];[Variables.$I$6];[Variables.$I$7];[.C476];[Variables.$I$7];[Variables.$I$6];[Variables.$I$7];[.D476];[Variables.$I$7];[Variables.$I$6];[.E476];[Variables.$I$6];[.F476];[Variables.$I$6];[.G476];[Variables.$I$6];[.H476];[Variables.$I$6];[Variables.$I$1];[.I476];[.J476];[.K476];[.L476];[.M476];[.N476];[.O476];[Variables.$I$2];[Variables.$I$6];[.P476];[Variables.$I$6];[.Q476];[Variables.$I$6];[.R476];[Variables.$I$6];[.S476];[Variables.$I$6];[.T476];IF([.U476]&lt;&gt;&quot;&quot;;CONCATENATE([Variables.$I$6];[.U476]);&quot;&quot;);[Variables.$I$2];[Variables.$I$6]);IF([.B476]&lt;&gt;&quot;&quot;;CONCATENATE(&quot;#&quot;;[.B476]);&quot;&quot;))" office:value-type="string" office:string-value="[&quot;dun_captain&quot;,&quot;Dunnish_Hetman&quot;,&quot;Dunnish_Hetmen&quot;,tf_dunland| tf_randomize_face| tfg_shield| tfg_armor| tfg_helm| tfg_boots,0,0,fac_dunland,[itm_dun_helm_a, itm_dun_helm_c,itm_dunland_mail_1_good, itm_dunland_mail_2_good,itm_dunland_chieftain_good,itm_leather_gloves,itm_fur_gloves_reward,itm_dunland_wolfboots,itm_leather_boots_dark,itm_dunnish_war_axe,itm_dun_berserker,itm_dun_shield_a,],attr_evil_tier_6,wp_tier_6,knows_common|knows_athletics_8|knows_shield_5|knows_power_strike_6|knows_ironflesh_6,dunland_face1,dunland_face2]," calcext:value-type="string">
            <text:p>["dun_captain","Dunnish_Hetman","Dunnish_Hetmen",tf_dunland| tf_randomize_face| tfg_shield| tfg_armor| tfg_helm| tfg_boots,0,0,fac_dunland,[itm_dun_helm_a, itm_dun_helm_c,itm_dunland_mail_1_good, itm_dunland_mail_2_good,itm_dunland_chieftain_good,itm_leather_gloves,itm_fur_gloves_reward,itm_dunland_wolfboots,itm_leather_boots_dark,itm_dunnish_war_axe,itm_dun_berserker,itm_dun_shield_a,],attr_evil_tier_6,wp_tier_6,knows_common|knows_athletics_8|knows_shield_5|knows_power_strike_6|knows_ironflesh_6,dunland_face1,dunland_face2],</text:p>
          </table:table-cell>
          <table:table-cell table:number-columns-repeated="16362"/>
        </table:table-row>
        <table:table-row table:style-name="ro1">
          <table:table-cell table:style-name="ce6" table:formula="of:=IF(AND([.B477]&lt;&gt;&quot;&quot;;[.C477]&lt;&gt;&quot;&quot;);CONCATENATE([Variables.$I$1];[Variables.$I$7];[.B477];[Variables.$I$7];[Variables.$I$6];[Variables.$I$7];[.C477];[Variables.$I$7];[Variables.$I$6];[Variables.$I$7];[.D477];[Variables.$I$7];[Variables.$I$6];[.E477];[Variables.$I$6];[.F477];[Variables.$I$6];[.G477];[Variables.$I$6];[.H477];[Variables.$I$6];[Variables.$I$1];[.I477];[.J477];[.K477];[.L477];[.M477];[.N477];[.O477];[Variables.$I$2];[Variables.$I$6];[.P477];[Variables.$I$6];[.Q477];[Variables.$I$6];[.R477];[Variables.$I$6];[.S477];[Variables.$I$6];[.T477];IF([.U477]&lt;&gt;&quot;&quot;;CONCATENATE([Variables.$I$6];[.U477]);&quot;&quot;);[Variables.$I$2];[Variables.$I$6]);IF([.B477]&lt;&gt;&quot;&quot;;CONCATENATE(&quot;#&quot;;[.B477]);&quot;&quot;))" office:value-type="string" office:string-value="[&quot;gunda_captain&quot;,&quot;Gundabad_Chieftain&quot;,&quot;Gundabad_Chieftains&quot;,tf_orc| tf_mounted| tfg_armor| tfg_shield| tfg_helm| tfg_horse| tfg_boots|tfg_gloves| tf_no_capture_alive,0,0,fac_gundabad,[itm_gundabad_helm_e,itm_gundabad_armor_e, itm_evil_gauntlets_a,itm_orc_furboots,itm_orc_sabre_heavy,itm_orc_scimitar_heavy,itm_orc_skull_spear,itm_orc_club_b,itm_orc_club_b_heavy,itm_orc_bastard_scimitar_bad,itm_orc_shield_b,itm_orc_shield_b,itm_wargarmored_3a,],attr_orc_tier_6,wp_orc_tier_6,knows_common|knows_athletics_7|knows_riding_6|knows_power_strike_5|knows_ironflesh_8,orc_face3,orc_face6]," calcext:value-type="string">
            <text:p>["gunda_captain","Gundabad_Chieftain","Gundabad_Chieftains",tf_orc| tf_mounted| tfg_armor| tfg_shield| tfg_helm| tfg_horse| tfg_boots|tfg_gloves| tf_no_capture_alive,0,0,fac_gundabad,[itm_gundabad_helm_e,itm_gundabad_armor_e, itm_evil_gauntlets_a,itm_orc_furboots,itm_orc_sabre_heavy,itm_orc_scimitar_heavy,itm_orc_skull_spear,itm_orc_club_b,itm_orc_club_b_heavy,itm_orc_bastard_scimitar_bad,itm_orc_shield_b,itm_orc_shield_b,itm_wargarmored_3a,],attr_orc_tier_6,wp_orc_tier_6,knows_common|knows_athletics_7|knows_riding_6|knows_power_strike_5|knows_ironflesh_8,orc_face3,orc_face6],</text:p>
          </table:table-cell>
          <table:table-cell table:style-name="ce7" office:value-type="string" calcext:value-type="string">
            <text:p>gunda_captain</text:p>
          </table:table-cell>
          <table:table-cell table:style-name="ce7" office:value-type="string" calcext:value-type="string">
            <text:p>Gundabad_Chieftain</text:p>
          </table:table-cell>
          <table:table-cell table:style-name="ce7" office:value-type="string" calcext:value-type="string">
            <text:p>Gundabad_Chieftain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undabad</text:p>
          </table:table-cell>
          <table:table-cell table:style-name="ce11" office:value-type="string" calcext:value-type="string">
            <text:p>itm_gundabad_helm_e,</text:p>
          </table:table-cell>
          <table:table-cell table:style-name="ce11" office:value-type="string" calcext:value-type="string">
            <text:p>itm_gundabad_armor_e,</text:p>
          </table:table-cell>
          <table:table-cell table:style-name="ce11" office:value-type="string" calcext:value-type="string">
            <text:p><text:s/>itm_evil_gauntlets_a,</text:p>
          </table:table-cell>
          <table:table-cell table:style-name="ce11" office:value-type="string" calcext:value-type="string">
            <text:p>itm_orc_furboots,</text:p>
          </table:table-cell>
          <table:table-cell table:style-name="ce11" office:value-type="string" calcext:value-type="string">
            <text:p>itm_orc_sabre_heavy,itm_orc_scimitar_heavy,itm_orc_skull_spear,itm_orc_club_b,itm_orc_club_b_heavy,itm_orc_bastard_scimitar_bad,</text:p>
          </table:table-cell>
          <table:table-cell table:style-name="ce11" office:value-type="string" calcext:value-type="string">
            <text:p>itm_orc_shield_b,itm_orc_shield_b,</text:p>
          </table:table-cell>
          <table:table-cell table:style-name="ce11" office:value-type="string" calcext:value-type="string">
            <text:p>itm_wargarmored_3a,</text:p>
          </table:table-cell>
          <table:table-cell table:style-name="ce12" office:value-type="string" calcext:value-type="string">
            <text:p>attr_orc_tier_6</text:p>
          </table:table-cell>
          <table:table-cell table:style-name="ce12" office:value-type="string" calcext:value-type="string">
            <text:p>wp_orc_tier_6</text:p>
          </table:table-cell>
          <table:table-cell table:style-name="ce12" office:value-type="string" calcext:value-type="string">
            <text:p>knows_common|knows_athletics_7|knows_riding_6|knows_power_strike_5|knows_ironflesh_8</text:p>
          </table:table-cell>
          <table:table-cell table:style-name="ce14" office:value-type="string" calcext:value-type="string">
            <text:p>orc_face3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32" table:formula="of:=IF(AND([.B477]&lt;&gt;&quot;&quot;;[.C477]&lt;&gt;&quot;&quot;);CONCATENATE([Variables.$I$1];[Variables.$I$7];[.B477];[Variables.$I$7];[Variables.$I$6];[Variables.$I$7];[.C477];[Variables.$I$7];[Variables.$I$6];[Variables.$I$7];[.D477];[Variables.$I$7];[Variables.$I$6];[.E477];[Variables.$I$6];[.F477];[Variables.$I$6];[.G477];[Variables.$I$6];[.H477];[Variables.$I$6];[Variables.$I$1];[.I477];[.J477];[.K477];[.L477];[.M477];[.N477];[.O477];[Variables.$I$2];[Variables.$I$6];[.P477];[Variables.$I$6];[.Q477];[Variables.$I$6];[.R477];[Variables.$I$6];[.S477];[Variables.$I$6];[.T477];IF([.U477]&lt;&gt;&quot;&quot;;CONCATENATE([Variables.$I$6];[.U477]);&quot;&quot;);[Variables.$I$2];[Variables.$I$6]);IF([.B477]&lt;&gt;&quot;&quot;;CONCATENATE(&quot;#&quot;;[.B477]);&quot;&quot;))" office:value-type="string" office:string-value="[&quot;gunda_captain&quot;,&quot;Gundabad_Chieftain&quot;,&quot;Gundabad_Chieftains&quot;,tf_orc| tf_mounted| tfg_armor| tfg_shield| tfg_helm| tfg_horse| tfg_boots|tfg_gloves| tf_no_capture_alive,0,0,fac_gundabad,[itm_gundabad_helm_e,itm_gundabad_armor_e, itm_evil_gauntlets_a,itm_orc_furboots,itm_orc_sabre_heavy,itm_orc_scimitar_heavy,itm_orc_skull_spear,itm_orc_club_b,itm_orc_club_b_heavy,itm_orc_bastard_scimitar_bad,itm_orc_shield_b,itm_orc_shield_b,itm_wargarmored_3a,],attr_orc_tier_6,wp_orc_tier_6,knows_common|knows_athletics_7|knows_riding_6|knows_power_strike_5|knows_ironflesh_8,orc_face3,orc_face6]," calcext:value-type="string">
            <text:p>["gunda_captain","Gundabad_Chieftain","Gundabad_Chieftains",tf_orc| tf_mounted| tfg_armor| tfg_shield| tfg_helm| tfg_horse| tfg_boots|tfg_gloves| tf_no_capture_alive,0,0,fac_gundabad,[itm_gundabad_helm_e,itm_gundabad_armor_e, itm_evil_gauntlets_a,itm_orc_furboots,itm_orc_sabre_heavy,itm_orc_scimitar_heavy,itm_orc_skull_spear,itm_orc_club_b,itm_orc_club_b_heavy,itm_orc_bastard_scimitar_bad,itm_orc_shield_b,itm_orc_shield_b,itm_wargarmored_3a,],attr_orc_tier_6,wp_orc_tier_6,knows_common|knows_athletics_7|knows_riding_6|knows_power_strike_5|knows_ironflesh_8,orc_face3,orc_face6],</text:p>
          </table:table-cell>
          <table:table-cell table:number-columns-repeated="16362"/>
        </table:table-row>
        <table:table-row table:style-name="ro1">
          <table:table-cell table:style-name="ce6" table:formula="of:=IF(AND([.B478]&lt;&gt;&quot;&quot;;[.C478]&lt;&gt;&quot;&quot;);CONCATENATE([Variables.$I$1];[Variables.$I$7];[.B478];[Variables.$I$7];[Variables.$I$6];[Variables.$I$7];[.C478];[Variables.$I$7];[Variables.$I$6];[Variables.$I$7];[.D478];[Variables.$I$7];[Variables.$I$6];[.E478];[Variables.$I$6];[.F478];[Variables.$I$6];[.G478];[Variables.$I$6];[.H478];[Variables.$I$6];[Variables.$I$1];[.I478];[.J478];[.K478];[.L478];[.M478];[.N478];[.O478];[Variables.$I$2];[Variables.$I$6];[.P478];[Variables.$I$6];[.Q478];[Variables.$I$6];[.R478];[Variables.$I$6];[.S478];[Variables.$I$6];[.T478];IF([.U478]&lt;&gt;&quot;&quot;;CONCATENATE([Variables.$I$6];[.U478]);&quot;&quot;);[Variables.$I$2];[Variables.$I$6]);IF([.B478]&lt;&gt;&quot;&quot;;CONCATENATE(&quot;#&quot;;[.B478]);&quot;&quot;))" office:value-type="string" office:string-value="[&quot;gondor_captain&quot;,&quot;Captain_of_Gondor&quot;,&quot;Captains_of_Gondor&quot;,tf_gondor| tf_mounted| tfg_gloves| tfg_shield| tfg_armor| tfg_helm| tfg_boots,0,0,fac_gondor,[itm_gondor_leader_helm,itm_gon_leader_surcoat_cloak,itm_mail_mittens,itm_gondor_heavy_greaves,itm_gondor_citadel_sword,itm_gondor_shield_e,],attr_tier_6,wp_tier_6,knows_common|knows_riding_8|knows_athletics_4|knows_shield_3|knows_power_strike_5|knows_ironflesh_6,gondor_face1,gondor_face2]," calcext:value-type="string">
            <text:p>["gondor_captain","Captain_of_Gondor","Captains_of_Gondor",tf_gondor| tf_mounted| tfg_gloves| tfg_shield| tfg_armor| tfg_helm| tfg_boots,0,0,fac_gondor,[itm_gondor_leader_helm,itm_gon_leader_surcoat_cloak,itm_mail_mittens,itm_gondor_heavy_greaves,itm_gondor_citadel_sword,itm_gondor_shield_e,],attr_tier_6,wp_tier_6,knows_common|knows_riding_8|knows_athletics_4|knows_shield_3|knows_power_strike_5|knows_ironflesh_6,gondor_face1,gondor_face2],</text:p>
          </table:table-cell>
          <table:table-cell table:style-name="ce7" office:value-type="string" calcext:value-type="string">
            <text:p>gondor_captain</text:p>
          </table:table-cell>
          <table:table-cell table:style-name="ce7" office:value-type="string" calcext:value-type="string">
            <text:p>Captain_of_Gondor</text:p>
          </table:table-cell>
          <table:table-cell table:style-name="ce7" office:value-type="string" calcext:value-type="string">
            <text:p>Captains_of_Gondor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gondor_leader_helm,</text:p>
          </table:table-cell>
          <table:table-cell table:style-name="ce11" office:value-type="string" calcext:value-type="string">
            <text:p>itm_gon_leader_surcoat_cloak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gondor_heavy_greaves,</text:p>
          </table:table-cell>
          <table:table-cell table:style-name="ce11" office:value-type="string" calcext:value-type="string">
            <text:p>itm_gondor_citadel_sword,</text:p>
          </table:table-cell>
          <table:table-cell table:style-name="ce11" office:value-type="string" calcext:value-type="string">
            <text:p>itm_gondor_shield_e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8|knows_athletics_4|knows_shield_3|knows_power_strike_5|knows_ironflesh_6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32" table:formula="of:=IF(AND([.B478]&lt;&gt;&quot;&quot;;[.C478]&lt;&gt;&quot;&quot;);CONCATENATE([Variables.$I$1];[Variables.$I$7];[.B478];[Variables.$I$7];[Variables.$I$6];[Variables.$I$7];[.C478];[Variables.$I$7];[Variables.$I$6];[Variables.$I$7];[.D478];[Variables.$I$7];[Variables.$I$6];[.E478];[Variables.$I$6];[.F478];[Variables.$I$6];[.G478];[Variables.$I$6];[.H478];[Variables.$I$6];[Variables.$I$1];[.I478];[.J478];[.K478];[.L478];[.M478];[.N478];[.O478];[Variables.$I$2];[Variables.$I$6];[.P478];[Variables.$I$6];[.Q478];[Variables.$I$6];[.R478];[Variables.$I$6];[.S478];[Variables.$I$6];[.T478];IF([.U478]&lt;&gt;&quot;&quot;;CONCATENATE([Variables.$I$6];[.U478]);&quot;&quot;);[Variables.$I$2];[Variables.$I$6]);IF([.B478]&lt;&gt;&quot;&quot;;CONCATENATE(&quot;#&quot;;[.B478]);&quot;&quot;))" office:value-type="string" office:string-value="[&quot;gondor_captain&quot;,&quot;Captain_of_Gondor&quot;,&quot;Captains_of_Gondor&quot;,tf_gondor| tf_mounted| tfg_gloves| tfg_shield| tfg_armor| tfg_helm| tfg_boots,0,0,fac_gondor,[itm_gondor_leader_helm,itm_gon_leader_surcoat_cloak,itm_mail_mittens,itm_gondor_heavy_greaves,itm_gondor_citadel_sword,itm_gondor_shield_e,],attr_tier_6,wp_tier_6,knows_common|knows_riding_8|knows_athletics_4|knows_shield_3|knows_power_strike_5|knows_ironflesh_6,gondor_face1,gondor_face2]," calcext:value-type="string">
            <text:p>["gondor_captain","Captain_of_Gondor","Captains_of_Gondor",tf_gondor| tf_mounted| tfg_gloves| tfg_shield| tfg_armor| tfg_helm| tfg_boots,0,0,fac_gondor,[itm_gondor_leader_helm,itm_gon_leader_surcoat_cloak,itm_mail_mittens,itm_gondor_heavy_greaves,itm_gondor_citadel_sword,itm_gondor_shield_e,],attr_tier_6,wp_tier_6,knows_common|knows_riding_8|knows_athletics_4|knows_shield_3|knows_power_strike_5|knows_ironflesh_6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479]&lt;&gt;&quot;&quot;;[.C479]&lt;&gt;&quot;&quot;);CONCATENATE([Variables.$I$1];[Variables.$I$7];[.B479];[Variables.$I$7];[Variables.$I$6];[Variables.$I$7];[.C479];[Variables.$I$7];[Variables.$I$6];[Variables.$I$7];[.D479];[Variables.$I$7];[Variables.$I$6];[.E479];[Variables.$I$6];[.F479];[Variables.$I$6];[.G479];[Variables.$I$6];[.H479];[Variables.$I$6];[Variables.$I$1];[.I479];[.J479];[.K479];[.L479];[.M479];[.N479];[.O479];[Variables.$I$2];[Variables.$I$6];[.P479];[Variables.$I$6];[.Q479];[Variables.$I$6];[.R479];[Variables.$I$6];[.S479];[Variables.$I$6];[.T479];IF([.U479]&lt;&gt;&quot;&quot;;CONCATENATE([Variables.$I$6];[.U479]);&quot;&quot;);[Variables.$I$2];[Variables.$I$6]);IF([.B479]&lt;&gt;&quot;&quot;;CONCATENATE(&quot;#&quot;;[.B479]);&quot;&quot;))" office:value-type="string" office:string-value="[&quot;pel_captain&quot;,&quot;Captain_of_Pelargir&quot;,&quot;Captains_of_Pelargir&quot;,tf_gondor| tfg_shield| tfg_armor| tfg_helm| tfg_boots,0,subfac_pelargir,fac_gondor,[itm_gondor_leader_helm,itm_pel_leader,itm_mail_mittens,itm_pelargir_greaves,itm_pelargir_sword,itm_gon_tab_shield_c,],attr_tier_6,wp_tier_6,knows_common|knows_athletics_5|knows_shield_9|knows_power_strike_6|knows_ironflesh_6,gondor_face1,gondor_face2]," calcext:value-type="string">
            <text:p>["pel_captain","Captain_of_Pelargir","Captains_of_Pelargir",tf_gondor| tfg_shield| tfg_armor| tfg_helm| tfg_boots,0,subfac_pelargir,fac_gondor,[itm_gondor_leader_helm,itm_pel_leader,itm_mail_mittens,itm_pelargir_greaves,itm_pelargir_sword,itm_gon_tab_shield_c,],attr_tier_6,wp_tier_6,knows_common|knows_athletics_5|knows_shield_9|knows_power_strike_6|knows_ironflesh_6,gondor_face1,gondor_face2],</text:p>
          </table:table-cell>
          <table:table-cell table:style-name="ce7" office:value-type="string" calcext:value-type="string">
            <text:p>pel_captain</text:p>
          </table:table-cell>
          <table:table-cell table:style-name="ce7" office:value-type="string" calcext:value-type="string">
            <text:p>Captain_of_Pelargir</text:p>
          </table:table-cell>
          <table:table-cell table:style-name="ce7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gondor_leader_helm,</text:p>
          </table:table-cell>
          <table:table-cell table:style-name="ce19" office:value-type="string" calcext:value-type="string">
            <text:p>itm_pel_leader,</text:p>
          </table:table-cell>
          <table:table-cell table:style-name="ce11" office:value-type="string" calcext:value-type="string">
            <text:p>itm_mail_mittens,</text:p>
          </table:table-cell>
          <table:table-cell table:style-name="ce19" office:value-type="string" calcext:value-type="string">
            <text:p>itm_pelargir_greaves,</text:p>
          </table:table-cell>
          <table:table-cell table:style-name="ce19" office:value-type="string" calcext:value-type="string">
            <text:p>itm_pelargir_sword,</text:p>
          </table:table-cell>
          <table:table-cell table:style-name="ce11" office:value-type="string" calcext:value-type="string">
            <text:p>itm_gon_tab_shield_c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5|knows_shield_9|knows_power_strike_6|knows_ironflesh_6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32" table:formula="of:=IF(AND([.B479]&lt;&gt;&quot;&quot;;[.C479]&lt;&gt;&quot;&quot;);CONCATENATE([Variables.$I$1];[Variables.$I$7];[.B479];[Variables.$I$7];[Variables.$I$6];[Variables.$I$7];[.C479];[Variables.$I$7];[Variables.$I$6];[Variables.$I$7];[.D479];[Variables.$I$7];[Variables.$I$6];[.E479];[Variables.$I$6];[.F479];[Variables.$I$6];[.G479];[Variables.$I$6];[.H479];[Variables.$I$6];[Variables.$I$1];[.I479];[.J479];[.K479];[.L479];[.M479];[.N479];[.O479];[Variables.$I$2];[Variables.$I$6];[.P479];[Variables.$I$6];[.Q479];[Variables.$I$6];[.R479];[Variables.$I$6];[.S479];[Variables.$I$6];[.T479];IF([.U479]&lt;&gt;&quot;&quot;;CONCATENATE([Variables.$I$6];[.U479]);&quot;&quot;);[Variables.$I$2];[Variables.$I$6]);IF([.B479]&lt;&gt;&quot;&quot;;CONCATENATE(&quot;#&quot;;[.B479]);&quot;&quot;))" office:value-type="string" office:string-value="[&quot;pel_captain&quot;,&quot;Captain_of_Pelargir&quot;,&quot;Captains_of_Pelargir&quot;,tf_gondor| tfg_shield| tfg_armor| tfg_helm| tfg_boots,0,subfac_pelargir,fac_gondor,[itm_gondor_leader_helm,itm_pel_leader,itm_mail_mittens,itm_pelargir_greaves,itm_pelargir_sword,itm_gon_tab_shield_c,],attr_tier_6,wp_tier_6,knows_common|knows_athletics_5|knows_shield_9|knows_power_strike_6|knows_ironflesh_6,gondor_face1,gondor_face2]," calcext:value-type="string">
            <text:p>["pel_captain","Captain_of_Pelargir","Captains_of_Pelargir",tf_gondor| tfg_shield| tfg_armor| tfg_helm| tfg_boots,0,subfac_pelargir,fac_gondor,[itm_gondor_leader_helm,itm_pel_leader,itm_mail_mittens,itm_pelargir_greaves,itm_pelargir_sword,itm_gon_tab_shield_c,],attr_tier_6,wp_tier_6,knows_common|knows_athletics_5|knows_shield_9|knows_power_strike_6|knows_ironflesh_6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480]&lt;&gt;&quot;&quot;;[.C480]&lt;&gt;&quot;&quot;);CONCATENATE([Variables.$I$1];[Variables.$I$7];[.B480];[Variables.$I$7];[Variables.$I$6];[Variables.$I$7];[.C480];[Variables.$I$7];[Variables.$I$6];[Variables.$I$7];[.D480];[Variables.$I$7];[Variables.$I$6];[.E480];[Variables.$I$6];[.F480];[Variables.$I$6];[.G480];[Variables.$I$6];[.H480];[Variables.$I$6];[Variables.$I$1];[.I480];[.J480];[.K480];[.L480];[.M480];[.N480];[.O480];[Variables.$I$2];[Variables.$I$6];[.P480];[Variables.$I$6];[.Q480];[Variables.$I$6];[.R480];[Variables.$I$6];[.S480];[Variables.$I$6];[.T480];IF([.U480]&lt;&gt;&quot;&quot;;CONCATENATE([Variables.$I$6];[.U480]);&quot;&quot;);[Variables.$I$2];[Variables.$I$6]);IF([.B480]&lt;&gt;&quot;&quot;;CONCATENATE(&quot;#&quot;;[.B480]);&quot;&quot;))" office:value-type="string" office:string-value="[&quot;amroth_captain&quot;,&quot;Knight_Captain_of_Dol_Amroth&quot;,&quot;Knights_Captain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8,gondor_face1,gondor_face3]," calcext:value-type="string">
            <text:p>["amroth_captain","Knight_Captain_of_Dol_Amroth","Knights_Captain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8,gondor_face1,gondor_face3],</text:p>
          </table:table-cell>
          <table:table-cell table:style-name="ce7" office:value-type="string" calcext:value-type="string">
            <text:p>amroth_captain</text:p>
          </table:table-cell>
          <table:table-cell table:style-name="ce7" office:value-type="string" calcext:value-type="string">
            <text:p>Knight_Captain_of_Dol_Amroth</text:p>
          </table:table-cell>
          <table:table-cell table:style-name="ce7" office:value-type="string" calcext:value-type="string">
            <text:p>Knights_Captain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gondor_leader_helm,</text:p>
          </table:table-cell>
          <table:table-cell table:style-name="ce19" office:value-type="string" calcext:value-type="string">
            <text:p>itm_dol_very_heavy_mail,</text:p>
          </table:table-cell>
          <table:table-cell table:style-name="ce11" office:value-type="string" calcext:value-type="string">
            <text:p>itm_mail_mittens,</text:p>
          </table:table-cell>
          <table:table-cell table:style-name="ce19" office:value-type="string" calcext:value-type="string">
            <text:p>itm_dol_greaves,</text:p>
          </table:table-cell>
          <table:table-cell table:style-name="ce19" office:value-type="string" calcext:value-type="string">
            <text:p>itm_amroth_bastard,itm_amroth_lance_banner,</text:p>
          </table:table-cell>
          <table:table-cell table:style-name="ce11" office:value-type="string" calcext:value-type="string">
            <text:p>itm_gon_tab_shield_c,</text:p>
          </table:table-cell>
          <table:table-cell table:style-name="ce11" office:value-type="string" calcext:value-type="string">
            <text:p>itm_dol_amroth_warhorse2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8|knows_shield_9|knows_power_strike_8|knows_ironflesh_8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32" table:formula="of:=IF(AND([.B480]&lt;&gt;&quot;&quot;;[.C480]&lt;&gt;&quot;&quot;);CONCATENATE([Variables.$I$1];[Variables.$I$7];[.B480];[Variables.$I$7];[Variables.$I$6];[Variables.$I$7];[.C480];[Variables.$I$7];[Variables.$I$6];[Variables.$I$7];[.D480];[Variables.$I$7];[Variables.$I$6];[.E480];[Variables.$I$6];[.F480];[Variables.$I$6];[.G480];[Variables.$I$6];[.H480];[Variables.$I$6];[Variables.$I$1];[.I480];[.J480];[.K480];[.L480];[.M480];[.N480];[.O480];[Variables.$I$2];[Variables.$I$6];[.P480];[Variables.$I$6];[.Q480];[Variables.$I$6];[.R480];[Variables.$I$6];[.S480];[Variables.$I$6];[.T480];IF([.U480]&lt;&gt;&quot;&quot;;CONCATENATE([Variables.$I$6];[.U480]);&quot;&quot;);[Variables.$I$2];[Variables.$I$6]);IF([.B480]&lt;&gt;&quot;&quot;;CONCATENATE(&quot;#&quot;;[.B480]);&quot;&quot;))" office:value-type="string" office:string-value="[&quot;amroth_captain&quot;,&quot;Knight_Captain_of_Dol_Amroth&quot;,&quot;Knights_Captain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8,gondor_face1,gondor_face3]," calcext:value-type="string">
            <text:p>["amroth_captain","Knight_Captain_of_Dol_Amroth","Knights_Captain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8,gondor_face1,gondor_face3],</text:p>
          </table:table-cell>
          <table:table-cell table:number-columns-repeated="16362"/>
        </table:table-row>
        <table:table-row table:style-name="ro1">
          <table:table-cell table:style-name="ce6" table:formula="of:=IF(AND([.B481]&lt;&gt;&quot;&quot;;[.C481]&lt;&gt;&quot;&quot;);CONCATENATE([Variables.$I$1];[Variables.$I$7];[.B481];[Variables.$I$7];[Variables.$I$6];[Variables.$I$7];[.C481];[Variables.$I$7];[Variables.$I$6];[Variables.$I$7];[.D481];[Variables.$I$7];[Variables.$I$6];[.E481];[Variables.$I$6];[.F481];[Variables.$I$6];[.G481];[Variables.$I$6];[.H481];[Variables.$I$6];[Variables.$I$1];[.I481];[.J481];[.K481];[.L481];[.M481];[.N481];[.O481];[Variables.$I$2];[Variables.$I$6];[.P481];[Variables.$I$6];[.Q481];[Variables.$I$6];[.R481];[Variables.$I$6];[.S481];[Variables.$I$6];[.T481];IF([.U481]&lt;&gt;&quot;&quot;;CONCATENATE([Variables.$I$6];[.U481]);&quot;&quot;);[Variables.$I$2];[Variables.$I$6]);IF([.B481]&lt;&gt;&quot;&quot;;CONCATENATE(&quot;#&quot;;[.B481]);&quot;&quot;))" office:value-type="string" office:string-value="[&quot;lam_captain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7,gondor_face1,gondor_face3]," calcext:value-type="string">
            <text:p>["lam_captain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7,gondor_face1,gondor_face3],</text:p>
          </table:table-cell>
          <table:table-cell table:style-name="ce7" office:value-type="string" calcext:value-type="string">
            <text:p>lam_captain</text:p>
          </table:table-cell>
          <table:table-cell table:style-name="ce7" office:value-type="string" calcext:value-type="string">
            <text:p>Captain_of_Lamedon</text:p>
          </table:table-cell>
          <table:table-cell table:style-name="ce7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gondor_lamedon_leader_helm,</text:p>
          </table:table-cell>
          <table:table-cell table:style-name="ce19" office:value-type="string" calcext:value-type="string">
            <text:p>itm_lamedon_leader_surcoat_cloak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19" office:value-type="string" calcext:value-type="string">
            <text:p>itm_gondor_cav_sword,</text:p>
          </table:table-cell>
          <table:table-cell table:style-name="ce11" office:value-type="string" calcext:value-type="string">
            <text:p>itm_gon_tab_shield_c,</text:p>
          </table:table-cell>
          <table:table-cell table:style-name="ce11" office:value-type="string" calcext:value-type="string">
            <text:p>itm_gondor_lam_horse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8|knows_shield_9|knows_power_strike_8|knows_ironflesh_7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32" table:formula="of:=IF(AND([.B481]&lt;&gt;&quot;&quot;;[.C481]&lt;&gt;&quot;&quot;);CONCATENATE([Variables.$I$1];[Variables.$I$7];[.B481];[Variables.$I$7];[Variables.$I$6];[Variables.$I$7];[.C481];[Variables.$I$7];[Variables.$I$6];[Variables.$I$7];[.D481];[Variables.$I$7];[Variables.$I$6];[.E481];[Variables.$I$6];[.F481];[Variables.$I$6];[.G481];[Variables.$I$6];[.H481];[Variables.$I$6];[Variables.$I$1];[.I481];[.J481];[.K481];[.L481];[.M481];[.N481];[.O481];[Variables.$I$2];[Variables.$I$6];[.P481];[Variables.$I$6];[.Q481];[Variables.$I$6];[.R481];[Variables.$I$6];[.S481];[Variables.$I$6];[.T481];IF([.U481]&lt;&gt;&quot;&quot;;CONCATENATE([Variables.$I$6];[.U481]);&quot;&quot;);[Variables.$I$2];[Variables.$I$6]);IF([.B481]&lt;&gt;&quot;&quot;;CONCATENATE(&quot;#&quot;;[.B481]);&quot;&quot;))" office:value-type="string" office:string-value="[&quot;lam_captain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7,gondor_face1,gondor_face3]," calcext:value-type="string">
            <text:p>["lam_captain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7,gondor_face1,gondor_face3],</text:p>
          </table:table-cell>
          <table:table-cell table:number-columns-repeated="16362"/>
        </table:table-row>
        <table:table-row table:style-name="ro1">
          <table:table-cell table:style-name="ce6" table:formula="of:=IF(AND([.B482]&lt;&gt;&quot;&quot;;[.C482]&lt;&gt;&quot;&quot;);CONCATENATE([Variables.$I$1];[Variables.$I$7];[.B482];[Variables.$I$7];[Variables.$I$6];[Variables.$I$7];[.C482];[Variables.$I$7];[Variables.$I$6];[Variables.$I$7];[.D482];[Variables.$I$7];[Variables.$I$6];[.E482];[Variables.$I$6];[.F482];[Variables.$I$6];[.G482];[Variables.$I$6];[.H482];[Variables.$I$6];[Variables.$I$1];[.I482];[.J482];[.K482];[.L482];[.M482];[.N482];[.O482];[Variables.$I$2];[Variables.$I$6];[.P482];[Variables.$I$6];[.Q482];[Variables.$I$6];[.R482];[Variables.$I$6];[.S482];[Variables.$I$6];[.T482];IF([.U482]&lt;&gt;&quot;&quot;;CONCATENATE([Variables.$I$6];[.U482]);&quot;&quot;);[Variables.$I$2];[Variables.$I$6]);IF([.B482]&lt;&gt;&quot;&quot;;CONCATENATE(&quot;#&quot;;[.B482]);&quot;&quot;))" office:value-type="string" office:string-value="[&quot;loss_captain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athletics_5|knows_shield_9|knows_power_strike_7|knows_ironflesh_7,gondor_face1,gondor_face3]," calcext:value-type="string">
            <text:p>["loss_captain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athletics_5|knows_shield_9|knows_power_strike_7|knows_ironflesh_7,gondor_face1,gondor_face3],</text:p>
          </table:table-cell>
          <table:table-cell table:style-name="ce7" office:value-type="string" calcext:value-type="string">
            <text:p>loss_captain</text:p>
          </table:table-cell>
          <table:table-cell table:style-name="ce7" office:value-type="string" calcext:value-type="string">
            <text:p>Captain_of_Lossarnach</text:p>
          </table:table-cell>
          <table:table-cell table:style-name="ce7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gondor_leader_helm,</text:p>
          </table:table-cell>
          <table:table-cell table:style-name="ce19" office:value-type="string" calcext:value-type="string">
            <text:p>itm_lossarnach_leader,</text:p>
          </table:table-cell>
          <table:table-cell table:style-name="ce11" office:value-type="string" calcext:value-type="string">
            <text:p>itm_mail_mittens,</text:p>
          </table:table-cell>
          <table:table-cell table:style-name="ce19" office:value-type="string" calcext:value-type="string">
            <text:p>itm_lossarnach_greaves,</text:p>
          </table:table-cell>
          <table:table-cell table:style-name="ce19" office:value-type="string" calcext:value-type="string">
            <text:p>itm_gondor_cav_sword,itm_loss_axe,</text:p>
          </table:table-cell>
          <table:table-cell table:style-name="ce11" office:value-type="string" calcext:value-type="string">
            <text:p>itm_gon_tab_shield_a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5|knows_shield_9|knows_power_strike_7|knows_ironflesh_7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32" table:formula="of:=IF(AND([.B482]&lt;&gt;&quot;&quot;;[.C482]&lt;&gt;&quot;&quot;);CONCATENATE([Variables.$I$1];[Variables.$I$7];[.B482];[Variables.$I$7];[Variables.$I$6];[Variables.$I$7];[.C482];[Variables.$I$7];[Variables.$I$6];[Variables.$I$7];[.D482];[Variables.$I$7];[Variables.$I$6];[.E482];[Variables.$I$6];[.F482];[Variables.$I$6];[.G482];[Variables.$I$6];[.H482];[Variables.$I$6];[Variables.$I$1];[.I482];[.J482];[.K482];[.L482];[.M482];[.N482];[.O482];[Variables.$I$2];[Variables.$I$6];[.P482];[Variables.$I$6];[.Q482];[Variables.$I$6];[.R482];[Variables.$I$6];[.S482];[Variables.$I$6];[.T482];IF([.U482]&lt;&gt;&quot;&quot;;CONCATENATE([Variables.$I$6];[.U482]);&quot;&quot;);[Variables.$I$2];[Variables.$I$6]);IF([.B482]&lt;&gt;&quot;&quot;;CONCATENATE(&quot;#&quot;;[.B482]);&quot;&quot;))" office:value-type="string" office:string-value="[&quot;loss_captain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athletics_5|knows_shield_9|knows_power_strike_7|knows_ironflesh_7,gondor_face1,gondor_face3]," calcext:value-type="string">
            <text:p>["loss_captain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athletics_5|knows_shield_9|knows_power_strike_7|knows_ironflesh_7,gondor_face1,gondor_face3],</text:p>
          </table:table-cell>
          <table:table-cell table:number-columns-repeated="16362"/>
        </table:table-row>
        <table:table-row table:style-name="ro1">
          <table:table-cell table:style-name="ce6" table:formula="of:=IF(AND([.B483]&lt;&gt;&quot;&quot;;[.C483]&lt;&gt;&quot;&quot;);CONCATENATE([Variables.$I$1];[Variables.$I$7];[.B483];[Variables.$I$7];[Variables.$I$6];[Variables.$I$7];[.C483];[Variables.$I$7];[Variables.$I$6];[Variables.$I$7];[.D483];[Variables.$I$7];[Variables.$I$6];[.E483];[Variables.$I$6];[.F483];[Variables.$I$6];[.G483];[Variables.$I$6];[.H483];[Variables.$I$6];[Variables.$I$1];[.I483];[.J483];[.K483];[.L483];[.M483];[.N483];[.O483];[Variables.$I$2];[Variables.$I$6];[.P483];[Variables.$I$6];[.Q483];[Variables.$I$6];[.R483];[Variables.$I$6];[.S483];[Variables.$I$6];[.T483];IF([.U483]&lt;&gt;&quot;&quot;;CONCATENATE([Variables.$I$6];[.U483]);&quot;&quot;);[Variables.$I$2];[Variables.$I$6]);IF([.B483]&lt;&gt;&quot;&quot;;CONCATENATE(&quot;#&quot;;[.B483]);&quot;&quot;))" office:value-type="string" office:string-value="[&quot;pinnath_captain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heavy_greaves,itm_gondor_cav_sword,itm_gon_tab_shield_c,itm_gondor_warhorse,],attr_tier_6,wp_tier_6,knows_common|knows_riding_8|knows_shield_9|knows_power_strike_6|knows_ironflesh_6,gondor_face1,gondor_face3]," calcext:value-type="string">
            <text:p>["pinnath_captain","Captain_of_Pinnath_Gelin","Captains_of_Pinnath_Gelin",tf_gondor| tf_mounted| tfg_shield| tfg_armor| tfg_helm| tfg_horse| tfg_boots,0,subfac_pinnath_gelin,fac_gondor,[itm_gondor_leader_helm,itm_pinnath_leader,itm_mail_mittens,itm_gondor_med_greaves,itm_gondor_heavy_greaves,itm_gondor_cav_sword,itm_gon_tab_shield_c,itm_gondor_warhorse,],attr_tier_6,wp_tier_6,knows_common|knows_riding_8|knows_shield_9|knows_power_strike_6|knows_ironflesh_6,gondor_face1,gondor_face3],</text:p>
          </table:table-cell>
          <table:table-cell table:style-name="ce7" office:value-type="string" calcext:value-type="string">
            <text:p>pinnath_captain</text:p>
          </table:table-cell>
          <table:table-cell table:style-name="ce7" office:value-type="string" calcext:value-type="string">
            <text:p>Captain_of_Pinnath_Gelin</text:p>
          </table:table-cell>
          <table:table-cell table:style-name="ce7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gondor_leader_helm,</text:p>
          </table:table-cell>
          <table:table-cell table:style-name="ce11" office:value-type="string" calcext:value-type="string">
            <text:p>itm_pinnath_leader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gondor_med_greaves,itm_gondor_heavy_greaves,</text:p>
          </table:table-cell>
          <table:table-cell table:style-name="ce11" office:value-type="string" calcext:value-type="string">
            <text:p>itm_gondor_cav_sword,</text:p>
          </table:table-cell>
          <table:table-cell table:style-name="ce11" office:value-type="string" calcext:value-type="string">
            <text:p>itm_gon_tab_shield_c,</text:p>
          </table:table-cell>
          <table:table-cell table:style-name="ce11" office:value-type="string" calcext:value-type="string">
            <text:p>itm_gondor_warhorse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8|knows_shield_9|knows_power_strike_6|knows_ironflesh_6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32" table:formula="of:=IF(AND([.B483]&lt;&gt;&quot;&quot;;[.C483]&lt;&gt;&quot;&quot;);CONCATENATE([Variables.$I$1];[Variables.$I$7];[.B483];[Variables.$I$7];[Variables.$I$6];[Variables.$I$7];[.C483];[Variables.$I$7];[Variables.$I$6];[Variables.$I$7];[.D483];[Variables.$I$7];[Variables.$I$6];[.E483];[Variables.$I$6];[.F483];[Variables.$I$6];[.G483];[Variables.$I$6];[.H483];[Variables.$I$6];[Variables.$I$1];[.I483];[.J483];[.K483];[.L483];[.M483];[.N483];[.O483];[Variables.$I$2];[Variables.$I$6];[.P483];[Variables.$I$6];[.Q483];[Variables.$I$6];[.R483];[Variables.$I$6];[.S483];[Variables.$I$6];[.T483];IF([.U483]&lt;&gt;&quot;&quot;;CONCATENATE([Variables.$I$6];[.U483]);&quot;&quot;);[Variables.$I$2];[Variables.$I$6]);IF([.B483]&lt;&gt;&quot;&quot;;CONCATENATE(&quot;#&quot;;[.B483]);&quot;&quot;))" office:value-type="string" office:string-value="[&quot;pinnath_captain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heavy_greaves,itm_gondor_cav_sword,itm_gon_tab_shield_c,itm_gondor_warhorse,],attr_tier_6,wp_tier_6,knows_common|knows_riding_8|knows_shield_9|knows_power_strike_6|knows_ironflesh_6,gondor_face1,gondor_face3]," calcext:value-type="string">
            <text:p>["pinnath_captain","Captain_of_Pinnath_Gelin","Captains_of_Pinnath_Gelin",tf_gondor| tf_mounted| tfg_shield| tfg_armor| tfg_helm| tfg_horse| tfg_boots,0,subfac_pinnath_gelin,fac_gondor,[itm_gondor_leader_helm,itm_pinnath_leader,itm_mail_mittens,itm_gondor_med_greaves,itm_gondor_heavy_greaves,itm_gondor_cav_sword,itm_gon_tab_shield_c,itm_gondor_warhorse,],attr_tier_6,wp_tier_6,knows_common|knows_riding_8|knows_shield_9|knows_power_strike_6|knows_ironflesh_6,gondor_face1,gondor_face3],</text:p>
          </table:table-cell>
          <table:table-cell table:number-columns-repeated="16362"/>
        </table:table-row>
        <table:table-row table:style-name="ro1">
          <table:table-cell table:style-name="ce6" table:formula="of:=IF(AND([.B484]&lt;&gt;&quot;&quot;;[.C484]&lt;&gt;&quot;&quot;);CONCATENATE([Variables.$I$1];[Variables.$I$7];[.B484];[Variables.$I$7];[Variables.$I$6];[Variables.$I$7];[.C484];[Variables.$I$7];[Variables.$I$6];[Variables.$I$7];[.D484];[Variables.$I$7];[Variables.$I$6];[.E484];[Variables.$I$6];[.F484];[Variables.$I$6];[.G484];[Variables.$I$6];[.H484];[Variables.$I$6];[Variables.$I$1];[.I484];[.J484];[.K484];[.L484];[.M484];[.N484];[.O484];[Variables.$I$2];[Variables.$I$6];[.P484];[Variables.$I$6];[.Q484];[Variables.$I$6];[.R484];[Variables.$I$6];[.S484];[Variables.$I$6];[.T484];IF([.U484]&lt;&gt;&quot;&quot;;CONCATENATE([Variables.$I$6];[.U484]);&quot;&quot;);[Variables.$I$2];[Variables.$I$6]);IF([.B484]&lt;&gt;&quot;&quot;;CONCATENATE(&quot;#&quot;;[.B484]);&quot;&quot;))" office:value-type="string" office:string-value="[&quot;blackroot_captain&quot;,&quot;Captain_of_Blackroot_Vale&quot;,&quot;Captains_of_Blackroot_Vale&quot;,tf_gondor| tfg_ranged| tfg_armor| tfg_helm| tfg_boots,0,subfac_blackroot,fac_gondor,[itm_gondor_leader_helm,itm_blackroot_leader,itm_leather_gloves_good,itm_gondor_med_greaves,itm_gondor_arrows,itm_gondor_bow,itm_gondor_spear,],attr_tier_6,wp_elf_tier_5,knows_common|knows_athletics_7|knows_power_draw_5|knows_power_strike_6|knows_ironflesh_7,gondor_face1,gondor_face3]," calcext:value-type="string">
            <text:p>["blackroot_captain","Captain_of_Blackroot_Vale","Captains_of_Blackroot_Vale",tf_gondor| tfg_ranged| tfg_armor| tfg_helm| tfg_boots,0,subfac_blackroot,fac_gondor,[itm_gondor_leader_helm,itm_blackroot_leader,itm_leather_gloves_good,itm_gondor_med_greaves,itm_gondor_arrows,itm_gondor_bow,itm_gondor_spear,],attr_tier_6,wp_elf_tier_5,knows_common|knows_athletics_7|knows_power_draw_5|knows_power_strike_6|knows_ironflesh_7,gondor_face1,gondor_face3],</text:p>
          </table:table-cell>
          <table:table-cell table:style-name="ce7" office:value-type="string" calcext:value-type="string">
            <text:p>blackroot_captain</text:p>
          </table:table-cell>
          <table:table-cell table:style-name="ce7" office:value-type="string" calcext:value-type="string">
            <text:p>Captain_of_Blackroot_Vale</text:p>
          </table:table-cell>
          <table:table-cell table:style-name="ce7" office:value-type="string" calcext:value-type="string">
            <text:p>Captain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gondor_leader_helm,</text:p>
          </table:table-cell>
          <table:table-cell table:style-name="ce11" office:value-type="string" calcext:value-type="string">
            <text:p>itm_blackroot_leader,</text:p>
          </table:table-cell>
          <table:table-cell table:style-name="ce11" office:value-type="string" calcext:value-type="string">
            <text:p>itm_leather_gloves_good,</text:p>
          </table:table-cell>
          <table:table-cell table:style-name="ce11" office:value-type="string" calcext:value-type="string">
            <text:p>itm_gondor_med_greaves,</text:p>
          </table:table-cell>
          <table:table-cell table:style-name="ce11" office:value-type="string" calcext:value-type="string">
            <text:p>itm_gondor_arrows,itm_gondor_bow,</text:p>
          </table:table-cell>
          <table:table-cell table:style-name="ce11" office:value-type="string" calcext:value-type="string">
            <text:p>itm_gondor_spear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elf_tier_5</text:p>
          </table:table-cell>
          <table:table-cell table:style-name="ce12" office:value-type="string" calcext:value-type="string">
            <text:p>knows_common|knows_athletics_7|knows_power_draw_5|knows_power_strike_6|knows_ironflesh_7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32" table:formula="of:=IF(AND([.B484]&lt;&gt;&quot;&quot;;[.C484]&lt;&gt;&quot;&quot;);CONCATENATE([Variables.$I$1];[Variables.$I$7];[.B484];[Variables.$I$7];[Variables.$I$6];[Variables.$I$7];[.C484];[Variables.$I$7];[Variables.$I$6];[Variables.$I$7];[.D484];[Variables.$I$7];[Variables.$I$6];[.E484];[Variables.$I$6];[.F484];[Variables.$I$6];[.G484];[Variables.$I$6];[.H484];[Variables.$I$6];[Variables.$I$1];[.I484];[.J484];[.K484];[.L484];[.M484];[.N484];[.O484];[Variables.$I$2];[Variables.$I$6];[.P484];[Variables.$I$6];[.Q484];[Variables.$I$6];[.R484];[Variables.$I$6];[.S484];[Variables.$I$6];[.T484];IF([.U484]&lt;&gt;&quot;&quot;;CONCATENATE([Variables.$I$6];[.U484]);&quot;&quot;);[Variables.$I$2];[Variables.$I$6]);IF([.B484]&lt;&gt;&quot;&quot;;CONCATENATE(&quot;#&quot;;[.B484]);&quot;&quot;))" office:value-type="string" office:string-value="[&quot;blackroot_captain&quot;,&quot;Captain_of_Blackroot_Vale&quot;,&quot;Captains_of_Blackroot_Vale&quot;,tf_gondor| tfg_ranged| tfg_armor| tfg_helm| tfg_boots,0,subfac_blackroot,fac_gondor,[itm_gondor_leader_helm,itm_blackroot_leader,itm_leather_gloves_good,itm_gondor_med_greaves,itm_gondor_arrows,itm_gondor_bow,itm_gondor_spear,],attr_tier_6,wp_elf_tier_5,knows_common|knows_athletics_7|knows_power_draw_5|knows_power_strike_6|knows_ironflesh_7,gondor_face1,gondor_face3]," calcext:value-type="string">
            <text:p>["blackroot_captain","Captain_of_Blackroot_Vale","Captains_of_Blackroot_Vale",tf_gondor| tfg_ranged| tfg_armor| tfg_helm| tfg_boots,0,subfac_blackroot,fac_gondor,[itm_gondor_leader_helm,itm_blackroot_leader,itm_leather_gloves_good,itm_gondor_med_greaves,itm_gondor_arrows,itm_gondor_bow,itm_gondor_spear,],attr_tier_6,wp_elf_tier_5,knows_common|knows_athletics_7|knows_power_draw_5|knows_power_strike_6|knows_ironflesh_7,gondor_face1,gondor_face3],</text:p>
          </table:table-cell>
          <table:table-cell table:number-columns-repeated="16362"/>
        </table:table-row>
        <table:table-row table:style-name="ro1">
          <table:table-cell table:style-name="ce6" table:formula="of:=IF(AND([.B485]&lt;&gt;&quot;&quot;;[.C485]&lt;&gt;&quot;&quot;);CONCATENATE([Variables.$I$1];[Variables.$I$7];[.B485];[Variables.$I$7];[Variables.$I$6];[Variables.$I$7];[.C485];[Variables.$I$7];[Variables.$I$6];[Variables.$I$7];[.D485];[Variables.$I$7];[Variables.$I$6];[.E485];[Variables.$I$6];[.F485];[Variables.$I$6];[.G485];[Variables.$I$6];[.H485];[Variables.$I$6];[Variables.$I$1];[.I485];[.J485];[.K485];[.L485];[.M485];[.N485];[.O485];[Variables.$I$2];[Variables.$I$6];[.P485];[Variables.$I$6];[.Q485];[Variables.$I$6];[.R485];[Variables.$I$6];[.S485];[Variables.$I$6];[.T485];IF([.U485]&lt;&gt;&quot;&quot;;CONCATENATE([Variables.$I$6];[.U485]);&quot;&quot;);[Variables.$I$2];[Variables.$I$6]);IF([.B485]&lt;&gt;&quot;&quot;;CONCATENATE(&quot;#&quot;;[.B485]);&quot;&quot;))" office:value-type="string" office:string-value="[&quot;ithilien_captain&quot;,&quot;Captain_of_Ithilien_Rangers&quot;,&quot;Captains_of_Ithilien_Rangers&quot;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6,wp_elf_tier_bow_5,knows_common|knows_pathfinding_4|knows_athletics_9|knows_shield_9|knows_power_draw_9|knows_power_strike_8|knows_ironflesh_8,gondor_face1,gondor_face2]," calcext:value-type="string">
            <text:p>["ithilien_captain","Captain_of_Ithilien_Rangers","Captains_of_Ithilien_Rangers"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6,wp_elf_tier_bow_5,knows_common|knows_pathfinding_4|knows_athletics_9|knows_shield_9|knows_power_draw_9|knows_power_strike_8|knows_ironflesh_8,gondor_face1,gondor_face2],</text:p>
          </table:table-cell>
          <table:table-cell table:style-name="ce7" office:value-type="string" calcext:value-type="string">
            <text:p>ithilien_captain</text:p>
          </table:table-cell>
          <table:table-cell table:style-name="ce7" office:value-type="string" calcext:value-type="string">
            <text:p>Captain_of_Ithilien_Rangers</text:p>
          </table:table-cell>
          <table:table-cell table:style-name="ce7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gondor_ranger_hood_mask,</text:p>
          </table:table-cell>
          <table:table-cell table:style-name="ce26" office:value-type="string" calcext:value-type="string">
            <text:p>(itm_gon_ranger_skirt, imod_lordly)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ithilien_arrows,itm_ithilien_arrows,itm_gondor_bow,</text:p>
          </table:table-cell>
          <table:table-cell table:style-name="ce11" office:value-type="string" calcext:value-type="string">
            <text:p>itm_gondor_ranger_sword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elf_tier_bow_5</text:p>
          </table:table-cell>
          <table:table-cell table:style-name="ce12" office:value-type="string" calcext:value-type="string">
            <text:p>knows_common|knows_pathfinding_4|knows_athletics_9|knows_shield_9|knows_power_draw_9|knows_power_strike_8|knows_ironflesh_8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32" table:formula="of:=IF(AND([.B485]&lt;&gt;&quot;&quot;;[.C485]&lt;&gt;&quot;&quot;);CONCATENATE([Variables.$I$1];[Variables.$I$7];[.B485];[Variables.$I$7];[Variables.$I$6];[Variables.$I$7];[.C485];[Variables.$I$7];[Variables.$I$6];[Variables.$I$7];[.D485];[Variables.$I$7];[Variables.$I$6];[.E485];[Variables.$I$6];[.F485];[Variables.$I$6];[.G485];[Variables.$I$6];[.H485];[Variables.$I$6];[Variables.$I$1];[.I485];[.J485];[.K485];[.L485];[.M485];[.N485];[.O485];[Variables.$I$2];[Variables.$I$6];[.P485];[Variables.$I$6];[.Q485];[Variables.$I$6];[.R485];[Variables.$I$6];[.S485];[Variables.$I$6];[.T485];IF([.U485]&lt;&gt;&quot;&quot;;CONCATENATE([Variables.$I$6];[.U485]);&quot;&quot;);[Variables.$I$2];[Variables.$I$6]);IF([.B485]&lt;&gt;&quot;&quot;;CONCATENATE(&quot;#&quot;;[.B485]);&quot;&quot;))" office:value-type="string" office:string-value="[&quot;ithilien_captain&quot;,&quot;Captain_of_Ithilien_Rangers&quot;,&quot;Captains_of_Ithilien_Rangers&quot;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6,wp_elf_tier_bow_5,knows_common|knows_pathfinding_4|knows_athletics_9|knows_shield_9|knows_power_draw_9|knows_power_strike_8|knows_ironflesh_8,gondor_face1,gondor_face2]," calcext:value-type="string">
            <text:p>["ithilien_captain","Captain_of_Ithilien_Rangers","Captains_of_Ithilien_Rangers"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6,wp_elf_tier_bow_5,knows_common|knows_pathfinding_4|knows_athletics_9|knows_shield_9|knows_power_draw_9|knows_power_strike_8|knows_ironflesh_8,gondor_face1,gondor_face2],</text:p>
          </table:table-cell>
          <table:table-cell table:number-columns-repeated="16362"/>
        </table:table-row>
        <table:table-row table:style-name="ro3">
          <table:table-cell/>
          <table:table-cell table:style-name="ce36" table:number-columns-repeated="64"/>
          <table:table-cell table:number-columns-repeated="16319"/>
        </table:table-row>
        <table:table-row table:style-name="ro1">
          <table:table-cell table:style-name="ce6" table:formula="of:=IF(AND([.B487]&lt;&gt;&quot;&quot;;[.C487]&lt;&gt;&quot;&quot;);CONCATENATE([Variables.$I$1];[Variables.$I$7];[.B487];[Variables.$I$7];[Variables.$I$6];[Variables.$I$7];[.C487];[Variables.$I$7];[Variables.$I$6];[Variables.$I$7];[.D487];[Variables.$I$7];[Variables.$I$6];[.E487];[Variables.$I$6];[.F487];[Variables.$I$6];[.G487];[Variables.$I$6];[.H487];[Variables.$I$6];[Variables.$I$1];[.I487];[.J487];[.K487];[.L487];[.M487];[.N487];[.O487];[Variables.$I$2];[Variables.$I$6];[.P487];[Variables.$I$6];[.Q487];[Variables.$I$6];[.R487];[Variables.$I$6];[.S487];[Variables.$I$6];[.T487];IF([.U487]&lt;&gt;&quot;&quot;;CONCATENATE([Variables.$I$6];[.U487]);&quot;&quot;);[Variables.$I$2];[Variables.$I$6]);IF([.B487]&lt;&gt;&quot;&quot;;CONCATENATE(&quot;#&quot;;[.B487]);&quot;&quot;))" office:value-type="string" office:string-value="[&quot;looter&quot;,&quot;Looter&quot;,&quot;Looters&quot;,tfg_armor,0,0,fac_outlaws,[itm_hood_black_bad,itm_hood_grey_bad,itm_dun_helm_b_bad, itm_leather_cap, itm_peasant_man_a_wb,  itm_leather_jerkin_wb, itm_dunland_tunic_1_bad, itm_dunland_tunic_2_bad, itm_pelt_coat, itm_leather_boots_dark_bad,itm_rohan_shoes_bad,itm_furry_boots,itm_wood_club, itm_twohand_wood_club, itm_orc_slasher, itm_orc_axe,],attr_evil_tier_1,wp_tier_1,knows_common|knows_athletics_1|knows_power_strike_1|knows_ironflesh_1,dunland_face1,dunland_face2]," calcext:value-type="string">
            <text:p>["looter","Looter","Looters",tfg_armor,0,0,fac_outlaws,[itm_hood_black_bad,itm_hood_grey_bad,itm_dun_helm_b_bad, itm_leather_cap, itm_peasant_man_a_wb, <text:s/>itm_leather_jerkin_wb, itm_dunland_tunic_1_bad, itm_dunland_tunic_2_bad, itm_pelt_coat, itm_leather_boots_dark_bad,itm_rohan_shoes_bad,itm_furry_boots,itm_wood_club, itm_twohand_wood_club, itm_orc_slasher, itm_orc_axe,],attr_evil_tier_1,wp_tier_1,knows_common|knows_athletics_1|knows_power_strike_1|knows_ironflesh_1,dunland_face1,dunland_face2],</text:p>
          </table:table-cell>
          <table:table-cell table:style-name="ce7" office:value-type="string" calcext:value-type="string">
            <text:p>looter</text:p>
          </table:table-cell>
          <table:table-cell table:style-name="ce7" office:value-type="string" calcext:value-type="string">
            <text:p>Looter</text:p>
          </table:table-cell>
          <table:table-cell table:style-name="ce7" office:value-type="string" calcext:value-type="string">
            <text:p>Loote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outlaws</text:p>
          </table:table-cell>
          <table:table-cell table:style-name="ce11" office:value-type="string" calcext:value-type="string">
            <text:p>itm_hood_black_bad,itm_hood_grey_bad,itm_dun_helm_b_bad, itm_leather_cap, </text:p>
          </table:table-cell>
          <table:table-cell table:style-name="ce26" office:value-type="string" calcext:value-type="string">
            <text:p>itm_peasant_man_a_wb, <text:s/>itm_leather_jerkin_wb, itm_dunland_tunic_1_bad, itm_dunland_tunic_2_bad, itm_pelt_coat, </text:p>
          </table:table-cell>
          <table:table-cell table:style-name="ce11"/>
          <table:table-cell table:style-name="ce19" office:value-type="string" calcext:value-type="string">
            <text:p>itm_leather_boots_dark_bad,itm_rohan_shoes_bad,itm_furry_boots,</text:p>
          </table:table-cell>
          <table:table-cell table:style-name="ce19" office:value-type="string" calcext:value-type="string">
            <text:p>itm_wood_club, itm_twohand_wood_club, itm_orc_slasher, itm_orc_axe,</text:p>
          </table:table-cell>
          <table:table-cell table:style-name="ce11" table:number-columns-repeated="2"/>
          <table:table-cell table:style-name="ce12" office:value-type="string" calcext:value-type="string">
            <text:p>attr_evil_tier_1</text:p>
          </table:table-cell>
          <table:table-cell table:style-name="ce12" office:value-type="string" calcext:value-type="string">
            <text:p>wp_tier_1</text:p>
          </table:table-cell>
          <table:table-cell table:style-name="ce12" office:value-type="string" calcext:value-type="string">
            <text:p>knows_common|knows_athletics_1|knows_power_strike_1|knows_ironflesh_1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32" table:formula="of:=IF(AND([.B487]&lt;&gt;&quot;&quot;;[.C487]&lt;&gt;&quot;&quot;);CONCATENATE([Variables.$I$1];[Variables.$I$7];[.B487];[Variables.$I$7];[Variables.$I$6];[Variables.$I$7];[.C487];[Variables.$I$7];[Variables.$I$6];[Variables.$I$7];[.D487];[Variables.$I$7];[Variables.$I$6];[.E487];[Variables.$I$6];[.F487];[Variables.$I$6];[.G487];[Variables.$I$6];[.H487];[Variables.$I$6];[Variables.$I$1];[.I487];[.J487];[.K487];[.L487];[.M487];[.N487];[.O487];[Variables.$I$2];[Variables.$I$6];[.P487];[Variables.$I$6];[.Q487];[Variables.$I$6];[.R487];[Variables.$I$6];[.S487];[Variables.$I$6];[.T487];IF([.U487]&lt;&gt;&quot;&quot;;CONCATENATE([Variables.$I$6];[.U487]);&quot;&quot;);[Variables.$I$2];[Variables.$I$6]);IF([.B487]&lt;&gt;&quot;&quot;;CONCATENATE(&quot;#&quot;;[.B487]);&quot;&quot;))" office:value-type="string" office:string-value="[&quot;looter&quot;,&quot;Looter&quot;,&quot;Looters&quot;,tfg_armor,0,0,fac_outlaws,[itm_hood_black_bad,itm_hood_grey_bad,itm_dun_helm_b_bad, itm_leather_cap, itm_peasant_man_a_wb,  itm_leather_jerkin_wb, itm_dunland_tunic_1_bad, itm_dunland_tunic_2_bad, itm_pelt_coat, itm_leather_boots_dark_bad,itm_rohan_shoes_bad,itm_furry_boots,itm_wood_club, itm_twohand_wood_club, itm_orc_slasher, itm_orc_axe,],attr_evil_tier_1,wp_tier_1,knows_common|knows_athletics_1|knows_power_strike_1|knows_ironflesh_1,dunland_face1,dunland_face2]," calcext:value-type="string">
            <text:p>["looter","Looter","Looters",tfg_armor,0,0,fac_outlaws,[itm_hood_black_bad,itm_hood_grey_bad,itm_dun_helm_b_bad, itm_leather_cap, itm_peasant_man_a_wb, <text:s/>itm_leather_jerkin_wb, itm_dunland_tunic_1_bad, itm_dunland_tunic_2_bad, itm_pelt_coat, itm_leather_boots_dark_bad,itm_rohan_shoes_bad,itm_furry_boots,itm_wood_club, itm_twohand_wood_club, itm_orc_slasher, itm_orc_axe,],attr_evil_tier_1,wp_tier_1,knows_common|knows_athletics_1|knows_power_strike_1|knows_ironflesh_1,dunland_face1,dunland_face2],</text:p>
          </table:table-cell>
          <table:table-cell table:number-columns-repeated="16362"/>
        </table:table-row>
        <table:table-row table:style-name="ro1">
          <table:table-cell table:style-name="ce6" table:formula="of:=IF(AND([.B488]&lt;&gt;&quot;&quot;;[.C488]&lt;&gt;&quot;&quot;);CONCATENATE([Variables.$I$1];[Variables.$I$7];[.B488];[Variables.$I$7];[Variables.$I$6];[Variables.$I$7];[.C488];[Variables.$I$7];[Variables.$I$6];[Variables.$I$7];[.D488];[Variables.$I$7];[Variables.$I$6];[.E488];[Variables.$I$6];[.F488];[Variables.$I$6];[.G488];[Variables.$I$6];[.H488];[Variables.$I$6];[Variables.$I$1];[.I488];[.J488];[.K488];[.L488];[.M488];[.N488];[.O488];[Variables.$I$2];[Variables.$I$6];[.P488];[Variables.$I$6];[.Q488];[Variables.$I$6];[.R488];[Variables.$I$6];[.S488];[Variables.$I$6];[.T488];IF([.U488]&lt;&gt;&quot;&quot;;CONCATENATE([Variables.$I$6];[.U488]);&quot;&quot;);[Variables.$I$2];[Variables.$I$6]);IF([.B488]&lt;&gt;&quot;&quot;;CONCATENATE(&quot;#&quot;;[.B488]);&quot;&quot;))" office:value-type="string" office:string-value="[&quot;brigand&quot;,&quot;Brigand&quot;,&quot;Brigands&quot;,tf_evil_man| tfg_armor| tfg_boots,0,0,fac_outlaws,[itm_hood_black, itm_hood_grey, itm_orc_coif_bad, itm_leather_cap, itm_leather_jerkin_wb, itm_dale_light_b, itm_rawhide_coat, itm_ragged_outfit, itm_padded_leather, itm_leather_vest, itm_orc_mittens_bad,itm_leather_boots_dark_bad,itm_furry_boots,itm_orc_bill_bad,itm_orc_slasher,itm_orc_slasher_heavy, itm_orc_falchion_bad, itm_orc_shield_a,itm_orc_shield_b,],attr_evil_tier_2,wp_tier_2,knows_common|knows_athletics_2|knows_power_strike_1|knows_ironflesh_2,mordor_man1,mordor_man2]," calcext:value-type="string">
            <text:p>["brigand","Brigand","Brigands",tf_evil_man| tfg_armor| tfg_boots,0,0,fac_outlaws,[itm_hood_black, itm_hood_grey, itm_orc_coif_bad, itm_leather_cap, itm_leather_jerkin_wb, itm_dale_light_b, itm_rawhide_coat, itm_ragged_outfit, itm_padded_leather, itm_leather_vest, itm_orc_mittens_bad,itm_leather_boots_dark_bad,itm_furry_boots,itm_orc_bill_bad,itm_orc_slasher,itm_orc_slasher_heavy, itm_orc_falchion_bad, itm_orc_shield_a,itm_orc_shield_b,],attr_evil_tier_2,wp_tier_2,knows_common|knows_athletics_2|knows_power_strike_1|knows_ironflesh_2,mordor_man1,mordor_man2],</text:p>
          </table:table-cell>
          <table:table-cell table:style-name="ce7" office:value-type="string" calcext:value-type="string">
            <text:p>brigand</text:p>
          </table:table-cell>
          <table:table-cell table:style-name="ce7" office:value-type="string" calcext:value-type="string">
            <text:p>Brigand</text:p>
          </table:table-cell>
          <table:table-cell table:style-name="ce7" office:value-type="string" calcext:value-type="string">
            <text:p>Brigand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outlaws</text:p>
          </table:table-cell>
          <table:table-cell table:style-name="ce11" office:value-type="string" calcext:value-type="string">
            <text:p>itm_hood_black, itm_hood_grey, itm_orc_coif_bad, itm_leather_cap, </text:p>
          </table:table-cell>
          <table:table-cell table:style-name="ce26" office:value-type="string" calcext:value-type="string">
            <text:p>itm_leather_jerkin_wb, itm_dale_light_b, itm_rawhide_coat, itm_ragged_outfit, itm_padded_leather, itm_leather_vest, </text:p>
          </table:table-cell>
          <table:table-cell table:style-name="ce11" office:value-type="string" calcext:value-type="string">
            <text:p>itm_orc_mittens_bad,</text:p>
          </table:table-cell>
          <table:table-cell table:style-name="ce19" office:value-type="string" calcext:value-type="string">
            <text:p>itm_leather_boots_dark_bad,itm_furry_boots,</text:p>
          </table:table-cell>
          <table:table-cell table:style-name="ce19" office:value-type="string" calcext:value-type="string">
            <text:p>itm_orc_bill_bad,itm_orc_slasher,itm_orc_slasher_heavy, itm_orc_falchion_bad, </text:p>
          </table:table-cell>
          <table:table-cell table:style-name="ce11"/>
          <table:table-cell table:style-name="ce11" office:value-type="string" calcext:value-type="string">
            <text:p>itm_orc_shield_a,itm_orc_shield_b,</text:p>
          </table:table-cell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2" office:value-type="string" calcext:value-type="string">
            <text:p>knows_common|knows_athletics_2|knows_power_strike_1|knows_ironflesh_2</text:p>
          </table:table-cell>
          <table:table-cell table:style-name="ce14" office:value-type="string" calcext:value-type="string">
            <text:p>mordor_man1</text:p>
          </table:table-cell>
          <table:table-cell table:style-name="ce14" office:value-type="string" calcext:value-type="string">
            <text:p>mordor_man2</text:p>
          </table:table-cell>
          <table:table-cell table:style-name="ce15"/>
          <table:table-cell table:style-name="ce32" table:formula="of:=IF(AND([.B488]&lt;&gt;&quot;&quot;;[.C488]&lt;&gt;&quot;&quot;);CONCATENATE([Variables.$I$1];[Variables.$I$7];[.B488];[Variables.$I$7];[Variables.$I$6];[Variables.$I$7];[.C488];[Variables.$I$7];[Variables.$I$6];[Variables.$I$7];[.D488];[Variables.$I$7];[Variables.$I$6];[.E488];[Variables.$I$6];[.F488];[Variables.$I$6];[.G488];[Variables.$I$6];[.H488];[Variables.$I$6];[Variables.$I$1];[.I488];[.J488];[.K488];[.L488];[.M488];[.N488];[.O488];[Variables.$I$2];[Variables.$I$6];[.P488];[Variables.$I$6];[.Q488];[Variables.$I$6];[.R488];[Variables.$I$6];[.S488];[Variables.$I$6];[.T488];IF([.U488]&lt;&gt;&quot;&quot;;CONCATENATE([Variables.$I$6];[.U488]);&quot;&quot;);[Variables.$I$2];[Variables.$I$6]);IF([.B488]&lt;&gt;&quot;&quot;;CONCATENATE(&quot;#&quot;;[.B488]);&quot;&quot;))" office:value-type="string" office:string-value="[&quot;brigand&quot;,&quot;Brigand&quot;,&quot;Brigands&quot;,tf_evil_man| tfg_armor| tfg_boots,0,0,fac_outlaws,[itm_hood_black, itm_hood_grey, itm_orc_coif_bad, itm_leather_cap, itm_leather_jerkin_wb, itm_dale_light_b, itm_rawhide_coat, itm_ragged_outfit, itm_padded_leather, itm_leather_vest, itm_orc_mittens_bad,itm_leather_boots_dark_bad,itm_furry_boots,itm_orc_bill_bad,itm_orc_slasher,itm_orc_slasher_heavy, itm_orc_falchion_bad, itm_orc_shield_a,itm_orc_shield_b,],attr_evil_tier_2,wp_tier_2,knows_common|knows_athletics_2|knows_power_strike_1|knows_ironflesh_2,mordor_man1,mordor_man2]," calcext:value-type="string">
            <text:p>["brigand","Brigand","Brigands",tf_evil_man| tfg_armor| tfg_boots,0,0,fac_outlaws,[itm_hood_black, itm_hood_grey, itm_orc_coif_bad, itm_leather_cap, itm_leather_jerkin_wb, itm_dale_light_b, itm_rawhide_coat, itm_ragged_outfit, itm_padded_leather, itm_leather_vest, itm_orc_mittens_bad,itm_leather_boots_dark_bad,itm_furry_boots,itm_orc_bill_bad,itm_orc_slasher,itm_orc_slasher_heavy, itm_orc_falchion_bad, itm_orc_shield_a,itm_orc_shield_b,],attr_evil_tier_2,wp_tier_2,knows_common|knows_athletics_2|knows_power_strike_1|knows_ironflesh_2,mordor_man1,mordor_man2],</text:p>
          </table:table-cell>
          <table:table-cell table:style-name="ce36" table:number-columns-repeated="43"/>
          <table:table-cell table:number-columns-repeated="16319"/>
        </table:table-row>
        <table:table-row table:style-name="ro1">
          <table:table-cell table:style-name="ce6" table:formula="of:=IF(AND([.B489]&lt;&gt;&quot;&quot;;[.C489]&lt;&gt;&quot;&quot;);CONCATENATE([Variables.$I$1];[Variables.$I$7];[.B489];[Variables.$I$7];[Variables.$I$6];[Variables.$I$7];[.C489];[Variables.$I$7];[Variables.$I$6];[Variables.$I$7];[.D489];[Variables.$I$7];[Variables.$I$6];[.E489];[Variables.$I$6];[.F489];[Variables.$I$6];[.G489];[Variables.$I$6];[.H489];[Variables.$I$6];[Variables.$I$1];[.I489];[.J489];[.K489];[.L489];[.M489];[.N489];[.O489];[Variables.$I$2];[Variables.$I$6];[.P489];[Variables.$I$6];[.Q489];[Variables.$I$6];[.R489];[Variables.$I$6];[.S489];[Variables.$I$6];[.T489];IF([.U489]&lt;&gt;&quot;&quot;;CONCATENATE([Variables.$I$6];[.U489]);&quot;&quot;);[Variables.$I$2];[Variables.$I$6]);IF([.B489]&lt;&gt;&quot;&quot;;CONCATENATE(&quot;#&quot;;[.B489]);&quot;&quot;))" office:value-type="string" office:string-value="[&quot;marauder&quot;,&quot;Marauder&quot;,&quot;Marauders&quot;,tf_evil_man| tfg_armor| tfg_boots,0,0,fac_outlaws,[itm_hood_black_good, itm_hood_grey_good, itm_orc_coif,itm_orc_skullcap_bad,itm_dun_helm_d_bad,itm_evil_light_armor, itm_dunland_mail_1_bad, itm_dunland_mail_2_bad, itm_dale_light_b_good, itm_leather_armor, itm_orc_mittens,itm_leather_boots_dark,itm_orc_club_b, itm_orc_sledgehammer, itm_orc_falchion, itm_orc_axe_heavy, itm_orc_shield_c,itm_orc_shield_b,],attr_evil_tier_3,wp_tier_3,knows_common|knows_athletics_3|knows_power_strike_3|knows_ironflesh_4,mordor_man1,mordor_man2]," calcext:value-type="string">
            <text:p>["marauder","Marauder","Marauders",tf_evil_man| tfg_armor| tfg_boots,0,0,fac_outlaws,[itm_hood_black_good, itm_hood_grey_good, itm_orc_coif,itm_orc_skullcap_bad,itm_dun_helm_d_bad,itm_evil_light_armor, itm_dunland_mail_1_bad, itm_dunland_mail_2_bad, itm_dale_light_b_good, itm_leather_armor, itm_orc_mittens,itm_leather_boots_dark,itm_orc_club_b, itm_orc_sledgehammer, itm_orc_falchion, itm_orc_axe_heavy, itm_orc_shield_c,itm_orc_shield_b,],attr_evil_tier_3,wp_tier_3,knows_common|knows_athletics_3|knows_power_strike_3|knows_ironflesh_4,mordor_man1,mordor_man2],</text:p>
          </table:table-cell>
          <table:table-cell table:style-name="ce7" office:value-type="string" calcext:value-type="string">
            <text:p>marauder</text:p>
          </table:table-cell>
          <table:table-cell table:style-name="ce7" office:value-type="string" calcext:value-type="string">
            <text:p>Marauder</text:p>
          </table:table-cell>
          <table:table-cell table:style-name="ce7" office:value-type="string" calcext:value-type="string">
            <text:p>Marauder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outlaws</text:p>
          </table:table-cell>
          <table:table-cell table:style-name="ce11" office:value-type="string" calcext:value-type="string">
            <text:p>itm_hood_black_good, itm_hood_grey_good, itm_orc_coif,itm_orc_skullcap_bad,itm_dun_helm_d_bad,</text:p>
          </table:table-cell>
          <table:table-cell table:style-name="ce26" office:value-type="string" calcext:value-type="string">
            <text:p>itm_evil_light_armor, itm_dunland_mail_1_bad, itm_dunland_mail_2_bad, itm_dale_light_b_good, itm_leather_armor, </text:p>
          </table:table-cell>
          <table:table-cell table:style-name="ce11" office:value-type="string" calcext:value-type="string">
            <text:p>itm_orc_mittens,</text:p>
          </table:table-cell>
          <table:table-cell table:style-name="ce19" office:value-type="string" calcext:value-type="string">
            <text:p>itm_leather_boots_dark,</text:p>
          </table:table-cell>
          <table:table-cell table:style-name="ce19" office:value-type="string" calcext:value-type="string">
            <text:p>itm_orc_club_b, itm_orc_sledgehammer, itm_orc_falchion, itm_orc_axe_heavy, </text:p>
          </table:table-cell>
          <table:table-cell table:style-name="ce11"/>
          <table:table-cell table:style-name="ce11" office:value-type="string" calcext:value-type="string">
            <text:p>itm_orc_shield_c,itm_orc_shield_b,</text:p>
          </table:table-cell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3|knows_power_strike_3|knows_ironflesh_4</text:p>
          </table:table-cell>
          <table:table-cell table:style-name="ce14" office:value-type="string" calcext:value-type="string">
            <text:p>mordor_man1</text:p>
          </table:table-cell>
          <table:table-cell table:style-name="ce14" office:value-type="string" calcext:value-type="string">
            <text:p>mordor_man2</text:p>
          </table:table-cell>
          <table:table-cell table:style-name="ce15"/>
          <table:table-cell table:style-name="ce32" table:formula="of:=IF(AND([.B489]&lt;&gt;&quot;&quot;;[.C489]&lt;&gt;&quot;&quot;);CONCATENATE([Variables.$I$1];[Variables.$I$7];[.B489];[Variables.$I$7];[Variables.$I$6];[Variables.$I$7];[.C489];[Variables.$I$7];[Variables.$I$6];[Variables.$I$7];[.D489];[Variables.$I$7];[Variables.$I$6];[.E489];[Variables.$I$6];[.F489];[Variables.$I$6];[.G489];[Variables.$I$6];[.H489];[Variables.$I$6];[Variables.$I$1];[.I489];[.J489];[.K489];[.L489];[.M489];[.N489];[.O489];[Variables.$I$2];[Variables.$I$6];[.P489];[Variables.$I$6];[.Q489];[Variables.$I$6];[.R489];[Variables.$I$6];[.S489];[Variables.$I$6];[.T489];IF([.U489]&lt;&gt;&quot;&quot;;CONCATENATE([Variables.$I$6];[.U489]);&quot;&quot;);[Variables.$I$2];[Variables.$I$6]);IF([.B489]&lt;&gt;&quot;&quot;;CONCATENATE(&quot;#&quot;;[.B489]);&quot;&quot;))" office:value-type="string" office:string-value="[&quot;marauder&quot;,&quot;Marauder&quot;,&quot;Marauders&quot;,tf_evil_man| tfg_armor| tfg_boots,0,0,fac_outlaws,[itm_hood_black_good, itm_hood_grey_good, itm_orc_coif,itm_orc_skullcap_bad,itm_dun_helm_d_bad,itm_evil_light_armor, itm_dunland_mail_1_bad, itm_dunland_mail_2_bad, itm_dale_light_b_good, itm_leather_armor, itm_orc_mittens,itm_leather_boots_dark,itm_orc_club_b, itm_orc_sledgehammer, itm_orc_falchion, itm_orc_axe_heavy, itm_orc_shield_c,itm_orc_shield_b,],attr_evil_tier_3,wp_tier_3,knows_common|knows_athletics_3|knows_power_strike_3|knows_ironflesh_4,mordor_man1,mordor_man2]," calcext:value-type="string">
            <text:p>["marauder","Marauder","Marauders",tf_evil_man| tfg_armor| tfg_boots,0,0,fac_outlaws,[itm_hood_black_good, itm_hood_grey_good, itm_orc_coif,itm_orc_skullcap_bad,itm_dun_helm_d_bad,itm_evil_light_armor, itm_dunland_mail_1_bad, itm_dunland_mail_2_bad, itm_dale_light_b_good, itm_leather_armor, itm_orc_mittens,itm_leather_boots_dark,itm_orc_club_b, itm_orc_sledgehammer, itm_orc_falchion, itm_orc_axe_heavy, itm_orc_shield_c,itm_orc_shield_b,],attr_evil_tier_3,wp_tier_3,knows_common|knows_athletics_3|knows_power_strike_3|knows_ironflesh_4,mordor_man1,mordor_man2],</text:p>
          </table:table-cell>
          <table:table-cell table:style-name="ce36" table:number-columns-repeated="43"/>
          <table:table-cell table:number-columns-repeated="16319"/>
        </table:table-row>
        <table:table-row table:style-name="ro1">
          <table:table-cell table:style-name="ce6" table:formula="of:=IF(AND([.B490]&lt;&gt;&quot;&quot;;[.C490]&lt;&gt;&quot;&quot;);CONCATENATE([Variables.$I$1];[Variables.$I$7];[.B490];[Variables.$I$7];[Variables.$I$6];[Variables.$I$7];[.C490];[Variables.$I$7];[Variables.$I$6];[Variables.$I$7];[.D490];[Variables.$I$7];[Variables.$I$6];[.E490];[Variables.$I$6];[.F490];[Variables.$I$6];[.G490];[Variables.$I$6];[.H490];[Variables.$I$6];[Variables.$I$1];[.I490];[.J490];[.K490];[.L490];[.M490];[.N490];[.O490];[Variables.$I$2];[Variables.$I$6];[.P490];[Variables.$I$6];[.Q490];[Variables.$I$6];[.R490];[Variables.$I$6];[.S490];[Variables.$I$6];[.T490];IF([.U490]&lt;&gt;&quot;&quot;;CONCATENATE([Variables.$I$6];[.U490]);&quot;&quot;);[Variables.$I$2];[Variables.$I$6]);IF([.B490]&lt;&gt;&quot;&quot;;CONCATENATE(&quot;#&quot;;[.B490]);&quot;&quot;))" office:value-type="string" office:string-value="[&quot;mirkwood_bandit&quot;,&quot;Mirkwood Bandit&quot;,&quot;Mirkwood Bandits&quot;,tf_evil_man| tfg_armor| tfg_boots,0,0,fac_outlaws,[itm_hood_black_good, itm_hood_grey, itm_hood_green_good, itm_leather_cap, itm_leather_jerkin_wb, itm_dale_light_b, itm_dunland_tunic_1_bad, itm_dunland_tunic_2_bad, itm_leather_vest, itm_ragged_outfit, itm_padded_leather,itm_orc_mittens,itm_leather_boots_dark, itm_leather_boots_bad, itm_furry_boots,itm_long_bearded_axe, itm_beorn_staff, itm_axe_a, itm_axe_b,itm_short_bow,itm_arrows,itm_regular_bow,],attr_evil_tier_3,wp_tier_bow_3,knows_common|knows_athletics_3|knows_power_draw_2|knows_power_strike_1|knows_ironflesh_1,beorn_face1,beorn_face2]," calcext:value-type="string">
            <text:p>["mirkwood_bandit","Mirkwood Bandit","Mirkwood Bandits",tf_evil_man| tfg_armor| tfg_boots,0,0,fac_outlaws,[itm_hood_black_good, itm_hood_grey, itm_hood_green_good, itm_leather_cap, itm_leather_jerkin_wb, itm_dale_light_b, itm_dunland_tunic_1_bad, itm_dunland_tunic_2_bad, itm_leather_vest, itm_ragged_outfit, itm_padded_leather,itm_orc_mittens,itm_leather_boots_dark, itm_leather_boots_bad, itm_furry_boots,itm_long_bearded_axe, itm_beorn_staff, itm_axe_a, itm_axe_b,itm_short_bow,itm_arrows,itm_regular_bow,],attr_evil_tier_3,wp_tier_bow_3,knows_common|knows_athletics_3|knows_power_draw_2|knows_power_strike_1|knows_ironflesh_1,beorn_face1,beorn_face2],</text:p>
          </table:table-cell>
          <table:table-cell table:style-name="ce7" office:value-type="string" calcext:value-type="string">
            <text:p>mirkwood_bandit</text:p>
          </table:table-cell>
          <table:table-cell table:style-name="ce7" office:value-type="string" calcext:value-type="string">
            <text:p>Mirkwood Bandit</text:p>
          </table:table-cell>
          <table:table-cell table:style-name="ce7" office:value-type="string" calcext:value-type="string">
            <text:p>Mirkwood Bandit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outlaws</text:p>
          </table:table-cell>
          <table:table-cell table:style-name="ce11" office:value-type="string" calcext:value-type="string">
            <text:p>itm_hood_black_good, itm_hood_grey, itm_hood_green_good, itm_leather_cap, </text:p>
          </table:table-cell>
          <table:table-cell table:style-name="ce26" office:value-type="string" calcext:value-type="string">
            <text:p>itm_leather_jerkin_wb, itm_dale_light_b, itm_dunland_tunic_1_bad, itm_dunland_tunic_2_bad, itm_leather_vest, itm_ragged_outfit, itm_padded_leather,</text:p>
          </table:table-cell>
          <table:table-cell table:style-name="ce11" office:value-type="string" calcext:value-type="string">
            <text:p>itm_orc_mittens,</text:p>
          </table:table-cell>
          <table:table-cell table:style-name="ce19" office:value-type="string" calcext:value-type="string">
            <text:p>itm_leather_boots_dark, itm_leather_boots_bad, itm_furry_boots,</text:p>
          </table:table-cell>
          <table:table-cell table:style-name="ce19" office:value-type="string" calcext:value-type="string">
            <text:p>itm_long_bearded_axe, itm_beorn_staff, itm_axe_a, itm_axe_b,</text:p>
          </table:table-cell>
          <table:table-cell table:style-name="ce11" office:value-type="string" calcext:value-type="string">
            <text:p>itm_short_bow,itm_arrows,itm_regular_bow,</text:p>
          </table:table-cell>
          <table:table-cell table:style-name="ce11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bow_3</text:p>
          </table:table-cell>
          <table:table-cell table:style-name="ce12" office:value-type="string" calcext:value-type="string">
            <text:p>knows_common|knows_athletics_3|knows_power_draw_2|knows_power_strike_1|knows_ironflesh_1</text:p>
          </table:table-cell>
          <table:table-cell table:style-name="ce14" office:value-type="string" calcext:value-type="string">
            <text:p>beorn_face1</text:p>
          </table:table-cell>
          <table:table-cell table:style-name="ce14" office:value-type="string" calcext:value-type="string">
            <text:p>beorn_face2</text:p>
          </table:table-cell>
          <table:table-cell table:style-name="ce15"/>
          <table:table-cell table:style-name="ce32" table:formula="of:=IF(AND([.B490]&lt;&gt;&quot;&quot;;[.C490]&lt;&gt;&quot;&quot;);CONCATENATE([Variables.$I$1];[Variables.$I$7];[.B490];[Variables.$I$7];[Variables.$I$6];[Variables.$I$7];[.C490];[Variables.$I$7];[Variables.$I$6];[Variables.$I$7];[.D490];[Variables.$I$7];[Variables.$I$6];[.E490];[Variables.$I$6];[.F490];[Variables.$I$6];[.G490];[Variables.$I$6];[.H490];[Variables.$I$6];[Variables.$I$1];[.I490];[.J490];[.K490];[.L490];[.M490];[.N490];[.O490];[Variables.$I$2];[Variables.$I$6];[.P490];[Variables.$I$6];[.Q490];[Variables.$I$6];[.R490];[Variables.$I$6];[.S490];[Variables.$I$6];[.T490];IF([.U490]&lt;&gt;&quot;&quot;;CONCATENATE([Variables.$I$6];[.U490]);&quot;&quot;);[Variables.$I$2];[Variables.$I$6]);IF([.B490]&lt;&gt;&quot;&quot;;CONCATENATE(&quot;#&quot;;[.B490]);&quot;&quot;))" office:value-type="string" office:string-value="[&quot;mirkwood_bandit&quot;,&quot;Mirkwood Bandit&quot;,&quot;Mirkwood Bandits&quot;,tf_evil_man| tfg_armor| tfg_boots,0,0,fac_outlaws,[itm_hood_black_good, itm_hood_grey, itm_hood_green_good, itm_leather_cap, itm_leather_jerkin_wb, itm_dale_light_b, itm_dunland_tunic_1_bad, itm_dunland_tunic_2_bad, itm_leather_vest, itm_ragged_outfit, itm_padded_leather,itm_orc_mittens,itm_leather_boots_dark, itm_leather_boots_bad, itm_furry_boots,itm_long_bearded_axe, itm_beorn_staff, itm_axe_a, itm_axe_b,itm_short_bow,itm_arrows,itm_regular_bow,],attr_evil_tier_3,wp_tier_bow_3,knows_common|knows_athletics_3|knows_power_draw_2|knows_power_strike_1|knows_ironflesh_1,beorn_face1,beorn_face2]," calcext:value-type="string">
            <text:p>["mirkwood_bandit","Mirkwood Bandit","Mirkwood Bandits",tf_evil_man| tfg_armor| tfg_boots,0,0,fac_outlaws,[itm_hood_black_good, itm_hood_grey, itm_hood_green_good, itm_leather_cap, itm_leather_jerkin_wb, itm_dale_light_b, itm_dunland_tunic_1_bad, itm_dunland_tunic_2_bad, itm_leather_vest, itm_ragged_outfit, itm_padded_leather,itm_orc_mittens,itm_leather_boots_dark, itm_leather_boots_bad, itm_furry_boots,itm_long_bearded_axe, itm_beorn_staff, itm_axe_a, itm_axe_b,itm_short_bow,itm_arrows,itm_regular_bow,],attr_evil_tier_3,wp_tier_bow_3,knows_common|knows_athletics_3|knows_power_draw_2|knows_power_strike_1|knows_ironflesh_1,beorn_face1,beorn_face2],</text:p>
          </table:table-cell>
          <table:table-cell table:style-name="ce36" table:number-columns-repeated="43"/>
          <table:table-cell table:number-columns-repeated="16319"/>
        </table:table-row>
        <table:table-row table:style-name="ro1">
          <table:table-cell table:style-name="ce6" table:formula="of:=IF(AND([.B491]&lt;&gt;&quot;&quot;;[.C491]&lt;&gt;&quot;&quot;);CONCATENATE([Variables.$I$1];[Variables.$I$7];[.B491];[Variables.$I$7];[Variables.$I$6];[Variables.$I$7];[.C491];[Variables.$I$7];[Variables.$I$6];[Variables.$I$7];[.D491];[Variables.$I$7];[Variables.$I$6];[.E491];[Variables.$I$6];[.F491];[Variables.$I$6];[.G491];[Variables.$I$6];[.H491];[Variables.$I$6];[Variables.$I$1];[.I491];[.J491];[.K491];[.L491];[.M491];[.N491];[.O491];[Variables.$I$2];[Variables.$I$6];[.P491];[Variables.$I$6];[.Q491];[Variables.$I$6];[.R491];[Variables.$I$6];[.S491];[Variables.$I$6];[.T491];IF([.U491]&lt;&gt;&quot;&quot;;CONCATENATE([Variables.$I$6];[.U491]);&quot;&quot;);[Variables.$I$2];[Variables.$I$6]);IF([.B491]&lt;&gt;&quot;&quot;;CONCATENATE(&quot;#&quot;;[.B491]);&quot;&quot;))" office:value-type="string" office:string-value="[&quot;easterling_bandit&quot;,&quot;Easterling Bandit&quot;,&quot;Easterling Bandits&quot;,tf_evil_man| tfg_armor| tfg_boots,0,0,fac_outlaws,[itm_rhun_helm_barbed, itm_rhun_helm_round, itm_rhun_helm_horde, itm_nomad_cap_b, itm_leather_steppe_cap_a, itm_nomad_armor, itm_khergit_armor, itm_ragged_outfit, itm_rawhide_coat, itm_leather_vest, itm_leather_boots_dark,itm_furry_boots,itm_rhun_sword ,itm_rhun_falchion, itm_javelin,itm_arrows,itm_nomad_bow,itm_rhun_horse_a,itm_rhun_horse_b,],attr_evil_tier_3,wp_tier_3,knows_common|knows_riding_4|knows_power_draw_2|knows_ironflesh_1|knows_horse_archery_3|knows_power_throw_1,rhun_man1,rhun_man2]," calcext:value-type="string">
            <text:p>["easterling_bandit","Easterling Bandit","Easterling Bandits",tf_evil_man| tfg_armor| tfg_boots,0,0,fac_outlaws,[itm_rhun_helm_barbed, itm_rhun_helm_round, itm_rhun_helm_horde, itm_nomad_cap_b, itm_leather_steppe_cap_a, itm_nomad_armor, itm_khergit_armor, itm_ragged_outfit, itm_rawhide_coat, itm_leather_vest, itm_leather_boots_dark,itm_furry_boots,itm_rhun_sword ,itm_rhun_falchion, itm_javelin,itm_arrows,itm_nomad_bow,itm_rhun_horse_a,itm_rhun_horse_b,],attr_evil_tier_3,wp_tier_3,knows_common|knows_riding_4|knows_power_draw_2|knows_ironflesh_1|knows_horse_archery_3|knows_power_throw_1,rhun_man1,rhun_man2],</text:p>
          </table:table-cell>
          <table:table-cell table:style-name="ce7" office:value-type="string" calcext:value-type="string">
            <text:p>easterling_bandit</text:p>
          </table:table-cell>
          <table:table-cell table:style-name="ce7" office:value-type="string" calcext:value-type="string">
            <text:p>Easterling Bandit</text:p>
          </table:table-cell>
          <table:table-cell table:style-name="ce7" office:value-type="string" calcext:value-type="string">
            <text:p>Easterling Bandit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outlaws</text:p>
          </table:table-cell>
          <table:table-cell table:style-name="ce11" office:value-type="string" calcext:value-type="string">
            <text:p>itm_rhun_helm_barbed, itm_rhun_helm_round, itm_rhun_helm_horde, itm_nomad_cap_b, itm_leather_steppe_cap_a, </text:p>
          </table:table-cell>
          <table:table-cell table:style-name="ce11" office:value-type="string" calcext:value-type="string">
            <text:p>itm_nomad_armor, itm_khergit_armor, itm_ragged_outfit, itm_rawhide_coat, itm_leather_vest, </text:p>
          </table:table-cell>
          <table:table-cell table:style-name="ce11"/>
          <table:table-cell table:style-name="ce19" office:value-type="string" calcext:value-type="string">
            <text:p>itm_leather_boots_dark,itm_furry_boots,</text:p>
          </table:table-cell>
          <table:table-cell table:style-name="ce19" office:value-type="string" calcext:value-type="string">
            <text:p>itm_rhun_sword ,itm_rhun_falchion, </text:p>
          </table:table-cell>
          <table:table-cell table:style-name="ce11" office:value-type="string" calcext:value-type="string">
            <text:p>itm_javelin,itm_arrows,itm_nomad_bow,</text:p>
          </table:table-cell>
          <table:table-cell table:style-name="ce11" office:value-type="string" calcext:value-type="string">
            <text:p>itm_rhun_horse_a,itm_rhun_horse_b,</text:p>
          </table:table-cell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riding_4|knows_power_draw_2|knows_ironflesh_1|knows_horse_archery_3|knows_power_throw_1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32" table:formula="of:=IF(AND([.B491]&lt;&gt;&quot;&quot;;[.C491]&lt;&gt;&quot;&quot;);CONCATENATE([Variables.$I$1];[Variables.$I$7];[.B491];[Variables.$I$7];[Variables.$I$6];[Variables.$I$7];[.C491];[Variables.$I$7];[Variables.$I$6];[Variables.$I$7];[.D491];[Variables.$I$7];[Variables.$I$6];[.E491];[Variables.$I$6];[.F491];[Variables.$I$6];[.G491];[Variables.$I$6];[.H491];[Variables.$I$6];[Variables.$I$1];[.I491];[.J491];[.K491];[.L491];[.M491];[.N491];[.O491];[Variables.$I$2];[Variables.$I$6];[.P491];[Variables.$I$6];[.Q491];[Variables.$I$6];[.R491];[Variables.$I$6];[.S491];[Variables.$I$6];[.T491];IF([.U491]&lt;&gt;&quot;&quot;;CONCATENATE([Variables.$I$6];[.U491]);&quot;&quot;);[Variables.$I$2];[Variables.$I$6]);IF([.B491]&lt;&gt;&quot;&quot;;CONCATENATE(&quot;#&quot;;[.B491]);&quot;&quot;))" office:value-type="string" office:string-value="[&quot;easterling_bandit&quot;,&quot;Easterling Bandit&quot;,&quot;Easterling Bandits&quot;,tf_evil_man| tfg_armor| tfg_boots,0,0,fac_outlaws,[itm_rhun_helm_barbed, itm_rhun_helm_round, itm_rhun_helm_horde, itm_nomad_cap_b, itm_leather_steppe_cap_a, itm_nomad_armor, itm_khergit_armor, itm_ragged_outfit, itm_rawhide_coat, itm_leather_vest, itm_leather_boots_dark,itm_furry_boots,itm_rhun_sword ,itm_rhun_falchion, itm_javelin,itm_arrows,itm_nomad_bow,itm_rhun_horse_a,itm_rhun_horse_b,],attr_evil_tier_3,wp_tier_3,knows_common|knows_riding_4|knows_power_draw_2|knows_ironflesh_1|knows_horse_archery_3|knows_power_throw_1,rhun_man1,rhun_man2]," calcext:value-type="string">
            <text:p>["easterling_bandit","Easterling Bandit","Easterling Bandits",tf_evil_man| tfg_armor| tfg_boots,0,0,fac_outlaws,[itm_rhun_helm_barbed, itm_rhun_helm_round, itm_rhun_helm_horde, itm_nomad_cap_b, itm_leather_steppe_cap_a, itm_nomad_armor, itm_khergit_armor, itm_ragged_outfit, itm_rawhide_coat, itm_leather_vest, itm_leather_boots_dark,itm_furry_boots,itm_rhun_sword ,itm_rhun_falchion, itm_javelin,itm_arrows,itm_nomad_bow,itm_rhun_horse_a,itm_rhun_horse_b,],attr_evil_tier_3,wp_tier_3,knows_common|knows_riding_4|knows_power_draw_2|knows_ironflesh_1|knows_horse_archery_3|knows_power_throw_1,rhun_man1,rhun_man2],</text:p>
          </table:table-cell>
          <table:table-cell table:style-name="ce36" table:number-columns-repeated="43"/>
          <table:table-cell table:number-columns-repeated="16319"/>
        </table:table-row>
        <table:table-row table:style-name="ro1">
          <table:table-cell table:style-name="ce6" table:formula="of:=IF(AND([.B492]&lt;&gt;&quot;&quot;;[.C492]&lt;&gt;&quot;&quot;);CONCATENATE([Variables.$I$1];[Variables.$I$7];[.B492];[Variables.$I$7];[Variables.$I$6];[Variables.$I$7];[.C492];[Variables.$I$7];[Variables.$I$6];[Variables.$I$7];[.D492];[Variables.$I$7];[Variables.$I$6];[.E492];[Variables.$I$6];[.F492];[Variables.$I$6];[.G492];[Variables.$I$6];[.H492];[Variables.$I$6];[Variables.$I$1];[.I492];[.J492];[.K492];[.L492];[.M492];[.N492];[.O492];[Variables.$I$2];[Variables.$I$6];[.P492];[Variables.$I$6];[.Q492];[Variables.$I$6];[.R492];[Variables.$I$6];[.S492];[Variables.$I$6];[.T492];IF([.U492]&lt;&gt;&quot;&quot;;CONCATENATE([Variables.$I$6];[.U492]);&quot;&quot;);[Variables.$I$2];[Variables.$I$6]);IF([.B492]&lt;&gt;&quot;&quot;;CONCATENATE(&quot;#&quot;;[.B492]);&quot;&quot;))" office:value-type="string" office:string-value="[&quot;rhovanion_bandit&quot;,&quot;Rhovanion Bandit&quot;,&quot;Rhovanion Bandits&quot;,tf_evil_man| tfg_armor| tfg_boots,0,0,fac_outlaws,[itm_dun_helm_d_bad, itm_rhun_helm_round, itm_nomad_cap_b, itm_leather_steppe_cap_a, itm_dunland_tunic_1, itm_dunland_tunic_2, itm_dunland_fur_1,itm_dunland_fur_2, itm_rawhide_coat, itm_nomad_vest, itm_leather_boots_dark,itm_furry_boots,itm_shortened_spear, itm_dunnish_long_axe_bad, itm_dunnish_axe, itm_javelin, itm_orc_throwing_arrow, itm_orc_shield_a,itm_orc_shield_b,itm_orc_shield_c,itm_dale_horse,],attr_evil_tier_3,wp_tier_3,knows_common|knows_riding_3|knows_athletics_3|knows_power_strike_3|knows_ironflesh_3|knows_power_throw_1|knows_horse_archery_3,beorn_face1,beorn_face2]," calcext:value-type="string">
            <text:p>["rhovanion_bandit","Rhovanion Bandit","Rhovanion Bandits",tf_evil_man| tfg_armor| tfg_boots,0,0,fac_outlaws,[itm_dun_helm_d_bad, itm_rhun_helm_round, itm_nomad_cap_b, itm_leather_steppe_cap_a, itm_dunland_tunic_1, itm_dunland_tunic_2, itm_dunland_fur_1,itm_dunland_fur_2, itm_rawhide_coat, itm_nomad_vest, itm_leather_boots_dark,itm_furry_boots,itm_shortened_spear, itm_dunnish_long_axe_bad, itm_dunnish_axe, itm_javelin, itm_orc_throwing_arrow, itm_orc_shield_a,itm_orc_shield_b,itm_orc_shield_c,itm_dale_horse,],attr_evil_tier_3,wp_tier_3,knows_common|knows_riding_3|knows_athletics_3|knows_power_strike_3|knows_ironflesh_3|knows_power_throw_1|knows_horse_archery_3,beorn_face1,beorn_face2],</text:p>
          </table:table-cell>
          <table:table-cell table:style-name="ce7" office:value-type="string" calcext:value-type="string">
            <text:p>rhovanion_bandit</text:p>
          </table:table-cell>
          <table:table-cell table:style-name="ce7" office:value-type="string" calcext:value-type="string">
            <text:p>Rhovanion Bandit</text:p>
          </table:table-cell>
          <table:table-cell table:style-name="ce7" office:value-type="string" calcext:value-type="string">
            <text:p>Rhovanion Bandit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outlaws</text:p>
          </table:table-cell>
          <table:table-cell table:style-name="ce11" office:value-type="string" calcext:value-type="string">
            <text:p>itm_dun_helm_d_bad, itm_rhun_helm_round, itm_nomad_cap_b, itm_leather_steppe_cap_a, </text:p>
          </table:table-cell>
          <table:table-cell table:style-name="ce11" office:value-type="string" calcext:value-type="string">
            <text:p>itm_dunland_tunic_1, itm_dunland_tunic_2, itm_dunland_fur_1,itm_dunland_fur_2, itm_rawhide_coat, itm_nomad_vest, </text:p>
          </table:table-cell>
          <table:table-cell table:style-name="ce11"/>
          <table:table-cell table:style-name="ce19" office:value-type="string" calcext:value-type="string">
            <text:p>itm_leather_boots_dark,itm_furry_boots,</text:p>
          </table:table-cell>
          <table:table-cell table:style-name="ce19" office:value-type="string" calcext:value-type="string">
            <text:p>itm_shortened_spear, itm_dunnish_long_axe_bad, itm_dunnish_axe, </text:p>
          </table:table-cell>
          <table:table-cell table:style-name="ce11" office:value-type="string" calcext:value-type="string">
            <text:p>itm_javelin, itm_orc_throwing_arrow, </text:p>
          </table:table-cell>
          <table:table-cell table:style-name="ce11" office:value-type="string" calcext:value-type="string">
            <text:p>itm_orc_shield_a,itm_orc_shield_b,itm_orc_shield_c,itm_dale_horse,</text:p>
          </table:table-cell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riding_3|knows_athletics_3|knows_power_strike_3|knows_ironflesh_3|knows_power_throw_1|knows_horse_archery_3</text:p>
          </table:table-cell>
          <table:table-cell table:style-name="ce14" office:value-type="string" calcext:value-type="string">
            <text:p>beorn_face1</text:p>
          </table:table-cell>
          <table:table-cell table:style-name="ce14" office:value-type="string" calcext:value-type="string">
            <text:p>beorn_face2</text:p>
          </table:table-cell>
          <table:table-cell table:style-name="ce15"/>
          <table:table-cell table:style-name="ce32" table:formula="of:=IF(AND([.B492]&lt;&gt;&quot;&quot;;[.C492]&lt;&gt;&quot;&quot;);CONCATENATE([Variables.$I$1];[Variables.$I$7];[.B492];[Variables.$I$7];[Variables.$I$6];[Variables.$I$7];[.C492];[Variables.$I$7];[Variables.$I$6];[Variables.$I$7];[.D492];[Variables.$I$7];[Variables.$I$6];[.E492];[Variables.$I$6];[.F492];[Variables.$I$6];[.G492];[Variables.$I$6];[.H492];[Variables.$I$6];[Variables.$I$1];[.I492];[.J492];[.K492];[.L492];[.M492];[.N492];[.O492];[Variables.$I$2];[Variables.$I$6];[.P492];[Variables.$I$6];[.Q492];[Variables.$I$6];[.R492];[Variables.$I$6];[.S492];[Variables.$I$6];[.T492];IF([.U492]&lt;&gt;&quot;&quot;;CONCATENATE([Variables.$I$6];[.U492]);&quot;&quot;);[Variables.$I$2];[Variables.$I$6]);IF([.B492]&lt;&gt;&quot;&quot;;CONCATENATE(&quot;#&quot;;[.B492]);&quot;&quot;))" office:value-type="string" office:string-value="[&quot;rhovanion_bandit&quot;,&quot;Rhovanion Bandit&quot;,&quot;Rhovanion Bandits&quot;,tf_evil_man| tfg_armor| tfg_boots,0,0,fac_outlaws,[itm_dun_helm_d_bad, itm_rhun_helm_round, itm_nomad_cap_b, itm_leather_steppe_cap_a, itm_dunland_tunic_1, itm_dunland_tunic_2, itm_dunland_fur_1,itm_dunland_fur_2, itm_rawhide_coat, itm_nomad_vest, itm_leather_boots_dark,itm_furry_boots,itm_shortened_spear, itm_dunnish_long_axe_bad, itm_dunnish_axe, itm_javelin, itm_orc_throwing_arrow, itm_orc_shield_a,itm_orc_shield_b,itm_orc_shield_c,itm_dale_horse,],attr_evil_tier_3,wp_tier_3,knows_common|knows_riding_3|knows_athletics_3|knows_power_strike_3|knows_ironflesh_3|knows_power_throw_1|knows_horse_archery_3,beorn_face1,beorn_face2]," calcext:value-type="string">
            <text:p>["rhovanion_bandit","Rhovanion Bandit","Rhovanion Bandits",tf_evil_man| tfg_armor| tfg_boots,0,0,fac_outlaws,[itm_dun_helm_d_bad, itm_rhun_helm_round, itm_nomad_cap_b, itm_leather_steppe_cap_a, itm_dunland_tunic_1, itm_dunland_tunic_2, itm_dunland_fur_1,itm_dunland_fur_2, itm_rawhide_coat, itm_nomad_vest, itm_leather_boots_dark,itm_furry_boots,itm_shortened_spear, itm_dunnish_long_axe_bad, itm_dunnish_axe, itm_javelin, itm_orc_throwing_arrow, itm_orc_shield_a,itm_orc_shield_b,itm_orc_shield_c,itm_dale_horse,],attr_evil_tier_3,wp_tier_3,knows_common|knows_riding_3|knows_athletics_3|knows_power_strike_3|knows_ironflesh_3|knows_power_throw_1|knows_horse_archery_3,beorn_face1,beorn_face2],</text:p>
          </table:table-cell>
          <table:table-cell table:style-name="ce36" table:number-columns-repeated="43"/>
          <table:table-cell table:number-columns-repeated="16319"/>
        </table:table-row>
        <table:table-row table:style-name="ro1" table:number-rows-repeated="6">
          <table:table-cell table:number-columns-repeated="16384"/>
        </table:table-row>
        <table:table-row table:style-name="ro1" table:number-rows-repeated="543">
          <table:table-cell/>
          <table:table-cell table:style-name="ce6" table:number-columns-repeated="21"/>
          <table:table-cell table:number-columns-repeated="16362"/>
        </table:table-row>
        <table:table-row table:style-name="ro4" table:number-rows-repeated="1047465">
          <table:table-cell table:number-columns-repeated="16384"/>
        </table:table-row>
        <table:table-row table:style-name="ro5" table:number-rows-repeated="66">
          <table:table-cell table:number-columns-repeated="16384"/>
        </table:table-row>
        <table:table-row table:style-name="ro6" table:number-rows-repeated="3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Variables" table:style-name="ta1">
        <table:table-column table:style-name="co22" table:number-columns-repeated="64" table:default-cell-style-name="ce36"/>
        <table:table-column table:style-name="co23" table:number-columns-repeated="16320" table:default-cell-style-name="ce36"/>
        <table:table-row table:style-name="ro7">
          <table:table-cell table:number-columns-repeated="7"/>
          <table:table-cell table:style-name="ce69" office:value-type="string" calcext:value-type="string">
            <text:p>Char 1</text:p>
          </table:table-cell>
          <table:table-cell table:style-name="ce69" office:value-type="string" calcext:value-type="string">
            <text:p>[</text:p>
          </table:table-cell>
          <table:table-cell table:number-columns-repeated="16375"/>
        </table:table-row>
        <table:table-row table:style-name="ro7">
          <table:table-cell table:number-columns-repeated="7"/>
          <table:table-cell table:style-name="ce69" office:value-type="string" calcext:value-type="string">
            <text:p>Char 2</text:p>
          </table:table-cell>
          <table:table-cell table:style-name="ce69" office:value-type="string" calcext:value-type="string">
            <text:p>]</text:p>
          </table:table-cell>
          <table:table-cell table:number-columns-repeated="16375"/>
        </table:table-row>
        <table:table-row table:style-name="ro7">
          <table:table-cell table:number-columns-repeated="7"/>
          <table:table-cell table:style-name="ce69" office:value-type="string" calcext:value-type="string">
            <text:p>Char 3</text:p>
          </table:table-cell>
          <table:table-cell table:style-name="ce69" office:value-type="string" calcext:value-type="string">
            <text:p>(</text:p>
          </table:table-cell>
          <table:table-cell table:number-columns-repeated="16375"/>
        </table:table-row>
        <table:table-row table:style-name="ro7">
          <table:table-cell table:number-columns-repeated="7"/>
          <table:table-cell table:style-name="ce69" office:value-type="string" calcext:value-type="string">
            <text:p>Char 4</text:p>
          </table:table-cell>
          <table:table-cell table:style-name="ce69" office:value-type="string" calcext:value-type="string">
            <text:p>)</text:p>
          </table:table-cell>
          <table:table-cell table:number-columns-repeated="16375"/>
        </table:table-row>
        <table:table-row table:style-name="ro7">
          <table:table-cell table:number-columns-repeated="7"/>
          <table:table-cell table:style-name="ce69" office:value-type="string" calcext:value-type="string">
            <text:p>Char 5</text:p>
          </table:table-cell>
          <table:table-cell table:style-name="ce69" office:value-type="string" calcext:value-type="string">
            <text:p>|</text:p>
          </table:table-cell>
          <table:table-cell table:number-columns-repeated="16375"/>
        </table:table-row>
        <table:table-row table:style-name="ro7">
          <table:table-cell table:number-columns-repeated="7"/>
          <table:table-cell table:style-name="ce69" office:value-type="string" calcext:value-type="string">
            <text:p>Char 6</text:p>
          </table:table-cell>
          <table:table-cell table:style-name="ce69" office:value-type="string" calcext:value-type="string">
            <text:p>,</text:p>
          </table:table-cell>
          <table:table-cell table:number-columns-repeated="16375"/>
        </table:table-row>
        <table:table-row table:style-name="ro7">
          <table:table-cell table:number-columns-repeated="7"/>
          <table:table-cell table:style-name="ce69" office:value-type="string" calcext:value-type="string">
            <text:p>Char 7</text:p>
          </table:table-cell>
          <table:table-cell table:style-name="ce69" office:value-type="string" calcext:value-type="string">
            <text:p>"</text:p>
          </table:table-cell>
          <table:table-cell table:number-columns-repeated="16375"/>
        </table:table-row>
        <table:table-row table:style-name="ro4">
          <table:table-cell table:number-columns-repeated="16384"/>
        </table:table-row>
        <table:table-row table:style-name="ro8">
          <table:table-cell table:style-name="ce68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16383"/>
        </table:table-row>
        <table:table-row table:style-name="ro4" table:number-rows-repeated="1048566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mbria" svg:font-family="Cambria" style:font-family-generic="roman"/>
    <style:font-face style:name="Cambria1" svg:font-family="Cambria1"/>
    <style:font-face style:name="Cambria2" svg:font-family="Cambria2"/>
    <style:font-face style:name="Cambria3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30">00.00.0000</text:date>, <text:time style:data-style-name="N2" text:time-value="21:02:31.347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5.2$Windows_X86_64 LibreOffice_project/ca8fe7424262805f223b9a2334bc7181abbcbf5e</meta:generator>
    <meta:initial-creator/>
    <meta:creation-date>2018-01-09T20:56:58Z</meta:creation-date>
    <dc:date>2026-06-30T21:47:19.951000000</dc:date>
    <meta:editing-cycles>699</meta:editing-cycles>
    <meta:editing-duration>PT6H43M7S</meta:editing-duration>
    <meta:document-statistic meta:table-count="2" meta:cell-count="8378" meta:object-count="0"/>
  </office:meta>
</office:document-meta>
</file>